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eta.xml" manifest:media-type="text/xml"/>
  <manifest:file-entry manifest:full-path="Basic/Standard/script-lb.xml" manifest:media-type="text/xml"/>
  <manifest:file-entry manifest:full-path="Basic/VBAProject/DieseArbeitsmappe.xml" manifest:media-type="text/xml"/>
  <manifest:file-entry manifest:full-path="Basic/VBAProject/Tabelle1.xml" manifest:media-type="text/xml"/>
  <manifest:file-entry manifest:full-path="Basic/VBAProject/Modul1.xml" manifest:media-type="text/xml"/>
  <manifest:file-entry manifest:full-path="Basic/VBAProject/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84cm"/>
    </style:style>
    <style:style style:name="co2" style:family="table-column">
      <style:table-column-properties fo:break-before="auto" style:column-width="2.097cm"/>
    </style:style>
    <style:style style:name="co3" style:family="table-column">
      <style:table-column-properties fo:break-before="auto" style:column-width="0.199cm"/>
    </style:style>
    <style:style style:name="co4" style:family="table-column">
      <style:table-column-properties fo:break-before="auto" style:column-width="2.977cm"/>
    </style:style>
    <style:style style:name="co5" style:family="table-column">
      <style:table-column-properties fo:break-before="auto" style:column-width="2.09cm"/>
    </style:style>
    <style:style style:name="ro1" style:family="table-row">
      <style:table-row-properties style:row-height="0.552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87cm" fo:break-before="auto" style:use-optimal-row-height="true"/>
    </style:style>
    <style:style style:name="ta1" style:family="table" style:master-page-name="PageStyle_5f_Tabelle1">
      <style:table-properties table:display="true" style:writing-mode="lr-tb"/>
    </style: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number:boolean-style style:name="N99">
      <number:boolean/>
    </number:boolean-style>
    <style:style style:name="ce3" style:family="table-cell" style:parent-style-name="Default" style:data-style-name="N153">
      <style:table-cell-properties fo:border-bottom="0.74pt solid #808080" fo:background-color="#9bbb59"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accent3" loext:color-type="theme"/>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 style:family="table-cell" style:parent-style-name="Default" style:data-style-name="N153">
      <style:table-cell-properties style:rotation-align="none"/>
      <style:text-properties fo:color="#4f622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3" loext:color-type="theme">
          <loext:transformation loext:type="lummod" loext:value="5000"/>
        </loext:char-complex-color>
      </style:text-properties>
    </style:style>
    <style:style style:name="ce11" style:family="table-cell" style:parent-style-name="Default" style:data-style-name="N153">
      <style:table-cell-properties fo:border-bottom="0.74pt solid #808080" fo:background-color="#c0504d"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6"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end"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19" style:family="table-cell" style:parent-style-name="Default" style:data-style-name="N153">
      <style:table-cell-properties fo:border-bottom="none" fo:background-color="#4f81bd"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end"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15" style:family="table-cell" style:parent-style-name="Default">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0" style:family="table-cell" style:parent-style-name="Default" style:data-style-name="N99">
      <style:table-cell-properties fo:background-color="#c0504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4" style:family="table-cell" style:parent-style-name="Default" style:data-style-name="N99">
      <style:table-cell-properties fo:background-color="#4f81b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18"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1"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4"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25"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9" style:family="table-cell" style:parent-style-name="Default">
      <style:table-cell-properties fo:border-bottom="0.74pt solid #80808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style:table-cell-properties>
      <style:paragraph-properties fo:text-align="center" css3t:text-justify="auto" fo:margin-left="0cm" style:writing-mode="page"/>
      <style:text-properties style:font-name="Calibri" fo:font-size="11pt" style:font-size-asian="11pt" style:font-size-complex="11pt"/>
    </style:style>
    <style:style style:name="ce31"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32"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62" style:family="table-cell" style:parent-style-name="Default" style:data-style-name="N153">
      <style:table-cell-properties fo:background-color="#ffffff" style:cell-protect="none" style:print-content="true" style:diagonal-bl-tr="none" style:diagonal-tl-br="none" style:text-align-source="fix" style:repeat-content="false" fo:wrap-option="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4"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4" style:family="table-cell" style:parent-style-name="Default" style:data-style-name="N72">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36"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8"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9" style:family="table-cell" style:parent-style-name="Default" style:data-style-name="N72">
      <style:table-cell-properties fo:border-bottom="0.74pt solid #808080" fo:background-color="#a6a6a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1" style:family="table-cell" style:parent-style-name="Default">
      <style:table-cell-properties fo:border-bottom="none" fo:background-color="#ffffff" style:diagonal-bl-tr="none" style:diagonal-tl-br="none" fo:border-left="none" fo:border-right="none" style:rotation-align="none" fo:border-top="0.74pt solid #808080">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42" style:family="table-cell" style:parent-style-name="Default">
      <style:table-cell-properties fo:background-color="#ffffff" style:diagonal-bl-tr="none" style:diagonal-tl-br="none" fo:border="none" style:rotation-align="none"/>
      <style:text-properties style:font-name="Calibri" fo:font-size="11pt" style:font-size-asian="11pt" style:font-size-complex="11pt"/>
    </style:style>
    <style:style style:name="ce43" style:family="table-cell" style:parent-style-name="Default">
      <style:table-cell-properties fo:border-bottom="0.74pt solid #808080" fo:background-color="#ffffff"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style:font-name="Calibri" fo:font-size="11pt" style:font-size-asian="11pt" style:font-size-complex="11pt"/>
    </style:style>
    <style:style style:name="ce51" style:family="table-cell" style:parent-style-name="Default">
      <style:table-cell-properties fo:background-color="#ffffff" style:rotation-align="none"/>
      <style:text-properties style:font-name="Calibri" fo:font-size="11pt" style:font-size-asian="11pt" style:font-size-complex="11pt"/>
    </style:style>
    <style:style style:name="ce53" style:family="table-cell" style:parent-style-name="Default">
      <style:text-properties style:font-name="Calibri" fo:font-size="11pt" style:font-size-asian="11pt" style:font-size-complex="11pt"/>
    </style:style>
    <style:style style:name="ce58"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middle" loext:vertical-justify="auto">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9"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bottom="0.74pt solid #808080" fo:background-color="#ffc000"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72" style:family="table-cell" style:parent-style-name="Default" style:data-style-name="N153">
      <style:table-cell-properties fo:background-color="#a6a6a6" style:diagonal-bl-tr="none" style:diagonal-tl-br="none" style:text-align-source="fix" style:repeat-content="false" fo:wrap-option="no-wrap" fo:border="0.74pt solid #808080" style:direction="ltr" style:rotation-angle="0" style:rotation-align="none" style:shrink-to-fit="fals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76" style:family="table-cell" style:parent-style-name="Default">
      <style:table-cell-properties fo:border-bottom="none" fo:background-color="#ffffff" style:diagonal-bl-tr="none" style:diagonal-tl-br="none" fo:border-left="none" fo:border-right="0.74pt solid #808080" style:rotation-align="none" fo:border-top="0.74pt solid #808080">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80" style:family="table-cell" style:parent-style-name="Default">
      <style:table-cell-properties fo:border-bottom="none" fo:background-color="#ffffff" style:diagonal-bl-tr="none" style:diagonal-tl-br="none" fo:border-left="none" fo:border-right="0.74pt solid #808080" style:rotation-align="none" fo:border-top="none">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4" style:family="table-cell" style:parent-style-name="Default">
      <style:table-cell-properties fo:border-bottom="0.74pt solid #808080" fo:background-color="#ffffff" style:diagonal-bl-tr="none" style:diagonal-tl-br="none" fo:border-left="none" fo:border-right="0.74pt solid #808080" style:rotation-align="none" fo:border-top="none">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8" style:family="table-cell" style:parent-style-name="Default">
      <style:table-cell-properties fo:background-color="#ffffff"/>
      <style:text-properties style:font-name="Calibri" fo:font-size="11pt" style:font-size-asian="11pt" style:font-size-complex="11pt"/>
    </style:style>
    <style:style style:name="ce89" style:family="table-cell" style:parent-style-name="Default">
      <style:table-cell-properties fo:background-color="transparent"/>
      <style:text-properties style:font-name="Calibri" fo:font-size="11pt" style:font-size-asian="11pt" style:font-size-complex="11pt"/>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left"/>
      <style:text-properties fo:font-size="18pt"/>
    </style:style>
    <style:style style:name="gr2" style:family="graphic" style:parent-style-name="Default">
      <style:graphic-properties draw:textarea-vertical-align="middle" fo:background-color="#c0504d" loext:decorative="false"/>
      <style:text-properties fo:color="#000000" style:text-line-through-style="none" style:text-line-through-type="none" fo:font-family="Tahoma" fo:font-size="8pt" fo:font-style="normal" style:text-underline-style="none" fo:font-weight="normal"/>
    </style:style>
    <style:style style:name="gr3"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gr4" style:family="graphic" style:parent-style-name="Default">
      <style:graphic-properties draw:textarea-vertical-align="middle" fo:background-color="#4f81bd" loext:decorative="false"/>
      <style:text-properties fo:color="#000000" style:text-line-through-style="none" style:text-line-through-type="none" fo:font-family="Tahoma" fo:font-size="8pt" fo:font-style="normal" style:text-underline-style="none" fo:font-weight="normal"/>
    </style:style>
    <style:style style:name="P1" style:family="paragraph">
      <loext:graphic-properties draw:fill="none"/>
      <style:paragraph-properties fo:text-align="left"/>
      <style:text-properties fo:font-size="18pt"/>
    </style:style>
    <style:style style:name="P2" style:family="paragraph">
      <style:paragraph-properties fo:text-align="left"/>
      <style:text-properties fo:color="#000000" style:text-line-through-style="none" style:text-line-through-type="none" fo:font-family="Tahoma" fo:font-size="8pt" fo:font-style="normal" style:text-underline-style="none" fo:font-weight="normal"/>
    </style:style>
    <style:style style:name="P3"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Tabelle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Open Fil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Open_File?language=Basic&amp;location=document" xlink:type="simple"/>
              </office:event-listeners>
            </form:button>
            <form:checkbox form:name="Check Box 3" form:control-implementation="ooo:com.sun.star.form.component.CheckBox" xml:id="control2" form:id="control2" form:label="   CH1" form:visual-effect="flat" form:input-required="false" form:linked-cell="Tabelle1.E2"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checkbox form:name="Check Box 4" form:control-implementation="ooo:com.sun.star.form.component.CheckBox" xml:id="control3" form:id="control3" form:label="   CH2" form:visual-effect="flat" form:input-required="false" form:linked-cell="Tabelle1.E3" form: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button form:name="Button 2" form:control-implementation="ooo:com.sun.star.form.component.CommandButton" xml:id="control4" form:id="control4" form:label="Export CSV"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Export_CSV?language=Basic&amp;location=document" xlink:type="simple"/>
              </office:event-listeners>
            </form:button>
          </form:form>
        </office:forms>
        <table:shapes>
          <draw:frame draw:z-index="0" draw:name="Diagramm 1" draw:style-name="gr1" draw:text-style-name="P1" svg:width="25.855cm" svg:height="16.35cm" svg:x="6.451cm" svg:y="2.354cm">
            <draw:object draw:notify-on-update-of-ranges="Tabelle1.A2:Tabelle1.A1501 Tabelle1.B1:Tabelle1.B1 Tabelle1.B2:Tabelle1.B1501 Tabelle1.A2:Tabelle1.A1501 Tabelle1.C1:Tabelle1.C1 Tabelle1.C2:Tabelle1.C1501" xlink:href="./Object 1" xlink:type="simple" xlink:show="embed" xlink:actuate="onLoad">
              <loext:p/>
            </draw:object>
            <draw:image xlink:href="./ObjectReplacements/Object 1" xlink:type="simple" xlink:show="embed" xlink:actuate="onLoad"/>
          </draw:frame>
        </table:shapes>
        <table:table-column table:style-name="co1" table:default-cell-style-name="ce4"/>
        <table:table-column table:style-name="co2" table:default-cell-style-name="ce6"/>
        <table:table-column table:style-name="co2" table:default-cell-style-name="ce8"/>
        <table:table-column table:style-name="co3" table:default-cell-style-name="ce14"/>
        <table:table-column table:style-name="co2" table:number-columns-repeated="9" table:default-cell-style-name="ce14"/>
        <table:table-column table:style-name="co2" table:number-columns-repeated="2" table:default-cell-style-name="ce53"/>
        <table:table-column table:style-name="co4" table:default-cell-style-name="ce53"/>
        <table:table-column table:style-name="co5" table:default-cell-style-name="ce89"/>
        <table:table-column table:style-name="co5" table:number-columns-repeated="16367"/>
        <table:table-row table:style-name="ro1">
          <table:table-cell table:style-name="ce3" office:value-type="string" calcext:value-type="string">
            <text:p>TIME</text:p>
          </table:table-cell>
          <table:table-cell table:style-name="ce11" office:value-type="string" calcext:value-type="string">
            <text:p>CH1</text:p>
          </table:table-cell>
          <table:table-cell table:style-name="ce19" office:value-type="string" calcext:value-type="string">
            <text:p>CH2</text:p>
          </table:table-cell>
          <table:table-cell table:style-name="ce27" table:number-columns-spanned="1" table:number-rows-spanned="35"/>
          <table:table-cell table:style-name="ce15"/>
          <table:table-cell table:style-name="ce15" office:value-type="string" calcext:value-type="string">
            <text:p>PROBE X</text:p>
          </table:table-cell>
          <table:table-cell table:style-name="ce15" office:value-type="string" calcext:value-type="string">
            <text:p>V/DIV</text:p>
          </table:table-cell>
          <table:table-cell table:style-name="ce15" office:value-type="string" calcext:value-type="string">
            <text:p>T/DIV</text:p>
          </table:table-cell>
          <table:table-cell table:style-name="ce15" office:value-type="string" calcext:value-type="string">
            <text:p>V_MIN</text:p>
          </table:table-cell>
          <table:table-cell table:style-name="ce15" office:value-type="string" calcext:value-type="string">
            <text:p>V_MAX</text:p>
          </table:table-cell>
          <table:table-cell table:style-name="ce15" office:value-type="string" calcext:value-type="string">
            <text:p>V_AVG</text:p>
          </table:table-cell>
          <table:table-cell table:style-name="ce15"/>
          <table:table-cell table:style-name="ce64" office:value-type="string" calcext:value-type="string">
            <text:p>V1.20</text:p>
          </table:table-cell>
          <table:table-cell table:style-name="ce39" table:formula="of:=NOW()" office:value-type="date" office:date-value="2026-05-23T21:44:55.93054" calcext:value-type="date" table:number-columns-spanned="2" table:number-rows-spanned="1">
            <text:p>23.05.2026 21:44</text:p>
          </table:table-cell>
          <table:covered-table-cell table:style-name="ce39"/>
          <table:table-cell table:style-name="ce69" office:value-type="string" calcext:value-type="string">
            <text:p>FNIRSI 1013D</text:p>
          </table:table-cell>
          <table:table-cell table:style-name="ce87"/>
          <table:table-cell table:style-name="ce53" table:number-columns-repeated="16367"/>
        </table:table-row>
        <table:table-row table:style-name="ro2">
          <table:table-cell office:value-type="float" office:value="0" calcext:value-type="float">
            <text:p>0,00E+0</text:p>
          </table:table-cell>
          <table:table-cell office:value-type="float" office:value="0.0150000005960464" calcext:value-type="float">
            <text:p>1,50E-2</text:p>
          </table:table-cell>
          <table:table-cell office:value-type="string" calcext:value-type="string">
            <text:p><text:s/></text:p>
          </table:table-cell>
          <table:covered-table-cell table:style-name="ce10"/>
          <table:table-cell table:style-name="ce40" office:value-type="boolean" office:boolean-value="true" calcext:value-type="boolean">
            <text:p>WAHR</text:p>
            <draw:control table:end-cell-address="Tabelle1.E2" table:end-x="2.098cm" table:end-y="0.709cm" draw:z-index="2" draw:style-name="gr2" draw:text-style-name="P2" svg:width="2.098cm" svg:height="0.68cm" svg:x="0cm" svg:y="0.029cm" draw:control="control2"/>
          </table:table-cell>
          <table:table-cell table:style-name="ce24" office:value-type="float" office:value="1" calcext:value-type="float">
            <text:p>1</text:p>
          </table:table-cell>
          <table:table-cell table:style-name="ce31" office:value-type="float" office:value="0.0500000007450581" calcext:value-type="float">
            <text:p>5,00E-2</text:p>
          </table:table-cell>
          <table:table-cell table:style-name="ce31" office:value-type="float" office:value="0.000199999994947575" calcext:value-type="float">
            <text:p>2,00E-4</text:p>
          </table:table-cell>
          <table:table-cell table:style-name="ce31" table:formula="of:=MIN([.B2:.B1501])" office:value-type="float" office:value="-0.203999996185303" calcext:value-type="float">
            <text:p>-2,04E-1</text:p>
          </table:table-cell>
          <table:table-cell table:style-name="ce31" table:formula="of:=MAX([.B2:.B1501])" office:value-type="float" office:value="0.196999996900558" calcext:value-type="float">
            <text:p>1,97E-1</text:p>
          </table:table-cell>
          <table:table-cell table:style-name="ce31" table:formula="of:=AVERAGE([.B2:.B1501])" office:value-type="float" office:value="-0.00444399990762273" calcext:value-type="float">
            <text:p>-4,44E-3</text:p>
          </table:table-cell>
          <table:table-cell table:style-name="ce62" office:value-type="string" calcext:value-type="string" table:number-columns-spanned="4" table:number-rows-spanned="2">
            <text:p>D:\Documents\ELEKTRONIK\FNIRSI-1013D\1013d_orig_data\3_Tri_1Khz_0,4Vss.wav</text:p>
          </table:table-cell>
          <table:covered-table-cell table:number-columns-repeated="2" table:style-name="ce36"/>
          <table:covered-table-cell table:style-name="ce58"/>
          <table:table-cell table:style-name="ce72" table:number-columns-spanned="1" table:number-rows-spanned="2">
            <draw:control draw:z-index="1" draw:style-name="gr3" draw:text-style-name="P3" svg:width="2.381cm" svg:height="0.661cm" svg:x="0.291cm" svg:y="0.077cm" draw:control="control1"/>
          </table:table-cell>
          <table:table-cell table:style-name="ce51"/>
          <table:table-cell table:style-name="ce53" table:number-columns-repeated="16367"/>
        </table:table-row>
        <table:table-row table:style-name="ro2">
          <table:table-cell office:value-type="float" office:value="0.0000039999998989515" calcext:value-type="float">
            <text:p>4,00E-6</text:p>
          </table:table-cell>
          <table:table-cell office:value-type="float" office:value="0.0150000005960464" calcext:value-type="float">
            <text:p>1,50E-2</text:p>
          </table:table-cell>
          <table:table-cell/>
          <table:covered-table-cell table:style-name="ce10"/>
          <table:table-cell table:style-name="ce44" office:value-type="boolean" office:boolean-value="false" calcext:value-type="boolean">
            <text:p>FALSCH</text:p>
            <draw:control table:end-cell-address="Tabelle1.E3" table:end-x="2.098cm" table:end-y="0.709cm" draw:z-index="3" draw:style-name="gr4" draw:text-style-name="P2" svg:width="2.098cm" svg:height="0.68cm" svg:x="0cm" svg:y="0.029cm" draw:control="control3"/>
          </table:table-cell>
          <table:table-cell table:style-name="ce25" office:value-type="float" office:value="1" calcext:value-type="float">
            <text:p>1</text:p>
          </table:table-cell>
          <table:table-cell table:style-name="ce32" office:value-type="float" office:value="5" calcext:value-type="float">
            <text:p>5,00E+0</text:p>
          </table:table-cell>
          <table:table-cell table:style-name="ce32" office:value-type="float" office:value="0.000199999994947575" calcext:value-type="float">
            <text:p>2,00E-4</text:p>
          </table:table-cell>
          <table:table-cell table:style-name="ce32" table:formula="of:=MIN([.C2:.C1501])" office:value-type="float" office:value="0" calcext:value-type="float">
            <text:p>0,00E+0</text:p>
          </table:table-cell>
          <table:table-cell table:style-name="ce32" table:formula="of:=MAX([.C2:.C1501])" office:value-type="float" office:value="0" calcext:value-type="float">
            <text:p>0,00E+0</text:p>
          </table:table-cell>
          <table:table-cell table:style-name="ce32" table:formula="of:=AVERAGE([.C2:.C1501])" office:value-type="string" office:string-value="" calcext:value-type="error">
            <text:p>#DIV/0!</text:p>
          </table:table-cell>
          <table:covered-table-cell table:style-name="ce34"/>
          <table:covered-table-cell table:number-columns-repeated="2" table:style-name="ce38"/>
          <table:covered-table-cell table:style-name="ce59"/>
          <table:covered-table-cell table:style-name="ce31">
            <draw:control draw:z-index="4" draw:style-name="gr3" draw:text-style-name="P3" svg:width="2.381cm" svg:height="0.661cm" svg:x="0.285cm" svg:y="0.006cm" draw:control="control4"/>
          </table:covered-table-cell>
          <table:table-cell table:style-name="ce88"/>
          <table:table-cell table:style-name="ce53" table:number-columns-repeated="16367"/>
        </table:table-row>
        <table:table-row table:style-name="ro3">
          <table:table-cell office:value-type="float" office:value="0.000007999999797903" calcext:value-type="float">
            <text:p>8,00E-6</text:p>
          </table:table-cell>
          <table:table-cell office:value-type="float" office:value="0.0199999995529652" calcext:value-type="float">
            <text:p>2,00E-2</text:p>
          </table:table-cell>
          <table:table-cell/>
          <table:covered-table-cell table:style-name="ce10"/>
          <table:table-cell table:style-name="ce17"/>
          <table:table-cell table:style-name="ce26" table:number-columns-repeated="8"/>
          <table:table-cell table:style-name="ce41" table:number-columns-repeated="2"/>
          <table:table-cell table:style-name="ce76"/>
          <table:table-cell table:style-name="ce51"/>
          <table:table-cell table:style-name="ce53" table:number-columns-repeated="16367"/>
        </table:table-row>
        <table:table-row table:style-name="ro3">
          <table:table-cell office:value-type="float" office:value="0.0000119999996968545" calcext:value-type="float">
            <text:p>1,20E-5</text:p>
          </table:table-cell>
          <table:table-cell office:value-type="float" office:value="0.0240000002086163" calcext:value-type="float">
            <text:p>2,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5999999595806" calcext:value-type="float">
            <text:p>1,60E-5</text:p>
          </table:table-cell>
          <table:table-cell office:value-type="float" office:value="0.0320000015199184" calcext:value-type="float">
            <text:p>3,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99999994947575" calcext:value-type="float">
            <text:p>2,00E-5</text:p>
          </table:table-cell>
          <table:table-cell office:value-type="float" office:value="0.0360000021755695" calcext:value-type="float">
            <text:p>3,6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3999999393709" calcext:value-type="float">
            <text:p>2,40E-5</text:p>
          </table:table-cell>
          <table:table-cell office:value-type="float" office:value="0.0399999991059303" calcext:value-type="float">
            <text:p>4,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79999992926605" calcext:value-type="float">
            <text:p>2,80E-5</text:p>
          </table:table-cell>
          <table:table-cell office:value-type="float" office:value="0.046000000089407" calcext:value-type="float">
            <text:p>4,6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1999999191612" calcext:value-type="float">
            <text:p>3,20E-5</text:p>
          </table:table-cell>
          <table:table-cell office:value-type="float" office:value="0.0500000007450581" calcext:value-type="float">
            <text:p>5,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59999990905635" calcext:value-type="float">
            <text:p>3,60E-5</text:p>
          </table:table-cell>
          <table:table-cell office:value-type="float" office:value="0.0540000014007092" calcext:value-type="float">
            <text:p>5,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9999998989515" calcext:value-type="float">
            <text:p>4,00E-5</text:p>
          </table:table-cell>
          <table:table-cell office:value-type="float" office:value="0.0620000027120113" calcext:value-type="float">
            <text:p>6,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39999988884665" calcext:value-type="float">
            <text:p>4,40E-5</text:p>
          </table:table-cell>
          <table:table-cell office:value-type="float" office:value="0.0649999976158142" calcext:value-type="float">
            <text:p>6,5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7999998787418" calcext:value-type="float">
            <text:p>4,80E-5</text:p>
          </table:table-cell>
          <table:table-cell office:value-type="float" office:value="0.068000003695488" calcext:value-type="float">
            <text:p>6,8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19999986863695" calcext:value-type="float">
            <text:p>5,20E-5</text:p>
          </table:table-cell>
          <table:table-cell office:value-type="float" office:value="0.0720000043511391" calcext:value-type="float">
            <text:p>7,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5999998585321" calcext:value-type="float">
            <text:p>5,60E-5</text:p>
          </table:table-cell>
          <table:table-cell office:value-type="float" office:value="0.0799999982118607" calcext:value-type="float">
            <text:p>8,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99999984842725" calcext:value-type="float">
            <text:p>6,00E-5</text:p>
          </table:table-cell>
          <table:table-cell office:value-type="float" office:value="0.0839999988675118" calcext:value-type="float">
            <text:p>8,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3999998383224" calcext:value-type="float">
            <text:p>6,40E-5</text:p>
          </table:table-cell>
          <table:table-cell office:value-type="float" office:value="0.0870000049471855" calcext:value-type="float">
            <text:p>8,7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79999982821755" calcext:value-type="float">
            <text:p>6,80E-5</text:p>
          </table:table-cell>
          <table:table-cell office:value-type="float" office:value="0.0920000001788139" calcext:value-type="float">
            <text:p>9,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1999998181127" calcext:value-type="float">
            <text:p>7,20E-5</text:p>
          </table:table-cell>
          <table:table-cell office:value-type="float" office:value="0.0980000048875809" calcext:value-type="float">
            <text:p>9,8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59999980800785" calcext:value-type="float">
            <text:p>7,60E-5</text:p>
          </table:table-cell>
          <table:table-cell office:value-type="float" office:value="0.101999998092651" calcext:value-type="float">
            <text:p>1,0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999999797903" calcext:value-type="float">
            <text:p>8,00E-5</text:p>
          </table:table-cell>
          <table:table-cell office:value-type="float" office:value="0.108000002801418" calcext:value-type="float">
            <text:p>1,08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839999978779815" calcext:value-type="float">
            <text:p>8,40E-5</text:p>
          </table:table-cell>
          <table:table-cell office:value-type="float" office:value="0.109999999403954" calcext:value-type="float">
            <text:p>1,10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87999997776933" calcext:value-type="float">
            <text:p>8,80E-5</text:p>
          </table:table-cell>
          <table:table-cell office:value-type="float" office:value="0.11600000411272" calcext:value-type="float">
            <text:p>1,1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19999976758845" calcext:value-type="float">
            <text:p>9,20E-5</text:p>
          </table:table-cell>
          <table:table-cell office:value-type="float" office:value="0.124000005424023" calcext:value-type="float">
            <text:p>1,24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5999997574836" calcext:value-type="float">
            <text:p>9,60E-5</text:p>
          </table:table-cell>
          <table:table-cell office:value-type="float" office:value="0.126000002026558" calcext:value-type="float">
            <text:p>1,2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99999974737875" calcext:value-type="float">
            <text:p>1,00E-4</text:p>
          </table:table-cell>
          <table:table-cell office:value-type="float" office:value="0.133000001311302" calcext:value-type="float">
            <text:p>1,33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03999997372739" calcext:value-type="float">
            <text:p>1,04E-4</text:p>
          </table:table-cell>
          <table:table-cell office:value-type="float" office:value="0.137999996542931" calcext:value-type="float">
            <text:p>1,38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07999997271691" calcext:value-type="float">
            <text:p>1,08E-4</text:p>
          </table:table-cell>
          <table:table-cell office:value-type="float" office:value="0.142000004649162" calcext:value-type="float">
            <text:p>1,4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1999997170642" calcext:value-type="float">
            <text:p>1,12E-4</text:p>
          </table:table-cell>
          <table:table-cell office:value-type="float" office:value="0.145999997854233" calcext:value-type="float">
            <text:p>1,4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5999997069594" calcext:value-type="float">
            <text:p>1,16E-4</text:p>
          </table:table-cell>
          <table:table-cell office:value-type="float" office:value="0.151999995112419" calcext:value-type="float">
            <text:p>1,5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9999996968545" calcext:value-type="float">
            <text:p>1,20E-4</text:p>
          </table:table-cell>
          <table:table-cell office:value-type="float" office:value="0.157000005245209" calcext:value-type="float">
            <text:p>1,57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23999996867497" calcext:value-type="float">
            <text:p>1,24E-4</text:p>
          </table:table-cell>
          <table:table-cell office:value-type="float" office:value="0.162000000476837" calcext:value-type="float">
            <text:p>1,6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27999996766448" calcext:value-type="float">
            <text:p>1,28E-4</text:p>
          </table:table-cell>
          <table:table-cell office:value-type="float" office:value="0.166000008583069" calcext:value-type="float">
            <text:p>1,6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319999966654" calcext:value-type="float">
            <text:p>1,32E-4</text:p>
          </table:table-cell>
          <table:table-cell office:value-type="float" office:value="0.170000001788139" calcext:value-type="float">
            <text:p>1,70E-1</text:p>
          </table:table-cell>
          <table:table-cell/>
          <table:covered-table-cell table:style-name="ce10"/>
          <table:table-cell table:style-name="ce21"/>
          <table:table-cell table:style-name="ce29" table:number-columns-repeated="8"/>
          <table:table-cell table:style-name="ce43" table:number-columns-repeated="2"/>
          <table:table-cell table:style-name="ce84"/>
          <table:table-cell table:style-name="ce51"/>
          <table:table-cell table:style-name="ce53" table:number-columns-repeated="16367"/>
        </table:table-row>
        <table:table-row table:style-name="ro4">
          <table:table-cell office:value-type="float" office:value="0.000135999996564351" calcext:value-type="float">
            <text:p>1,36E-4</text:p>
          </table:table-cell>
          <table:table-cell office:value-type="float" office:value="0.177000001072884" calcext:value-type="float">
            <text:p>1,77E-1</text:p>
          </table:table-cell>
          <table:table-cell/>
          <table:table-cell table:style-name="ce13" table:number-columns-repeated="9"/>
          <table:table-cell table:style-name="ce22"/>
          <table:table-cell table:style-name="ce51" table:number-columns-repeated="4"/>
          <table:table-cell table:style-name="ce53" table:number-columns-repeated="16367"/>
        </table:table-row>
        <table:table-row table:style-name="ro4">
          <table:table-cell office:value-type="float" office:value="0.000139999996463303" calcext:value-type="float">
            <text:p>1,40E-4</text:p>
          </table:table-cell>
          <table:table-cell office:value-type="float" office:value="0.181999996304512" calcext:value-type="float">
            <text:p>1,82E-1</text:p>
          </table:table-cell>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143999996362254" calcext:value-type="float">
            <text:p>1,44E-4</text:p>
          </table:table-cell>
          <table:table-cell office:value-type="float" office:value="0.186000004410744" calcext:value-type="float">
            <text:p>1,86E-1</text:p>
          </table:table-cell>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147999996261206" calcext:value-type="float">
            <text:p>1,48E-4</text:p>
          </table:table-cell>
          <table:table-cell office:value-type="float" office:value="0.189999997615814" calcext:value-type="float">
            <text:p>1,90E-1</text:p>
          </table:table-cell>
          <table:table-cell/>
          <table:table-cell table:style-name="ce13"/>
          <table:table-cell table:style-name="ce23"/>
          <table:table-cell table:style-name="ce22" table:number-columns-repeated="12"/>
          <table:table-cell table:style-name="ce53" table:number-columns-repeated="16367"/>
        </table:table-row>
        <table:table-row table:style-name="ro4">
          <table:table-cell office:value-type="float" office:value="0.000151999996160157" calcext:value-type="float">
            <text:p>1,52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155999996059109" calcext:value-type="float">
            <text:p>1,5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5999999595806" calcext:value-type="float">
            <text:p>1,6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63999995857012" calcext:value-type="float">
            <text:p>1,6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67999995755963" calcext:value-type="float">
            <text:p>1,6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1999995654915" calcext:value-type="float">
            <text:p>1,7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5999995553866" calcext:value-type="float">
            <text:p>1,7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9999995452818" calcext:value-type="float">
            <text:p>1,8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83999995351769" calcext:value-type="float">
            <text:p>1,8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87999995250721" calcext:value-type="float">
            <text:p>1,8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1999995149672" calcext:value-type="float">
            <text:p>1,9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5999995048624" calcext:value-type="float">
            <text:p>1,9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9999994947575" calcext:value-type="float">
            <text:p>2,0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03999994846527" calcext:value-type="float">
            <text:p>2,0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07999994745478" calcext:value-type="float">
            <text:p>2,0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199999464443" calcext:value-type="float">
            <text:p>2,1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5999994543381" calcext:value-type="float">
            <text:p>2,1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9999994442333" calcext:value-type="float">
            <text:p>2,2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23999994341284" calcext:value-type="float">
            <text:p>2,2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27999994240236" calcext:value-type="float">
            <text:p>2,2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1999994139187" calcext:value-type="float">
            <text:p>2,3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5999994038139" calcext:value-type="float">
            <text:p>2,3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999999393709" calcext:value-type="float">
            <text:p>2,4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43999993836042" calcext:value-type="float">
            <text:p>2,4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47999993734993" calcext:value-type="float">
            <text:p>2,4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1999993633945" calcext:value-type="float">
            <text:p>2,5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5999993532896" calcext:value-type="float">
            <text:p>2,5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9999993431848" calcext:value-type="float">
            <text:p>2,6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63999993330799" calcext:value-type="float">
            <text:p>2,6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67999993229751" calcext:value-type="float">
            <text:p>2,6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1999993128702" calcext:value-type="float">
            <text:p>2,7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5999993027654" calcext:value-type="float">
            <text:p>2,7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9999992926605" calcext:value-type="float">
            <text:p>2,8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83999992825557" calcext:value-type="float">
            <text:p>2,8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87999992724508" calcext:value-type="float">
            <text:p>2,8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199999262346" calcext:value-type="float">
            <text:p>2,9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5999992522411" calcext:value-type="float">
            <text:p>2,9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9999992421363" calcext:value-type="float">
            <text:p>3,0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03999992320314" calcext:value-type="float">
            <text:p>3,0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07999992219266" calcext:value-type="float">
            <text:p>3,0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1999992118217" calcext:value-type="float">
            <text:p>3,1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5999992017169" calcext:value-type="float">
            <text:p>3,1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999999191612" calcext:value-type="float">
            <text:p>3,2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23999991815072" calcext:value-type="float">
            <text:p>3,24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327999991714023" calcext:value-type="float">
            <text:p>3,28E-4</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0331999991612975" calcext:value-type="float">
            <text:p>3,32E-4</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0335999991511926" calcext:value-type="float">
            <text:p>3,36E-4</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0339999991410878" calcext:value-type="float">
            <text:p>3,40E-4</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0343999991309829" calcext:value-type="float">
            <text:p>3,44E-4</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0347999991208781" calcext:value-type="float">
            <text:p>3,48E-4</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0351999991107732" calcext:value-type="float">
            <text:p>3,52E-4</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0355999991006684" calcext:value-type="float">
            <text:p>3,56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359999990905635" calcext:value-type="float">
            <text:p>3,60E-4</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0363999990804587" calcext:value-type="float">
            <text:p>3,64E-4</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0367999990703538" calcext:value-type="float">
            <text:p>3,68E-4</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037199999060249" calcext:value-type="float">
            <text:p>3,72E-4</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0375999990501441" calcext:value-type="float">
            <text:p>3,76E-4</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0379999990400393" calcext:value-type="float">
            <text:p>3,80E-4</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0383999990299344" calcext:value-type="float">
            <text:p>3,84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387999990198296" calcext:value-type="float">
            <text:p>3,88E-4</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0391999990097247" calcext:value-type="float">
            <text:p>3,92E-4</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0395999989996199" calcext:value-type="float">
            <text:p>3,96E-4</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039999998989515" calcext:value-type="float">
            <text:p>4,00E-4</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0403999989794102" calcext:value-type="float">
            <text:p>4,04E-4</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0407999989693053" calcext:value-type="float">
            <text:p>4,08E-4</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0411999989592005" calcext:value-type="float">
            <text:p>4,12E-4</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0415999989490956" calcext:value-type="float">
            <text:p>4,16E-4</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0419999989389908" calcext:value-type="float">
            <text:p>4,20E-4</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0423999989288859" calcext:value-type="float">
            <text:p>4,24E-4</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0427999989187811" calcext:value-type="float">
            <text:p>4,28E-4</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0431999989086762" calcext:value-type="float">
            <text:p>4,32E-4</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0435999988985714" calcext:value-type="float">
            <text:p>4,36E-4</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0439999988884665" calcext:value-type="float">
            <text:p>4,40E-4</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0443999988783617" calcext:value-type="float">
            <text:p>4,44E-4</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0447999988682568" calcext:value-type="float">
            <text:p>4,48E-4</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045199998858152" calcext:value-type="float">
            <text:p>4,52E-4</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0455999988480471" calcext:value-type="float">
            <text:p>4,56E-4</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0459999988379423" calcext:value-type="float">
            <text:p>4,60E-4</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0463999988278374" calcext:value-type="float">
            <text:p>4,64E-4</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0467999988177326" calcext:value-type="float">
            <text:p>4,68E-4</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0471999988076277" calcext:value-type="float">
            <text:p>4,72E-4</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0475999987975229" calcext:value-type="float">
            <text:p>4,76E-4</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047999998787418" calcext:value-type="float">
            <text:p>4,80E-4</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0483999987773132" calcext:value-type="float">
            <text:p>4,84E-4</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0487999987672083" calcext:value-type="float">
            <text:p>4,88E-4</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0491999987571035" calcext:value-type="float">
            <text:p>4,92E-4</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0495999987469986" calcext:value-type="float">
            <text:p>4,96E-4</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0499999987368938" calcext:value-type="float">
            <text:p>5,00E-4</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0503999987267889" calcext:value-type="float">
            <text:p>5,04E-4</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0507999987166841" calcext:value-type="float">
            <text:p>5,08E-4</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0511999987065792" calcext:value-type="float">
            <text:p>5,12E-4</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0515999986964744" calcext:value-type="float">
            <text:p>5,16E-4</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0519999986863695" calcext:value-type="float">
            <text:p>5,20E-4</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0523999986762647" calcext:value-type="float">
            <text:p>5,24E-4</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0527999986661598" calcext:value-type="float">
            <text:p>5,28E-4</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053199998656055" calcext:value-type="float">
            <text:p>5,32E-4</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0535999986459501" calcext:value-type="float">
            <text:p>5,36E-4</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0539999986358453" calcext:value-type="float">
            <text:p>5,40E-4</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0543999986257404" calcext:value-type="float">
            <text:p>5,44E-4</text:p>
          </table:table-cell>
          <table:table-cell office:value-type="float" office:value="-0.0729999989271164" calcext:value-type="float">
            <text:p>-7,30E-2</text:p>
          </table:table-cell>
          <table:table-cell table:number-columns-repeated="15"/>
          <table:table-cell table:style-name="ce53" table:number-columns-repeated="16367"/>
        </table:table-row>
        <table:table-row table:style-name="ro4">
          <table:table-cell office:value-type="float" office:value="0.000547999986156356" calcext:value-type="float">
            <text:p>5,48E-4</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0551999986055307" calcext:value-type="float">
            <text:p>5,52E-4</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0555999985954259" calcext:value-type="float">
            <text:p>5,56E-4</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055999998585321" calcext:value-type="float">
            <text:p>5,60E-4</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0563999985752162" calcext:value-type="float">
            <text:p>5,64E-4</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0567999985651113" calcext:value-type="float">
            <text:p>5,68E-4</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0571999985550065" calcext:value-type="float">
            <text:p>5,72E-4</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0575999985449016" calcext:value-type="float">
            <text:p>5,76E-4</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0579999985347968" calcext:value-type="float">
            <text:p>5,80E-4</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0583999985246919" calcext:value-type="float">
            <text:p>5,84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587999985145871" calcext:value-type="float">
            <text:p>5,88E-4</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0591999985044822" calcext:value-type="float">
            <text:p>5,92E-4</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0595999984943774" calcext:value-type="float">
            <text:p>5,96E-4</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0599999984842725" calcext:value-type="float">
            <text:p>6,00E-4</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0603999984741677" calcext:value-type="float">
            <text:p>6,04E-4</text:p>
          </table:table-cell>
          <table:table-cell office:value-type="float" office:value="-0.14300000667572" calcext:value-type="float">
            <text:p>-1,43E-1</text:p>
          </table:table-cell>
          <table:table-cell table:number-columns-repeated="15"/>
          <table:table-cell table:style-name="ce53" table:number-columns-repeated="16367"/>
        </table:table-row>
        <table:table-row table:style-name="ro4">
          <table:table-cell office:value-type="float" office:value="0.000607999984640628" calcext:value-type="float">
            <text:p>6,08E-4</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061199998453958" calcext:value-type="float">
            <text:p>6,12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615999984438531" calcext:value-type="float">
            <text:p>6,16E-4</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0619999984337483" calcext:value-type="float">
            <text:p>6,20E-4</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0623999984236434" calcext:value-type="float">
            <text:p>6,24E-4</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0627999984135386" calcext:value-type="float">
            <text:p>6,28E-4</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0631999984034337" calcext:value-type="float">
            <text:p>6,32E-4</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0635999983933289" calcext:value-type="float">
            <text:p>6,36E-4</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063999998383224" calcext:value-type="float">
            <text:p>6,40E-4</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0643999983731192" calcext:value-type="float">
            <text:p>6,44E-4</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0647999983630143" calcext:value-type="float">
            <text:p>6,48E-4</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0651999983529095" calcext:value-type="float">
            <text:p>6,52E-4</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0655999983428046" calcext:value-type="float">
            <text:p>6,5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59999983326998" calcext:value-type="float">
            <text:p>6,6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63999983225949" calcext:value-type="float">
            <text:p>6,6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67999983124901" calcext:value-type="float">
            <text:p>6,6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1999983023852" calcext:value-type="float">
            <text:p>6,7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5999982922804" calcext:value-type="float">
            <text:p>6,7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9999982821755" calcext:value-type="float">
            <text:p>6,8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83999982720707" calcext:value-type="float">
            <text:p>6,8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87999982619658" calcext:value-type="float">
            <text:p>6,8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199998251861" calcext:value-type="float">
            <text:p>6,9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5999982417561" calcext:value-type="float">
            <text:p>6,9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9999982316513" calcext:value-type="float">
            <text:p>7,0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03999982215464" calcext:value-type="float">
            <text:p>7,0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07999982114416" calcext:value-type="float">
            <text:p>7,0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1999982013367" calcext:value-type="float">
            <text:p>7,1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5999981912319" calcext:value-type="float">
            <text:p>7,1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999998181127" calcext:value-type="float">
            <text:p>7,2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23999981710222" calcext:value-type="float">
            <text:p>7,2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27999981609173" calcext:value-type="float">
            <text:p>7,2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1999981508125" calcext:value-type="float">
            <text:p>7,3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5999981407076" calcext:value-type="float">
            <text:p>7,3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9999981306028" calcext:value-type="float">
            <text:p>7,4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43999981204979" calcext:value-type="float">
            <text:p>7,4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47999981103931" calcext:value-type="float">
            <text:p>7,4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1999981002882" calcext:value-type="float">
            <text:p>7,5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5999980901834" calcext:value-type="float">
            <text:p>7,5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9999980800785" calcext:value-type="float">
            <text:p>7,6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63999980699737" calcext:value-type="float">
            <text:p>7,6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67999980598688" calcext:value-type="float">
            <text:p>7,6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199998049764" calcext:value-type="float">
            <text:p>7,7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5999980396591" calcext:value-type="float">
            <text:p>7,7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9999980295543" calcext:value-type="float">
            <text:p>7,8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83999980194494" calcext:value-type="float">
            <text:p>7,8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87999980093446" calcext:value-type="float">
            <text:p>7,8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1999979992397" calcext:value-type="float">
            <text:p>7,9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5999979891349" calcext:value-type="float">
            <text:p>7,9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99999797903" calcext:value-type="float">
            <text:p>8,0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03999979689252" calcext:value-type="float">
            <text:p>8,0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07999979588203" calcext:value-type="float">
            <text:p>8,0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1999979487155" calcext:value-type="float">
            <text:p>8,1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5999979386106" calcext:value-type="float">
            <text:p>8,1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9999979285058" calcext:value-type="float">
            <text:p>8,2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23999979184009" calcext:value-type="float">
            <text:p>8,24E-4</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0827999979082961" calcext:value-type="float">
            <text:p>8,28E-4</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0831999978981912" calcext:value-type="float">
            <text:p>8,32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835999978880864" calcext:value-type="float">
            <text:p>8,36E-4</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0839999978779815" calcext:value-type="float">
            <text:p>8,40E-4</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0843999978678767" calcext:value-type="float">
            <text:p>8,44E-4</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0847999978577718" calcext:value-type="float">
            <text:p>8,48E-4</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085199997847667" calcext:value-type="float">
            <text:p>8,52E-4</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0855999978375621" calcext:value-type="float">
            <text:p>8,56E-4</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0859999978274573" calcext:value-type="float">
            <text:p>8,60E-4</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0863999978173524" calcext:value-type="float">
            <text:p>8,64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867999978072476" calcext:value-type="float">
            <text:p>8,68E-4</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0871999977971427" calcext:value-type="float">
            <text:p>8,72E-4</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0875999977870379" calcext:value-type="float">
            <text:p>8,76E-4</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087999997776933" calcext:value-type="float">
            <text:p>8,80E-4</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0883999977668282" calcext:value-type="float">
            <text:p>8,84E-4</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0887999977567233" calcext:value-type="float">
            <text:p>8,88E-4</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0891999977466185" calcext:value-type="float">
            <text:p>8,92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895999977365136" calcext:value-type="float">
            <text:p>8,96E-4</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0899999977264088" calcext:value-type="float">
            <text:p>9,00E-4</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0903999977163039" calcext:value-type="float">
            <text:p>9,04E-4</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0907999977061991" calcext:value-type="float">
            <text:p>9,08E-4</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0911999976960942" calcext:value-type="float">
            <text:p>9,12E-4</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0915999976859894" calcext:value-type="float">
            <text:p>9,16E-4</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0919999976758845" calcext:value-type="float">
            <text:p>9,20E-4</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0923999976657797" calcext:value-type="float">
            <text:p>9,24E-4</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0927999976556748" calcext:value-type="float">
            <text:p>9,28E-4</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09319999764557" calcext:value-type="float">
            <text:p>9,32E-4</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0935999976354651" calcext:value-type="float">
            <text:p>9,36E-4</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0939999976253603" calcext:value-type="float">
            <text:p>9,40E-4</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0943999976152554" calcext:value-type="float">
            <text:p>9,44E-4</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0947999976051506" calcext:value-type="float">
            <text:p>9,48E-4</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0951999975950457" calcext:value-type="float">
            <text:p>9,52E-4</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0955999975849409" calcext:value-type="float">
            <text:p>9,56E-4</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095999997574836" calcext:value-type="float">
            <text:p>9,60E-4</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0963999975647312" calcext:value-type="float">
            <text:p>9,64E-4</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0967999975546263" calcext:value-type="float">
            <text:p>9,68E-4</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0971999975445215" calcext:value-type="float">
            <text:p>9,72E-4</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0975999975344166" calcext:value-type="float">
            <text:p>9,76E-4</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0979999975243118" calcext:value-type="float">
            <text:p>9,80E-4</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0983999975142069" calcext:value-type="float">
            <text:p>9,84E-4</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0987999975041021" calcext:value-type="float">
            <text:p>9,88E-4</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0991999974939972" calcext:value-type="float">
            <text:p>9,92E-4</text:p>
          </table:table-cell>
          <table:table-cell office:value-type="float" office:value="-0.00300000002607703" calcext:value-type="float">
            <text:p>-3,00E-3</text:p>
          </table:table-cell>
          <table:table-cell table:number-columns-repeated="15"/>
          <table:table-cell table:style-name="ce53" table:number-columns-repeated="16367"/>
        </table:table-row>
        <table:table-row table:style-name="ro4">
          <table:table-cell office:value-type="float" office:value="0.000995999974838924" calcext:value-type="float">
            <text:p>9,96E-4</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0999999974737875" calcext:value-type="float">
            <text:p>1,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00399997463683" calcext:value-type="float">
            <text:p>1,0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100799997453578" calcext:value-type="float">
            <text:p>1,01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101199997443473" calcext:value-type="float">
            <text:p>1,0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01599997433368" calcext:value-type="float">
            <text:p>1,02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01999997423263" calcext:value-type="float">
            <text:p>1,0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102399997413158" calcext:value-type="float">
            <text:p>1,02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102799997403054" calcext:value-type="float">
            <text:p>1,03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03199997392949" calcext:value-type="float">
            <text:p>1,03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03599997382844" calcext:value-type="float">
            <text:p>1,0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103999997372739" calcext:value-type="float">
            <text:p>1,0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04399997362634" calcext:value-type="float">
            <text:p>1,0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104799997352529" calcext:value-type="float">
            <text:p>1,0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05199997342424" calcext:value-type="float">
            <text:p>1,0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10559999733232" calcext:value-type="float">
            <text:p>1,0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105999997322215" calcext:value-type="float">
            <text:p>1,0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10639999731211" calcext:value-type="float">
            <text:p>1,0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06799997302005" calcext:value-type="float">
            <text:p>1,07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1071999972919" calcext:value-type="float">
            <text:p>1,0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07599997281795" calcext:value-type="float">
            <text:p>1,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107999997271691" calcext:value-type="float">
            <text:p>1,08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08399997261586" calcext:value-type="float">
            <text:p>1,08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108799997251481" calcext:value-type="float">
            <text:p>1,09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109199997241376" calcext:value-type="float">
            <text:p>1,09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109599997231271" calcext:value-type="float">
            <text:p>1,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09999997221166" calcext:value-type="float">
            <text:p>1,1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110399997211061" calcext:value-type="float">
            <text:p>1,1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110799997200957" calcext:value-type="float">
            <text:p>1,1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11199997190852" calcext:value-type="float">
            <text:p>1,1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11599997180747" calcext:value-type="float">
            <text:p>1,1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111999997170642" calcext:value-type="float">
            <text:p>1,1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112399997160537" calcext:value-type="float">
            <text:p>1,12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112799997150432" calcext:value-type="float">
            <text:p>1,13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113199997140327" calcext:value-type="float">
            <text:p>1,1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113599997130223" calcext:value-type="float">
            <text:p>1,1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113999997120118" calcext:value-type="float">
            <text:p>1,1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114399997110013" calcext:value-type="float">
            <text:p>1,1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114799997099908" calcext:value-type="float">
            <text:p>1,1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15199997089803" calcext:value-type="float">
            <text:p>1,15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15599997079698" calcext:value-type="float">
            <text:p>1,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115999997069594" calcext:value-type="float">
            <text:p>1,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6399997059489" calcext:value-type="float">
            <text:p>1,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6799997049384" calcext:value-type="float">
            <text:p>1,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199997039279" calcext:value-type="float">
            <text:p>1,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599997029174"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999997019069"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8399997008964"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879999699886" calcext:value-type="float">
            <text:p>1,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199996988755" calcext:value-type="float">
            <text:p>1,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59999697865"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999996968545"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039999695844"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0799996948335" calcext:value-type="float">
            <text:p>1,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19999693823" calcext:value-type="float">
            <text:p>1,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599996928126"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999996918021"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2399996907916"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2799996897811" calcext:value-type="float">
            <text:p>1,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199996887706" calcext:value-type="float">
            <text:p>1,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599996877601"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999996867497"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4399996857392"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4799996847287" calcext:value-type="float">
            <text:p>1,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199996837182" calcext:value-type="float">
            <text:p>1,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599996827077"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999996816972"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6399996806867"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6799996796763" calcext:value-type="float">
            <text:p>1,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199996786658" calcext:value-type="float">
            <text:p>1,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599996776553"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999996766448"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8399996756343"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8799996746238" calcext:value-type="float">
            <text:p>1,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199996736133" calcext:value-type="float">
            <text:p>1,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599996726029"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999996715924"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0399996705819"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0799996695714" calcext:value-type="float">
            <text:p>1,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199996685609" calcext:value-type="float">
            <text:p>1,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599996675504" calcext:value-type="float">
            <text:p>1,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9999966654" calcext:value-type="float">
            <text:p>1,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2399996655295" calcext:value-type="float">
            <text:p>1,32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13279999664519" calcext:value-type="float">
            <text:p>1,33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33199996635085" calcext:value-type="float">
            <text:p>1,33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13359999662498" calcext:value-type="float">
            <text:p>1,3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133999996614875" calcext:value-type="float">
            <text:p>1,3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13439999660477" calcext:value-type="float">
            <text:p>1,3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134799996594666" calcext:value-type="float">
            <text:p>1,35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35199996584561" calcext:value-type="float">
            <text:p>1,35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135599996574456" calcext:value-type="float">
            <text:p>1,36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135999996564351" calcext:value-type="float">
            <text:p>1,36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36399996554246" calcext:value-type="float">
            <text:p>1,36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136799996544141" calcext:value-type="float">
            <text:p>1,37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37199996534036" calcext:value-type="float">
            <text:p>1,37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137599996523932" calcext:value-type="float">
            <text:p>1,38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137999996513827" calcext:value-type="float">
            <text:p>1,38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138399996503722" calcext:value-type="float">
            <text:p>1,38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138799996493617" calcext:value-type="float">
            <text:p>1,39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139199996483512" calcext:value-type="float">
            <text:p>1,3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139599996473407" calcext:value-type="float">
            <text:p>1,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139999996463303" calcext:value-type="float">
            <text:p>1,40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40399996453198" calcext:value-type="float">
            <text:p>1,40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140799996443093" calcext:value-type="float">
            <text:p>1,41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141199996432988" calcext:value-type="float">
            <text:p>1,41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141599996422883" calcext:value-type="float">
            <text:p>1,42E-3</text:p>
          </table:table-cell>
          <table:table-cell office:value-type="float" office:value="0.0850000008940697" calcext:value-type="float">
            <text:p>8,50E-2</text:p>
          </table:table-cell>
          <table:table-cell table:number-columns-repeated="15"/>
          <table:table-cell table:style-name="ce53" table:number-columns-repeated="16367"/>
        </table:table-row>
        <table:table-row table:style-name="ro4">
          <table:table-cell office:value-type="float" office:value="0.00141999996412778" calcext:value-type="float">
            <text:p>1,42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142399996402673" calcext:value-type="float">
            <text:p>1,42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42799996392569" calcext:value-type="float">
            <text:p>1,43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143199996382464" calcext:value-type="float">
            <text:p>1,43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43599996372359" calcext:value-type="float">
            <text:p>1,4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143999996362254" calcext:value-type="float">
            <text:p>1,4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144399996352149" calcext:value-type="float">
            <text:p>1,4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144799996342044" calcext:value-type="float">
            <text:p>1,45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145199996331939" calcext:value-type="float">
            <text:p>1,45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145599996321835" calcext:value-type="float">
            <text:p>1,46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14599999631173" calcext:value-type="float">
            <text:p>1,46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146399996301625" calcext:value-type="float">
            <text:p>1,46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14679999629152" calcext:value-type="float">
            <text:p>1,47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147199996281415" calcext:value-type="float">
            <text:p>1,47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4759999627131" calcext:value-type="float">
            <text:p>1,48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147999996261206" calcext:value-type="float">
            <text:p>1,48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148399996251101" calcext:value-type="float">
            <text:p>1,48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148799996240996" calcext:value-type="float">
            <text:p>1,49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149199996230891" calcext:value-type="float">
            <text:p>1,4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49599996220786" calcext:value-type="float">
            <text:p>1,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149999996210681" calcext:value-type="float">
            <text:p>1,50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150399996200576" calcext:value-type="float">
            <text:p>1,50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50799996190472" calcext:value-type="float">
            <text:p>1,51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51199996180367" calcext:value-type="float">
            <text:p>1,51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151599996170262" calcext:value-type="float">
            <text:p>1,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151999996160157" calcext:value-type="float">
            <text:p>1,52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52399996150052" calcext:value-type="float">
            <text:p>1,52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52799996139947" calcext:value-type="float">
            <text:p>1,53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153199996129842" calcext:value-type="float">
            <text:p>1,53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53599996119738" calcext:value-type="float">
            <text:p>1,54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153999996109633" calcext:value-type="float">
            <text:p>1,5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54399996099528" calcext:value-type="float">
            <text:p>1,5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154799996089423" calcext:value-type="float">
            <text:p>1,55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155199996079318" calcext:value-type="float">
            <text:p>1,55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55599996069213" calcext:value-type="float">
            <text:p>1,5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55999996059109" calcext:value-type="float">
            <text:p>1,56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156399996049004" calcext:value-type="float">
            <text:p>1,56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56799996038899" calcext:value-type="float">
            <text:p>1,57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157199996028794" calcext:value-type="float">
            <text:p>1,57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157599996018689" calcext:value-type="float">
            <text:p>1,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157999996008584" calcext:value-type="float">
            <text:p>1,58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158399995998479" calcext:value-type="float">
            <text:p>1,58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158799995988375" calcext:value-type="float">
            <text:p>1,5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5919999597827" calcext:value-type="float">
            <text:p>1,5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159599995968165" calcext:value-type="float">
            <text:p>1,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15999999595806" calcext:value-type="float">
            <text:p>1,60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60399995947955" calcext:value-type="float">
            <text:p>1,60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6079999593785" calcext:value-type="float">
            <text:p>1,61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161199995927745" calcext:value-type="float">
            <text:p>1,61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161599995917641" calcext:value-type="float">
            <text:p>1,6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61999995907536" calcext:value-type="float">
            <text:p>1,62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162399995897431" calcext:value-type="float">
            <text:p>1,62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162799995887326" calcext:value-type="float">
            <text:p>1,63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63199995877221" calcext:value-type="float">
            <text:p>1,63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163599995867116" calcext:value-type="float">
            <text:p>1,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163999995857012" calcext:value-type="float">
            <text:p>1,6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64399995846907" calcext:value-type="float">
            <text:p>1,64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164799995836802" calcext:value-type="float">
            <text:p>1,65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65199995826697" calcext:value-type="float">
            <text:p>1,65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165599995816592" calcext:value-type="float">
            <text:p>1,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165999995806487" calcext:value-type="float">
            <text:p>1,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6399995796382" calcext:value-type="float">
            <text:p>1,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6799995786278" calcext:value-type="float">
            <text:p>1,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199995776173" calcext:value-type="float">
            <text:p>1,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599995766068"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999995755963"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8399995745858"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8799995735753" calcext:value-type="float">
            <text:p>1,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199995725648" calcext:value-type="float">
            <text:p>1,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599995715544"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999995705439"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0399995695334"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0799995685229" calcext:value-type="float">
            <text:p>1,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199995675124" calcext:value-type="float">
            <text:p>1,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599995665019"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999995654915"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239999564481"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2799995634705" calcext:value-type="float">
            <text:p>1,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1999956246" calcext:value-type="float">
            <text:p>1,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599995614495"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99999560439"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4399995594285"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4799995584181" calcext:value-type="float">
            <text:p>1,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199995574076" calcext:value-type="float">
            <text:p>1,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599995563971"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999995553866"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6399995543761"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6799995533656" calcext:value-type="float">
            <text:p>1,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199995523551" calcext:value-type="float">
            <text:p>1,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599995513447"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999995503342"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8399995493237"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8799995483132" calcext:value-type="float">
            <text:p>1,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199995473027" calcext:value-type="float">
            <text:p>1,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599995462922"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999995452818"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0399995442713"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0799995432608" calcext:value-type="float">
            <text:p>1,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199995422503" calcext:value-type="float">
            <text:p>1,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599995412398"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999995402293"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2399995392188"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2799995382084" calcext:value-type="float">
            <text:p>1,83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183199995371979" calcext:value-type="float">
            <text:p>1,83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183599995361874" calcext:value-type="float">
            <text:p>1,84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83999995351769" calcext:value-type="float">
            <text:p>1,84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184399995341664" calcext:value-type="float">
            <text:p>1,8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84799995331559" calcext:value-type="float">
            <text:p>1,8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185199995321454" calcext:value-type="float">
            <text:p>1,8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18559999531135" calcext:value-type="float">
            <text:p>1,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85999995301245" calcext:value-type="float">
            <text:p>1,8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18639999529114" calcext:value-type="float">
            <text:p>1,86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186799995281035" calcext:value-type="float">
            <text:p>1,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8719999527093" calcext:value-type="float">
            <text:p>1,87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187599995260825" calcext:value-type="float">
            <text:p>1,88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187999995250721" calcext:value-type="float">
            <text:p>1,8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88399995240616" calcext:value-type="float">
            <text:p>1,8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88799995230511" calcext:value-type="float">
            <text:p>1,89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189199995220406" calcext:value-type="float">
            <text:p>1,89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189599995210301" calcext:value-type="float">
            <text:p>1,9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89999995200196" calcext:value-type="float">
            <text:p>1,9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190399995190091" calcext:value-type="float">
            <text:p>1,9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190799995179987" calcext:value-type="float">
            <text:p>1,9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91199995169882" calcext:value-type="float">
            <text:p>1,91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191599995159777" calcext:value-type="float">
            <text:p>1,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191999995149672" calcext:value-type="float">
            <text:p>1,9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92399995139567" calcext:value-type="float">
            <text:p>1,9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192799995129462" calcext:value-type="float">
            <text:p>1,93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93199995119357" calcext:value-type="float">
            <text:p>1,9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93599995109253" calcext:value-type="float">
            <text:p>1,94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193999995099148" calcext:value-type="float">
            <text:p>1,9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194399995089043" calcext:value-type="float">
            <text:p>1,9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194799995078938" calcext:value-type="float">
            <text:p>1,9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195199995068833" calcext:value-type="float">
            <text:p>1,95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95599995058728" calcext:value-type="float">
            <text:p>1,9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195999995048624" calcext:value-type="float">
            <text:p>1,96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96399995038519" calcext:value-type="float">
            <text:p>1,96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96799995028414" calcext:value-type="float">
            <text:p>1,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197199995018309" calcext:value-type="float">
            <text:p>1,97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197599995008204" calcext:value-type="float">
            <text:p>1,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97999994998099" calcext:value-type="float">
            <text:p>1,98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98399994987994" calcext:value-type="float">
            <text:p>1,98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19879999497789" calcext:value-type="float">
            <text:p>1,99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199199994967785" calcext:value-type="float">
            <text:p>1,9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9959999495768" calcext:value-type="float">
            <text:p>2,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199999994947575" calcext:value-type="float">
            <text:p>2,00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0039999493747" calcext:value-type="float">
            <text:p>2,0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200799994927365" calcext:value-type="float">
            <text:p>2,01E-3</text:p>
          </table:table-cell>
          <table:table-cell office:value-type="float" office:value="0.0150000005960464" calcext:value-type="float">
            <text:p>1,50E-2</text:p>
          </table:table-cell>
          <table:table-cell table:number-columns-repeated="15"/>
          <table:table-cell table:style-name="ce53" table:number-columns-repeated="16367"/>
        </table:table-row>
        <table:table-row table:style-name="ro4">
          <table:table-cell office:value-type="float" office:value="0.0020119999491726" calcext:value-type="float">
            <text:p>2,0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01599994907156" calcext:value-type="float">
            <text:p>2,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201999994897051" calcext:value-type="float">
            <text:p>2,02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202399994886946" calcext:value-type="float">
            <text:p>2,02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202799994876841" calcext:value-type="float">
            <text:p>2,03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203199994866736" calcext:value-type="float">
            <text:p>2,0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203599994856631" calcext:value-type="float">
            <text:p>2,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203999994846527" calcext:value-type="float">
            <text:p>2,0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204399994836422" calcext:value-type="float">
            <text:p>2,04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204799994826317" calcext:value-type="float">
            <text:p>2,0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05199994816212" calcext:value-type="float">
            <text:p>2,0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205599994806107" calcext:value-type="float">
            <text:p>2,0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205999994796002" calcext:value-type="float">
            <text:p>2,0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06399994785897" calcext:value-type="float">
            <text:p>2,0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206799994775793" calcext:value-type="float">
            <text:p>2,07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207199994765688" calcext:value-type="float">
            <text:p>2,07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207599994755583" calcext:value-type="float">
            <text:p>2,0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07999994745478" calcext:value-type="float">
            <text:p>2,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08399994735373" calcext:value-type="float">
            <text:p>2,0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208799994725268" calcext:value-type="float">
            <text:p>2,0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09199994715163" calcext:value-type="float">
            <text:p>2,0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209599994705059" calcext:value-type="float">
            <text:p>2,10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209999994694954" calcext:value-type="float">
            <text:p>2,1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210399994684849" calcext:value-type="float">
            <text:p>2,10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210799994674744" calcext:value-type="float">
            <text:p>2,11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211199994664639" calcext:value-type="float">
            <text:p>2,11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211599994654534" calcext:value-type="float">
            <text:p>2,12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21199999464443" calcext:value-type="float">
            <text:p>2,1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212399994634325" calcext:value-type="float">
            <text:p>2,1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21279999462422" calcext:value-type="float">
            <text:p>2,13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213199994614115" calcext:value-type="float">
            <text:p>2,13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21359999460401" calcext:value-type="float">
            <text:p>2,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213999994593905" calcext:value-type="float">
            <text:p>2,1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143999945838" calcext:value-type="float">
            <text:p>2,1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214799994573696" calcext:value-type="float">
            <text:p>2,1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215199994563591" calcext:value-type="float">
            <text:p>2,1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15599994553486" calcext:value-type="float">
            <text:p>2,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215999994543381" calcext:value-type="float">
            <text:p>2,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6399994533276" calcext:value-type="float">
            <text:p>2,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6799994523171" calcext:value-type="float">
            <text:p>2,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199994513066" calcext:value-type="float">
            <text:p>2,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599994502962"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999994492857"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8399994482752"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8799994472647" calcext:value-type="float">
            <text:p>2,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199994462542" calcext:value-type="float">
            <text:p>2,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599994452437"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999994442333"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0399994432228"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0799994422123" calcext:value-type="float">
            <text:p>2,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199994412018" calcext:value-type="float">
            <text:p>2,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599994401913"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999994391808"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2399994381703"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2799994371599" calcext:value-type="float">
            <text:p>2,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199994361494" calcext:value-type="float">
            <text:p>2,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599994351389"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999994341284"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4399994331179"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4799994321074" calcext:value-type="float">
            <text:p>2,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199994310969" calcext:value-type="float">
            <text:p>2,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599994300865"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99999429076"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6399994280655"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679999427055" calcext:value-type="float">
            <text:p>2,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199994260445" calcext:value-type="float">
            <text:p>2,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59999425034"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999994240236"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8399994230131"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8799994220026" calcext:value-type="float">
            <text:p>2,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199994209921" calcext:value-type="float">
            <text:p>2,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599994199816"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999994189711"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0399994179606"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0799994169502" calcext:value-type="float">
            <text:p>2,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199994159397" calcext:value-type="float">
            <text:p>2,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599994149292"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999994139187"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2399994129082"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2799994118977" calcext:value-type="float">
            <text:p>2,33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33199994108872" calcext:value-type="float">
            <text:p>2,33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233599994098768" calcext:value-type="float">
            <text:p>2,3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33999994088663" calcext:value-type="float">
            <text:p>2,3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234399994078558" calcext:value-type="float">
            <text:p>2,3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234799994068453" calcext:value-type="float">
            <text:p>2,35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35199994058348" calcext:value-type="float">
            <text:p>2,35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35599994048243" calcext:value-type="float">
            <text:p>2,36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235999994038139" calcext:value-type="float">
            <text:p>2,36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236399994028034" calcext:value-type="float">
            <text:p>2,36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236799994017929" calcext:value-type="float">
            <text:p>2,37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237199994007824" calcext:value-type="float">
            <text:p>2,37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237599993997719" calcext:value-type="float">
            <text:p>2,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237999993987614" calcext:value-type="float">
            <text:p>2,38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238399993977509" calcext:value-type="float">
            <text:p>2,38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238799993967405" calcext:value-type="float">
            <text:p>2,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2391999939573" calcext:value-type="float">
            <text:p>2,39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239599993947195" calcext:value-type="float">
            <text:p>2,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3999999393709" calcext:value-type="float">
            <text:p>2,40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240399993926985" calcext:value-type="float">
            <text:p>2,40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24079999391688" calcext:value-type="float">
            <text:p>2,41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41199993906775" calcext:value-type="float">
            <text:p>2,41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41599993896671" calcext:value-type="float">
            <text:p>2,4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241999993886566" calcext:value-type="float">
            <text:p>2,42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242399993876461" calcext:value-type="float">
            <text:p>2,42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242799993866356" calcext:value-type="float">
            <text:p>2,4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43199993856251" calcext:value-type="float">
            <text:p>2,43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243599993846146" calcext:value-type="float">
            <text:p>2,44E-3</text:p>
          </table:table-cell>
          <table:table-cell office:value-type="float" office:value="0.0649999976158142" calcext:value-type="float">
            <text:p>6,50E-2</text:p>
          </table:table-cell>
          <table:table-cell table:number-columns-repeated="15"/>
          <table:table-cell table:style-name="ce53" table:number-columns-repeated="16367"/>
        </table:table-row>
        <table:table-row table:style-name="ro4">
          <table:table-cell office:value-type="float" office:value="0.00243999993836042" calcext:value-type="float">
            <text:p>2,4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244399993825937" calcext:value-type="float">
            <text:p>2,4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244799993815832" calcext:value-type="float">
            <text:p>2,45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245199993805727" calcext:value-type="float">
            <text:p>2,45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245599993795622" calcext:value-type="float">
            <text:p>2,46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245999993785517" calcext:value-type="float">
            <text:p>2,46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46399993775412" calcext:value-type="float">
            <text:p>2,46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246799993765308" calcext:value-type="float">
            <text:p>2,47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47199993755203" calcext:value-type="float">
            <text:p>2,47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247599993745098" calcext:value-type="float">
            <text:p>2,4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47999993734993" calcext:value-type="float">
            <text:p>2,48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248399993724888" calcext:value-type="float">
            <text:p>2,48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248799993714783" calcext:value-type="float">
            <text:p>2,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49199993704678" calcext:value-type="float">
            <text:p>2,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49599993694574" calcext:value-type="float">
            <text:p>2,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249999993684469" calcext:value-type="float">
            <text:p>2,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250399993674364" calcext:value-type="float">
            <text:p>2,50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250799993664259" calcext:value-type="float">
            <text:p>2,5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251199993654154" calcext:value-type="float">
            <text:p>2,51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51599993644049" calcext:value-type="float">
            <text:p>2,5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251999993633945" calcext:value-type="float">
            <text:p>2,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5239999362384" calcext:value-type="float">
            <text:p>2,52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252799993613735" calcext:value-type="float">
            <text:p>2,53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25319999360363" calcext:value-type="float">
            <text:p>2,53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253599993593525" calcext:value-type="float">
            <text:p>2,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25399999358342" calcext:value-type="float">
            <text:p>2,5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54399993573315" calcext:value-type="float">
            <text:p>2,5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254799993563211" calcext:value-type="float">
            <text:p>2,55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255199993553106" calcext:value-type="float">
            <text:p>2,55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255599993543001" calcext:value-type="float">
            <text:p>2,5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55999993532896" calcext:value-type="float">
            <text:p>2,5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256399993522791" calcext:value-type="float">
            <text:p>2,56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256799993512686" calcext:value-type="float">
            <text:p>2,57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57199993502581" calcext:value-type="float">
            <text:p>2,57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257599993492477" calcext:value-type="float">
            <text:p>2,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257999993482372" calcext:value-type="float">
            <text:p>2,58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58399993472267" calcext:value-type="float">
            <text:p>2,58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258799993462162" calcext:value-type="float">
            <text:p>2,59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259199993452057" calcext:value-type="float">
            <text:p>2,5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259599993441952" calcext:value-type="float">
            <text:p>2,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259999993431848" calcext:value-type="float">
            <text:p>2,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260399993421743" calcext:value-type="float">
            <text:p>2,60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260799993411638" calcext:value-type="float">
            <text:p>2,61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261199993401533" calcext:value-type="float">
            <text:p>2,61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261599993391428" calcext:value-type="float">
            <text:p>2,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261999993381323" calcext:value-type="float">
            <text:p>2,62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262399993371218" calcext:value-type="float">
            <text:p>2,62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262799993361114" calcext:value-type="float">
            <text:p>2,6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63199993351009" calcext:value-type="float">
            <text:p>2,63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63599993340904" calcext:value-type="float">
            <text:p>2,64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263999993330799" calcext:value-type="float">
            <text:p>2,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264399993320694" calcext:value-type="float">
            <text:p>2,6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64799993310589" calcext:value-type="float">
            <text:p>2,6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265199993300484" calcext:value-type="float">
            <text:p>2,65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6559999329038" calcext:value-type="float">
            <text:p>2,66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265999993280275" calcext:value-type="float">
            <text:p>2,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26639999327017" calcext:value-type="float">
            <text:p>2,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6799993260065" calcext:value-type="float">
            <text:p>2,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19999324996" calcext:value-type="float">
            <text:p>2,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599993239855"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999993229751"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8399993219646"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8799993209541" calcext:value-type="float">
            <text:p>2,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199993199436" calcext:value-type="float">
            <text:p>2,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599993189331"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999993179226"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0399993169121"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0799993159017" calcext:value-type="float">
            <text:p>2,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199993148912" calcext:value-type="float">
            <text:p>2,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599993138807"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999993128702"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2399993118597"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2799993108492" calcext:value-type="float">
            <text:p>2,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199993098387" calcext:value-type="float">
            <text:p>2,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599993088283"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999993078178"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4399993068073"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4799993057968" calcext:value-type="float">
            <text:p>2,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199993047863" calcext:value-type="float">
            <text:p>2,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599993037758"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999993027654"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6399993017549"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6799993007444" calcext:value-type="float">
            <text:p>2,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199992997339" calcext:value-type="float">
            <text:p>2,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599992987234"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999992977129"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8399992967024"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879999295692" calcext:value-type="float">
            <text:p>2,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199992946815" calcext:value-type="float">
            <text:p>2,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59999293671"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999992926605"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03999929165"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0799992906395" calcext:value-type="float">
            <text:p>2,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199992896291" calcext:value-type="float">
            <text:p>2,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599992886186"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999992876081"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2399992865976"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2799992855871" calcext:value-type="float">
            <text:p>2,83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283199992845766" calcext:value-type="float">
            <text:p>2,83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283599992835661" calcext:value-type="float">
            <text:p>2,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83999992825557" calcext:value-type="float">
            <text:p>2,84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284399992815452" calcext:value-type="float">
            <text:p>2,8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84799992805347" calcext:value-type="float">
            <text:p>2,8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285199992795242" calcext:value-type="float">
            <text:p>2,8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285599992785137" calcext:value-type="float">
            <text:p>2,86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285999992775032" calcext:value-type="float">
            <text:p>2,8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86399992764927" calcext:value-type="float">
            <text:p>2,8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286799992754823" calcext:value-type="float">
            <text:p>2,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287199992744718" calcext:value-type="float">
            <text:p>2,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287599992734613" calcext:value-type="float">
            <text:p>2,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287999992724508" calcext:value-type="float">
            <text:p>2,8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288399992714403" calcext:value-type="float">
            <text:p>2,8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288799992704298" calcext:value-type="float">
            <text:p>2,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289199992694194" calcext:value-type="float">
            <text:p>2,8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289599992684089" calcext:value-type="float">
            <text:p>2,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289999992673984" calcext:value-type="float">
            <text:p>2,9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290399992663879" calcext:value-type="float">
            <text:p>2,9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290799992653774" calcext:value-type="float">
            <text:p>2,91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91199992643669" calcext:value-type="float">
            <text:p>2,9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291599992633564" calcext:value-type="float">
            <text:p>2,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9199999262346" calcext:value-type="float">
            <text:p>2,92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292399992613355" calcext:value-type="float">
            <text:p>2,9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29279999260325" calcext:value-type="float">
            <text:p>2,93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293199992593145" calcext:value-type="float">
            <text:p>2,93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29359999258304" calcext:value-type="float">
            <text:p>2,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293999992572935" calcext:value-type="float">
            <text:p>2,94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29439999256283" calcext:value-type="float">
            <text:p>2,9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294799992552726" calcext:value-type="float">
            <text:p>2,9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95199992542621" calcext:value-type="float">
            <text:p>2,9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295599992532516" calcext:value-type="float">
            <text:p>2,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295999992522411" calcext:value-type="float">
            <text:p>2,9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296399992512306" calcext:value-type="float">
            <text:p>2,9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296799992502201" calcext:value-type="float">
            <text:p>2,97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297199992492097" calcext:value-type="float">
            <text:p>2,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97599992481992" calcext:value-type="float">
            <text:p>2,98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297999992471887" calcext:value-type="float">
            <text:p>2,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98399992461782" calcext:value-type="float">
            <text:p>2,9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98799992451677" calcext:value-type="float">
            <text:p>2,99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299199992441572" calcext:value-type="float">
            <text:p>2,9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299599992431467" calcext:value-type="float">
            <text:p>3,0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299999992421363" calcext:value-type="float">
            <text:p>3,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300399992411258" calcext:value-type="float">
            <text:p>3,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00799992401153" calcext:value-type="float">
            <text:p>3,01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301199992391048" calcext:value-type="float">
            <text:p>3,01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301599992380943" calcext:value-type="float">
            <text:p>3,02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301999992370838" calcext:value-type="float">
            <text:p>3,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302399992360733" calcext:value-type="float">
            <text:p>3,0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302799992350629" calcext:value-type="float">
            <text:p>3,03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03199992340524" calcext:value-type="float">
            <text:p>3,03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303599992330419" calcext:value-type="float">
            <text:p>3,04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303999992320314" calcext:value-type="float">
            <text:p>3,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04399992310209" calcext:value-type="float">
            <text:p>3,0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304799992300104" calcext:value-type="float">
            <text:p>3,05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0519999229" calcext:value-type="float">
            <text:p>3,05E-3</text:p>
          </table:table-cell>
          <table:table-cell office:value-type="float" office:value="0.0649999976158142" calcext:value-type="float">
            <text:p>6,50E-2</text:p>
          </table:table-cell>
          <table:table-cell table:number-columns-repeated="15"/>
          <table:table-cell table:style-name="ce53" table:number-columns-repeated="16367"/>
        </table:table-row>
        <table:table-row table:style-name="ro4">
          <table:table-cell office:value-type="float" office:value="0.00305599992279895" calcext:value-type="float">
            <text:p>3,06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0599999226979" calcext:value-type="float">
            <text:p>3,0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306399992259685" calcext:value-type="float">
            <text:p>3,06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30679999224958" calcext:value-type="float">
            <text:p>3,0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307199992239475" calcext:value-type="float">
            <text:p>3,07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30759999222937" calcext:value-type="float">
            <text:p>3,08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307999992219266" calcext:value-type="float">
            <text:p>3,08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08399992209161" calcext:value-type="float">
            <text:p>3,0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308799992199056" calcext:value-type="float">
            <text:p>3,09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309199992188951" calcext:value-type="float">
            <text:p>3,0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309599992178846" calcext:value-type="float">
            <text:p>3,1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309999992168741" calcext:value-type="float">
            <text:p>3,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310399992158636" calcext:value-type="float">
            <text:p>3,1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10799992148532" calcext:value-type="float">
            <text:p>3,11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311199992138427" calcext:value-type="float">
            <text:p>3,1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11599992128322" calcext:value-type="float">
            <text:p>3,12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311999992118217" calcext:value-type="float">
            <text:p>3,1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312399992108112" calcext:value-type="float">
            <text:p>3,1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12799992098007" calcext:value-type="float">
            <text:p>3,13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313199992087903" calcext:value-type="float">
            <text:p>3,13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313599992077798" calcext:value-type="float">
            <text:p>3,14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313999992067693" calcext:value-type="float">
            <text:p>3,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14399992057588" calcext:value-type="float">
            <text:p>3,14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314799992047483" calcext:value-type="float">
            <text:p>3,1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15199992037378" calcext:value-type="float">
            <text:p>3,1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315599992027273" calcext:value-type="float">
            <text:p>3,16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15999992017169" calcext:value-type="float">
            <text:p>3,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16399992007064" calcext:value-type="float">
            <text:p>3,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16799991996959" calcext:value-type="float">
            <text:p>3,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199991986854" calcext:value-type="float">
            <text:p>3,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599991976749"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999991966644"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8399991956539"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8799991946435" calcext:value-type="float">
            <text:p>3,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19999193633" calcext:value-type="float">
            <text:p>3,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599991926225"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99999191612"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0399991906015"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079999189591" calcext:value-type="float">
            <text:p>3,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199991885806" calcext:value-type="float">
            <text:p>3,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599991875701"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999991865596"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2399991855491"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2799991845386" calcext:value-type="float">
            <text:p>3,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199991835281" calcext:value-type="float">
            <text:p>3,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599991825176"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999991815072"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4399991804967"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4799991794862" calcext:value-type="float">
            <text:p>3,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199991784757" calcext:value-type="float">
            <text:p>3,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599991774652"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999991764547"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6399991754442"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6799991744338" calcext:value-type="float">
            <text:p>3,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199991734233" calcext:value-type="float">
            <text:p>3,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599991724128"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999991714023"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8399991703918"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8799991693813" calcext:value-type="float">
            <text:p>3,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199991683709" calcext:value-type="float">
            <text:p>3,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599991673604"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999991663499"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0399991653394"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0799991643289" calcext:value-type="float">
            <text:p>3,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199991633184" calcext:value-type="float">
            <text:p>3,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599991623079"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999991612975"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239999160287"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2799991592765" calcext:value-type="float">
            <text:p>3,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319999158266" calcext:value-type="float">
            <text:p>3,33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33599991572555" calcext:value-type="float">
            <text:p>3,34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3399999156245" calcext:value-type="float">
            <text:p>3,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334399991552345" calcext:value-type="float">
            <text:p>3,3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34799991542241" calcext:value-type="float">
            <text:p>3,35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335199991532136" calcext:value-type="float">
            <text:p>3,35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35599991522031" calcext:value-type="float">
            <text:p>3,3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335999991511926" calcext:value-type="float">
            <text:p>3,36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336399991501821" calcext:value-type="float">
            <text:p>3,36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336799991491716" calcext:value-type="float">
            <text:p>3,37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337199991481612" calcext:value-type="float">
            <text:p>3,37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337599991471507" calcext:value-type="float">
            <text:p>3,38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337999991461402" calcext:value-type="float">
            <text:p>3,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38399991451297" calcext:value-type="float">
            <text:p>3,38E-3</text:p>
          </table:table-cell>
          <table:table-cell office:value-type="float" office:value="0.131999999284744" calcext:value-type="float">
            <text:p>1,32E-1</text:p>
          </table:table-cell>
          <table:table-cell table:number-columns-repeated="15"/>
          <table:table-cell table:style-name="ce53" table:number-columns-repeated="16367"/>
        </table:table-row>
        <table:table-row table:style-name="ro4">
          <table:table-cell office:value-type="float" office:value="0.00338799991441192" calcext:value-type="float">
            <text:p>3,3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39199991431087" calcext:value-type="float">
            <text:p>3,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339599991420982" calcext:value-type="float">
            <text:p>3,4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339999991410878" calcext:value-type="float">
            <text:p>3,4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340399991400773" calcext:value-type="float">
            <text:p>3,40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340799991390668" calcext:value-type="float">
            <text:p>3,41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341199991380563" calcext:value-type="float">
            <text:p>3,41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41599991370458" calcext:value-type="float">
            <text:p>3,42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341999991360353" calcext:value-type="float">
            <text:p>3,4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342399991350248" calcext:value-type="float">
            <text:p>3,42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342799991340144" calcext:value-type="float">
            <text:p>3,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343199991330039" calcext:value-type="float">
            <text:p>3,43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343599991319934" calcext:value-type="float">
            <text:p>3,4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43999991309829" calcext:value-type="float">
            <text:p>3,4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344399991299724" calcext:value-type="float">
            <text:p>3,44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44799991289619" calcext:value-type="float">
            <text:p>3,4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345199991279515" calcext:value-type="float">
            <text:p>3,45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4559999126941" calcext:value-type="float">
            <text:p>3,4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345999991259305" calcext:value-type="float">
            <text:p>3,46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3463999912492" calcext:value-type="float">
            <text:p>3,46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46799991239095" calcext:value-type="float">
            <text:p>3,47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34719999122899" calcext:value-type="float">
            <text:p>3,47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347599991218885" calcext:value-type="float">
            <text:p>3,48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347999991208781" calcext:value-type="float">
            <text:p>3,48E-3</text:p>
          </table:table-cell>
          <table:table-cell office:value-type="float" office:value="0.0150000005960464" calcext:value-type="float">
            <text:p>1,50E-2</text:p>
          </table:table-cell>
          <table:table-cell table:number-columns-repeated="15"/>
          <table:table-cell table:style-name="ce53" table:number-columns-repeated="16367"/>
        </table:table-row>
        <table:table-row table:style-name="ro4">
          <table:table-cell office:value-type="float" office:value="0.00348399991198676" calcext:value-type="float">
            <text:p>3,48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348799991188571" calcext:value-type="float">
            <text:p>3,4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49199991178466" calcext:value-type="float">
            <text:p>3,49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349599991168361" calcext:value-type="float">
            <text:p>3,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49999991158256" calcext:value-type="float">
            <text:p>3,5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350399991148151" calcext:value-type="float">
            <text:p>3,5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350799991138047" calcext:value-type="float">
            <text:p>3,5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351199991127942" calcext:value-type="float">
            <text:p>3,51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351599991117837" calcext:value-type="float">
            <text:p>3,52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351999991107732" calcext:value-type="float">
            <text:p>3,52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352399991097627" calcext:value-type="float">
            <text:p>3,52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352799991087522" calcext:value-type="float">
            <text:p>3,5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353199991077418" calcext:value-type="float">
            <text:p>3,53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53599991067313" calcext:value-type="float">
            <text:p>3,54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353999991057208" calcext:value-type="float">
            <text:p>3,5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354399991047103" calcext:value-type="float">
            <text:p>3,5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354799991036998" calcext:value-type="float">
            <text:p>3,5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55199991026893" calcext:value-type="float">
            <text:p>3,5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355599991016788" calcext:value-type="float">
            <text:p>3,5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355999991006684" calcext:value-type="float">
            <text:p>3,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356399990996579" calcext:value-type="float">
            <text:p>3,56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356799990986474" calcext:value-type="float">
            <text:p>3,5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357199990976369" calcext:value-type="float">
            <text:p>3,57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357599990966264" calcext:value-type="float">
            <text:p>3,5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357999990956159" calcext:value-type="float">
            <text:p>3,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358399990946054" calcext:value-type="float">
            <text:p>3,58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35879999093595" calcext:value-type="float">
            <text:p>3,5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359199990925845" calcext:value-type="float">
            <text:p>3,59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35959999091574" calcext:value-type="float">
            <text:p>3,6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359999990905635" calcext:value-type="float">
            <text:p>3,6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36039999089553" calcext:value-type="float">
            <text:p>3,60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360799990885425" calcext:value-type="float">
            <text:p>3,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361199990875321" calcext:value-type="float">
            <text:p>3,61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361599990865216" calcext:value-type="float">
            <text:p>3,6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61999990855111" calcext:value-type="float">
            <text:p>3,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362399990845006" calcext:value-type="float">
            <text:p>3,62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362799990834901" calcext:value-type="float">
            <text:p>3,63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363199990824796" calcext:value-type="float">
            <text:p>3,6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363599990814691" calcext:value-type="float">
            <text:p>3,64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363999990804587" calcext:value-type="float">
            <text:p>3,6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64399990794482" calcext:value-type="float">
            <text:p>3,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364799990784377" calcext:value-type="float">
            <text:p>3,6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365199990774272" calcext:value-type="float">
            <text:p>3,6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365599990764167" calcext:value-type="float">
            <text:p>3,66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365999990754062" calcext:value-type="float">
            <text:p>3,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366399990743957" calcext:value-type="float">
            <text:p>3,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6799990733853" calcext:value-type="float">
            <text:p>3,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199990723748" calcext:value-type="float">
            <text:p>3,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599990713643"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999990703538"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8399990693433"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8799990683328" calcext:value-type="float">
            <text:p>3,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199990673224" calcext:value-type="float">
            <text:p>3,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599990663119"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999990653014"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0399990642909"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0799990632804" calcext:value-type="float">
            <text:p>3,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199990622699" calcext:value-type="float">
            <text:p>3,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599990612594"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99999060249"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2399990592385"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279999058228" calcext:value-type="float">
            <text:p>3,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199990572175" calcext:value-type="float">
            <text:p>3,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59999056207"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999990551965"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439999054186"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4799990531756" calcext:value-type="float">
            <text:p>3,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199990521651" calcext:value-type="float">
            <text:p>3,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599990511546"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999990501441"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6399990491336"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6799990481231" calcext:value-type="float">
            <text:p>3,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199990471127" calcext:value-type="float">
            <text:p>3,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599990461022"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999990450917"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8399990440812"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8799990430707" calcext:value-type="float">
            <text:p>3,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199990420602" calcext:value-type="float">
            <text:p>3,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599990410497"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999990400393"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0399990390288"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0799990380183" calcext:value-type="float">
            <text:p>3,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199990370078" calcext:value-type="float">
            <text:p>3,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599990359973"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999990349868"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2399990339763"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2799990329659" calcext:value-type="float">
            <text:p>3,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3199990319554" calcext:value-type="float">
            <text:p>3,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3599990309449" calcext:value-type="float">
            <text:p>3,84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383999990299344" calcext:value-type="float">
            <text:p>3,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84399990289239" calcext:value-type="float">
            <text:p>3,84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84799990279134" calcext:value-type="float">
            <text:p>3,8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38519999026903" calcext:value-type="float">
            <text:p>3,8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385599990258925" calcext:value-type="float">
            <text:p>3,86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38599999024882" calcext:value-type="float">
            <text:p>3,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86399990238715" calcext:value-type="float">
            <text:p>3,86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38679999022861" calcext:value-type="float">
            <text:p>3,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387199990218505" calcext:value-type="float">
            <text:p>3,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3875999902084" calcext:value-type="float">
            <text:p>3,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87999990198296" calcext:value-type="float">
            <text:p>3,8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388399990188191" calcext:value-type="float">
            <text:p>3,8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388799990178086" calcext:value-type="float">
            <text:p>3,89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89199990167981" calcext:value-type="float">
            <text:p>3,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389599990157876" calcext:value-type="float">
            <text:p>3,9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89999990147771" calcext:value-type="float">
            <text:p>3,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390399990137666" calcext:value-type="float">
            <text:p>3,90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390799990127562" calcext:value-type="float">
            <text:p>3,91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391199990117457" calcext:value-type="float">
            <text:p>3,91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391599990107352" calcext:value-type="float">
            <text:p>3,92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391999990097247" calcext:value-type="float">
            <text:p>3,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92399990087142" calcext:value-type="float">
            <text:p>3,92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392799990077037" calcext:value-type="float">
            <text:p>3,93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393199990066933" calcext:value-type="float">
            <text:p>3,93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393599990056828" calcext:value-type="float">
            <text:p>3,94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393999990046723" calcext:value-type="float">
            <text:p>3,94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394399990036618" calcext:value-type="float">
            <text:p>3,9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394799990026513" calcext:value-type="float">
            <text:p>3,9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395199990016408" calcext:value-type="float">
            <text:p>3,95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95599990006303" calcext:value-type="float">
            <text:p>3,96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395999989996199" calcext:value-type="float">
            <text:p>3,96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396399989986094" calcext:value-type="float">
            <text:p>3,96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96799989975989" calcext:value-type="float">
            <text:p>3,97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397199989965884" calcext:value-type="float">
            <text:p>3,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97599989955779" calcext:value-type="float">
            <text:p>3,98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397999989945674" calcext:value-type="float">
            <text:p>3,98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398399989935569" calcext:value-type="float">
            <text:p>3,98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398799989925465" calcext:value-type="float">
            <text:p>3,99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39919998991536" calcext:value-type="float">
            <text:p>3,99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399599989905255" calcext:value-type="float">
            <text:p>4,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9999998989515" calcext:value-type="float">
            <text:p>4,00E-3</text:p>
          </table:table-cell>
          <table:table-cell office:value-type="float" office:value="-0.00300000002607703" calcext:value-type="float">
            <text:p>-3,00E-3</text:p>
          </table:table-cell>
          <table:table-cell table:number-columns-repeated="15"/>
          <table:table-cell table:style-name="ce53" table:number-columns-repeated="16367"/>
        </table:table-row>
        <table:table-row table:style-name="ro4">
          <table:table-cell office:value-type="float" office:value="0.00400399989885045" calcext:value-type="float">
            <text:p>4,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40079998987494" calcext:value-type="float">
            <text:p>4,01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401199989864836" calcext:value-type="float">
            <text:p>4,01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401599989854731" calcext:value-type="float">
            <text:p>4,02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401999989844626" calcext:value-type="float">
            <text:p>4,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402399989834521" calcext:value-type="float">
            <text:p>4,02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402799989824416" calcext:value-type="float">
            <text:p>4,03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403199989814311" calcext:value-type="float">
            <text:p>4,03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403599989804206" calcext:value-type="float">
            <text:p>4,04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03999989794102" calcext:value-type="float">
            <text:p>4,04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404399989783997" calcext:value-type="float">
            <text:p>4,0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404799989773892" calcext:value-type="float">
            <text:p>4,0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05199989763787" calcext:value-type="float">
            <text:p>4,0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405599989753682" calcext:value-type="float">
            <text:p>4,06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05999989743577" calcext:value-type="float">
            <text:p>4,06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06399989733472" calcext:value-type="float">
            <text:p>4,0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06799989723368" calcext:value-type="float">
            <text:p>4,07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07199989713263" calcext:value-type="float">
            <text:p>4,0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407599989703158" calcext:value-type="float">
            <text:p>4,08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407999989693053" calcext:value-type="float">
            <text:p>4,08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08399989682948" calcext:value-type="float">
            <text:p>4,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408799989672843" calcext:value-type="float">
            <text:p>4,09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409199989662739" calcext:value-type="float">
            <text:p>4,09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409599989652634" calcext:value-type="float">
            <text:p>4,1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09999989642529" calcext:value-type="float">
            <text:p>4,1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10399989632424" calcext:value-type="float">
            <text:p>4,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10799989622319" calcext:value-type="float">
            <text:p>4,11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411199989612214" calcext:value-type="float">
            <text:p>4,11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411599989602109" calcext:value-type="float">
            <text:p>4,12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11999989592005" calcext:value-type="float">
            <text:p>4,12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123999895819" calcext:value-type="float">
            <text:p>4,1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412799989571795" calcext:value-type="float">
            <text:p>4,13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41319998956169" calcext:value-type="float">
            <text:p>4,13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413599989551585" calcext:value-type="float">
            <text:p>4,14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41399998954148" calcext:value-type="float">
            <text:p>4,14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414399989531375" calcext:value-type="float">
            <text:p>4,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14799989521271" calcext:value-type="float">
            <text:p>4,1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415199989511166" calcext:value-type="float">
            <text:p>4,1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15599989501061" calcext:value-type="float">
            <text:p>4,16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15999989490956" calcext:value-type="float">
            <text:p>4,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416399989480851" calcext:value-type="float">
            <text:p>4,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16799989470746" calcext:value-type="float">
            <text:p>4,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199989460642" calcext:value-type="float">
            <text:p>4,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599989450537"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999989440432"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8399989430327"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8799989420222" calcext:value-type="float">
            <text:p>4,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199989410117" calcext:value-type="float">
            <text:p>4,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599989400012"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999989389908"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0399989379803"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0799989369698" calcext:value-type="float">
            <text:p>4,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199989359593" calcext:value-type="float">
            <text:p>4,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599989349488"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999989339383"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2399989329278"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2799989319174" calcext:value-type="float">
            <text:p>4,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199989309069" calcext:value-type="float">
            <text:p>4,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599989298964"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999989288859"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4399989278754"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4799989268649" calcext:value-type="float">
            <text:p>4,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199989258545" calcext:value-type="float">
            <text:p>4,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59998924844"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999989238335"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639998922823"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6799989218125" calcext:value-type="float">
            <text:p>4,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19998920802" calcext:value-type="float">
            <text:p>4,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599989197915"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999989187811"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8399989177706"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8799989167601" calcext:value-type="float">
            <text:p>4,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199989157496" calcext:value-type="float">
            <text:p>4,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599989147391"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999989137286"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0399989127181"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0799989117077" calcext:value-type="float">
            <text:p>4,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199989106972" calcext:value-type="float">
            <text:p>4,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599989096867"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999989086762"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2399989076657"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2799989066552" calcext:value-type="float">
            <text:p>4,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3199989056448" calcext:value-type="float">
            <text:p>4,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3599989046343" calcext:value-type="float">
            <text:p>4,3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33999989036238" calcext:value-type="float">
            <text:p>4,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34399989026133" calcext:value-type="float">
            <text:p>4,3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34799989016028" calcext:value-type="float">
            <text:p>4,3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435199989005923" calcext:value-type="float">
            <text:p>4,3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435599988995818" calcext:value-type="float">
            <text:p>4,3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435999988985714" calcext:value-type="float">
            <text:p>4,3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436399988975609" calcext:value-type="float">
            <text:p>4,36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436799988965504" calcext:value-type="float">
            <text:p>4,3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37199988955399" calcext:value-type="float">
            <text:p>4,37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37599988945294" calcext:value-type="float">
            <text:p>4,3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437999988935189" calcext:value-type="float">
            <text:p>4,38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438399988925084" calcext:value-type="float">
            <text:p>4,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3879998891498" calcext:value-type="float">
            <text:p>4,39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439199988904875" calcext:value-type="float">
            <text:p>4,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3959998889477" calcext:value-type="float">
            <text:p>4,4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439999988884665" calcext:value-type="float">
            <text:p>4,4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4039998887456" calcext:value-type="float">
            <text:p>4,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440799988864455" calcext:value-type="float">
            <text:p>4,4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441199988854351" calcext:value-type="float">
            <text:p>4,41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441599988844246" calcext:value-type="float">
            <text:p>4,4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441999988834141" calcext:value-type="float">
            <text:p>4,42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442399988824036" calcext:value-type="float">
            <text:p>4,42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442799988813931" calcext:value-type="float">
            <text:p>4,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443199988803826" calcext:value-type="float">
            <text:p>4,4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43599988793722" calcext:value-type="float">
            <text:p>4,4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43999988783617" calcext:value-type="float">
            <text:p>4,4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44399988773512" calcext:value-type="float">
            <text:p>4,4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444799988763407" calcext:value-type="float">
            <text:p>4,4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45199988753302" calcext:value-type="float">
            <text:p>4,4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445599988743197" calcext:value-type="float">
            <text:p>4,46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445999988733092" calcext:value-type="float">
            <text:p>4,4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446399988722987" calcext:value-type="float">
            <text:p>4,46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446799988712883" calcext:value-type="float">
            <text:p>4,47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447199988702778" calcext:value-type="float">
            <text:p>4,47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47599988692673" calcext:value-type="float">
            <text:p>4,48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447999988682568" calcext:value-type="float">
            <text:p>4,48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448399988672463" calcext:value-type="float">
            <text:p>4,48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448799988662358" calcext:value-type="float">
            <text:p>4,49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449199988652254" calcext:value-type="float">
            <text:p>4,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449599988642149" calcext:value-type="float">
            <text:p>4,5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449999988632044" calcext:value-type="float">
            <text:p>4,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450399988621939" calcext:value-type="float">
            <text:p>4,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450799988611834" calcext:value-type="float">
            <text:p>4,51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451199988601729" calcext:value-type="float">
            <text:p>4,5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451599988591625" calcext:value-type="float">
            <text:p>4,52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5199998858152" calcext:value-type="float">
            <text:p>4,52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452399988571415" calcext:value-type="float">
            <text:p>4,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45279998856131" calcext:value-type="float">
            <text:p>4,53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53199988551205" calcext:value-type="float">
            <text:p>4,5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4535999885411" calcext:value-type="float">
            <text:p>4,5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453999988530995" calcext:value-type="float">
            <text:p>4,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45439998852089" calcext:value-type="float">
            <text:p>4,5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54799988510786" calcext:value-type="float">
            <text:p>4,5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455199988500681" calcext:value-type="float">
            <text:p>4,55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55599988490576" calcext:value-type="float">
            <text:p>4,5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455999988480471" calcext:value-type="float">
            <text:p>4,5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56399988470366" calcext:value-type="float">
            <text:p>4,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56799988460261" calcext:value-type="float">
            <text:p>4,57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457199988450157" calcext:value-type="float">
            <text:p>4,5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57599988440052" calcext:value-type="float">
            <text:p>4,58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457999988429947" calcext:value-type="float">
            <text:p>4,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458399988419842" calcext:value-type="float">
            <text:p>4,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458799988409737" calcext:value-type="float">
            <text:p>4,59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59199988399632" calcext:value-type="float">
            <text:p>4,59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459599988389528" calcext:value-type="float">
            <text:p>4,6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59999988379423" calcext:value-type="float">
            <text:p>4,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460399988369318" calcext:value-type="float">
            <text:p>4,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460799988359213" calcext:value-type="float">
            <text:p>4,6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61199988349108" calcext:value-type="float">
            <text:p>4,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61599988339003" calcext:value-type="float">
            <text:p>4,6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461999988328898" calcext:value-type="float">
            <text:p>4,6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62399988318793" calcext:value-type="float">
            <text:p>4,6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62799988308689" calcext:value-type="float">
            <text:p>4,63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463199988298584" calcext:value-type="float">
            <text:p>4,63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463599988288479" calcext:value-type="float">
            <text:p>4,6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63999988278374" calcext:value-type="float">
            <text:p>4,64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464399988268269" calcext:value-type="float">
            <text:p>4,6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64799988258164" calcext:value-type="float">
            <text:p>4,6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6519998824806" calcext:value-type="float">
            <text:p>4,65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465599988237955" calcext:value-type="float">
            <text:p>4,6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46599998822785" calcext:value-type="float">
            <text:p>4,66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466399988217745" calcext:value-type="float">
            <text:p>4,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6679998820764" calcext:value-type="float">
            <text:p>4,67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67199988197535" calcext:value-type="float">
            <text:p>4,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7599988187431"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7999988177326"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8399988167221"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8799988157116" calcext:value-type="float">
            <text:p>4,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199988147011" calcext:value-type="float">
            <text:p>4,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599988136906"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999988126801"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0399988116696"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0799988106592" calcext:value-type="float">
            <text:p>4,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199988096487" calcext:value-type="float">
            <text:p>4,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599988086382"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999988076277"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2399988066172"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2799988056067" calcext:value-type="float">
            <text:p>4,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199988045963" calcext:value-type="float">
            <text:p>4,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599988035858"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999988025753"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4399988015648"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4799988005543" calcext:value-type="float">
            <text:p>4,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199987995438" calcext:value-type="float">
            <text:p>4,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599987985334"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999987975229"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6399987965124"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6799987955019" calcext:value-type="float">
            <text:p>4,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199987944914" calcext:value-type="float">
            <text:p>4,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599987934809"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999987924704"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8399987914599"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8799987904495" calcext:value-type="float">
            <text:p>4,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19998789439" calcext:value-type="float">
            <text:p>4,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599987884285"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99998787418"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0399987864075"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079998785397" calcext:value-type="float">
            <text:p>4,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199987843866" calcext:value-type="float">
            <text:p>4,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599987833761"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999987823656"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2399987813551"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2799987803446" calcext:value-type="float">
            <text:p>4,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3199987793341" calcext:value-type="float">
            <text:p>4,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3599987783237" calcext:value-type="float">
            <text:p>4,84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83999987773132" calcext:value-type="float">
            <text:p>4,84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484399987763027" calcext:value-type="float">
            <text:p>4,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84799987752922" calcext:value-type="float">
            <text:p>4,85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485199987742817" calcext:value-type="float">
            <text:p>4,8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85599987732712" calcext:value-type="float">
            <text:p>4,86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85999987722607" calcext:value-type="float">
            <text:p>4,86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486399987712502" calcext:value-type="float">
            <text:p>4,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86799987702398" calcext:value-type="float">
            <text:p>4,87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487199987692293" calcext:value-type="float">
            <text:p>4,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487599987682188" calcext:value-type="float">
            <text:p>4,88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87999987672083" calcext:value-type="float">
            <text:p>4,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88399987661978" calcext:value-type="float">
            <text:p>4,88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488799987651873" calcext:value-type="float">
            <text:p>4,89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89199987641769" calcext:value-type="float">
            <text:p>4,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489599987631664" calcext:value-type="float">
            <text:p>4,90E-3</text:p>
          </table:table-cell>
          <table:table-cell office:value-type="float" office:value="-0.131999999284744" calcext:value-type="float">
            <text:p>-1,32E-1</text:p>
          </table:table-cell>
          <table:table-cell table:number-columns-repeated="15"/>
          <table:table-cell table:style-name="ce53" table:number-columns-repeated="16367"/>
        </table:table-row>
        <table:table-row table:style-name="ro4">
          <table:table-cell office:value-type="float" office:value="0.00489999987621559" calcext:value-type="float">
            <text:p>4,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490399987611454" calcext:value-type="float">
            <text:p>4,9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490799987601349" calcext:value-type="float">
            <text:p>4,91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91199987591244" calcext:value-type="float">
            <text:p>4,91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9159998758114" calcext:value-type="float">
            <text:p>4,92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491999987571035" calcext:value-type="float">
            <text:p>4,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49239998756093" calcext:value-type="float">
            <text:p>4,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492799987550825" calcext:value-type="float">
            <text:p>4,93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9319998754072" calcext:value-type="float">
            <text:p>4,93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493599987530615" calcext:value-type="float">
            <text:p>4,94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9399998752051" calcext:value-type="float">
            <text:p>4,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494399987510405" calcext:value-type="float">
            <text:p>4,94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494799987500301" calcext:value-type="float">
            <text:p>4,9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495199987490196" calcext:value-type="float">
            <text:p>4,9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95599987480091" calcext:value-type="float">
            <text:p>4,96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495999987469986" calcext:value-type="float">
            <text:p>4,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496399987459881" calcext:value-type="float">
            <text:p>4,96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496799987449776" calcext:value-type="float">
            <text:p>4,97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497199987439672" calcext:value-type="float">
            <text:p>4,97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97599987429567" calcext:value-type="float">
            <text:p>4,98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497999987419462" calcext:value-type="float">
            <text:p>4,98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498399987409357" calcext:value-type="float">
            <text:p>4,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98799987399252" calcext:value-type="float">
            <text:p>4,99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499199987389147" calcext:value-type="float">
            <text:p>4,99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499599987379043" calcext:value-type="float">
            <text:p>5,0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499999987368938" calcext:value-type="float">
            <text:p>5,0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500399987358833" calcext:value-type="float">
            <text:p>5,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500799987348728" calcext:value-type="float">
            <text:p>5,01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501199987338623" calcext:value-type="float">
            <text:p>5,01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01599987328518" calcext:value-type="float">
            <text:p>5,02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501999987318413" calcext:value-type="float">
            <text:p>5,02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02399987308308" calcext:value-type="float">
            <text:p>5,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502799987298204" calcext:value-type="float">
            <text:p>5,03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503199987288099" calcext:value-type="float">
            <text:p>5,03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03599987277994" calcext:value-type="float">
            <text:p>5,04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503999987267889" calcext:value-type="float">
            <text:p>5,04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504399987257784" calcext:value-type="float">
            <text:p>5,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504799987247679" calcext:value-type="float">
            <text:p>5,0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505199987237575" calcext:value-type="float">
            <text:p>5,05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50559998722747" calcext:value-type="float">
            <text:p>5,06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05999987217365" calcext:value-type="float">
            <text:p>5,06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0639998720726" calcext:value-type="float">
            <text:p>5,0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506799987197155" calcext:value-type="float">
            <text:p>5,07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50719998718705" calcext:value-type="float">
            <text:p>5,07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507599987176946" calcext:value-type="float">
            <text:p>5,08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507999987166841" calcext:value-type="float">
            <text:p>5,08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508399987156736" calcext:value-type="float">
            <text:p>5,0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08799987146631" calcext:value-type="float">
            <text:p>5,09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09199987136526" calcext:value-type="float">
            <text:p>5,09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09599987126421" calcext:value-type="float">
            <text:p>5,1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509999987116316" calcext:value-type="float">
            <text:p>5,1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510399987106211" calcext:value-type="float">
            <text:p>5,1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510799987096107" calcext:value-type="float">
            <text:p>5,11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11199987086002" calcext:value-type="float">
            <text:p>5,11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511599987075897" calcext:value-type="float">
            <text:p>5,12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11999987065792" calcext:value-type="float">
            <text:p>5,12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512399987055687" calcext:value-type="float">
            <text:p>5,12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512799987045582" calcext:value-type="float">
            <text:p>5,13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513199987035478" calcext:value-type="float">
            <text:p>5,13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13599987025373" calcext:value-type="float">
            <text:p>5,14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13999987015268" calcext:value-type="float">
            <text:p>5,14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514399987005163" calcext:value-type="float">
            <text:p>5,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514799986995058" calcext:value-type="float">
            <text:p>5,1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515199986984953" calcext:value-type="float">
            <text:p>5,1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515599986974849" calcext:value-type="float">
            <text:p>5,16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15999986964744" calcext:value-type="float">
            <text:p>5,16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16399986954639" calcext:value-type="float">
            <text:p>5,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516799986944534" calcext:value-type="float">
            <text:p>5,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199986934429" calcext:value-type="float">
            <text:p>5,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599986924324"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999986914219"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8399986904114"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879998689401" calcext:value-type="float">
            <text:p>5,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199986883905" calcext:value-type="float">
            <text:p>5,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5999868738"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999986863695"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039998685359"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0799986843485" calcext:value-type="float">
            <text:p>5,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199986833381" calcext:value-type="float">
            <text:p>5,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599986823276"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999986813171"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2399986803066"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2799986792961" calcext:value-type="float">
            <text:p>5,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199986782856" calcext:value-type="float">
            <text:p>5,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599986772752"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999986762647"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4399986752542"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4799986742437" calcext:value-type="float">
            <text:p>5,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199986732332" calcext:value-type="float">
            <text:p>5,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599986722227"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999986712122"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6399986702017"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6799986691913" calcext:value-type="float">
            <text:p>5,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199986681808" calcext:value-type="float">
            <text:p>5,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599986671703"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999986661598"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8399986651493"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8799986641388" calcext:value-type="float">
            <text:p>5,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199986631284" calcext:value-type="float">
            <text:p>5,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599986621179"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999986611074"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0399986600969"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0799986590864" calcext:value-type="float">
            <text:p>5,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199986580759" calcext:value-type="float">
            <text:p>5,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59998657065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9999865605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239998655044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279998654034" calcext:value-type="float">
            <text:p>5,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3199986530235" calcext:value-type="float">
            <text:p>5,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359998652013" calcext:value-type="float">
            <text:p>5,3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33999986510025" calcext:value-type="float">
            <text:p>5,34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53439998649992" calcext:value-type="float">
            <text:p>5,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534799986489816" calcext:value-type="float">
            <text:p>5,3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535199986479711" calcext:value-type="float">
            <text:p>5,35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35599986469606" calcext:value-type="float">
            <text:p>5,36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35999986459501" calcext:value-type="float">
            <text:p>5,3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536399986449396" calcext:value-type="float">
            <text:p>5,36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536799986439291" calcext:value-type="float">
            <text:p>5,37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37199986429187" calcext:value-type="float">
            <text:p>5,37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37599986419082" calcext:value-type="float">
            <text:p>5,3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537999986408977" calcext:value-type="float">
            <text:p>5,3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38399986398872" calcext:value-type="float">
            <text:p>5,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538799986388767" calcext:value-type="float">
            <text:p>5,39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39199986378662" calcext:value-type="float">
            <text:p>5,39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539599986368558" calcext:value-type="float">
            <text:p>5,4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39999986358453" calcext:value-type="float">
            <text:p>5,4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540399986348348" calcext:value-type="float">
            <text:p>5,4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540799986338243" calcext:value-type="float">
            <text:p>5,41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541199986328138" calcext:value-type="float">
            <text:p>5,4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41599986318033" calcext:value-type="float">
            <text:p>5,4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41999986307928" calcext:value-type="float">
            <text:p>5,4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542399986297823" calcext:value-type="float">
            <text:p>5,42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542799986287719" calcext:value-type="float">
            <text:p>5,43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543199986277614" calcext:value-type="float">
            <text:p>5,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543599986267509" calcext:value-type="float">
            <text:p>5,4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543999986257404" calcext:value-type="float">
            <text:p>5,4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544399986247299" calcext:value-type="float">
            <text:p>5,4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44799986237194" calcext:value-type="float">
            <text:p>5,45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54519998622709" calcext:value-type="float">
            <text:p>5,45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545599986216985" calcext:value-type="float">
            <text:p>5,4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54599998620688" calcext:value-type="float">
            <text:p>5,46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546399986196775" calcext:value-type="float">
            <text:p>5,46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54679998618667" calcext:value-type="float">
            <text:p>5,47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547199986176565" calcext:value-type="float">
            <text:p>5,47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47599986166461" calcext:value-type="float">
            <text:p>5,4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547999986156356" calcext:value-type="float">
            <text:p>5,48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548399986146251" calcext:value-type="float">
            <text:p>5,4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48799986136146" calcext:value-type="float">
            <text:p>5,49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549199986126041" calcext:value-type="float">
            <text:p>5,49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49599986115936" calcext:value-type="float">
            <text:p>5,5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549999986105831" calcext:value-type="float">
            <text:p>5,5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550399986095726" calcext:value-type="float">
            <text:p>5,5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50799986085622" calcext:value-type="float">
            <text:p>5,51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551199986075517" calcext:value-type="float">
            <text:p>5,5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51599986065412" calcext:value-type="float">
            <text:p>5,52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551999986055307" calcext:value-type="float">
            <text:p>5,52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552399986045202" calcext:value-type="float">
            <text:p>5,5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552799986035097" calcext:value-type="float">
            <text:p>5,53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553199986024993" calcext:value-type="float">
            <text:p>5,53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553599986014888" calcext:value-type="float">
            <text:p>5,5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553999986004783" calcext:value-type="float">
            <text:p>5,5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554399985994678" calcext:value-type="float">
            <text:p>5,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554799985984573" calcext:value-type="float">
            <text:p>5,5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55199985974468" calcext:value-type="float">
            <text:p>5,5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55599985964364" calcext:value-type="float">
            <text:p>5,56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555999985954259" calcext:value-type="float">
            <text:p>5,56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556399985944154" calcext:value-type="float">
            <text:p>5,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556799985934049" calcext:value-type="float">
            <text:p>5,5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557199985923944" calcext:value-type="float">
            <text:p>5,57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557599985913839" calcext:value-type="float">
            <text:p>5,5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57999985903734" calcext:value-type="float">
            <text:p>5,58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55839998589363" calcext:value-type="float">
            <text:p>5,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558799985883525" calcext:value-type="float">
            <text:p>5,5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55919998587342" calcext:value-type="float">
            <text:p>5,59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559599985863315" calcext:value-type="float">
            <text:p>5,60E-3</text:p>
          </table:table-cell>
          <table:table-cell office:value-type="float" office:value="-0.120999999344349" calcext:value-type="float">
            <text:p>-1,21E-1</text:p>
          </table:table-cell>
          <table:table-cell table:number-columns-repeated="15"/>
          <table:table-cell table:style-name="ce53" table:number-columns-repeated="16367"/>
        </table:table-row>
        <table:table-row table:style-name="ro4">
          <table:table-cell office:value-type="float" office:value="0.0055999998585321" calcext:value-type="float">
            <text:p>5,6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560399985843105" calcext:value-type="float">
            <text:p>5,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560799985833" calcext:value-type="float">
            <text:p>5,61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61199985822896" calcext:value-type="float">
            <text:p>5,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61599985812791" calcext:value-type="float">
            <text:p>5,62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561999985802686" calcext:value-type="float">
            <text:p>5,6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562399985792581" calcext:value-type="float">
            <text:p>5,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62799985782476" calcext:value-type="float">
            <text:p>5,63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63199985772371" calcext:value-type="float">
            <text:p>5,63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563599985762267" calcext:value-type="float">
            <text:p>5,64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563999985752162" calcext:value-type="float">
            <text:p>5,6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64399985742057" calcext:value-type="float">
            <text:p>5,64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64799985731952" calcext:value-type="float">
            <text:p>5,6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65199985721847" calcext:value-type="float">
            <text:p>5,6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65599985711742" calcext:value-type="float">
            <text:p>5,66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565999985701637" calcext:value-type="float">
            <text:p>5,6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66399985691533" calcext:value-type="float">
            <text:p>5,66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566799985681428" calcext:value-type="float">
            <text:p>5,67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567199985671323" calcext:value-type="float">
            <text:p>5,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7599985661218"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7999985651113"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8399985641008"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8799985630903" calcext:value-type="float">
            <text:p>5,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199985620799" calcext:value-type="float">
            <text:p>5,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599985610694"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999985600589"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0399985590484"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0799985580379" calcext:value-type="float">
            <text:p>5,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199985570274" calcext:value-type="float">
            <text:p>5,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59998556017"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999985550065"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239998553996"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2799985529855" calcext:value-type="float">
            <text:p>5,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19998551975" calcext:value-type="float">
            <text:p>5,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599985509645"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99998549954"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4399985489436"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4799985479331" calcext:value-type="float">
            <text:p>5,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199985469226" calcext:value-type="float">
            <text:p>5,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599985459121"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999985449016"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6399985438911"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6799985428806" calcext:value-type="float">
            <text:p>5,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199985418702" calcext:value-type="float">
            <text:p>5,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599985408597"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999985398492"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8399985388387"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8799985378282" calcext:value-type="float">
            <text:p>5,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199985368177" calcext:value-type="float">
            <text:p>5,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599985358073"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999985347968"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0399985337863"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0799985327758" calcext:value-type="float">
            <text:p>5,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199985317653" calcext:value-type="float">
            <text:p>5,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599985307548"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999985297443"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2399985287339"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2799985277234" calcext:value-type="float">
            <text:p>5,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199985267129" calcext:value-type="float">
            <text:p>5,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599985257024" calcext:value-type="float">
            <text:p>5,8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999985246919" calcext:value-type="float">
            <text:p>5,84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584399985236814" calcext:value-type="float">
            <text:p>5,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84799985226709" calcext:value-type="float">
            <text:p>5,8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585199985216605" calcext:value-type="float">
            <text:p>5,8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855999852065" calcext:value-type="float">
            <text:p>5,86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85999985196395" calcext:value-type="float">
            <text:p>5,86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8639998518629" calcext:value-type="float">
            <text:p>5,86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86799985176185" calcext:value-type="float">
            <text:p>5,87E-3</text:p>
          </table:table-cell>
          <table:table-cell office:value-type="float" office:value="-0.168999999761581" calcext:value-type="float">
            <text:p>-1,69E-1</text:p>
          </table:table-cell>
          <table:table-cell table:number-columns-repeated="15"/>
          <table:table-cell table:style-name="ce53" table:number-columns-repeated="16367"/>
        </table:table-row>
        <table:table-row table:style-name="ro4">
          <table:table-cell office:value-type="float" office:value="0.0058719998516608" calcext:value-type="float">
            <text:p>5,87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587599985155976" calcext:value-type="float">
            <text:p>5,88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87999985145871" calcext:value-type="float">
            <text:p>5,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588399985135766" calcext:value-type="float">
            <text:p>5,8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588799985125661" calcext:value-type="float">
            <text:p>5,89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589199985115556" calcext:value-type="float">
            <text:p>5,89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89599985105451" calcext:value-type="float">
            <text:p>5,9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89999985095346" calcext:value-type="float">
            <text:p>5,9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590399985085242" calcext:value-type="float">
            <text:p>5,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90799985075137" calcext:value-type="float">
            <text:p>5,91E-3</text:p>
          </table:table-cell>
          <table:table-cell office:value-type="float" office:value="-0.120999999344349" calcext:value-type="float">
            <text:p>-1,21E-1</text:p>
          </table:table-cell>
          <table:table-cell table:number-columns-repeated="15"/>
          <table:table-cell table:style-name="ce53" table:number-columns-repeated="16367"/>
        </table:table-row>
        <table:table-row table:style-name="ro4">
          <table:table-cell office:value-type="float" office:value="0.00591199985065032" calcext:value-type="float">
            <text:p>5,91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591599985054927" calcext:value-type="float">
            <text:p>5,92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591999985044822" calcext:value-type="float">
            <text:p>5,92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92399985034717" calcext:value-type="float">
            <text:p>5,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92799985024612" calcext:value-type="float">
            <text:p>5,93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93199985014508" calcext:value-type="float">
            <text:p>5,93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593599985004403" calcext:value-type="float">
            <text:p>5,94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593999984994298" calcext:value-type="float">
            <text:p>5,94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594399984984193" calcext:value-type="float">
            <text:p>5,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594799984974088" calcext:value-type="float">
            <text:p>5,9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595199984963983" calcext:value-type="float">
            <text:p>5,9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595599984953879" calcext:value-type="float">
            <text:p>5,96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95999984943774" calcext:value-type="float">
            <text:p>5,96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596399984933669" calcext:value-type="float">
            <text:p>5,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596799984923564" calcext:value-type="float">
            <text:p>5,97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597199984913459" calcext:value-type="float">
            <text:p>5,97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597599984903354" calcext:value-type="float">
            <text:p>5,98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597999984893249" calcext:value-type="float">
            <text:p>5,98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98399984883145" calcext:value-type="float">
            <text:p>5,98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59879998487304" calcext:value-type="float">
            <text:p>5,99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599199984862935" calcext:value-type="float">
            <text:p>5,99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59959998485283" calcext:value-type="float">
            <text:p>6,0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number-rows-repeated="1047074">
          <table:table-cell table:number-columns-repeated="17"/>
          <table:table-cell table:style-name="ce53" table:number-columns-repeated="16367"/>
        </table:table-row>
        <table:table-row table:style-name="ro4">
          <table:table-cell table:number-columns-repeated="17"/>
          <table:table-cell table:style-name="ce53" table:number-columns-repeated="16367"/>
        </table:table-row>
      </table:table>
      <table:named-expressions>
        <table:named-range table:name="Ch1Vals" table:base-cell-address="$Tabelle1.$A$1" table:cell-range-address="$Tabelle1.$B$1"/>
        <table:named-range table:name="Ch2Vals" table:base-cell-address="$Tabelle1.$A$1" table:cell-range-address="$Tabelle1.$C$1"/>
        <table:named-range table:name="ChkChan1" table:base-cell-address="$Tabelle1.$A$1" table:cell-range-address="$Tabelle1.$E$2"/>
        <table:named-range table:name="ChkChan2" table:base-cell-address="$Tabelle1.$A$1" table:cell-range-address="$Tabelle1.$E$3"/>
        <table:named-range table:name="FileName" table:base-cell-address="$Tabelle1.$A$1" table:cell-range-address="$Tabelle1.$L$2"/>
        <table:named-range table:name="ProbeCh1" table:base-cell-address="$Tabelle1.$A$1" table:cell-range-address="$Tabelle1.$F$2"/>
        <table:named-range table:name="TDivCh1" table:base-cell-address="$Tabelle1.$A$1" table:cell-range-address="$Tabelle1.$H$2"/>
        <table:named-range table:name="TimeVals" table:base-cell-address="$Tabelle1.$A$1" table:cell-range-address="$Tabelle1.$A$1"/>
        <table:named-range table:name="VDivCh1" table:base-cell-address="$Tabelle1.$A$1" table:cell-range-address="$Tabelle1.$G$2"/>
        <table:named-range table:name="Version" table:base-cell-address="$Tabelle1.$M$1" table:cell-range-address="$Tabelle1.$M$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3">00.00.0000</text:date>, <text:time style:data-style-name="N2" text:time-value="21:25:07.8526633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alter</meta:initial-creator>
    <meta:creation-date>2021-03-05T16:37:21</meta:creation-date>
    <dc:date>2026-05-23T21:45:01.007940100</dc:date>
    <meta:editing-duration>PT8H53M54S</meta:editing-duration>
    <meta:generator>LibreOffice/26.2.3.2$Windows_X86_64 LibreOffice_project/70e089b17412e4cb7773e41413306b17a2328c34</meta:generator>
    <meta:editing-cycles>119</meta:editing-cycles>
    <meta:document-statistic meta:table-count="1" meta:cell-count="3028" meta:object-count="5"/>
    <meta:user-defined meta:name="AppVersion">14.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DieseArbeitsmappe.xml><?xml version="1.0" encoding="utf-8"?>
<!DOCTYPE module  PUBLIC '-//OpenOffice.org//DTD OfficeDocument 1.0//EN'  'module.dtd'>
<script:module xmlns:script="http://openoffice.org/2000/script" script:name="DieseArbeitsmappe" script:language="StarBasic" script:moduleType="document">Rem Attribute VBA_ModuleType=VBADocumentModule
Option VBASupport 1
Private Sub Workbook_Open()
    ThisComponent.CurrentController.ActiveSheet.unprotect("")
'    With Worksheets("Tabelle1")
'        .Protect UserInterfaceOnly:=True
'    End With
     FileIsOpen = false
End Sub

</script:module>
</file>

<file path=Basic/VBAProject/Modul1.xml><?xml version="1.0" encoding="utf-8"?>
<!DOCTYPE module  PUBLIC '-//OpenOffice.org//DTD OfficeDocument 1.0//EN'  'module.dtd'>
<script:module xmlns:script="http://openoffice.org/2000/script" script:name="Modul1" script:language="StarBasic" script:moduleType="normal">' FNIRSI-1013D WAV Viewer for LibreOffice
' From 1013D_DisplayData.xlsm (Microsoft Excel)
' Translated to LibreOffice Basic 20.05.2026 /Vo
' Data Format: original Firmware .wav Format
' History:
' V1.20: Corrected Signal offset

Rem Attribute VBA_ModuleType=VBAModule
Option VBASupport 1
Option Explicit

Public Const Version = "V1.20"

Dim Bytes     'The whole file in a Bytes Array
Dim VScaleArr
Dim TScaleArr
Dim ChRow0 As Long
Dim Ch1Col As Long
Dim Ch2Col As Long
Dim TimCol As Long

Dim FileName As String
Dim FileIsOpen As Boolean


Sub LoadData()
   
    VScaleArr = Array(5, 2.5, 1, 0.5, 0.2, 0.1, 0.05)
    TScaleArr = Array(50, 20, 10, 5, 2, 1, 0.5, 0.2, 0.1, 0.05, 0.02, 0.01, 0.005, 0.002, 0.001, 0.0005, 0.0002, 0.0001, 0.00005, 0.00002, 0.00001, 0.000005, 0.000002, 0.000001, 0.0000005, 0.0000002, 0.0000001, 0.00000005, 0.00000002, 0.00000001)
    On Error GoTo ErrHandler
    With CreateObject("ADODB.Stream")  ' load file
        .Open
        .Type = 1  ' adTypeBinary
        .LoadFromFile FileName
        Bytes = .Read
        .Close
    End With
    TimCol = Range("TimeVals").Column
    Ch1Col = Range("Ch1Vals").Column
    Ch2Col = Range("Ch2Vals").Column
    ChRow0 = Range("Ch1Vals").Row
    Range("Version") = Version
    Range(Cells(ChRow0 + 1, Ch1Col), Cells(ChRow0 + 1500, Ch2Col)).ClearContents
    Cells(ChRow0 + 1, Ch1Col) = " "
    Cells(ChRow0 + 1, Ch2Col) = " "
    '' Application.Calculation = xlCalculationManual ' Excel VBA
    If (Range("ChkChan2") = False) Then Range("ChkChan1") = True
	If (Range("ChkChan1") = True) Then PlotData 1, 1000, 3000  ' plot Channel
    If (Range("ChkChan2") = True) Then PlotData 2, 4000, 3000
    ' Application.Calculation = xlCalculationAutomatic ' Excel VBA
	ThisComponent.enableAutomaticCalculation(True)	
	ThisComponent.removeActionLock()
	ThisComponent.CurrentController.Frame.ContainerWindow.invalidate(1) ' redraw
    FileIsOpen = True
Exit Sub
ErrHandler:
    Call MsgBox("can't open file", vbCritical Or vbOKOnly, Error)
End Sub


Function GetData(adr1 As Integer, optional adr2 As Integer = 0) As Integer
    Dim byte1 As Integer 		' LO interprets Bytes as integer
    Dim byte2 As Integer     	' convert to (unsigned) "Bytes" 
    byte1 =  Bytes(adr1) And &amp;HFF
    byte2 =  0
 	if (adr2 &gt; 0) then byte2 =  Bytes(adr2)  And &amp;HFF
	GetData = byte2 * 256 + byte1
End Function
 

Sub PlotData(ch, dataStart, dataSize)
    
    Dim index As Integer
    Dim vVal As Single
    Dim vMult As Single
    Dim tMult As Single
    Dim probe As Single
    Dim rawPos As Integer
    Dim rowcnt As Integer
    Dim dataEnd As Integer
 	        
    probe = 10 ^ GetData(10 + (ch - 1) * 10) 		' Probe X
    Range("ProbeCh1").Offset(ch - 1) = probe
    vMult = VScaleArr(GetData(4 + (ch - 1) * 10)) * probe ' Vertical scale
    Range("VDivCh1").Offset(ch - 1) = vMult
    tMult = TScaleArr(GetData(22))          		 	' Time scale
    Range("TDivCh1").Offset(ch - 1) = tMult
    rawPos =GetData(84 + (ch - 1) * 2 , 85 + (ch - 1) * 2)

	Dim hval(1499) As Variant
	Dim data(1499) As Variant   
	rowcnt =0
    dataEnd = dataStart + dataSize - 2
    For index = dataStart To dataEnd Step 2
        vVal = (GetData(index, index+1) - rawPos) * vMult / 50 * probe ' Vertical
        If (index = dataStart And abs(vVal) &lt; 1e-9) then vVal = 1e-9 ' no "0" in 1st cell
        hval(rowcnt) = Array(rowcnt * tMult / 50)  ' Horizontal (Time)
    	data(rowcnt) = Array(vVal )					  	 ' Vertical (Values)
        rowcnt = rowcnt + 1       
    Next

	Dim oRange As Object ' push all values to table	
	oRange = ThisComponent.CurrentController.ActiveSheet.getCellRangeByPosition(TimCol-1, ChRow0, TimCol-1, ChRow0+1499)
	oRange.setDataArray(hval())      
	oRange = ThisComponent.CurrentController.ActiveSheet.getCellRangeByPosition(Ch1Col+ch-2, ChRow0,  Ch1Col+ch-2, ChRow0+1499)
	oRange.setDataArray(data())      
End Sub



Sub Export_CSV
    On Error GoTo ErrHandler
     If Not FileIsOpen Then
        Call MsgBox("Please open file first", vbCritical Or vbOKOnly, Error)
        Exit Sub
    End If
   Dim rowcnt As Integer
	Dim f As Long
	f = FreeFile()
    FileName = Range("FileName")
   	Open  FileName  &amp; ".csv" For Output As #f
    For rowcnt = ChRow0 + 1 To ChRow0 + 1500 
        Print #f, CStr(Cells(rowcnt, TimCol)) &amp; ";" &amp; CStr(Cells(rowcnt, Ch1Col)) &amp; ";" &amp; CStr(Cells(rowcnt, Ch2Col))
    Next
    Close #f	
Exit Sub
ErrHandler:
    Call MsgBox("Error saving csv file", vbCritical Or vbOKOnly, Error)
End Sub



Sub Chan_Select()
    FileName = Range("FileName")
    If FileName &lt;&gt; "" Then LoadData
End Sub


Sub Open_File()
    FileName = Range("FileName")
    FileName = Get_FileName
    If FileName &lt;&gt; "" Then
        LoadData
        Range("FileName") = FileName
    End If
End Sub


Public Function Get_FileName() As String  ' LibreOffice Basic
    Dim oFilePicker As Object
    Dim sDisplayPath As String
    oFilePicker = CreateUnoService("com.sun.star.ui.dialogs.FilePicker")
    With oFilePicker
        .initialize(Array(com.sun.star.ui.dialogs.TemplateDescription.FILEOPEN_SIMPLE))
        .setTitle("Open File")
        .appendFilter("FNIRSI 1013D (*.wav)", "*.wav")
        .setCurrentFilter("FNIRSI 1013D (*.wav)")
        If .execute() = 1 Then
            sDisplayPath = .getFiles()(0)
            Get_FileName = ConvertFromURL(sDisplayPath)
        Else
            Get_FileName = ""
        End If
    End With
End Function


' Public Function Get_FileName() As String  ' Excel VBA
    ' Dim f As Office.FileDialog
'     Set f = Application.FileDialog(msoFileDialogFilePicker)
'     With f
'         .Title = "Open File"                      'Fenstertitel
'         .AllowMultiSelect = False                 'Nur eine Datei auswählbar
'         .ButtonName = "Open"                      'Button Beschriftung
'         .Filters.Clear                            'erst alle Filter löschen
'         .Filters.Add "FNIRSI 1013D", "*.wav"      'dann eigene anlegen
'         '.FilterIndex = 1                          'einen Filter vorselektieren
'         .InitialFileName = FileName               'Startverzeichnis
'         .Show
'     End With
'     If f.SelectedItems.Count &gt; 0 Then
'         Get_FileName = f.SelectedItems(1)
'     End If
' End Function



</script:module>
</file>

<file path=Basic/VBAProject/Tabelle1.xml><?xml version="1.0" encoding="utf-8"?>
<!DOCTYPE module  PUBLIC '-//OpenOffice.org//DTD OfficeDocument 1.0//EN'  'module.dtd'>
<script:module xmlns:script="http://openoffice.org/2000/script" script:name="Tabelle1"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1"/>
  <library:element library:name="DieseArbeitsmappe"/>
  <library:element library:name="Tabel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ch1" style:family="chart">
      <style:graphic-properties draw:stroke="solid" svg:stroke-width="0.026cm" svg:stroke-color="#d9d9d9" draw:fill-color="#bfbfbf"/>
    </style:style>
    <style:style style:name="ch2" style:family="chart">
      <style:chart-properties chart:include-hidden-cells="false" chart:auto-position="true" chart:auto-size="true" chart:treat-empty-cells="leave-gap"/>
    </style:style>
    <style:style style:name="ch3" style:family="chart" style:data-style-name="N153">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4f6228" style:text-position="0% 100%" fo:font-family="Calibri" fo:font-size="10pt" fo:font-weight="bold" style:font-size-asian="10pt" style:font-weight-asian="bold" style:font-size-complex="10pt" style:font-weight-complex="bold"/>
    </style:style>
    <style:style style:name="ch4" style:family="chart">
      <style:graphic-properties svg:stroke-width="0.026cm" svg:stroke-color="#878787"/>
    </style:style>
    <style:style style:name="ch5" style:family="chart">
      <style:graphic-properties draw:stroke="dash" draw:stroke-dash="msLineDash_20_1" svg:stroke-width="0.009cm" svg:stroke-color="#d9d9d9"/>
    </style:style>
    <style:style style:name="ch6" style:family="chart" style:data-style-name="N153">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15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953735" style:text-position="0% 100%" fo:font-family="Calibri" fo:font-size="10pt" fo:font-weight="bold" style:font-size-asian="10pt" style:font-weight-asian="bold" style:font-size-complex="10pt" style:font-weight-complex="bold"/>
    </style:style>
    <style:style style:name="ch8" style:family="chart">
      <style:graphic-properties draw:stroke="dash" draw:stroke-dash="msLineDash_20_2" svg:stroke-width="0.009cm" svg:stroke-color="#d9d9d9"/>
    </style:style>
    <style:style style:name="ch9" style:family="chart" style:data-style-name="N153">
      <style:chart-properties chart:display-label="true" chart:tick-marks-major-inner="false" chart:tick-marks-major-outer="fals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376092" style:text-position="0% 100%" fo:font-family="Calibri" fo:font-size="10pt" fo:font-weight="bold" style:font-size-asian="10pt" style:font-weight-asian="bold" style:font-size-complex="10pt" style:font-weight-complex="bold"/>
    </style:style>
    <style:style style:name="ch10" style:family="chart" style:data-style-name="N154">
      <style:chart-properties chart:symbol-type="none" chart:link-data-style-to-source="true" chart:label-position="right">
        <chart:label-separator>
          <text:p>; </text:p>
        </chart:label-separator>
      </style:chart-properties>
      <style:graphic-properties svg:stroke-width="0.071cm" svg:stroke-color="#c0504d" draw:fill-color="#c0504d" fo:wrap-option="wrap"/>
      <style:text-properties fo:color="#000000" style:text-position="0% 100%" fo:font-family="Calibri" fo:font-size="10pt" style:font-size-asian="10pt" style:font-size-complex="10pt"/>
    </style:style>
    <style:style style:name="ch11" style:family="chart" style:data-style-name="N154">
      <style:chart-properties chart:symbol-type="none" chart:link-data-style-to-source="true" chart:label-position="right">
        <chart:label-separator>
          <text:p>; </text:p>
        </chart:label-separator>
      </style:chart-properties>
      <style:graphic-properties svg:stroke-width="0.071cm" svg:stroke-color="#4f81bd" draw:fill-color="#4f81bd" fo:wrap-option="wrap"/>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5.856cm" svg:height="16.351cm" xlink:href=".." xlink:type="simple" chart:class="chart:scatter" chart:style-name="ch1">
        <chart:plot-area chart:style-name="ch2" svg:x="0.517cm" svg:y="0.327cm" svg:width="24.822cm" svg:height="15.697cm">
          <chart:coordinate-region svg:x="1.932cm" svg:y="0.923cm" svg:width="22.18cm" svg:height="14.929cm"/>
          <chart:axis chart:dimension="x" chart:name="primary-x" chart:style-name="ch3">
            <chart:grid chart:style-name="ch4" chart:class="major"/>
            <chart:grid chart:style-name="ch5" chart:class="minor"/>
          </chart:axis>
          <chart:axis chart:dimension="x" chart:name="secondary-x" chart:style-name="ch6"/>
          <chart:axis chart:dimension="y" chart:name="primary-y" chart:style-name="ch7">
            <chart:grid chart:style-name="ch4" chart:class="major"/>
            <chart:grid chart:style-name="ch8" chart:class="minor"/>
          </chart:axis>
          <chart:axis chart:dimension="y" chart:name="secondary-y" chart:style-name="ch9"/>
          <chart:series chart:attached-axis="primary-y" chart:style-name="ch10" chart:values-cell-range-address="Tabelle1.B2:Tabelle1.B1501" chart:label-cell-address="Tabelle1.B1:Tabelle1.B1" chart:class="chart:scatter">
            <chart:domain table:cell-range-address="Tabelle1.A2:Tabelle1.A1501"/>
            <chart:data-point chart:repeated="1500"/>
          </chart:series>
          <chart:series chart:attached-axis="secondary-y" chart:style-name="ch11" chart:values-cell-range-address="Tabelle1.C2:Tabelle1.C1501" chart:label-cell-address="Tabelle1.C1:Tabelle1.C1" chart:class="chart:scatter">
            <chart:data-point chart:repeated="15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CH1</text:p>
                <draw:g>
                  <svg:desc>Tabelle1.B1:Tabelle1.B1</svg:desc>
                </draw:g>
              </table:table-cell>
              <table:table-cell office:value-type="string">
                <text:p>CH2</text:p>
                <draw:g>
                  <svg:desc>Tabelle1.C1:Tabelle1.C1</svg:desc>
                </draw:g>
              </table:table-cell>
            </table:table-row>
          </table:table-header-rows>
          <table:table-rows>
            <table:table-row>
              <table:table-cell office:value-type="string">
                <text:p>1</text:p>
              </table:table-cell>
              <table:table-cell office:value-type="float" office:value="0">
                <text:p>0</text:p>
                <draw:g>
                  <svg:desc>Tabelle1.A2:Tabelle1.A1501</svg:desc>
                </draw:g>
              </table:table-cell>
              <table:table-cell office:value-type="float" office:value="0.0150000005960464">
                <text:p>0.0150000005960464</text:p>
                <draw:g>
                  <svg:desc>Tabelle1.B2:Tabelle1.B1501</svg:desc>
                </draw:g>
              </table:table-cell>
              <table:table-cell office:value-type="float" office:value="NaN">
                <text:p>NaN</text:p>
                <draw:g>
                  <svg:desc>Tabelle1.C2:Tabelle1.C1501</svg:desc>
                </draw:g>
              </table:table-cell>
            </table:table-row>
            <table:table-row>
              <table:table-cell office:value-type="string">
                <text:p>2</text:p>
              </table:table-cell>
              <table:table-cell office:value-type="float" office:value="0.0000039999998989515">
                <text:p>0.000003999999898951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3</text:p>
              </table:table-cell>
              <table:table-cell office:value-type="float" office:value="0.000007999999797903">
                <text:p>0.0000079999997979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text:p>
              </table:table-cell>
              <table:table-cell office:value-type="float" office:value="0.0000119999996968545">
                <text:p>0.0000119999996968545</text:p>
              </table:table-cell>
              <table:table-cell office:value-type="float" office:value="0.0240000002086163">
                <text:p>0.0240000002086163</text:p>
              </table:table-cell>
              <table:table-cell office:value-type="float" office:value="NaN">
                <text:p>NaN</text:p>
              </table:table-cell>
            </table:table-row>
            <table:table-row>
              <table:table-cell office:value-type="string">
                <text:p>5</text:p>
              </table:table-cell>
              <table:table-cell office:value-type="float" office:value="0.000015999999595806">
                <text:p>0.00001599999959580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text:p>
              </table:table-cell>
              <table:table-cell office:value-type="float" office:value="0.0000199999994947575">
                <text:p>0.000019999999494757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text:p>
              </table:table-cell>
              <table:table-cell office:value-type="float" office:value="0.000023999999393709">
                <text:p>0.00002399999939370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8</text:p>
              </table:table-cell>
              <table:table-cell office:value-type="float" office:value="0.0000279999992926605">
                <text:p>0.0000279999992926605</text:p>
              </table:table-cell>
              <table:table-cell office:value-type="float" office:value="0.046000000089407">
                <text:p>0.046000000089407</text:p>
              </table:table-cell>
              <table:table-cell office:value-type="float" office:value="NaN">
                <text:p>NaN</text:p>
              </table:table-cell>
            </table:table-row>
            <table:table-row>
              <table:table-cell office:value-type="string">
                <text:p>9</text:p>
              </table:table-cell>
              <table:table-cell office:value-type="float" office:value="0.000031999999191612">
                <text:p>0.00003199999919161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text:p>
              </table:table-cell>
              <table:table-cell office:value-type="float" office:value="0.0000359999990905635">
                <text:p>0.000035999999090563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text:p>
              </table:table-cell>
              <table:table-cell office:value-type="float" office:value="0.000039999998989515">
                <text:p>0.000039999998989515</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2</text:p>
              </table:table-cell>
              <table:table-cell office:value-type="float" office:value="0.0000439999988884665">
                <text:p>0.0000439999988884665</text:p>
              </table:table-cell>
              <table:table-cell office:value-type="float" office:value="0.0649999976158142">
                <text:p>0.0649999976158142</text:p>
              </table:table-cell>
              <table:table-cell office:value-type="float" office:value="NaN">
                <text:p>NaN</text:p>
              </table:table-cell>
            </table:table-row>
            <table:table-row>
              <table:table-cell office:value-type="string">
                <text:p>13</text:p>
              </table:table-cell>
              <table:table-cell office:value-type="float" office:value="0.000047999998787418">
                <text:p>0.000047999998787418</text:p>
              </table:table-cell>
              <table:table-cell office:value-type="float" office:value="0.068000003695488">
                <text:p>0.068000003695488</text:p>
              </table:table-cell>
              <table:table-cell office:value-type="float" office:value="NaN">
                <text:p>NaN</text:p>
              </table:table-cell>
            </table:table-row>
            <table:table-row>
              <table:table-cell office:value-type="string">
                <text:p>14</text:p>
              </table:table-cell>
              <table:table-cell office:value-type="float" office:value="0.0000519999986863695">
                <text:p>0.000051999998686369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5</text:p>
              </table:table-cell>
              <table:table-cell office:value-type="float" office:value="0.000055999998585321">
                <text:p>0.00005599999858532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6</text:p>
              </table:table-cell>
              <table:table-cell office:value-type="float" office:value="0.0000599999984842725">
                <text:p>0.0000599999984842725</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7</text:p>
              </table:table-cell>
              <table:table-cell office:value-type="float" office:value="0.000063999998383224">
                <text:p>0.000063999998383224</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8</text:p>
              </table:table-cell>
              <table:table-cell office:value-type="float" office:value="0.0000679999982821755">
                <text:p>0.0000679999982821755</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9</text:p>
              </table:table-cell>
              <table:table-cell office:value-type="float" office:value="0.000071999998181127">
                <text:p>0.00007199999818112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0</text:p>
              </table:table-cell>
              <table:table-cell office:value-type="float" office:value="0.0000759999980800785">
                <text:p>0.0000759999980800785</text:p>
              </table:table-cell>
              <table:table-cell office:value-type="float" office:value="0.101999998092651">
                <text:p>0.101999998092651</text:p>
              </table:table-cell>
              <table:table-cell office:value-type="float" office:value="NaN">
                <text:p>NaN</text:p>
              </table:table-cell>
            </table:table-row>
            <table:table-row>
              <table:table-cell office:value-type="string">
                <text:p>21</text:p>
              </table:table-cell>
              <table:table-cell office:value-type="float" office:value="0.00007999999797903">
                <text:p>0.00007999999797903</text:p>
              </table:table-cell>
              <table:table-cell office:value-type="float" office:value="0.108000002801418">
                <text:p>0.108000002801418</text:p>
              </table:table-cell>
              <table:table-cell office:value-type="float" office:value="NaN">
                <text:p>NaN</text:p>
              </table:table-cell>
            </table:table-row>
            <table:table-row>
              <table:table-cell office:value-type="string">
                <text:p>22</text:p>
              </table:table-cell>
              <table:table-cell office:value-type="float" office:value="0.0000839999978779815">
                <text:p>0.0000839999978779815</text:p>
              </table:table-cell>
              <table:table-cell office:value-type="float" office:value="0.109999999403954">
                <text:p>0.109999999403954</text:p>
              </table:table-cell>
              <table:table-cell office:value-type="float" office:value="NaN">
                <text:p>NaN</text:p>
              </table:table-cell>
            </table:table-row>
            <table:table-row>
              <table:table-cell office:value-type="string">
                <text:p>23</text:p>
              </table:table-cell>
              <table:table-cell office:value-type="float" office:value="0.000087999997776933">
                <text:p>0.000087999997776933</text:p>
              </table:table-cell>
              <table:table-cell office:value-type="float" office:value="0.11600000411272">
                <text:p>0.11600000411272</text:p>
              </table:table-cell>
              <table:table-cell office:value-type="float" office:value="NaN">
                <text:p>NaN</text:p>
              </table:table-cell>
            </table:table-row>
            <table:table-row>
              <table:table-cell office:value-type="string">
                <text:p>24</text:p>
              </table:table-cell>
              <table:table-cell office:value-type="float" office:value="0.0000919999976758845">
                <text:p>0.0000919999976758845</text:p>
              </table:table-cell>
              <table:table-cell office:value-type="float" office:value="0.124000005424023">
                <text:p>0.124000005424023</text:p>
              </table:table-cell>
              <table:table-cell office:value-type="float" office:value="NaN">
                <text:p>NaN</text:p>
              </table:table-cell>
            </table:table-row>
            <table:table-row>
              <table:table-cell office:value-type="string">
                <text:p>25</text:p>
              </table:table-cell>
              <table:table-cell office:value-type="float" office:value="0.000095999997574836">
                <text:p>0.000095999997574836</text:p>
              </table:table-cell>
              <table:table-cell office:value-type="float" office:value="0.126000002026558">
                <text:p>0.126000002026558</text:p>
              </table:table-cell>
              <table:table-cell office:value-type="float" office:value="NaN">
                <text:p>NaN</text:p>
              </table:table-cell>
            </table:table-row>
            <table:table-row>
              <table:table-cell office:value-type="string">
                <text:p>26</text:p>
              </table:table-cell>
              <table:table-cell office:value-type="float" office:value="0.0000999999974737875">
                <text:p>0.0000999999974737875</text:p>
              </table:table-cell>
              <table:table-cell office:value-type="float" office:value="0.133000001311302">
                <text:p>0.133000001311302</text:p>
              </table:table-cell>
              <table:table-cell office:value-type="float" office:value="NaN">
                <text:p>NaN</text:p>
              </table:table-cell>
            </table:table-row>
            <table:table-row>
              <table:table-cell office:value-type="string">
                <text:p>27</text:p>
              </table:table-cell>
              <table:table-cell office:value-type="float" office:value="0.000103999997372739">
                <text:p>0.000103999997372739</text:p>
              </table:table-cell>
              <table:table-cell office:value-type="float" office:value="0.137999996542931">
                <text:p>0.137999996542931</text:p>
              </table:table-cell>
              <table:table-cell office:value-type="float" office:value="NaN">
                <text:p>NaN</text:p>
              </table:table-cell>
            </table:table-row>
            <table:table-row>
              <table:table-cell office:value-type="string">
                <text:p>28</text:p>
              </table:table-cell>
              <table:table-cell office:value-type="float" office:value="0.000107999997271691">
                <text:p>0.000107999997271691</text:p>
              </table:table-cell>
              <table:table-cell office:value-type="float" office:value="0.142000004649162">
                <text:p>0.142000004649162</text:p>
              </table:table-cell>
              <table:table-cell office:value-type="float" office:value="NaN">
                <text:p>NaN</text:p>
              </table:table-cell>
            </table:table-row>
            <table:table-row>
              <table:table-cell office:value-type="string">
                <text:p>29</text:p>
              </table:table-cell>
              <table:table-cell office:value-type="float" office:value="0.000111999997170642">
                <text:p>0.000111999997170642</text:p>
              </table:table-cell>
              <table:table-cell office:value-type="float" office:value="0.145999997854233">
                <text:p>0.145999997854233</text:p>
              </table:table-cell>
              <table:table-cell office:value-type="float" office:value="NaN">
                <text:p>NaN</text:p>
              </table:table-cell>
            </table:table-row>
            <table:table-row>
              <table:table-cell office:value-type="string">
                <text:p>30</text:p>
              </table:table-cell>
              <table:table-cell office:value-type="float" office:value="0.000115999997069594">
                <text:p>0.000115999997069594</text:p>
              </table:table-cell>
              <table:table-cell office:value-type="float" office:value="0.151999995112419">
                <text:p>0.151999995112419</text:p>
              </table:table-cell>
              <table:table-cell office:value-type="float" office:value="NaN">
                <text:p>NaN</text:p>
              </table:table-cell>
            </table:table-row>
            <table:table-row>
              <table:table-cell office:value-type="string">
                <text:p>31</text:p>
              </table:table-cell>
              <table:table-cell office:value-type="float" office:value="0.000119999996968545">
                <text:p>0.000119999996968545</text:p>
              </table:table-cell>
              <table:table-cell office:value-type="float" office:value="0.157000005245209">
                <text:p>0.157000005245209</text:p>
              </table:table-cell>
              <table:table-cell office:value-type="float" office:value="NaN">
                <text:p>NaN</text:p>
              </table:table-cell>
            </table:table-row>
            <table:table-row>
              <table:table-cell office:value-type="string">
                <text:p>32</text:p>
              </table:table-cell>
              <table:table-cell office:value-type="float" office:value="0.000123999996867497">
                <text:p>0.000123999996867497</text:p>
              </table:table-cell>
              <table:table-cell office:value-type="float" office:value="0.162000000476837">
                <text:p>0.162000000476837</text:p>
              </table:table-cell>
              <table:table-cell office:value-type="float" office:value="NaN">
                <text:p>NaN</text:p>
              </table:table-cell>
            </table:table-row>
            <table:table-row>
              <table:table-cell office:value-type="string">
                <text:p>33</text:p>
              </table:table-cell>
              <table:table-cell office:value-type="float" office:value="0.000127999996766448">
                <text:p>0.000127999996766448</text:p>
              </table:table-cell>
              <table:table-cell office:value-type="float" office:value="0.166000008583069">
                <text:p>0.166000008583069</text:p>
              </table:table-cell>
              <table:table-cell office:value-type="float" office:value="NaN">
                <text:p>NaN</text:p>
              </table:table-cell>
            </table:table-row>
            <table:table-row>
              <table:table-cell office:value-type="string">
                <text:p>34</text:p>
              </table:table-cell>
              <table:table-cell office:value-type="float" office:value="0.0001319999966654">
                <text:p>0.0001319999966654</text:p>
              </table:table-cell>
              <table:table-cell office:value-type="float" office:value="0.170000001788139">
                <text:p>0.170000001788139</text:p>
              </table:table-cell>
              <table:table-cell office:value-type="float" office:value="NaN">
                <text:p>NaN</text:p>
              </table:table-cell>
            </table:table-row>
            <table:table-row>
              <table:table-cell office:value-type="string">
                <text:p>35</text:p>
              </table:table-cell>
              <table:table-cell office:value-type="float" office:value="0.000135999996564351">
                <text:p>0.000135999996564351</text:p>
              </table:table-cell>
              <table:table-cell office:value-type="float" office:value="0.177000001072884">
                <text:p>0.177000001072884</text:p>
              </table:table-cell>
              <table:table-cell office:value-type="float" office:value="NaN">
                <text:p>NaN</text:p>
              </table:table-cell>
            </table:table-row>
            <table:table-row>
              <table:table-cell office:value-type="string">
                <text:p>36</text:p>
              </table:table-cell>
              <table:table-cell office:value-type="float" office:value="0.000139999996463303">
                <text:p>0.000139999996463303</text:p>
              </table:table-cell>
              <table:table-cell office:value-type="float" office:value="0.181999996304512">
                <text:p>0.181999996304512</text:p>
              </table:table-cell>
              <table:table-cell office:value-type="float" office:value="NaN">
                <text:p>NaN</text:p>
              </table:table-cell>
            </table:table-row>
            <table:table-row>
              <table:table-cell office:value-type="string">
                <text:p>37</text:p>
              </table:table-cell>
              <table:table-cell office:value-type="float" office:value="0.000143999996362254">
                <text:p>0.000143999996362254</text:p>
              </table:table-cell>
              <table:table-cell office:value-type="float" office:value="0.186000004410744">
                <text:p>0.186000004410744</text:p>
              </table:table-cell>
              <table:table-cell office:value-type="float" office:value="NaN">
                <text:p>NaN</text:p>
              </table:table-cell>
            </table:table-row>
            <table:table-row>
              <table:table-cell office:value-type="string">
                <text:p>38</text:p>
              </table:table-cell>
              <table:table-cell office:value-type="float" office:value="0.000147999996261206">
                <text:p>0.000147999996261206</text:p>
              </table:table-cell>
              <table:table-cell office:value-type="float" office:value="0.189999997615814">
                <text:p>0.189999997615814</text:p>
              </table:table-cell>
              <table:table-cell office:value-type="float" office:value="NaN">
                <text:p>NaN</text:p>
              </table:table-cell>
            </table:table-row>
            <table:table-row>
              <table:table-cell office:value-type="string">
                <text:p>39</text:p>
              </table:table-cell>
              <table:table-cell office:value-type="float" office:value="0.000151999996160157">
                <text:p>0.000151999996160157</text:p>
              </table:table-cell>
              <table:table-cell office:value-type="float" office:value="0.196000009775162">
                <text:p>0.196000009775162</text:p>
              </table:table-cell>
              <table:table-cell office:value-type="float" office:value="NaN">
                <text:p>NaN</text:p>
              </table:table-cell>
            </table:table-row>
            <table:table-row>
              <table:table-cell office:value-type="string">
                <text:p>40</text:p>
              </table:table-cell>
              <table:table-cell office:value-type="float" office:value="0.000155999996059109">
                <text:p>0.000155999996059109</text:p>
              </table:table-cell>
              <table:table-cell office:value-type="float" office:value="0.196999996900558">
                <text:p>0.196999996900558</text:p>
              </table:table-cell>
              <table:table-cell office:value-type="float" office:value="NaN">
                <text:p>NaN</text:p>
              </table:table-cell>
            </table:table-row>
            <table:table-row>
              <table:table-cell office:value-type="string">
                <text:p>41</text:p>
              </table:table-cell>
              <table:table-cell office:value-type="float" office:value="0.00015999999595806">
                <text:p>0.0001599999959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42</text:p>
              </table:table-cell>
              <table:table-cell office:value-type="float" office:value="0.000163999995857012">
                <text:p>0.000163999995857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43</text:p>
              </table:table-cell>
              <table:table-cell office:value-type="float" office:value="0.000167999995755963">
                <text:p>0.000167999995755963</text:p>
              </table:table-cell>
              <table:table-cell office:value-type="float" office:value="0.196999996900558">
                <text:p>0.196999996900558</text:p>
              </table:table-cell>
              <table:table-cell office:value-type="float" office:value="NaN">
                <text:p>NaN</text:p>
              </table:table-cell>
            </table:table-row>
            <table:table-row>
              <table:table-cell office:value-type="string">
                <text:p>44</text:p>
              </table:table-cell>
              <table:table-cell office:value-type="float" office:value="0.000171999995654915">
                <text:p>0.000171999995654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45</text:p>
              </table:table-cell>
              <table:table-cell office:value-type="float" office:value="0.000175999995553866">
                <text:p>0.000175999995553866</text:p>
              </table:table-cell>
              <table:table-cell office:value-type="float" office:value="0.196999996900558">
                <text:p>0.196999996900558</text:p>
              </table:table-cell>
              <table:table-cell office:value-type="float" office:value="NaN">
                <text:p>NaN</text:p>
              </table:table-cell>
            </table:table-row>
            <table:table-row>
              <table:table-cell office:value-type="string">
                <text:p>46</text:p>
              </table:table-cell>
              <table:table-cell office:value-type="float" office:value="0.000179999995452818">
                <text:p>0.000179999995452818</text:p>
              </table:table-cell>
              <table:table-cell office:value-type="float" office:value="0.196999996900558">
                <text:p>0.196999996900558</text:p>
              </table:table-cell>
              <table:table-cell office:value-type="float" office:value="NaN">
                <text:p>NaN</text:p>
              </table:table-cell>
            </table:table-row>
            <table:table-row>
              <table:table-cell office:value-type="string">
                <text:p>47</text:p>
              </table:table-cell>
              <table:table-cell office:value-type="float" office:value="0.000183999995351769">
                <text:p>0.000183999995351769</text:p>
              </table:table-cell>
              <table:table-cell office:value-type="float" office:value="0.196999996900558">
                <text:p>0.196999996900558</text:p>
              </table:table-cell>
              <table:table-cell office:value-type="float" office:value="NaN">
                <text:p>NaN</text:p>
              </table:table-cell>
            </table:table-row>
            <table:table-row>
              <table:table-cell office:value-type="string">
                <text:p>48</text:p>
              </table:table-cell>
              <table:table-cell office:value-type="float" office:value="0.000187999995250721">
                <text:p>0.000187999995250721</text:p>
              </table:table-cell>
              <table:table-cell office:value-type="float" office:value="0.196999996900558">
                <text:p>0.196999996900558</text:p>
              </table:table-cell>
              <table:table-cell office:value-type="float" office:value="NaN">
                <text:p>NaN</text:p>
              </table:table-cell>
            </table:table-row>
            <table:table-row>
              <table:table-cell office:value-type="string">
                <text:p>49</text:p>
              </table:table-cell>
              <table:table-cell office:value-type="float" office:value="0.000191999995149672">
                <text:p>0.000191999995149672</text:p>
              </table:table-cell>
              <table:table-cell office:value-type="float" office:value="0.196999996900558">
                <text:p>0.196999996900558</text:p>
              </table:table-cell>
              <table:table-cell office:value-type="float" office:value="NaN">
                <text:p>NaN</text:p>
              </table:table-cell>
            </table:table-row>
            <table:table-row>
              <table:table-cell office:value-type="string">
                <text:p>50</text:p>
              </table:table-cell>
              <table:table-cell office:value-type="float" office:value="0.000195999995048624">
                <text:p>0.000195999995048624</text:p>
              </table:table-cell>
              <table:table-cell office:value-type="float" office:value="0.196999996900558">
                <text:p>0.196999996900558</text:p>
              </table:table-cell>
              <table:table-cell office:value-type="float" office:value="NaN">
                <text:p>NaN</text:p>
              </table:table-cell>
            </table:table-row>
            <table:table-row>
              <table:table-cell office:value-type="string">
                <text:p>51</text:p>
              </table:table-cell>
              <table:table-cell office:value-type="float" office:value="0.000199999994947575">
                <text:p>0.000199999994947575</text:p>
              </table:table-cell>
              <table:table-cell office:value-type="float" office:value="0.196999996900558">
                <text:p>0.196999996900558</text:p>
              </table:table-cell>
              <table:table-cell office:value-type="float" office:value="NaN">
                <text:p>NaN</text:p>
              </table:table-cell>
            </table:table-row>
            <table:table-row>
              <table:table-cell office:value-type="string">
                <text:p>52</text:p>
              </table:table-cell>
              <table:table-cell office:value-type="float" office:value="0.000203999994846527">
                <text:p>0.000203999994846527</text:p>
              </table:table-cell>
              <table:table-cell office:value-type="float" office:value="0.196999996900558">
                <text:p>0.196999996900558</text:p>
              </table:table-cell>
              <table:table-cell office:value-type="float" office:value="NaN">
                <text:p>NaN</text:p>
              </table:table-cell>
            </table:table-row>
            <table:table-row>
              <table:table-cell office:value-type="string">
                <text:p>53</text:p>
              </table:table-cell>
              <table:table-cell office:value-type="float" office:value="0.000207999994745478">
                <text:p>0.000207999994745478</text:p>
              </table:table-cell>
              <table:table-cell office:value-type="float" office:value="0.196999996900558">
                <text:p>0.196999996900558</text:p>
              </table:table-cell>
              <table:table-cell office:value-type="float" office:value="NaN">
                <text:p>NaN</text:p>
              </table:table-cell>
            </table:table-row>
            <table:table-row>
              <table:table-cell office:value-type="string">
                <text:p>54</text:p>
              </table:table-cell>
              <table:table-cell office:value-type="float" office:value="0.00021199999464443">
                <text:p>0.0002119999946444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text:p>
              </table:table-cell>
              <table:table-cell office:value-type="float" office:value="0.000215999994543381">
                <text:p>0.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6</text:p>
              </table:table-cell>
              <table:table-cell office:value-type="float" office:value="0.000219999994442333">
                <text:p>0.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7</text:p>
              </table:table-cell>
              <table:table-cell office:value-type="float" office:value="0.000223999994341284">
                <text:p>0.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8</text:p>
              </table:table-cell>
              <table:table-cell office:value-type="float" office:value="0.000227999994240236">
                <text:p>0.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9</text:p>
              </table:table-cell>
              <table:table-cell office:value-type="float" office:value="0.000231999994139187">
                <text:p>0.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60</text:p>
              </table:table-cell>
              <table:table-cell office:value-type="float" office:value="0.000235999994038139">
                <text:p>0.000235999994038139</text:p>
              </table:table-cell>
              <table:table-cell office:value-type="float" office:value="0.196999996900558">
                <text:p>0.196999996900558</text:p>
              </table:table-cell>
              <table:table-cell office:value-type="float" office:value="NaN">
                <text:p>NaN</text:p>
              </table:table-cell>
            </table:table-row>
            <table:table-row>
              <table:table-cell office:value-type="string">
                <text:p>61</text:p>
              </table:table-cell>
              <table:table-cell office:value-type="float" office:value="0.00023999999393709">
                <text:p>0.0002399999939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62</text:p>
              </table:table-cell>
              <table:table-cell office:value-type="float" office:value="0.000243999993836042">
                <text:p>0.000243999993836042</text:p>
              </table:table-cell>
              <table:table-cell office:value-type="float" office:value="0.196999996900558">
                <text:p>0.196999996900558</text:p>
              </table:table-cell>
              <table:table-cell office:value-type="float" office:value="NaN">
                <text:p>NaN</text:p>
              </table:table-cell>
            </table:table-row>
            <table:table-row>
              <table:table-cell office:value-type="string">
                <text:p>63</text:p>
              </table:table-cell>
              <table:table-cell office:value-type="float" office:value="0.000247999993734993">
                <text:p>0.000247999993734993</text:p>
              </table:table-cell>
              <table:table-cell office:value-type="float" office:value="0.196999996900558">
                <text:p>0.196999996900558</text:p>
              </table:table-cell>
              <table:table-cell office:value-type="float" office:value="NaN">
                <text:p>NaN</text:p>
              </table:table-cell>
            </table:table-row>
            <table:table-row>
              <table:table-cell office:value-type="string">
                <text:p>64</text:p>
              </table:table-cell>
              <table:table-cell office:value-type="float" office:value="0.000251999993633945">
                <text:p>0.000251999993633945</text:p>
              </table:table-cell>
              <table:table-cell office:value-type="float" office:value="0.196999996900558">
                <text:p>0.196999996900558</text:p>
              </table:table-cell>
              <table:table-cell office:value-type="float" office:value="NaN">
                <text:p>NaN</text:p>
              </table:table-cell>
            </table:table-row>
            <table:table-row>
              <table:table-cell office:value-type="string">
                <text:p>65</text:p>
              </table:table-cell>
              <table:table-cell office:value-type="float" office:value="0.000255999993532896">
                <text:p>0.000255999993532896</text:p>
              </table:table-cell>
              <table:table-cell office:value-type="float" office:value="0.196999996900558">
                <text:p>0.196999996900558</text:p>
              </table:table-cell>
              <table:table-cell office:value-type="float" office:value="NaN">
                <text:p>NaN</text:p>
              </table:table-cell>
            </table:table-row>
            <table:table-row>
              <table:table-cell office:value-type="string">
                <text:p>66</text:p>
              </table:table-cell>
              <table:table-cell office:value-type="float" office:value="0.000259999993431848">
                <text:p>0.000259999993431848</text:p>
              </table:table-cell>
              <table:table-cell office:value-type="float" office:value="0.196999996900558">
                <text:p>0.196999996900558</text:p>
              </table:table-cell>
              <table:table-cell office:value-type="float" office:value="NaN">
                <text:p>NaN</text:p>
              </table:table-cell>
            </table:table-row>
            <table:table-row>
              <table:table-cell office:value-type="string">
                <text:p>67</text:p>
              </table:table-cell>
              <table:table-cell office:value-type="float" office:value="0.000263999993330799">
                <text:p>0.000263999993330799</text:p>
              </table:table-cell>
              <table:table-cell office:value-type="float" office:value="0.196999996900558">
                <text:p>0.196999996900558</text:p>
              </table:table-cell>
              <table:table-cell office:value-type="float" office:value="NaN">
                <text:p>NaN</text:p>
              </table:table-cell>
            </table:table-row>
            <table:table-row>
              <table:table-cell office:value-type="string">
                <text:p>68</text:p>
              </table:table-cell>
              <table:table-cell office:value-type="float" office:value="0.000267999993229751">
                <text:p>0.000267999993229751</text:p>
              </table:table-cell>
              <table:table-cell office:value-type="float" office:value="0.196999996900558">
                <text:p>0.196999996900558</text:p>
              </table:table-cell>
              <table:table-cell office:value-type="float" office:value="NaN">
                <text:p>NaN</text:p>
              </table:table-cell>
            </table:table-row>
            <table:table-row>
              <table:table-cell office:value-type="string">
                <text:p>69</text:p>
              </table:table-cell>
              <table:table-cell office:value-type="float" office:value="0.000271999993128702">
                <text:p>0.000271999993128702</text:p>
              </table:table-cell>
              <table:table-cell office:value-type="float" office:value="0.196999996900558">
                <text:p>0.196999996900558</text:p>
              </table:table-cell>
              <table:table-cell office:value-type="float" office:value="NaN">
                <text:p>NaN</text:p>
              </table:table-cell>
            </table:table-row>
            <table:table-row>
              <table:table-cell office:value-type="string">
                <text:p>70</text:p>
              </table:table-cell>
              <table:table-cell office:value-type="float" office:value="0.000275999993027654">
                <text:p>0.000275999993027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1</text:p>
              </table:table-cell>
              <table:table-cell office:value-type="float" office:value="0.000279999992926605">
                <text:p>0.000279999992926605</text:p>
              </table:table-cell>
              <table:table-cell office:value-type="float" office:value="0.196999996900558">
                <text:p>0.196999996900558</text:p>
              </table:table-cell>
              <table:table-cell office:value-type="float" office:value="NaN">
                <text:p>NaN</text:p>
              </table:table-cell>
            </table:table-row>
            <table:table-row>
              <table:table-cell office:value-type="string">
                <text:p>72</text:p>
              </table:table-cell>
              <table:table-cell office:value-type="float" office:value="0.000283999992825557">
                <text:p>0.000283999992825557</text:p>
              </table:table-cell>
              <table:table-cell office:value-type="float" office:value="0.196999996900558">
                <text:p>0.196999996900558</text:p>
              </table:table-cell>
              <table:table-cell office:value-type="float" office:value="NaN">
                <text:p>NaN</text:p>
              </table:table-cell>
            </table:table-row>
            <table:table-row>
              <table:table-cell office:value-type="string">
                <text:p>73</text:p>
              </table:table-cell>
              <table:table-cell office:value-type="float" office:value="0.000287999992724508">
                <text:p>0.000287999992724508</text:p>
              </table:table-cell>
              <table:table-cell office:value-type="float" office:value="0.196999996900558">
                <text:p>0.196999996900558</text:p>
              </table:table-cell>
              <table:table-cell office:value-type="float" office:value="NaN">
                <text:p>NaN</text:p>
              </table:table-cell>
            </table:table-row>
            <table:table-row>
              <table:table-cell office:value-type="string">
                <text:p>74</text:p>
              </table:table-cell>
              <table:table-cell office:value-type="float" office:value="0.00029199999262346">
                <text:p>0.00029199999262346</text:p>
              </table:table-cell>
              <table:table-cell office:value-type="float" office:value="0.196999996900558">
                <text:p>0.196999996900558</text:p>
              </table:table-cell>
              <table:table-cell office:value-type="float" office:value="NaN">
                <text:p>NaN</text:p>
              </table:table-cell>
            </table:table-row>
            <table:table-row>
              <table:table-cell office:value-type="string">
                <text:p>75</text:p>
              </table:table-cell>
              <table:table-cell office:value-type="float" office:value="0.000295999992522411">
                <text:p>0.000295999992522411</text:p>
              </table:table-cell>
              <table:table-cell office:value-type="float" office:value="0.196999996900558">
                <text:p>0.196999996900558</text:p>
              </table:table-cell>
              <table:table-cell office:value-type="float" office:value="NaN">
                <text:p>NaN</text:p>
              </table:table-cell>
            </table:table-row>
            <table:table-row>
              <table:table-cell office:value-type="string">
                <text:p>76</text:p>
              </table:table-cell>
              <table:table-cell office:value-type="float" office:value="0.000299999992421363">
                <text:p>0.000299999992421363</text:p>
              </table:table-cell>
              <table:table-cell office:value-type="float" office:value="0.196999996900558">
                <text:p>0.196999996900558</text:p>
              </table:table-cell>
              <table:table-cell office:value-type="float" office:value="NaN">
                <text:p>NaN</text:p>
              </table:table-cell>
            </table:table-row>
            <table:table-row>
              <table:table-cell office:value-type="string">
                <text:p>77</text:p>
              </table:table-cell>
              <table:table-cell office:value-type="float" office:value="0.000303999992320314">
                <text:p>0.000303999992320314</text:p>
              </table:table-cell>
              <table:table-cell office:value-type="float" office:value="0.196999996900558">
                <text:p>0.196999996900558</text:p>
              </table:table-cell>
              <table:table-cell office:value-type="float" office:value="NaN">
                <text:p>NaN</text:p>
              </table:table-cell>
            </table:table-row>
            <table:table-row>
              <table:table-cell office:value-type="string">
                <text:p>78</text:p>
              </table:table-cell>
              <table:table-cell office:value-type="float" office:value="0.000307999992219266">
                <text:p>0.000307999992219266</text:p>
              </table:table-cell>
              <table:table-cell office:value-type="float" office:value="0.196999996900558">
                <text:p>0.196999996900558</text:p>
              </table:table-cell>
              <table:table-cell office:value-type="float" office:value="NaN">
                <text:p>NaN</text:p>
              </table:table-cell>
            </table:table-row>
            <table:table-row>
              <table:table-cell office:value-type="string">
                <text:p>79</text:p>
              </table:table-cell>
              <table:table-cell office:value-type="float" office:value="0.000311999992118217">
                <text:p>0.000311999992118217</text:p>
              </table:table-cell>
              <table:table-cell office:value-type="float" office:value="0.196999996900558">
                <text:p>0.196999996900558</text:p>
              </table:table-cell>
              <table:table-cell office:value-type="float" office:value="NaN">
                <text:p>NaN</text:p>
              </table:table-cell>
            </table:table-row>
            <table:table-row>
              <table:table-cell office:value-type="string">
                <text:p>80</text:p>
              </table:table-cell>
              <table:table-cell office:value-type="float" office:value="0.000315999992017169">
                <text:p>0.000315999992017169</text:p>
              </table:table-cell>
              <table:table-cell office:value-type="float" office:value="0.196999996900558">
                <text:p>0.196999996900558</text:p>
              </table:table-cell>
              <table:table-cell office:value-type="float" office:value="NaN">
                <text:p>NaN</text:p>
              </table:table-cell>
            </table:table-row>
            <table:table-row>
              <table:table-cell office:value-type="string">
                <text:p>81</text:p>
              </table:table-cell>
              <table:table-cell office:value-type="float" office:value="0.00031999999191612">
                <text:p>0.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2</text:p>
              </table:table-cell>
              <table:table-cell office:value-type="float" office:value="0.000323999991815072">
                <text:p>0.000323999991815072</text:p>
              </table:table-cell>
              <table:table-cell office:value-type="float" office:value="0.196000009775162">
                <text:p>0.196000009775162</text:p>
              </table:table-cell>
              <table:table-cell office:value-type="float" office:value="NaN">
                <text:p>NaN</text:p>
              </table:table-cell>
            </table:table-row>
            <table:table-row>
              <table:table-cell office:value-type="string">
                <text:p>83</text:p>
              </table:table-cell>
              <table:table-cell office:value-type="float" office:value="0.000327999991714023">
                <text:p>0.000327999991714023</text:p>
              </table:table-cell>
              <table:table-cell office:value-type="float" office:value="0.189999997615814">
                <text:p>0.189999997615814</text:p>
              </table:table-cell>
              <table:table-cell office:value-type="float" office:value="NaN">
                <text:p>NaN</text:p>
              </table:table-cell>
            </table:table-row>
            <table:table-row>
              <table:table-cell office:value-type="string">
                <text:p>84</text:p>
              </table:table-cell>
              <table:table-cell office:value-type="float" office:value="0.000331999991612975">
                <text:p>0.000331999991612975</text:p>
              </table:table-cell>
              <table:table-cell office:value-type="float" office:value="0.184000000357628">
                <text:p>0.184000000357628</text:p>
              </table:table-cell>
              <table:table-cell office:value-type="float" office:value="NaN">
                <text:p>NaN</text:p>
              </table:table-cell>
            </table:table-row>
            <table:table-row>
              <table:table-cell office:value-type="string">
                <text:p>85</text:p>
              </table:table-cell>
              <table:table-cell office:value-type="float" office:value="0.000335999991511926">
                <text:p>0.000335999991511926</text:p>
              </table:table-cell>
              <table:table-cell office:value-type="float" office:value="0.180000007152557">
                <text:p>0.180000007152557</text:p>
              </table:table-cell>
              <table:table-cell office:value-type="float" office:value="NaN">
                <text:p>NaN</text:p>
              </table:table-cell>
            </table:table-row>
            <table:table-row>
              <table:table-cell office:value-type="string">
                <text:p>86</text:p>
              </table:table-cell>
              <table:table-cell office:value-type="float" office:value="0.000339999991410878">
                <text:p>0.000339999991410878</text:p>
              </table:table-cell>
              <table:table-cell office:value-type="float" office:value="0.175999999046326">
                <text:p>0.175999999046326</text:p>
              </table:table-cell>
              <table:table-cell office:value-type="float" office:value="NaN">
                <text:p>NaN</text:p>
              </table:table-cell>
            </table:table-row>
            <table:table-row>
              <table:table-cell office:value-type="string">
                <text:p>87</text:p>
              </table:table-cell>
              <table:table-cell office:value-type="float" office:value="0.000343999991309829">
                <text:p>0.000343999991309829</text:p>
              </table:table-cell>
              <table:table-cell office:value-type="float" office:value="0.170000001788139">
                <text:p>0.170000001788139</text:p>
              </table:table-cell>
              <table:table-cell office:value-type="float" office:value="NaN">
                <text:p>NaN</text:p>
              </table:table-cell>
            </table:table-row>
            <table:table-row>
              <table:table-cell office:value-type="string">
                <text:p>88</text:p>
              </table:table-cell>
              <table:table-cell office:value-type="float" office:value="0.000347999991208781">
                <text:p>0.000347999991208781</text:p>
              </table:table-cell>
              <table:table-cell office:value-type="float" office:value="0.166000008583069">
                <text:p>0.166000008583069</text:p>
              </table:table-cell>
              <table:table-cell office:value-type="float" office:value="NaN">
                <text:p>NaN</text:p>
              </table:table-cell>
            </table:table-row>
            <table:table-row>
              <table:table-cell office:value-type="string">
                <text:p>89</text:p>
              </table:table-cell>
              <table:table-cell office:value-type="float" office:value="0.000351999991107732">
                <text:p>0.000351999991107732</text:p>
              </table:table-cell>
              <table:table-cell office:value-type="float" office:value="0.159999996423721">
                <text:p>0.159999996423721</text:p>
              </table:table-cell>
              <table:table-cell office:value-type="float" office:value="NaN">
                <text:p>NaN</text:p>
              </table:table-cell>
            </table:table-row>
            <table:table-row>
              <table:table-cell office:value-type="string">
                <text:p>90</text:p>
              </table:table-cell>
              <table:table-cell office:value-type="float" office:value="0.000355999991006684">
                <text:p>0.000355999991006684</text:p>
              </table:table-cell>
              <table:table-cell office:value-type="float" office:value="0.156000003218651">
                <text:p>0.156000003218651</text:p>
              </table:table-cell>
              <table:table-cell office:value-type="float" office:value="NaN">
                <text:p>NaN</text:p>
              </table:table-cell>
            </table:table-row>
            <table:table-row>
              <table:table-cell office:value-type="string">
                <text:p>91</text:p>
              </table:table-cell>
              <table:table-cell office:value-type="float" office:value="0.000359999990905635">
                <text:p>0.000359999990905635</text:p>
              </table:table-cell>
              <table:table-cell office:value-type="float" office:value="0.151999995112419">
                <text:p>0.151999995112419</text:p>
              </table:table-cell>
              <table:table-cell office:value-type="float" office:value="NaN">
                <text:p>NaN</text:p>
              </table:table-cell>
            </table:table-row>
            <table:table-row>
              <table:table-cell office:value-type="string">
                <text:p>92</text:p>
              </table:table-cell>
              <table:table-cell office:value-type="float" office:value="0.000363999990804587">
                <text:p>0.000363999990804587</text:p>
              </table:table-cell>
              <table:table-cell office:value-type="float" office:value="0.148000001907349">
                <text:p>0.148000001907349</text:p>
              </table:table-cell>
              <table:table-cell office:value-type="float" office:value="NaN">
                <text:p>NaN</text:p>
              </table:table-cell>
            </table:table-row>
            <table:table-row>
              <table:table-cell office:value-type="string">
                <text:p>93</text:p>
              </table:table-cell>
              <table:table-cell office:value-type="float" office:value="0.000367999990703538">
                <text:p>0.000367999990703538</text:p>
              </table:table-cell>
              <table:table-cell office:value-type="float" office:value="0.140000000596046">
                <text:p>0.140000000596046</text:p>
              </table:table-cell>
              <table:table-cell office:value-type="float" office:value="NaN">
                <text:p>NaN</text:p>
              </table:table-cell>
            </table:table-row>
            <table:table-row>
              <table:table-cell office:value-type="string">
                <text:p>94</text:p>
              </table:table-cell>
              <table:table-cell office:value-type="float" office:value="0.00037199999060249">
                <text:p>0.00037199999060249</text:p>
              </table:table-cell>
              <table:table-cell office:value-type="float" office:value="0.136000007390976">
                <text:p>0.136000007390976</text:p>
              </table:table-cell>
              <table:table-cell office:value-type="float" office:value="NaN">
                <text:p>NaN</text:p>
              </table:table-cell>
            </table:table-row>
            <table:table-row>
              <table:table-cell office:value-type="string">
                <text:p>95</text:p>
              </table:table-cell>
              <table:table-cell office:value-type="float" office:value="0.000375999990501441">
                <text:p>0.000375999990501441</text:p>
              </table:table-cell>
              <table:table-cell office:value-type="float" office:value="0.130999997258186">
                <text:p>0.130999997258186</text:p>
              </table:table-cell>
              <table:table-cell office:value-type="float" office:value="NaN">
                <text:p>NaN</text:p>
              </table:table-cell>
            </table:table-row>
            <table:table-row>
              <table:table-cell office:value-type="string">
                <text:p>96</text:p>
              </table:table-cell>
              <table:table-cell office:value-type="float" office:value="0.000379999990400393">
                <text:p>0.000379999990400393</text:p>
              </table:table-cell>
              <table:table-cell office:value-type="float" office:value="0.128000006079674">
                <text:p>0.128000006079674</text:p>
              </table:table-cell>
              <table:table-cell office:value-type="float" office:value="NaN">
                <text:p>NaN</text:p>
              </table:table-cell>
            </table:table-row>
            <table:table-row>
              <table:table-cell office:value-type="string">
                <text:p>97</text:p>
              </table:table-cell>
              <table:table-cell office:value-type="float" office:value="0.000383999990299344">
                <text:p>0.000383999990299344</text:p>
              </table:table-cell>
              <table:table-cell office:value-type="float" office:value="0.122000001370907">
                <text:p>0.122000001370907</text:p>
              </table:table-cell>
              <table:table-cell office:value-type="float" office:value="NaN">
                <text:p>NaN</text:p>
              </table:table-cell>
            </table:table-row>
            <table:table-row>
              <table:table-cell office:value-type="string">
                <text:p>98</text:p>
              </table:table-cell>
              <table:table-cell office:value-type="float" office:value="0.000387999990198296">
                <text:p>0.000387999990198296</text:p>
              </table:table-cell>
              <table:table-cell office:value-type="float" office:value="0.11600000411272">
                <text:p>0.11600000411272</text:p>
              </table:table-cell>
              <table:table-cell office:value-type="float" office:value="NaN">
                <text:p>NaN</text:p>
              </table:table-cell>
            </table:table-row>
            <table:table-row>
              <table:table-cell office:value-type="string">
                <text:p>99</text:p>
              </table:table-cell>
              <table:table-cell office:value-type="float" office:value="0.000391999990097247">
                <text:p>0.000391999990097247</text:p>
              </table:table-cell>
              <table:table-cell office:value-type="float" office:value="0.112000003457069">
                <text:p>0.112000003457069</text:p>
              </table:table-cell>
              <table:table-cell office:value-type="float" office:value="NaN">
                <text:p>NaN</text:p>
              </table:table-cell>
            </table:table-row>
            <table:table-row>
              <table:table-cell office:value-type="string">
                <text:p>100</text:p>
              </table:table-cell>
              <table:table-cell office:value-type="float" office:value="0.000395999989996199">
                <text:p>0.000395999989996199</text:p>
              </table:table-cell>
              <table:table-cell office:value-type="float" office:value="0.108000002801418">
                <text:p>0.108000002801418</text:p>
              </table:table-cell>
              <table:table-cell office:value-type="float" office:value="NaN">
                <text:p>NaN</text:p>
              </table:table-cell>
            </table:table-row>
            <table:table-row>
              <table:table-cell office:value-type="string">
                <text:p>101</text:p>
              </table:table-cell>
              <table:table-cell office:value-type="float" office:value="0.00039999998989515">
                <text:p>0.00039999998989515</text:p>
              </table:table-cell>
              <table:table-cell office:value-type="float" office:value="0.101999998092651">
                <text:p>0.101999998092651</text:p>
              </table:table-cell>
              <table:table-cell office:value-type="float" office:value="NaN">
                <text:p>NaN</text:p>
              </table:table-cell>
            </table:table-row>
            <table:table-row>
              <table:table-cell office:value-type="string">
                <text:p>102</text:p>
              </table:table-cell>
              <table:table-cell office:value-type="float" office:value="0.000403999989794102">
                <text:p>0.00040399998979410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03</text:p>
              </table:table-cell>
              <table:table-cell office:value-type="float" office:value="0.000407999989693053">
                <text:p>0.000407999989693053</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04</text:p>
              </table:table-cell>
              <table:table-cell office:value-type="float" office:value="0.000411999989592005">
                <text:p>0.00041199998959200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5</text:p>
              </table:table-cell>
              <table:table-cell office:value-type="float" office:value="0.000415999989490956">
                <text:p>0.00041599998949095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6</text:p>
              </table:table-cell>
              <table:table-cell office:value-type="float" office:value="0.000419999989389908">
                <text:p>0.00041999998938990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07</text:p>
              </table:table-cell>
              <table:table-cell office:value-type="float" office:value="0.000423999989288859">
                <text:p>0.00042399998928885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08</text:p>
              </table:table-cell>
              <table:table-cell office:value-type="float" office:value="0.000427999989187811">
                <text:p>0.000427999989187811</text:p>
              </table:table-cell>
              <table:table-cell office:value-type="float" office:value="0.068000003695488">
                <text:p>0.068000003695488</text:p>
              </table:table-cell>
              <table:table-cell office:value-type="float" office:value="NaN">
                <text:p>NaN</text:p>
              </table:table-cell>
            </table:table-row>
            <table:table-row>
              <table:table-cell office:value-type="string">
                <text:p>109</text:p>
              </table:table-cell>
              <table:table-cell office:value-type="float" office:value="0.000431999989086762">
                <text:p>0.00043199998908676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0</text:p>
              </table:table-cell>
              <table:table-cell office:value-type="float" office:value="0.000435999988985714">
                <text:p>0.000435999988985714</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11</text:p>
              </table:table-cell>
              <table:table-cell office:value-type="float" office:value="0.000439999988884665">
                <text:p>0.00043999998888466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2</text:p>
              </table:table-cell>
              <table:table-cell office:value-type="float" office:value="0.000443999988783617">
                <text:p>0.00044399998878361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text:p>
              </table:table-cell>
              <table:table-cell office:value-type="float" office:value="0.000447999988682568">
                <text:p>0.000447999988682568</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4</text:p>
              </table:table-cell>
              <table:table-cell office:value-type="float" office:value="0.00045199998858152">
                <text:p>0.00045199998858152</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15</text:p>
              </table:table-cell>
              <table:table-cell office:value-type="float" office:value="0.000455999988480471">
                <text:p>0.000455999988480471</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6</text:p>
              </table:table-cell>
              <table:table-cell office:value-type="float" office:value="0.000459999988379423">
                <text:p>0.000459999988379423</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7</text:p>
              </table:table-cell>
              <table:table-cell office:value-type="float" office:value="0.000463999988278374">
                <text:p>0.000463999988278374</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8</text:p>
              </table:table-cell>
              <table:table-cell office:value-type="float" office:value="0.000467999988177326">
                <text:p>0.00046799998817732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9</text:p>
              </table:table-cell>
              <table:table-cell office:value-type="float" office:value="0.000471999988076277">
                <text:p>0.000471999988076277</text:p>
              </table:table-cell>
              <table:table-cell office:value-type="float" office:value="0.017000000923872">
                <text:p>0.017000000923872</text:p>
              </table:table-cell>
              <table:table-cell office:value-type="float" office:value="NaN">
                <text:p>NaN</text:p>
              </table:table-cell>
            </table:table-row>
            <table:table-row>
              <table:table-cell office:value-type="string">
                <text:p>120</text:p>
              </table:table-cell>
              <table:table-cell office:value-type="float" office:value="0.000475999987975229">
                <text:p>0.00047599998797522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21</text:p>
              </table:table-cell>
              <table:table-cell office:value-type="float" office:value="0.00047999998787418">
                <text:p>0.0004799999878741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2</text:p>
              </table:table-cell>
              <table:table-cell office:value-type="float" office:value="0.000483999987773132">
                <text:p>0.000483999987773132</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3</text:p>
              </table:table-cell>
              <table:table-cell office:value-type="float" office:value="0.000487999987672083">
                <text:p>0.000487999987672083</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4</text:p>
              </table:table-cell>
              <table:table-cell office:value-type="float" office:value="0.000491999987571035">
                <text:p>0.000491999987571035</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text:p>
              </table:table-cell>
              <table:table-cell office:value-type="float" office:value="0.000495999987469986">
                <text:p>0.000495999987469986</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6</text:p>
              </table:table-cell>
              <table:table-cell office:value-type="float" office:value="0.000499999987368938">
                <text:p>0.000499999987368938</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7</text:p>
              </table:table-cell>
              <table:table-cell office:value-type="float" office:value="0.000503999987267889">
                <text:p>0.000503999987267889</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8</text:p>
              </table:table-cell>
              <table:table-cell office:value-type="float" office:value="0.000507999987166841">
                <text:p>0.00050799998716684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9</text:p>
              </table:table-cell>
              <table:table-cell office:value-type="float" office:value="0.000511999987065792">
                <text:p>0.000511999987065792</text:p>
              </table:table-cell>
              <table:table-cell office:value-type="float" office:value="-0.034000001847744">
                <text:p>-0.034000001847744</text:p>
              </table:table-cell>
              <table:table-cell office:value-type="float" office:value="NaN">
                <text:p>NaN</text:p>
              </table:table-cell>
            </table:table-row>
            <table:table-row>
              <table:table-cell office:value-type="string">
                <text:p>130</text:p>
              </table:table-cell>
              <table:table-cell office:value-type="float" office:value="0.000515999986964744">
                <text:p>0.00051599998696474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1</text:p>
              </table:table-cell>
              <table:table-cell office:value-type="float" office:value="0.000519999986863695">
                <text:p>0.000519999986863695</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2</text:p>
              </table:table-cell>
              <table:table-cell office:value-type="float" office:value="0.000523999986762647">
                <text:p>0.00052399998676264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3</text:p>
              </table:table-cell>
              <table:table-cell office:value-type="float" office:value="0.000527999986661598">
                <text:p>0.000527999986661598</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34</text:p>
              </table:table-cell>
              <table:table-cell office:value-type="float" office:value="0.00053199998656055">
                <text:p>0.00053199998656055</text:p>
              </table:table-cell>
              <table:table-cell office:value-type="float" office:value="-0.0600000023841858">
                <text:p>-0.0600000023841858</text:p>
              </table:table-cell>
              <table:table-cell office:value-type="float" office:value="NaN">
                <text:p>NaN</text:p>
              </table:table-cell>
            </table:table-row>
            <table:table-row>
              <table:table-cell office:value-type="string">
                <text:p>135</text:p>
              </table:table-cell>
              <table:table-cell office:value-type="float" office:value="0.000535999986459501">
                <text:p>0.000535999986459501</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6</text:p>
              </table:table-cell>
              <table:table-cell office:value-type="float" office:value="0.000539999986358453">
                <text:p>0.000539999986358453</text:p>
              </table:table-cell>
              <table:table-cell office:value-type="float" office:value="-0.068000003695488">
                <text:p>-0.068000003695488</text:p>
              </table:table-cell>
              <table:table-cell office:value-type="float" office:value="NaN">
                <text:p>NaN</text:p>
              </table:table-cell>
            </table:table-row>
            <table:table-row>
              <table:table-cell office:value-type="string">
                <text:p>137</text:p>
              </table:table-cell>
              <table:table-cell office:value-type="float" office:value="0.000543999986257404">
                <text:p>0.000543999986257404</text:p>
              </table:table-cell>
              <table:table-cell office:value-type="float" office:value="-0.0729999989271164">
                <text:p>-0.0729999989271164</text:p>
              </table:table-cell>
              <table:table-cell office:value-type="float" office:value="NaN">
                <text:p>NaN</text:p>
              </table:table-cell>
            </table:table-row>
            <table:table-row>
              <table:table-cell office:value-type="string">
                <text:p>138</text:p>
              </table:table-cell>
              <table:table-cell office:value-type="float" office:value="0.000547999986156356">
                <text:p>0.00054799998615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39</text:p>
              </table:table-cell>
              <table:table-cell office:value-type="float" office:value="0.000551999986055307">
                <text:p>0.00055199998605530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40</text:p>
              </table:table-cell>
              <table:table-cell office:value-type="float" office:value="0.000555999985954259">
                <text:p>0.00055599998595425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1</text:p>
              </table:table-cell>
              <table:table-cell office:value-type="float" office:value="0.00055999998585321">
                <text:p>0.00055999998585321</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42</text:p>
              </table:table-cell>
              <table:table-cell office:value-type="float" office:value="0.000563999985752162">
                <text:p>0.000563999985752162</text:p>
              </table:table-cell>
              <table:table-cell office:value-type="float" office:value="-0.097000002861023">
                <text:p>-0.097000002861023</text:p>
              </table:table-cell>
              <table:table-cell office:value-type="float" office:value="NaN">
                <text:p>NaN</text:p>
              </table:table-cell>
            </table:table-row>
            <table:table-row>
              <table:table-cell office:value-type="string">
                <text:p>143</text:p>
              </table:table-cell>
              <table:table-cell office:value-type="float" office:value="0.000567999985651113">
                <text:p>0.000567999985651113</text:p>
              </table:table-cell>
              <table:table-cell office:value-type="float" office:value="-0.100000001490116">
                <text:p>-0.100000001490116</text:p>
              </table:table-cell>
              <table:table-cell office:value-type="float" office:value="NaN">
                <text:p>NaN</text:p>
              </table:table-cell>
            </table:table-row>
            <table:table-row>
              <table:table-cell office:value-type="string">
                <text:p>144</text:p>
              </table:table-cell>
              <table:table-cell office:value-type="float" office:value="0.000571999985550065">
                <text:p>0.000571999985550065</text:p>
              </table:table-cell>
              <table:table-cell office:value-type="float" office:value="-0.105999998748302">
                <text:p>-0.105999998748302</text:p>
              </table:table-cell>
              <table:table-cell office:value-type="float" office:value="NaN">
                <text:p>NaN</text:p>
              </table:table-cell>
            </table:table-row>
            <table:table-row>
              <table:table-cell office:value-type="string">
                <text:p>145</text:p>
              </table:table-cell>
              <table:table-cell office:value-type="float" office:value="0.000575999985449016">
                <text:p>0.000575999985449016</text:p>
              </table:table-cell>
              <table:table-cell office:value-type="float" office:value="-0.112000003457069">
                <text:p>-0.112000003457069</text:p>
              </table:table-cell>
              <table:table-cell office:value-type="float" office:value="NaN">
                <text:p>NaN</text:p>
              </table:table-cell>
            </table:table-row>
            <table:table-row>
              <table:table-cell office:value-type="string">
                <text:p>146</text:p>
              </table:table-cell>
              <table:table-cell office:value-type="float" office:value="0.000579999985347968">
                <text:p>0.000579999985347968</text:p>
              </table:table-cell>
              <table:table-cell office:value-type="float" office:value="-0.11600000411272">
                <text:p>-0.11600000411272</text:p>
              </table:table-cell>
              <table:table-cell office:value-type="float" office:value="NaN">
                <text:p>NaN</text:p>
              </table:table-cell>
            </table:table-row>
            <table:table-row>
              <table:table-cell office:value-type="string">
                <text:p>147</text:p>
              </table:table-cell>
              <table:table-cell office:value-type="float" office:value="0.000583999985246919">
                <text:p>0.000583999985246919</text:p>
              </table:table-cell>
              <table:table-cell office:value-type="float" office:value="-0.122000001370907">
                <text:p>-0.122000001370907</text:p>
              </table:table-cell>
              <table:table-cell office:value-type="float" office:value="NaN">
                <text:p>NaN</text:p>
              </table:table-cell>
            </table:table-row>
            <table:table-row>
              <table:table-cell office:value-type="string">
                <text:p>148</text:p>
              </table:table-cell>
              <table:table-cell office:value-type="float" office:value="0.000587999985145871">
                <text:p>0.000587999985145871</text:p>
              </table:table-cell>
              <table:table-cell office:value-type="float" office:value="-0.126000002026558">
                <text:p>-0.126000002026558</text:p>
              </table:table-cell>
              <table:table-cell office:value-type="float" office:value="NaN">
                <text:p>NaN</text:p>
              </table:table-cell>
            </table:table-row>
            <table:table-row>
              <table:table-cell office:value-type="string">
                <text:p>149</text:p>
              </table:table-cell>
              <table:table-cell office:value-type="float" office:value="0.000591999985044822">
                <text:p>0.000591999985044822</text:p>
              </table:table-cell>
              <table:table-cell office:value-type="float" office:value="-0.129999995231628">
                <text:p>-0.129999995231628</text:p>
              </table:table-cell>
              <table:table-cell office:value-type="float" office:value="NaN">
                <text:p>NaN</text:p>
              </table:table-cell>
            </table:table-row>
            <table:table-row>
              <table:table-cell office:value-type="string">
                <text:p>150</text:p>
              </table:table-cell>
              <table:table-cell office:value-type="float" office:value="0.000595999984943774">
                <text:p>0.000595999984943774</text:p>
              </table:table-cell>
              <table:table-cell office:value-type="float" office:value="-0.137999996542931">
                <text:p>-0.137999996542931</text:p>
              </table:table-cell>
              <table:table-cell office:value-type="float" office:value="NaN">
                <text:p>NaN</text:p>
              </table:table-cell>
            </table:table-row>
            <table:table-row>
              <table:table-cell office:value-type="string">
                <text:p>151</text:p>
              </table:table-cell>
              <table:table-cell office:value-type="float" office:value="0.000599999984842725">
                <text:p>0.000599999984842725</text:p>
              </table:table-cell>
              <table:table-cell office:value-type="float" office:value="-0.142000004649162">
                <text:p>-0.142000004649162</text:p>
              </table:table-cell>
              <table:table-cell office:value-type="float" office:value="NaN">
                <text:p>NaN</text:p>
              </table:table-cell>
            </table:table-row>
            <table:table-row>
              <table:table-cell office:value-type="string">
                <text:p>152</text:p>
              </table:table-cell>
              <table:table-cell office:value-type="float" office:value="0.000603999984741677">
                <text:p>0.000603999984741677</text:p>
              </table:table-cell>
              <table:table-cell office:value-type="float" office:value="-0.14300000667572">
                <text:p>-0.14300000667572</text:p>
              </table:table-cell>
              <table:table-cell office:value-type="float" office:value="NaN">
                <text:p>NaN</text:p>
              </table:table-cell>
            </table:table-row>
            <table:table-row>
              <table:table-cell office:value-type="string">
                <text:p>153</text:p>
              </table:table-cell>
              <table:table-cell office:value-type="float" office:value="0.000607999984640628">
                <text:p>0.000607999984640628</text:p>
              </table:table-cell>
              <table:table-cell office:value-type="float" office:value="-0.151999995112419">
                <text:p>-0.151999995112419</text:p>
              </table:table-cell>
              <table:table-cell office:value-type="float" office:value="NaN">
                <text:p>NaN</text:p>
              </table:table-cell>
            </table:table-row>
            <table:table-row>
              <table:table-cell office:value-type="string">
                <text:p>154</text:p>
              </table:table-cell>
              <table:table-cell office:value-type="float" office:value="0.00061199998453958">
                <text:p>0.00061199998453958</text:p>
              </table:table-cell>
              <table:table-cell office:value-type="float" office:value="-0.156000003218651">
                <text:p>-0.156000003218651</text:p>
              </table:table-cell>
              <table:table-cell office:value-type="float" office:value="NaN">
                <text:p>NaN</text:p>
              </table:table-cell>
            </table:table-row>
            <table:table-row>
              <table:table-cell office:value-type="string">
                <text:p>155</text:p>
              </table:table-cell>
              <table:table-cell office:value-type="float" office:value="0.000615999984438531">
                <text:p>0.000615999984438531</text:p>
              </table:table-cell>
              <table:table-cell office:value-type="float" office:value="-0.159999996423721">
                <text:p>-0.159999996423721</text:p>
              </table:table-cell>
              <table:table-cell office:value-type="float" office:value="NaN">
                <text:p>NaN</text:p>
              </table:table-cell>
            </table:table-row>
            <table:table-row>
              <table:table-cell office:value-type="string">
                <text:p>156</text:p>
              </table:table-cell>
              <table:table-cell office:value-type="float" office:value="0.000619999984337483">
                <text:p>0.000619999984337483</text:p>
              </table:table-cell>
              <table:table-cell office:value-type="float" office:value="-0.166000008583069">
                <text:p>-0.166000008583069</text:p>
              </table:table-cell>
              <table:table-cell office:value-type="float" office:value="NaN">
                <text:p>NaN</text:p>
              </table:table-cell>
            </table:table-row>
            <table:table-row>
              <table:table-cell office:value-type="string">
                <text:p>157</text:p>
              </table:table-cell>
              <table:table-cell office:value-type="float" office:value="0.000623999984236434">
                <text:p>0.000623999984236434</text:p>
              </table:table-cell>
              <table:table-cell office:value-type="float" office:value="-0.170000001788139">
                <text:p>-0.170000001788139</text:p>
              </table:table-cell>
              <table:table-cell office:value-type="float" office:value="NaN">
                <text:p>NaN</text:p>
              </table:table-cell>
            </table:table-row>
            <table:table-row>
              <table:table-cell office:value-type="string">
                <text:p>158</text:p>
              </table:table-cell>
              <table:table-cell office:value-type="float" office:value="0.000627999984135386">
                <text:p>0.000627999984135386</text:p>
              </table:table-cell>
              <table:table-cell office:value-type="float" office:value="-0.174000009894371">
                <text:p>-0.174000009894371</text:p>
              </table:table-cell>
              <table:table-cell office:value-type="float" office:value="NaN">
                <text:p>NaN</text:p>
              </table:table-cell>
            </table:table-row>
            <table:table-row>
              <table:table-cell office:value-type="string">
                <text:p>159</text:p>
              </table:table-cell>
              <table:table-cell office:value-type="float" office:value="0.000631999984034337">
                <text:p>0.000631999984034337</text:p>
              </table:table-cell>
              <table:table-cell office:value-type="float" office:value="-0.180000007152557">
                <text:p>-0.180000007152557</text:p>
              </table:table-cell>
              <table:table-cell office:value-type="float" office:value="NaN">
                <text:p>NaN</text:p>
              </table:table-cell>
            </table:table-row>
            <table:table-row>
              <table:table-cell office:value-type="string">
                <text:p>160</text:p>
              </table:table-cell>
              <table:table-cell office:value-type="float" office:value="0.000635999983933289">
                <text:p>0.000635999983933289</text:p>
              </table:table-cell>
              <table:table-cell office:value-type="float" office:value="-0.186000004410744">
                <text:p>-0.186000004410744</text:p>
              </table:table-cell>
              <table:table-cell office:value-type="float" office:value="NaN">
                <text:p>NaN</text:p>
              </table:table-cell>
            </table:table-row>
            <table:table-row>
              <table:table-cell office:value-type="string">
                <text:p>161</text:p>
              </table:table-cell>
              <table:table-cell office:value-type="float" office:value="0.00063999998383224">
                <text:p>0.00063999998383224</text:p>
              </table:table-cell>
              <table:table-cell office:value-type="float" office:value="-0.188999995589256">
                <text:p>-0.188999995589256</text:p>
              </table:table-cell>
              <table:table-cell office:value-type="float" office:value="NaN">
                <text:p>NaN</text:p>
              </table:table-cell>
            </table:table-row>
            <table:table-row>
              <table:table-cell office:value-type="string">
                <text:p>162</text:p>
              </table:table-cell>
              <table:table-cell office:value-type="float" office:value="0.000643999983731192">
                <text:p>0.000643999983731192</text:p>
              </table:table-cell>
              <table:table-cell office:value-type="float" office:value="-0.194000005722046">
                <text:p>-0.194000005722046</text:p>
              </table:table-cell>
              <table:table-cell office:value-type="float" office:value="NaN">
                <text:p>NaN</text:p>
              </table:table-cell>
            </table:table-row>
            <table:table-row>
              <table:table-cell office:value-type="string">
                <text:p>163</text:p>
              </table:table-cell>
              <table:table-cell office:value-type="float" office:value="0.000647999983630143">
                <text:p>0.000647999983630143</text:p>
              </table:table-cell>
              <table:table-cell office:value-type="float" office:value="-0.200000002980232">
                <text:p>-0.200000002980232</text:p>
              </table:table-cell>
              <table:table-cell office:value-type="float" office:value="NaN">
                <text:p>NaN</text:p>
              </table:table-cell>
            </table:table-row>
            <table:table-row>
              <table:table-cell office:value-type="string">
                <text:p>164</text:p>
              </table:table-cell>
              <table:table-cell office:value-type="float" office:value="0.000651999983529095">
                <text:p>0.000651999983529095</text:p>
              </table:table-cell>
              <table:table-cell office:value-type="float" office:value="-0.202000007033348">
                <text:p>-0.202000007033348</text:p>
              </table:table-cell>
              <table:table-cell office:value-type="float" office:value="NaN">
                <text:p>NaN</text:p>
              </table:table-cell>
            </table:table-row>
            <table:table-row>
              <table:table-cell office:value-type="string">
                <text:p>165</text:p>
              </table:table-cell>
              <table:table-cell office:value-type="float" office:value="0.000655999983428046">
                <text:p>0.0006559999834280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66</text:p>
              </table:table-cell>
              <table:table-cell office:value-type="float" office:value="0.000659999983326998">
                <text:p>0.000659999983326998</text:p>
              </table:table-cell>
              <table:table-cell office:value-type="float" office:value="-0.203999996185303">
                <text:p>-0.203999996185303</text:p>
              </table:table-cell>
              <table:table-cell office:value-type="float" office:value="NaN">
                <text:p>NaN</text:p>
              </table:table-cell>
            </table:table-row>
            <table:table-row>
              <table:table-cell office:value-type="string">
                <text:p>167</text:p>
              </table:table-cell>
              <table:table-cell office:value-type="float" office:value="0.000663999983225949">
                <text:p>0.000663999983225949</text:p>
              </table:table-cell>
              <table:table-cell office:value-type="float" office:value="-0.203999996185303">
                <text:p>-0.203999996185303</text:p>
              </table:table-cell>
              <table:table-cell office:value-type="float" office:value="NaN">
                <text:p>NaN</text:p>
              </table:table-cell>
            </table:table-row>
            <table:table-row>
              <table:table-cell office:value-type="string">
                <text:p>168</text:p>
              </table:table-cell>
              <table:table-cell office:value-type="float" office:value="0.000667999983124901">
                <text:p>0.0006679999831249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69</text:p>
              </table:table-cell>
              <table:table-cell office:value-type="float" office:value="0.000671999983023852">
                <text:p>0.000671999983023852</text:p>
              </table:table-cell>
              <table:table-cell office:value-type="float" office:value="-0.203999996185303">
                <text:p>-0.203999996185303</text:p>
              </table:table-cell>
              <table:table-cell office:value-type="float" office:value="NaN">
                <text:p>NaN</text:p>
              </table:table-cell>
            </table:table-row>
            <table:table-row>
              <table:table-cell office:value-type="string">
                <text:p>170</text:p>
              </table:table-cell>
              <table:table-cell office:value-type="float" office:value="0.000675999982922804">
                <text:p>0.00067599998292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1</text:p>
              </table:table-cell>
              <table:table-cell office:value-type="float" office:value="0.000679999982821755">
                <text:p>0.0006799999828217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72</text:p>
              </table:table-cell>
              <table:table-cell office:value-type="float" office:value="0.000683999982720707">
                <text:p>0.00068399998272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173</text:p>
              </table:table-cell>
              <table:table-cell office:value-type="float" office:value="0.000687999982619658">
                <text:p>0.0006879999826196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74</text:p>
              </table:table-cell>
              <table:table-cell office:value-type="float" office:value="0.00069199998251861">
                <text:p>0.000691999982518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5</text:p>
              </table:table-cell>
              <table:table-cell office:value-type="float" office:value="0.000695999982417561">
                <text:p>0.0006959999824175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6</text:p>
              </table:table-cell>
              <table:table-cell office:value-type="float" office:value="0.000699999982316513">
                <text:p>0.0006999999823165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77</text:p>
              </table:table-cell>
              <table:table-cell office:value-type="float" office:value="0.000703999982215464">
                <text:p>0.0007039999822154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8</text:p>
              </table:table-cell>
              <table:table-cell office:value-type="float" office:value="0.000707999982114416">
                <text:p>0.0007079999821144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79</text:p>
              </table:table-cell>
              <table:table-cell office:value-type="float" office:value="0.000711999982013367">
                <text:p>0.0007119999820133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0</text:p>
              </table:table-cell>
              <table:table-cell office:value-type="float" office:value="0.000715999981912319">
                <text:p>0.0007159999819123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1</text:p>
              </table:table-cell>
              <table:table-cell office:value-type="float" office:value="0.00071999998181127">
                <text:p>0.0007199999818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2</text:p>
              </table:table-cell>
              <table:table-cell office:value-type="float" office:value="0.000723999981710222">
                <text:p>0.000723999981710222</text:p>
              </table:table-cell>
              <table:table-cell office:value-type="float" office:value="-0.203999996185303">
                <text:p>-0.203999996185303</text:p>
              </table:table-cell>
              <table:table-cell office:value-type="float" office:value="NaN">
                <text:p>NaN</text:p>
              </table:table-cell>
            </table:table-row>
            <table:table-row>
              <table:table-cell office:value-type="string">
                <text:p>183</text:p>
              </table:table-cell>
              <table:table-cell office:value-type="float" office:value="0.000727999981609173">
                <text:p>0.000727999981609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84</text:p>
              </table:table-cell>
              <table:table-cell office:value-type="float" office:value="0.000731999981508125">
                <text:p>0.000731999981508125</text:p>
              </table:table-cell>
              <table:table-cell office:value-type="float" office:value="-0.203999996185303">
                <text:p>-0.203999996185303</text:p>
              </table:table-cell>
              <table:table-cell office:value-type="float" office:value="NaN">
                <text:p>NaN</text:p>
              </table:table-cell>
            </table:table-row>
            <table:table-row>
              <table:table-cell office:value-type="string">
                <text:p>185</text:p>
              </table:table-cell>
              <table:table-cell office:value-type="float" office:value="0.000735999981407076">
                <text:p>0.000735999981407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186</text:p>
              </table:table-cell>
              <table:table-cell office:value-type="float" office:value="0.000739999981306028">
                <text:p>0.000739999981306028</text:p>
              </table:table-cell>
              <table:table-cell office:value-type="float" office:value="-0.203999996185303">
                <text:p>-0.203999996185303</text:p>
              </table:table-cell>
              <table:table-cell office:value-type="float" office:value="NaN">
                <text:p>NaN</text:p>
              </table:table-cell>
            </table:table-row>
            <table:table-row>
              <table:table-cell office:value-type="string">
                <text:p>187</text:p>
              </table:table-cell>
              <table:table-cell office:value-type="float" office:value="0.000743999981204979">
                <text:p>0.0007439999812049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8</text:p>
              </table:table-cell>
              <table:table-cell office:value-type="float" office:value="0.000747999981103931">
                <text:p>0.0007479999811039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89</text:p>
              </table:table-cell>
              <table:table-cell office:value-type="float" office:value="0.000751999981002882">
                <text:p>0.0007519999810028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90</text:p>
              </table:table-cell>
              <table:table-cell office:value-type="float" office:value="0.000755999980901834">
                <text:p>0.0007559999809018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1</text:p>
              </table:table-cell>
              <table:table-cell office:value-type="float" office:value="0.000759999980800785">
                <text:p>0.0007599999808007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92</text:p>
              </table:table-cell>
              <table:table-cell office:value-type="float" office:value="0.000763999980699737">
                <text:p>0.000763999980699737</text:p>
              </table:table-cell>
              <table:table-cell office:value-type="float" office:value="-0.203999996185303">
                <text:p>-0.203999996185303</text:p>
              </table:table-cell>
              <table:table-cell office:value-type="float" office:value="NaN">
                <text:p>NaN</text:p>
              </table:table-cell>
            </table:table-row>
            <table:table-row>
              <table:table-cell office:value-type="string">
                <text:p>193</text:p>
              </table:table-cell>
              <table:table-cell office:value-type="float" office:value="0.000767999980598688">
                <text:p>0.000767999980598688</text:p>
              </table:table-cell>
              <table:table-cell office:value-type="float" office:value="-0.203999996185303">
                <text:p>-0.203999996185303</text:p>
              </table:table-cell>
              <table:table-cell office:value-type="float" office:value="NaN">
                <text:p>NaN</text:p>
              </table:table-cell>
            </table:table-row>
            <table:table-row>
              <table:table-cell office:value-type="string">
                <text:p>194</text:p>
              </table:table-cell>
              <table:table-cell office:value-type="float" office:value="0.00077199998049764">
                <text:p>0.000771999980497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5</text:p>
              </table:table-cell>
              <table:table-cell office:value-type="float" office:value="0.000775999980396591">
                <text:p>0.000775999980396591</text:p>
              </table:table-cell>
              <table:table-cell office:value-type="float" office:value="-0.203999996185303">
                <text:p>-0.203999996185303</text:p>
              </table:table-cell>
              <table:table-cell office:value-type="float" office:value="NaN">
                <text:p>NaN</text:p>
              </table:table-cell>
            </table:table-row>
            <table:table-row>
              <table:table-cell office:value-type="string">
                <text:p>196</text:p>
              </table:table-cell>
              <table:table-cell office:value-type="float" office:value="0.000779999980295543">
                <text:p>0.00077999998029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97</text:p>
              </table:table-cell>
              <table:table-cell office:value-type="float" office:value="0.000783999980194494">
                <text:p>0.0007839999801944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8</text:p>
              </table:table-cell>
              <table:table-cell office:value-type="float" office:value="0.000787999980093446">
                <text:p>0.00078799998009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99</text:p>
              </table:table-cell>
              <table:table-cell office:value-type="float" office:value="0.000791999979992397">
                <text:p>0.000791999979992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200</text:p>
              </table:table-cell>
              <table:table-cell office:value-type="float" office:value="0.000795999979891349">
                <text:p>0.000795999979891349</text:p>
              </table:table-cell>
              <table:table-cell office:value-type="float" office:value="-0.203999996185303">
                <text:p>-0.203999996185303</text:p>
              </table:table-cell>
              <table:table-cell office:value-type="float" office:value="NaN">
                <text:p>NaN</text:p>
              </table:table-cell>
            </table:table-row>
            <table:table-row>
              <table:table-cell office:value-type="string">
                <text:p>201</text:p>
              </table:table-cell>
              <table:table-cell office:value-type="float" office:value="0.0007999999797903">
                <text:p>0.0007999999797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2</text:p>
              </table:table-cell>
              <table:table-cell office:value-type="float" office:value="0.000803999979689252">
                <text:p>0.000803999979689252</text:p>
              </table:table-cell>
              <table:table-cell office:value-type="float" office:value="-0.203999996185303">
                <text:p>-0.203999996185303</text:p>
              </table:table-cell>
              <table:table-cell office:value-type="float" office:value="NaN">
                <text:p>NaN</text:p>
              </table:table-cell>
            </table:table-row>
            <table:table-row>
              <table:table-cell office:value-type="string">
                <text:p>203</text:p>
              </table:table-cell>
              <table:table-cell office:value-type="float" office:value="0.000807999979588203">
                <text:p>0.0008079999795882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4</text:p>
              </table:table-cell>
              <table:table-cell office:value-type="float" office:value="0.000811999979487155">
                <text:p>0.000811999979487155</text:p>
              </table:table-cell>
              <table:table-cell office:value-type="float" office:value="-0.203999996185303">
                <text:p>-0.203999996185303</text:p>
              </table:table-cell>
              <table:table-cell office:value-type="float" office:value="NaN">
                <text:p>NaN</text:p>
              </table:table-cell>
            </table:table-row>
            <table:table-row>
              <table:table-cell office:value-type="string">
                <text:p>205</text:p>
              </table:table-cell>
              <table:table-cell office:value-type="float" office:value="0.000815999979386106">
                <text:p>0.000815999979386106</text:p>
              </table:table-cell>
              <table:table-cell office:value-type="float" office:value="-0.203999996185303">
                <text:p>-0.203999996185303</text:p>
              </table:table-cell>
              <table:table-cell office:value-type="float" office:value="NaN">
                <text:p>NaN</text:p>
              </table:table-cell>
            </table:table-row>
            <table:table-row>
              <table:table-cell office:value-type="string">
                <text:p>206</text:p>
              </table:table-cell>
              <table:table-cell office:value-type="float" office:value="0.000819999979285058">
                <text:p>0.000819999979285058</text:p>
              </table:table-cell>
              <table:table-cell office:value-type="float" office:value="-0.203999996185303">
                <text:p>-0.203999996185303</text:p>
              </table:table-cell>
              <table:table-cell office:value-type="float" office:value="NaN">
                <text:p>NaN</text:p>
              </table:table-cell>
            </table:table-row>
            <table:table-row>
              <table:table-cell office:value-type="string">
                <text:p>207</text:p>
              </table:table-cell>
              <table:table-cell office:value-type="float" office:value="0.000823999979184009">
                <text:p>0.000823999979184009</text:p>
              </table:table-cell>
              <table:table-cell office:value-type="float" office:value="-0.203000009059906">
                <text:p>-0.203000009059906</text:p>
              </table:table-cell>
              <table:table-cell office:value-type="float" office:value="NaN">
                <text:p>NaN</text:p>
              </table:table-cell>
            </table:table-row>
            <table:table-row>
              <table:table-cell office:value-type="string">
                <text:p>208</text:p>
              </table:table-cell>
              <table:table-cell office:value-type="float" office:value="0.000827999979082961">
                <text:p>0.000827999979082961</text:p>
              </table:table-cell>
              <table:table-cell office:value-type="float" office:value="-0.200000002980232">
                <text:p>-0.200000002980232</text:p>
              </table:table-cell>
              <table:table-cell office:value-type="float" office:value="NaN">
                <text:p>NaN</text:p>
              </table:table-cell>
            </table:table-row>
            <table:table-row>
              <table:table-cell office:value-type="string">
                <text:p>209</text:p>
              </table:table-cell>
              <table:table-cell office:value-type="float" office:value="0.000831999978981912">
                <text:p>0.000831999978981912</text:p>
              </table:table-cell>
              <table:table-cell office:value-type="float" office:value="-0.196000009775162">
                <text:p>-0.196000009775162</text:p>
              </table:table-cell>
              <table:table-cell office:value-type="float" office:value="NaN">
                <text:p>NaN</text:p>
              </table:table-cell>
            </table:table-row>
            <table:table-row>
              <table:table-cell office:value-type="string">
                <text:p>210</text:p>
              </table:table-cell>
              <table:table-cell office:value-type="float" office:value="0.000835999978880864">
                <text:p>0.000835999978880864</text:p>
              </table:table-cell>
              <table:table-cell office:value-type="float" office:value="-0.19200000166893">
                <text:p>-0.19200000166893</text:p>
              </table:table-cell>
              <table:table-cell office:value-type="float" office:value="NaN">
                <text:p>NaN</text:p>
              </table:table-cell>
            </table:table-row>
            <table:table-row>
              <table:table-cell office:value-type="string">
                <text:p>211</text:p>
              </table:table-cell>
              <table:table-cell office:value-type="float" office:value="0.000839999978779815">
                <text:p>0.000839999978779815</text:p>
              </table:table-cell>
              <table:table-cell office:value-type="float" office:value="-0.18800000846386">
                <text:p>-0.18800000846386</text:p>
              </table:table-cell>
              <table:table-cell office:value-type="float" office:value="NaN">
                <text:p>NaN</text:p>
              </table:table-cell>
            </table:table-row>
            <table:table-row>
              <table:table-cell office:value-type="string">
                <text:p>212</text:p>
              </table:table-cell>
              <table:table-cell office:value-type="float" office:value="0.000843999978678767">
                <text:p>0.000843999978678767</text:p>
              </table:table-cell>
              <table:table-cell office:value-type="float" office:value="-0.184000000357628">
                <text:p>-0.184000000357628</text:p>
              </table:table-cell>
              <table:table-cell office:value-type="float" office:value="NaN">
                <text:p>NaN</text:p>
              </table:table-cell>
            </table:table-row>
            <table:table-row>
              <table:table-cell office:value-type="string">
                <text:p>213</text:p>
              </table:table-cell>
              <table:table-cell office:value-type="float" office:value="0.000847999978577718">
                <text:p>0.000847999978577718</text:p>
              </table:table-cell>
              <table:table-cell office:value-type="float" office:value="-0.175999999046326">
                <text:p>-0.175999999046326</text:p>
              </table:table-cell>
              <table:table-cell office:value-type="float" office:value="NaN">
                <text:p>NaN</text:p>
              </table:table-cell>
            </table:table-row>
            <table:table-row>
              <table:table-cell office:value-type="string">
                <text:p>214</text:p>
              </table:table-cell>
              <table:table-cell office:value-type="float" office:value="0.00085199997847667">
                <text:p>0.00085199997847667</text:p>
              </table:table-cell>
              <table:table-cell office:value-type="float" office:value="-0.172000005841255">
                <text:p>-0.172000005841255</text:p>
              </table:table-cell>
              <table:table-cell office:value-type="float" office:value="NaN">
                <text:p>NaN</text:p>
              </table:table-cell>
            </table:table-row>
            <table:table-row>
              <table:table-cell office:value-type="string">
                <text:p>215</text:p>
              </table:table-cell>
              <table:table-cell office:value-type="float" office:value="0.000855999978375621">
                <text:p>0.000855999978375621</text:p>
              </table:table-cell>
              <table:table-cell office:value-type="float" office:value="-0.167999997735024">
                <text:p>-0.167999997735024</text:p>
              </table:table-cell>
              <table:table-cell office:value-type="float" office:value="NaN">
                <text:p>NaN</text:p>
              </table:table-cell>
            </table:table-row>
            <table:table-row>
              <table:table-cell office:value-type="string">
                <text:p>216</text:p>
              </table:table-cell>
              <table:table-cell office:value-type="float" office:value="0.000859999978274573">
                <text:p>0.000859999978274573</text:p>
              </table:table-cell>
              <table:table-cell office:value-type="float" office:value="-0.164000004529953">
                <text:p>-0.164000004529953</text:p>
              </table:table-cell>
              <table:table-cell office:value-type="float" office:value="NaN">
                <text:p>NaN</text:p>
              </table:table-cell>
            </table:table-row>
            <table:table-row>
              <table:table-cell office:value-type="string">
                <text:p>217</text:p>
              </table:table-cell>
              <table:table-cell office:value-type="float" office:value="0.000863999978173524">
                <text:p>0.000863999978173524</text:p>
              </table:table-cell>
              <table:table-cell office:value-type="float" office:value="-0.156000003218651">
                <text:p>-0.156000003218651</text:p>
              </table:table-cell>
              <table:table-cell office:value-type="float" office:value="NaN">
                <text:p>NaN</text:p>
              </table:table-cell>
            </table:table-row>
            <table:table-row>
              <table:table-cell office:value-type="string">
                <text:p>218</text:p>
              </table:table-cell>
              <table:table-cell office:value-type="float" office:value="0.000867999978072476">
                <text:p>0.000867999978072476</text:p>
              </table:table-cell>
              <table:table-cell office:value-type="float" office:value="-0.153999999165535">
                <text:p>-0.153999999165535</text:p>
              </table:table-cell>
              <table:table-cell office:value-type="float" office:value="NaN">
                <text:p>NaN</text:p>
              </table:table-cell>
            </table:table-row>
            <table:table-row>
              <table:table-cell office:value-type="string">
                <text:p>219</text:p>
              </table:table-cell>
              <table:table-cell office:value-type="float" office:value="0.000871999977971427">
                <text:p>0.000871999977971427</text:p>
              </table:table-cell>
              <table:table-cell office:value-type="float" office:value="-0.148000001907349">
                <text:p>-0.148000001907349</text:p>
              </table:table-cell>
              <table:table-cell office:value-type="float" office:value="NaN">
                <text:p>NaN</text:p>
              </table:table-cell>
            </table:table-row>
            <table:table-row>
              <table:table-cell office:value-type="string">
                <text:p>220</text:p>
              </table:table-cell>
              <table:table-cell office:value-type="float" office:value="0.000875999977870379">
                <text:p>0.000875999977870379</text:p>
              </table:table-cell>
              <table:table-cell office:value-type="float" office:value="-0.144000008702278">
                <text:p>-0.144000008702278</text:p>
              </table:table-cell>
              <table:table-cell office:value-type="float" office:value="NaN">
                <text:p>NaN</text:p>
              </table:table-cell>
            </table:table-row>
            <table:table-row>
              <table:table-cell office:value-type="string">
                <text:p>221</text:p>
              </table:table-cell>
              <table:table-cell office:value-type="float" office:value="0.00087999997776933">
                <text:p>0.00087999997776933</text:p>
              </table:table-cell>
              <table:table-cell office:value-type="float" office:value="-0.140000000596046">
                <text:p>-0.140000000596046</text:p>
              </table:table-cell>
              <table:table-cell office:value-type="float" office:value="NaN">
                <text:p>NaN</text:p>
              </table:table-cell>
            </table:table-row>
            <table:table-row>
              <table:table-cell office:value-type="string">
                <text:p>222</text:p>
              </table:table-cell>
              <table:table-cell office:value-type="float" office:value="0.000883999977668282">
                <text:p>0.000883999977668282</text:p>
              </table:table-cell>
              <table:table-cell office:value-type="float" office:value="-0.13400000333786">
                <text:p>-0.13400000333786</text:p>
              </table:table-cell>
              <table:table-cell office:value-type="float" office:value="NaN">
                <text:p>NaN</text:p>
              </table:table-cell>
            </table:table-row>
            <table:table-row>
              <table:table-cell office:value-type="string">
                <text:p>223</text:p>
              </table:table-cell>
              <table:table-cell office:value-type="float" office:value="0.000887999977567233">
                <text:p>0.000887999977567233</text:p>
              </table:table-cell>
              <table:table-cell office:value-type="float" office:value="-0.128000006079674">
                <text:p>-0.128000006079674</text:p>
              </table:table-cell>
              <table:table-cell office:value-type="float" office:value="NaN">
                <text:p>NaN</text:p>
              </table:table-cell>
            </table:table-row>
            <table:table-row>
              <table:table-cell office:value-type="string">
                <text:p>224</text:p>
              </table:table-cell>
              <table:table-cell office:value-type="float" office:value="0.000891999977466185">
                <text:p>0.000891999977466185</text:p>
              </table:table-cell>
              <table:table-cell office:value-type="float" office:value="-0.122000001370907">
                <text:p>-0.122000001370907</text:p>
              </table:table-cell>
              <table:table-cell office:value-type="float" office:value="NaN">
                <text:p>NaN</text:p>
              </table:table-cell>
            </table:table-row>
            <table:table-row>
              <table:table-cell office:value-type="string">
                <text:p>225</text:p>
              </table:table-cell>
              <table:table-cell office:value-type="float" office:value="0.000895999977365136">
                <text:p>0.000895999977365136</text:p>
              </table:table-cell>
              <table:table-cell office:value-type="float" office:value="-0.119000002741814">
                <text:p>-0.119000002741814</text:p>
              </table:table-cell>
              <table:table-cell office:value-type="float" office:value="NaN">
                <text:p>NaN</text:p>
              </table:table-cell>
            </table:table-row>
            <table:table-row>
              <table:table-cell office:value-type="string">
                <text:p>226</text:p>
              </table:table-cell>
              <table:table-cell office:value-type="float" office:value="0.000899999977264088">
                <text:p>0.000899999977264088</text:p>
              </table:table-cell>
              <table:table-cell office:value-type="float" office:value="-0.114000000059605">
                <text:p>-0.114000000059605</text:p>
              </table:table-cell>
              <table:table-cell office:value-type="float" office:value="NaN">
                <text:p>NaN</text:p>
              </table:table-cell>
            </table:table-row>
            <table:table-row>
              <table:table-cell office:value-type="string">
                <text:p>227</text:p>
              </table:table-cell>
              <table:table-cell office:value-type="float" office:value="0.000903999977163039">
                <text:p>0.000903999977163039</text:p>
              </table:table-cell>
              <table:table-cell office:value-type="float" office:value="-0.109999999403954">
                <text:p>-0.109999999403954</text:p>
              </table:table-cell>
              <table:table-cell office:value-type="float" office:value="NaN">
                <text:p>NaN</text:p>
              </table:table-cell>
            </table:table-row>
            <table:table-row>
              <table:table-cell office:value-type="string">
                <text:p>228</text:p>
              </table:table-cell>
              <table:table-cell office:value-type="float" office:value="0.000907999977061991">
                <text:p>0.000907999977061991</text:p>
              </table:table-cell>
              <table:table-cell office:value-type="float" office:value="-0.104000002145767">
                <text:p>-0.104000002145767</text:p>
              </table:table-cell>
              <table:table-cell office:value-type="float" office:value="NaN">
                <text:p>NaN</text:p>
              </table:table-cell>
            </table:table-row>
            <table:table-row>
              <table:table-cell office:value-type="string">
                <text:p>229</text:p>
              </table:table-cell>
              <table:table-cell office:value-type="float" office:value="0.000911999976960942">
                <text:p>0.00091199997696094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30</text:p>
              </table:table-cell>
              <table:table-cell office:value-type="float" office:value="0.000915999976859894">
                <text:p>0.000915999976859894</text:p>
              </table:table-cell>
              <table:table-cell office:value-type="float" office:value="-0.096000000834465">
                <text:p>-0.096000000834465</text:p>
              </table:table-cell>
              <table:table-cell office:value-type="float" office:value="NaN">
                <text:p>NaN</text:p>
              </table:table-cell>
            </table:table-row>
            <table:table-row>
              <table:table-cell office:value-type="string">
                <text:p>231</text:p>
              </table:table-cell>
              <table:table-cell office:value-type="float" office:value="0.000919999976758845">
                <text:p>0.00091999997675884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232</text:p>
              </table:table-cell>
              <table:table-cell office:value-type="float" office:value="0.000923999976657797">
                <text:p>0.000923999976657797</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33</text:p>
              </table:table-cell>
              <table:table-cell office:value-type="float" office:value="0.000927999976556748">
                <text:p>0.00092799997655674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234</text:p>
              </table:table-cell>
              <table:table-cell office:value-type="float" office:value="0.0009319999764557">
                <text:p>0.0009319999764557</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35</text:p>
              </table:table-cell>
              <table:table-cell office:value-type="float" office:value="0.000935999976354651">
                <text:p>0.0009359999763546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236</text:p>
              </table:table-cell>
              <table:table-cell office:value-type="float" office:value="0.000939999976253603">
                <text:p>0.00093999997625360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37</text:p>
              </table:table-cell>
              <table:table-cell office:value-type="float" office:value="0.000943999976152554">
                <text:p>0.00094399997615255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238</text:p>
              </table:table-cell>
              <table:table-cell office:value-type="float" office:value="0.000947999976051506">
                <text:p>0.000947999976051506</text:p>
              </table:table-cell>
              <table:table-cell office:value-type="float" office:value="-0.0560000017285347">
                <text:p>-0.0560000017285347</text:p>
              </table:table-cell>
              <table:table-cell office:value-type="float" office:value="NaN">
                <text:p>NaN</text:p>
              </table:table-cell>
            </table:table-row>
            <table:table-row>
              <table:table-cell office:value-type="string">
                <text:p>239</text:p>
              </table:table-cell>
              <table:table-cell office:value-type="float" office:value="0.000951999975950457">
                <text:p>0.000951999975950457</text:p>
              </table:table-cell>
              <table:table-cell office:value-type="float" office:value="-0.0529999993741512">
                <text:p>-0.0529999993741512</text:p>
              </table:table-cell>
              <table:table-cell office:value-type="float" office:value="NaN">
                <text:p>NaN</text:p>
              </table:table-cell>
            </table:table-row>
            <table:table-row>
              <table:table-cell office:value-type="string">
                <text:p>240</text:p>
              </table:table-cell>
              <table:table-cell office:value-type="float" office:value="0.000955999975849409">
                <text:p>0.000955999975849409</text:p>
              </table:table-cell>
              <table:table-cell office:value-type="float" office:value="-0.046000000089407">
                <text:p>-0.046000000089407</text:p>
              </table:table-cell>
              <table:table-cell office:value-type="float" office:value="NaN">
                <text:p>NaN</text:p>
              </table:table-cell>
            </table:table-row>
            <table:table-row>
              <table:table-cell office:value-type="string">
                <text:p>241</text:p>
              </table:table-cell>
              <table:table-cell office:value-type="float" office:value="0.00095999997574836">
                <text:p>0.0009599999757483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242</text:p>
              </table:table-cell>
              <table:table-cell office:value-type="float" office:value="0.000963999975647312">
                <text:p>0.000963999975647312</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43</text:p>
              </table:table-cell>
              <table:table-cell office:value-type="float" office:value="0.000967999975546263">
                <text:p>0.000967999975546263</text:p>
              </table:table-cell>
              <table:table-cell office:value-type="float" office:value="-0.034000001847744">
                <text:p>-0.034000001847744</text:p>
              </table:table-cell>
              <table:table-cell office:value-type="float" office:value="NaN">
                <text:p>NaN</text:p>
              </table:table-cell>
            </table:table-row>
            <table:table-row>
              <table:table-cell office:value-type="string">
                <text:p>244</text:p>
              </table:table-cell>
              <table:table-cell office:value-type="float" office:value="0.000971999975445215">
                <text:p>0.00097199997544521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45</text:p>
              </table:table-cell>
              <table:table-cell office:value-type="float" office:value="0.000975999975344166">
                <text:p>0.000975999975344166</text:p>
              </table:table-cell>
              <table:table-cell office:value-type="float" office:value="-0.0240000002086163">
                <text:p>-0.0240000002086163</text:p>
              </table:table-cell>
              <table:table-cell office:value-type="float" office:value="NaN">
                <text:p>NaN</text:p>
              </table:table-cell>
            </table:table-row>
            <table:table-row>
              <table:table-cell office:value-type="string">
                <text:p>246</text:p>
              </table:table-cell>
              <table:table-cell office:value-type="float" office:value="0.000979999975243118">
                <text:p>0.00097999997524311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247</text:p>
              </table:table-cell>
              <table:table-cell office:value-type="float" office:value="0.000983999975142069">
                <text:p>0.000983999975142069</text:p>
              </table:table-cell>
              <table:table-cell office:value-type="float" office:value="-0.0120000001043081">
                <text:p>-0.0120000001043081</text:p>
              </table:table-cell>
              <table:table-cell office:value-type="float" office:value="NaN">
                <text:p>NaN</text:p>
              </table:table-cell>
            </table:table-row>
            <table:table-row>
              <table:table-cell office:value-type="string">
                <text:p>248</text:p>
              </table:table-cell>
              <table:table-cell office:value-type="float" office:value="0.000987999975041021">
                <text:p>0.00098799997504102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249</text:p>
              </table:table-cell>
              <table:table-cell office:value-type="float" office:value="0.000991999974939972">
                <text:p>0.000991999974939972</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250</text:p>
              </table:table-cell>
              <table:table-cell office:value-type="float" office:value="0.000995999974838924">
                <text:p>0.000995999974838924</text:p>
              </table:table-cell>
              <table:table-cell office:value-type="float" office:value="0.0020000000949949">
                <text:p>0.0020000000949949</text:p>
              </table:table-cell>
              <table:table-cell office:value-type="float" office:value="NaN">
                <text:p>NaN</text:p>
              </table:table-cell>
            </table:table-row>
            <table:table-row>
              <table:table-cell office:value-type="string">
                <text:p>251</text:p>
              </table:table-cell>
              <table:table-cell office:value-type="float" office:value="0.000999999974737875">
                <text:p>0.00099999997473787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252</text:p>
              </table:table-cell>
              <table:table-cell office:value-type="float" office:value="0.00100399997463683">
                <text:p>0.0010039999746368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253</text:p>
              </table:table-cell>
              <table:table-cell office:value-type="float" office:value="0.00100799997453578">
                <text:p>0.00100799997453578</text:p>
              </table:table-cell>
              <table:table-cell office:value-type="float" office:value="0.017000000923872">
                <text:p>0.017000000923872</text:p>
              </table:table-cell>
              <table:table-cell office:value-type="float" office:value="NaN">
                <text:p>NaN</text:p>
              </table:table-cell>
            </table:table-row>
            <table:table-row>
              <table:table-cell office:value-type="string">
                <text:p>254</text:p>
              </table:table-cell>
              <table:table-cell office:value-type="float" office:value="0.00101199997443473">
                <text:p>0.0010119999744347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255</text:p>
              </table:table-cell>
              <table:table-cell office:value-type="float" office:value="0.00101599997433368">
                <text:p>0.0010159999743336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56</text:p>
              </table:table-cell>
              <table:table-cell office:value-type="float" office:value="0.00101999997423263">
                <text:p>0.0010199999742326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257</text:p>
              </table:table-cell>
              <table:table-cell office:value-type="float" office:value="0.00102399997413158">
                <text:p>0.00102399997413158</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58</text:p>
              </table:table-cell>
              <table:table-cell office:value-type="float" office:value="0.00102799997403054">
                <text:p>0.00102799997403054</text:p>
              </table:table-cell>
              <table:table-cell office:value-type="float" office:value="0.0399999991059303">
                <text:p>0.0399999991059303</text:p>
              </table:table-cell>
              <table:table-cell office:value-type="float" office:value="NaN">
                <text:p>NaN</text:p>
              </table:table-cell>
            </table:table-row>
            <table:table-row>
              <table:table-cell office:value-type="string">
                <text:p>259</text:p>
              </table:table-cell>
              <table:table-cell office:value-type="float" office:value="0.00103199997392949">
                <text:p>0.00103199997392949</text:p>
              </table:table-cell>
              <table:table-cell office:value-type="float" office:value="0.046000000089407">
                <text:p>0.046000000089407</text:p>
              </table:table-cell>
              <table:table-cell office:value-type="float" office:value="NaN">
                <text:p>NaN</text:p>
              </table:table-cell>
            </table:table-row>
            <table:table-row>
              <table:table-cell office:value-type="string">
                <text:p>260</text:p>
              </table:table-cell>
              <table:table-cell office:value-type="float" office:value="0.00103599997382844">
                <text:p>0.0010359999738284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261</text:p>
              </table:table-cell>
              <table:table-cell office:value-type="float" office:value="0.00103999997372739">
                <text:p>0.0010399999737273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262</text:p>
              </table:table-cell>
              <table:table-cell office:value-type="float" office:value="0.00104399997362634">
                <text:p>0.0010439999736263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263</text:p>
              </table:table-cell>
              <table:table-cell office:value-type="float" office:value="0.00104799997352529">
                <text:p>0.0010479999735252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64</text:p>
              </table:table-cell>
              <table:table-cell office:value-type="float" office:value="0.00105199997342424">
                <text:p>0.00105199997342424</text:p>
              </table:table-cell>
              <table:table-cell office:value-type="float" office:value="0.0720000043511391">
                <text:p>0.0720000043511391</text:p>
              </table:table-cell>
              <table:table-cell office:value-type="float" office:value="NaN">
                <text:p>NaN</text:p>
              </table:table-cell>
            </table:table-row>
            <table:table-row>
              <table:table-cell office:value-type="string">
                <text:p>265</text:p>
              </table:table-cell>
              <table:table-cell office:value-type="float" office:value="0.0010559999733232">
                <text:p>0.0010559999733232</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66</text:p>
              </table:table-cell>
              <table:table-cell office:value-type="float" office:value="0.00105999997322215">
                <text:p>0.001059999973222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267</text:p>
              </table:table-cell>
              <table:table-cell office:value-type="float" office:value="0.0010639999731211">
                <text:p>0.0010639999731211</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68</text:p>
              </table:table-cell>
              <table:table-cell office:value-type="float" office:value="0.00106799997302005">
                <text:p>0.0010679999730200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269</text:p>
              </table:table-cell>
              <table:table-cell office:value-type="float" office:value="0.001071999972919">
                <text:p>0.001071999972919</text:p>
              </table:table-cell>
              <table:table-cell office:value-type="float" office:value="0.0940000042319298">
                <text:p>0.0940000042319298</text:p>
              </table:table-cell>
              <table:table-cell office:value-type="float" office:value="NaN">
                <text:p>NaN</text:p>
              </table:table-cell>
            </table:table-row>
            <table:table-row>
              <table:table-cell office:value-type="string">
                <text:p>270</text:p>
              </table:table-cell>
              <table:table-cell office:value-type="float" office:value="0.00107599997281795">
                <text:p>0.00107599997281795</text:p>
              </table:table-cell>
              <table:table-cell office:value-type="float" office:value="0.100000001490116">
                <text:p>0.100000001490116</text:p>
              </table:table-cell>
              <table:table-cell office:value-type="float" office:value="NaN">
                <text:p>NaN</text:p>
              </table:table-cell>
            </table:table-row>
            <table:table-row>
              <table:table-cell office:value-type="string">
                <text:p>271</text:p>
              </table:table-cell>
              <table:table-cell office:value-type="float" office:value="0.00107999997271691">
                <text:p>0.00107999997271691</text:p>
              </table:table-cell>
              <table:table-cell office:value-type="float" office:value="0.105999998748302">
                <text:p>0.105999998748302</text:p>
              </table:table-cell>
              <table:table-cell office:value-type="float" office:value="NaN">
                <text:p>NaN</text:p>
              </table:table-cell>
            </table:table-row>
            <table:table-row>
              <table:table-cell office:value-type="string">
                <text:p>272</text:p>
              </table:table-cell>
              <table:table-cell office:value-type="float" office:value="0.00108399997261586">
                <text:p>0.00108399997261586</text:p>
              </table:table-cell>
              <table:table-cell office:value-type="float" office:value="0.109000004827976">
                <text:p>0.109000004827976</text:p>
              </table:table-cell>
              <table:table-cell office:value-type="float" office:value="NaN">
                <text:p>NaN</text:p>
              </table:table-cell>
            </table:table-row>
            <table:table-row>
              <table:table-cell office:value-type="string">
                <text:p>273</text:p>
              </table:table-cell>
              <table:table-cell office:value-type="float" office:value="0.00108799997251481">
                <text:p>0.00108799997251481</text:p>
              </table:table-cell>
              <table:table-cell office:value-type="float" office:value="0.112000003457069">
                <text:p>0.112000003457069</text:p>
              </table:table-cell>
              <table:table-cell office:value-type="float" office:value="NaN">
                <text:p>NaN</text:p>
              </table:table-cell>
            </table:table-row>
            <table:table-row>
              <table:table-cell office:value-type="string">
                <text:p>274</text:p>
              </table:table-cell>
              <table:table-cell office:value-type="float" office:value="0.00109199997241376">
                <text:p>0.00109199997241376</text:p>
              </table:table-cell>
              <table:table-cell office:value-type="float" office:value="0.120000004768372">
                <text:p>0.120000004768372</text:p>
              </table:table-cell>
              <table:table-cell office:value-type="float" office:value="NaN">
                <text:p>NaN</text:p>
              </table:table-cell>
            </table:table-row>
            <table:table-row>
              <table:table-cell office:value-type="string">
                <text:p>275</text:p>
              </table:table-cell>
              <table:table-cell office:value-type="float" office:value="0.00109599997231271">
                <text:p>0.00109599997231271</text:p>
              </table:table-cell>
              <table:table-cell office:value-type="float" office:value="0.124000005424023">
                <text:p>0.124000005424023</text:p>
              </table:table-cell>
              <table:table-cell office:value-type="float" office:value="NaN">
                <text:p>NaN</text:p>
              </table:table-cell>
            </table:table-row>
            <table:table-row>
              <table:table-cell office:value-type="string">
                <text:p>276</text:p>
              </table:table-cell>
              <table:table-cell office:value-type="float" office:value="0.00109999997221166">
                <text:p>0.00109999997221166</text:p>
              </table:table-cell>
              <table:table-cell office:value-type="float" office:value="0.129999995231628">
                <text:p>0.129999995231628</text:p>
              </table:table-cell>
              <table:table-cell office:value-type="float" office:value="NaN">
                <text:p>NaN</text:p>
              </table:table-cell>
            </table:table-row>
            <table:table-row>
              <table:table-cell office:value-type="string">
                <text:p>277</text:p>
              </table:table-cell>
              <table:table-cell office:value-type="float" office:value="0.00110399997211061">
                <text:p>0.00110399997211061</text:p>
              </table:table-cell>
              <table:table-cell office:value-type="float" office:value="0.13400000333786">
                <text:p>0.13400000333786</text:p>
              </table:table-cell>
              <table:table-cell office:value-type="float" office:value="NaN">
                <text:p>NaN</text:p>
              </table:table-cell>
            </table:table-row>
            <table:table-row>
              <table:table-cell office:value-type="string">
                <text:p>278</text:p>
              </table:table-cell>
              <table:table-cell office:value-type="float" office:value="0.00110799997200957">
                <text:p>0.00110799997200957</text:p>
              </table:table-cell>
              <table:table-cell office:value-type="float" office:value="0.137999996542931">
                <text:p>0.137999996542931</text:p>
              </table:table-cell>
              <table:table-cell office:value-type="float" office:value="NaN">
                <text:p>NaN</text:p>
              </table:table-cell>
            </table:table-row>
            <table:table-row>
              <table:table-cell office:value-type="string">
                <text:p>279</text:p>
              </table:table-cell>
              <table:table-cell office:value-type="float" office:value="0.00111199997190852">
                <text:p>0.00111199997190852</text:p>
              </table:table-cell>
              <table:table-cell office:value-type="float" office:value="0.142000004649162">
                <text:p>0.142000004649162</text:p>
              </table:table-cell>
              <table:table-cell office:value-type="float" office:value="NaN">
                <text:p>NaN</text:p>
              </table:table-cell>
            </table:table-row>
            <table:table-row>
              <table:table-cell office:value-type="string">
                <text:p>280</text:p>
              </table:table-cell>
              <table:table-cell office:value-type="float" office:value="0.00111599997180747">
                <text:p>0.00111599997180747</text:p>
              </table:table-cell>
              <table:table-cell office:value-type="float" office:value="0.148000001907349">
                <text:p>0.148000001907349</text:p>
              </table:table-cell>
              <table:table-cell office:value-type="float" office:value="NaN">
                <text:p>NaN</text:p>
              </table:table-cell>
            </table:table-row>
            <table:table-row>
              <table:table-cell office:value-type="string">
                <text:p>281</text:p>
              </table:table-cell>
              <table:table-cell office:value-type="float" office:value="0.00111999997170642">
                <text:p>0.00111999997170642</text:p>
              </table:table-cell>
              <table:table-cell office:value-type="float" office:value="0.153999999165535">
                <text:p>0.153999999165535</text:p>
              </table:table-cell>
              <table:table-cell office:value-type="float" office:value="NaN">
                <text:p>NaN</text:p>
              </table:table-cell>
            </table:table-row>
            <table:table-row>
              <table:table-cell office:value-type="string">
                <text:p>282</text:p>
              </table:table-cell>
              <table:table-cell office:value-type="float" office:value="0.00112399997160537">
                <text:p>0.00112399997160537</text:p>
              </table:table-cell>
              <table:table-cell office:value-type="float" office:value="0.157000005245209">
                <text:p>0.157000005245209</text:p>
              </table:table-cell>
              <table:table-cell office:value-type="float" office:value="NaN">
                <text:p>NaN</text:p>
              </table:table-cell>
            </table:table-row>
            <table:table-row>
              <table:table-cell office:value-type="string">
                <text:p>283</text:p>
              </table:table-cell>
              <table:table-cell office:value-type="float" office:value="0.00112799997150432">
                <text:p>0.00112799997150432</text:p>
              </table:table-cell>
              <table:table-cell office:value-type="float" office:value="0.162000000476837">
                <text:p>0.162000000476837</text:p>
              </table:table-cell>
              <table:table-cell office:value-type="float" office:value="NaN">
                <text:p>NaN</text:p>
              </table:table-cell>
            </table:table-row>
            <table:table-row>
              <table:table-cell office:value-type="string">
                <text:p>284</text:p>
              </table:table-cell>
              <table:table-cell office:value-type="float" office:value="0.00113199997140327">
                <text:p>0.00113199997140327</text:p>
              </table:table-cell>
              <table:table-cell office:value-type="float" office:value="0.167999997735024">
                <text:p>0.167999997735024</text:p>
              </table:table-cell>
              <table:table-cell office:value-type="float" office:value="NaN">
                <text:p>NaN</text:p>
              </table:table-cell>
            </table:table-row>
            <table:table-row>
              <table:table-cell office:value-type="string">
                <text:p>285</text:p>
              </table:table-cell>
              <table:table-cell office:value-type="float" office:value="0.00113599997130223">
                <text:p>0.00113599997130223</text:p>
              </table:table-cell>
              <table:table-cell office:value-type="float" office:value="0.172000005841255">
                <text:p>0.172000005841255</text:p>
              </table:table-cell>
              <table:table-cell office:value-type="float" office:value="NaN">
                <text:p>NaN</text:p>
              </table:table-cell>
            </table:table-row>
            <table:table-row>
              <table:table-cell office:value-type="string">
                <text:p>286</text:p>
              </table:table-cell>
              <table:table-cell office:value-type="float" office:value="0.00113999997120118">
                <text:p>0.00113999997120118</text:p>
              </table:table-cell>
              <table:table-cell office:value-type="float" office:value="0.179000005125999">
                <text:p>0.179000005125999</text:p>
              </table:table-cell>
              <table:table-cell office:value-type="float" office:value="NaN">
                <text:p>NaN</text:p>
              </table:table-cell>
            </table:table-row>
            <table:table-row>
              <table:table-cell office:value-type="string">
                <text:p>287</text:p>
              </table:table-cell>
              <table:table-cell office:value-type="float" office:value="0.00114399997110013">
                <text:p>0.00114399997110013</text:p>
              </table:table-cell>
              <table:table-cell office:value-type="float" office:value="0.181999996304512">
                <text:p>0.181999996304512</text:p>
              </table:table-cell>
              <table:table-cell office:value-type="float" office:value="NaN">
                <text:p>NaN</text:p>
              </table:table-cell>
            </table:table-row>
            <table:table-row>
              <table:table-cell office:value-type="string">
                <text:p>288</text:p>
              </table:table-cell>
              <table:table-cell office:value-type="float" office:value="0.00114799997099908">
                <text:p>0.00114799997099908</text:p>
              </table:table-cell>
              <table:table-cell office:value-type="float" office:value="0.186000004410744">
                <text:p>0.186000004410744</text:p>
              </table:table-cell>
              <table:table-cell office:value-type="float" office:value="NaN">
                <text:p>NaN</text:p>
              </table:table-cell>
            </table:table-row>
            <table:table-row>
              <table:table-cell office:value-type="string">
                <text:p>289</text:p>
              </table:table-cell>
              <table:table-cell office:value-type="float" office:value="0.00115199997089803">
                <text:p>0.00115199997089803</text:p>
              </table:table-cell>
              <table:table-cell office:value-type="float" office:value="0.194000005722046">
                <text:p>0.194000005722046</text:p>
              </table:table-cell>
              <table:table-cell office:value-type="float" office:value="NaN">
                <text:p>NaN</text:p>
              </table:table-cell>
            </table:table-row>
            <table:table-row>
              <table:table-cell office:value-type="string">
                <text:p>290</text:p>
              </table:table-cell>
              <table:table-cell office:value-type="float" office:value="0.00115599997079698">
                <text:p>0.00115599997079698</text:p>
              </table:table-cell>
              <table:table-cell office:value-type="float" office:value="0.196000009775162">
                <text:p>0.196000009775162</text:p>
              </table:table-cell>
              <table:table-cell office:value-type="float" office:value="NaN">
                <text:p>NaN</text:p>
              </table:table-cell>
            </table:table-row>
            <table:table-row>
              <table:table-cell office:value-type="string">
                <text:p>291</text:p>
              </table:table-cell>
              <table:table-cell office:value-type="float" office:value="0.00115999997069594">
                <text:p>0.0011599999706959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2</text:p>
              </table:table-cell>
              <table:table-cell office:value-type="float" office:value="0.00116399997059489">
                <text:p>0.0011639999705948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3</text:p>
              </table:table-cell>
              <table:table-cell office:value-type="float" office:value="0.00116799997049384">
                <text:p>0.0011679999704938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4</text:p>
              </table:table-cell>
              <table:table-cell office:value-type="float" office:value="0.00117199997039279">
                <text:p>0.0011719999703927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5</text:p>
              </table:table-cell>
              <table:table-cell office:value-type="float" office:value="0.00117599997029174">
                <text:p>0.0011759999702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6</text:p>
              </table:table-cell>
              <table:table-cell office:value-type="float" office:value="0.00117999997019069">
                <text:p>0.0011799999701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7</text:p>
              </table:table-cell>
              <table:table-cell office:value-type="float" office:value="0.00118399997008964">
                <text:p>0.0011839999700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8</text:p>
              </table:table-cell>
              <table:table-cell office:value-type="float" office:value="0.0011879999699886">
                <text:p>0.0011879999699886</text:p>
              </table:table-cell>
              <table:table-cell office:value-type="float" office:value="0.196999996900558">
                <text:p>0.196999996900558</text:p>
              </table:table-cell>
              <table:table-cell office:value-type="float" office:value="NaN">
                <text:p>NaN</text:p>
              </table:table-cell>
            </table:table-row>
            <table:table-row>
              <table:table-cell office:value-type="string">
                <text:p>299</text:p>
              </table:table-cell>
              <table:table-cell office:value-type="float" office:value="0.00119199996988755">
                <text:p>0.0011919999698875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0</text:p>
              </table:table-cell>
              <table:table-cell office:value-type="float" office:value="0.0011959999697865">
                <text:p>0.0011959999697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1</text:p>
              </table:table-cell>
              <table:table-cell office:value-type="float" office:value="0.00119999996968545">
                <text:p>0.0011999999696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2</text:p>
              </table:table-cell>
              <table:table-cell office:value-type="float" office:value="0.0012039999695844">
                <text:p>0.0012039999695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303</text:p>
              </table:table-cell>
              <table:table-cell office:value-type="float" office:value="0.00120799996948335">
                <text:p>0.0012079999694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4</text:p>
              </table:table-cell>
              <table:table-cell office:value-type="float" office:value="0.0012119999693823">
                <text:p>0.0012119999693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305</text:p>
              </table:table-cell>
              <table:table-cell office:value-type="float" office:value="0.00121599996928126">
                <text:p>0.0012159999692812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6</text:p>
              </table:table-cell>
              <table:table-cell office:value-type="float" office:value="0.00121999996918021">
                <text:p>0.0012199999691802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7</text:p>
              </table:table-cell>
              <table:table-cell office:value-type="float" office:value="0.00122399996907916">
                <text:p>0.0012239999690791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8</text:p>
              </table:table-cell>
              <table:table-cell office:value-type="float" office:value="0.00122799996897811">
                <text:p>0.0012279999689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9</text:p>
              </table:table-cell>
              <table:table-cell office:value-type="float" office:value="0.00123199996887706">
                <text:p>0.0012319999688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310</text:p>
              </table:table-cell>
              <table:table-cell office:value-type="float" office:value="0.00123599996877601">
                <text:p>0.0012359999687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311</text:p>
              </table:table-cell>
              <table:table-cell office:value-type="float" office:value="0.00123999996867497">
                <text:p>0.0012399999686749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2</text:p>
              </table:table-cell>
              <table:table-cell office:value-type="float" office:value="0.00124399996857392">
                <text:p>0.0012439999685739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3</text:p>
              </table:table-cell>
              <table:table-cell office:value-type="float" office:value="0.00124799996847287">
                <text:p>0.00124799996847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4</text:p>
              </table:table-cell>
              <table:table-cell office:value-type="float" office:value="0.00125199996837182">
                <text:p>0.0012519999683718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5</text:p>
              </table:table-cell>
              <table:table-cell office:value-type="float" office:value="0.00125599996827077">
                <text:p>0.0012559999682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6</text:p>
              </table:table-cell>
              <table:table-cell office:value-type="float" office:value="0.00125999996816972">
                <text:p>0.0012599999681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7</text:p>
              </table:table-cell>
              <table:table-cell office:value-type="float" office:value="0.00126399996806867">
                <text:p>0.0012639999680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8</text:p>
              </table:table-cell>
              <table:table-cell office:value-type="float" office:value="0.00126799996796763">
                <text:p>0.00126799996796763</text:p>
              </table:table-cell>
              <table:table-cell office:value-type="float" office:value="0.196999996900558">
                <text:p>0.196999996900558</text:p>
              </table:table-cell>
              <table:table-cell office:value-type="float" office:value="NaN">
                <text:p>NaN</text:p>
              </table:table-cell>
            </table:table-row>
            <table:table-row>
              <table:table-cell office:value-type="string">
                <text:p>319</text:p>
              </table:table-cell>
              <table:table-cell office:value-type="float" office:value="0.00127199996786658">
                <text:p>0.0012719999678665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0</text:p>
              </table:table-cell>
              <table:table-cell office:value-type="float" office:value="0.00127599996776553">
                <text:p>0.0012759999677655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1</text:p>
              </table:table-cell>
              <table:table-cell office:value-type="float" office:value="0.00127999996766448">
                <text:p>0.0012799999676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2</text:p>
              </table:table-cell>
              <table:table-cell office:value-type="float" office:value="0.00128399996756343">
                <text:p>0.0012839999675634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3</text:p>
              </table:table-cell>
              <table:table-cell office:value-type="float" office:value="0.00128799996746238">
                <text:p>0.0012879999674623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4</text:p>
              </table:table-cell>
              <table:table-cell office:value-type="float" office:value="0.00129199996736133">
                <text:p>0.0012919999673613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5</text:p>
              </table:table-cell>
              <table:table-cell office:value-type="float" office:value="0.00129599996726029">
                <text:p>0.0012959999672602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6</text:p>
              </table:table-cell>
              <table:table-cell office:value-type="float" office:value="0.00129999996715924">
                <text:p>0.0012999999671592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7</text:p>
              </table:table-cell>
              <table:table-cell office:value-type="float" office:value="0.00130399996705819">
                <text:p>0.0013039999670581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8</text:p>
              </table:table-cell>
              <table:table-cell office:value-type="float" office:value="0.00130799996695714">
                <text:p>0.0013079999669571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9</text:p>
              </table:table-cell>
              <table:table-cell office:value-type="float" office:value="0.00131199996685609">
                <text:p>0.00131199996685609</text:p>
              </table:table-cell>
              <table:table-cell office:value-type="float" office:value="0.196999996900558">
                <text:p>0.196999996900558</text:p>
              </table:table-cell>
              <table:table-cell office:value-type="float" office:value="NaN">
                <text:p>NaN</text:p>
              </table:table-cell>
            </table:table-row>
            <table:table-row>
              <table:table-cell office:value-type="string">
                <text:p>330</text:p>
              </table:table-cell>
              <table:table-cell office:value-type="float" office:value="0.00131599996675504">
                <text:p>0.0013159999667550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1</text:p>
              </table:table-cell>
              <table:table-cell office:value-type="float" office:value="0.001319999966654">
                <text:p>0.001319999966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2</text:p>
              </table:table-cell>
              <table:table-cell office:value-type="float" office:value="0.00132399996655295">
                <text:p>0.00132399996655295</text:p>
              </table:table-cell>
              <table:table-cell office:value-type="float" office:value="0.196000009775162">
                <text:p>0.196000009775162</text:p>
              </table:table-cell>
              <table:table-cell office:value-type="float" office:value="NaN">
                <text:p>NaN</text:p>
              </table:table-cell>
            </table:table-row>
            <table:table-row>
              <table:table-cell office:value-type="string">
                <text:p>333</text:p>
              </table:table-cell>
              <table:table-cell office:value-type="float" office:value="0.0013279999664519">
                <text:p>0.0013279999664519</text:p>
              </table:table-cell>
              <table:table-cell office:value-type="float" office:value="0.194000005722046">
                <text:p>0.194000005722046</text:p>
              </table:table-cell>
              <table:table-cell office:value-type="float" office:value="NaN">
                <text:p>NaN</text:p>
              </table:table-cell>
            </table:table-row>
            <table:table-row>
              <table:table-cell office:value-type="string">
                <text:p>334</text:p>
              </table:table-cell>
              <table:table-cell office:value-type="float" office:value="0.00133199996635085">
                <text:p>0.00133199996635085</text:p>
              </table:table-cell>
              <table:table-cell office:value-type="float" office:value="0.18800000846386">
                <text:p>0.18800000846386</text:p>
              </table:table-cell>
              <table:table-cell office:value-type="float" office:value="NaN">
                <text:p>NaN</text:p>
              </table:table-cell>
            </table:table-row>
            <table:table-row>
              <table:table-cell office:value-type="string">
                <text:p>335</text:p>
              </table:table-cell>
              <table:table-cell office:value-type="float" office:value="0.0013359999662498">
                <text:p>0.0013359999662498</text:p>
              </table:table-cell>
              <table:table-cell office:value-type="float" office:value="0.184000000357628">
                <text:p>0.184000000357628</text:p>
              </table:table-cell>
              <table:table-cell office:value-type="float" office:value="NaN">
                <text:p>NaN</text:p>
              </table:table-cell>
            </table:table-row>
            <table:table-row>
              <table:table-cell office:value-type="string">
                <text:p>336</text:p>
              </table:table-cell>
              <table:table-cell office:value-type="float" office:value="0.00133999996614875">
                <text:p>0.00133999996614875</text:p>
              </table:table-cell>
              <table:table-cell office:value-type="float" office:value="0.180000007152557">
                <text:p>0.180000007152557</text:p>
              </table:table-cell>
              <table:table-cell office:value-type="float" office:value="NaN">
                <text:p>NaN</text:p>
              </table:table-cell>
            </table:table-row>
            <table:table-row>
              <table:table-cell office:value-type="string">
                <text:p>337</text:p>
              </table:table-cell>
              <table:table-cell office:value-type="float" office:value="0.0013439999660477">
                <text:p>0.0013439999660477</text:p>
              </table:table-cell>
              <table:table-cell office:value-type="float" office:value="0.172000005841255">
                <text:p>0.172000005841255</text:p>
              </table:table-cell>
              <table:table-cell office:value-type="float" office:value="NaN">
                <text:p>NaN</text:p>
              </table:table-cell>
            </table:table-row>
            <table:table-row>
              <table:table-cell office:value-type="string">
                <text:p>338</text:p>
              </table:table-cell>
              <table:table-cell office:value-type="float" office:value="0.00134799996594666">
                <text:p>0.00134799996594666</text:p>
              </table:table-cell>
              <table:table-cell office:value-type="float" office:value="0.170000001788139">
                <text:p>0.170000001788139</text:p>
              </table:table-cell>
              <table:table-cell office:value-type="float" office:value="NaN">
                <text:p>NaN</text:p>
              </table:table-cell>
            </table:table-row>
            <table:table-row>
              <table:table-cell office:value-type="string">
                <text:p>339</text:p>
              </table:table-cell>
              <table:table-cell office:value-type="float" office:value="0.00135199996584561">
                <text:p>0.00135199996584561</text:p>
              </table:table-cell>
              <table:table-cell office:value-type="float" office:value="0.166000008583069">
                <text:p>0.166000008583069</text:p>
              </table:table-cell>
              <table:table-cell office:value-type="float" office:value="NaN">
                <text:p>NaN</text:p>
              </table:table-cell>
            </table:table-row>
            <table:table-row>
              <table:table-cell office:value-type="string">
                <text:p>340</text:p>
              </table:table-cell>
              <table:table-cell office:value-type="float" office:value="0.00135599996574456">
                <text:p>0.00135599996574456</text:p>
              </table:table-cell>
              <table:table-cell office:value-type="float" office:value="0.158000007271767">
                <text:p>0.158000007271767</text:p>
              </table:table-cell>
              <table:table-cell office:value-type="float" office:value="NaN">
                <text:p>NaN</text:p>
              </table:table-cell>
            </table:table-row>
            <table:table-row>
              <table:table-cell office:value-type="string">
                <text:p>341</text:p>
              </table:table-cell>
              <table:table-cell office:value-type="float" office:value="0.00135999996564351">
                <text:p>0.00135999996564351</text:p>
              </table:table-cell>
              <table:table-cell office:value-type="float" office:value="0.156000003218651">
                <text:p>0.156000003218651</text:p>
              </table:table-cell>
              <table:table-cell office:value-type="float" office:value="NaN">
                <text:p>NaN</text:p>
              </table:table-cell>
            </table:table-row>
            <table:table-row>
              <table:table-cell office:value-type="string">
                <text:p>342</text:p>
              </table:table-cell>
              <table:table-cell office:value-type="float" office:value="0.00136399996554246">
                <text:p>0.00136399996554246</text:p>
              </table:table-cell>
              <table:table-cell office:value-type="float" office:value="0.150000005960464">
                <text:p>0.150000005960464</text:p>
              </table:table-cell>
              <table:table-cell office:value-type="float" office:value="NaN">
                <text:p>NaN</text:p>
              </table:table-cell>
            </table:table-row>
            <table:table-row>
              <table:table-cell office:value-type="string">
                <text:p>343</text:p>
              </table:table-cell>
              <table:table-cell office:value-type="float" office:value="0.00136799996544141">
                <text:p>0.00136799996544141</text:p>
              </table:table-cell>
              <table:table-cell office:value-type="float" office:value="0.142000004649162">
                <text:p>0.142000004649162</text:p>
              </table:table-cell>
              <table:table-cell office:value-type="float" office:value="NaN">
                <text:p>NaN</text:p>
              </table:table-cell>
            </table:table-row>
            <table:table-row>
              <table:table-cell office:value-type="string">
                <text:p>344</text:p>
              </table:table-cell>
              <table:table-cell office:value-type="float" office:value="0.00137199996534036">
                <text:p>0.00137199996534036</text:p>
              </table:table-cell>
              <table:table-cell office:value-type="float" office:value="0.140000000596046">
                <text:p>0.140000000596046</text:p>
              </table:table-cell>
              <table:table-cell office:value-type="float" office:value="NaN">
                <text:p>NaN</text:p>
              </table:table-cell>
            </table:table-row>
            <table:table-row>
              <table:table-cell office:value-type="string">
                <text:p>345</text:p>
              </table:table-cell>
              <table:table-cell office:value-type="float" office:value="0.00137599996523932">
                <text:p>0.00137599996523932</text:p>
              </table:table-cell>
              <table:table-cell office:value-type="float" office:value="0.136000007390976">
                <text:p>0.136000007390976</text:p>
              </table:table-cell>
              <table:table-cell office:value-type="float" office:value="NaN">
                <text:p>NaN</text:p>
              </table:table-cell>
            </table:table-row>
            <table:table-row>
              <table:table-cell office:value-type="string">
                <text:p>346</text:p>
              </table:table-cell>
              <table:table-cell office:value-type="float" office:value="0.00137999996513827">
                <text:p>0.00137999996513827</text:p>
              </table:table-cell>
              <table:table-cell office:value-type="float" office:value="0.130999997258186">
                <text:p>0.130999997258186</text:p>
              </table:table-cell>
              <table:table-cell office:value-type="float" office:value="NaN">
                <text:p>NaN</text:p>
              </table:table-cell>
            </table:table-row>
            <table:table-row>
              <table:table-cell office:value-type="string">
                <text:p>347</text:p>
              </table:table-cell>
              <table:table-cell office:value-type="float" office:value="0.00138399996503722">
                <text:p>0.00138399996503722</text:p>
              </table:table-cell>
              <table:table-cell office:value-type="float" office:value="0.126000002026558">
                <text:p>0.126000002026558</text:p>
              </table:table-cell>
              <table:table-cell office:value-type="float" office:value="NaN">
                <text:p>NaN</text:p>
              </table:table-cell>
            </table:table-row>
            <table:table-row>
              <table:table-cell office:value-type="string">
                <text:p>348</text:p>
              </table:table-cell>
              <table:table-cell office:value-type="float" office:value="0.00138799996493617">
                <text:p>0.00138799996493617</text:p>
              </table:table-cell>
              <table:table-cell office:value-type="float" office:value="0.122000001370907">
                <text:p>0.122000001370907</text:p>
              </table:table-cell>
              <table:table-cell office:value-type="float" office:value="NaN">
                <text:p>NaN</text:p>
              </table:table-cell>
            </table:table-row>
            <table:table-row>
              <table:table-cell office:value-type="string">
                <text:p>349</text:p>
              </table:table-cell>
              <table:table-cell office:value-type="float" office:value="0.00139199996483512">
                <text:p>0.00139199996483512</text:p>
              </table:table-cell>
              <table:table-cell office:value-type="float" office:value="0.11600000411272">
                <text:p>0.11600000411272</text:p>
              </table:table-cell>
              <table:table-cell office:value-type="float" office:value="NaN">
                <text:p>NaN</text:p>
              </table:table-cell>
            </table:table-row>
            <table:table-row>
              <table:table-cell office:value-type="string">
                <text:p>350</text:p>
              </table:table-cell>
              <table:table-cell office:value-type="float" office:value="0.00139599996473407">
                <text:p>0.00139599996473407</text:p>
              </table:table-cell>
              <table:table-cell office:value-type="float" office:value="0.109999999403954">
                <text:p>0.109999999403954</text:p>
              </table:table-cell>
              <table:table-cell office:value-type="float" office:value="NaN">
                <text:p>NaN</text:p>
              </table:table-cell>
            </table:table-row>
            <table:table-row>
              <table:table-cell office:value-type="string">
                <text:p>351</text:p>
              </table:table-cell>
              <table:table-cell office:value-type="float" office:value="0.00139999996463303">
                <text:p>0.00139999996463303</text:p>
              </table:table-cell>
              <table:table-cell office:value-type="float" office:value="0.105999998748302">
                <text:p>0.105999998748302</text:p>
              </table:table-cell>
              <table:table-cell office:value-type="float" office:value="NaN">
                <text:p>NaN</text:p>
              </table:table-cell>
            </table:table-row>
            <table:table-row>
              <table:table-cell office:value-type="string">
                <text:p>352</text:p>
              </table:table-cell>
              <table:table-cell office:value-type="float" office:value="0.00140399996453198">
                <text:p>0.00140399996453198</text:p>
              </table:table-cell>
              <table:table-cell office:value-type="float" office:value="0.101999998092651">
                <text:p>0.101999998092651</text:p>
              </table:table-cell>
              <table:table-cell office:value-type="float" office:value="NaN">
                <text:p>NaN</text:p>
              </table:table-cell>
            </table:table-row>
            <table:table-row>
              <table:table-cell office:value-type="string">
                <text:p>353</text:p>
              </table:table-cell>
              <table:table-cell office:value-type="float" office:value="0.00140799996443093">
                <text:p>0.00140799996443093</text:p>
              </table:table-cell>
              <table:table-cell office:value-type="float" office:value="0.096000000834465">
                <text:p>0.096000000834465</text:p>
              </table:table-cell>
              <table:table-cell office:value-type="float" office:value="NaN">
                <text:p>NaN</text:p>
              </table:table-cell>
            </table:table-row>
            <table:table-row>
              <table:table-cell office:value-type="string">
                <text:p>354</text:p>
              </table:table-cell>
              <table:table-cell office:value-type="float" office:value="0.00141199996432988">
                <text:p>0.0014119999643298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355</text:p>
              </table:table-cell>
              <table:table-cell office:value-type="float" office:value="0.00141599996422883">
                <text:p>0.00141599996422883</text:p>
              </table:table-cell>
              <table:table-cell office:value-type="float" office:value="0.0850000008940697">
                <text:p>0.0850000008940697</text:p>
              </table:table-cell>
              <table:table-cell office:value-type="float" office:value="NaN">
                <text:p>NaN</text:p>
              </table:table-cell>
            </table:table-row>
            <table:table-row>
              <table:table-cell office:value-type="string">
                <text:p>356</text:p>
              </table:table-cell>
              <table:table-cell office:value-type="float" office:value="0.00141999996412778">
                <text:p>0.0014199999641277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357</text:p>
              </table:table-cell>
              <table:table-cell office:value-type="float" office:value="0.00142399996402673">
                <text:p>0.00142399996402673</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58</text:p>
              </table:table-cell>
              <table:table-cell office:value-type="float" office:value="0.00142799996392569">
                <text:p>0.0014279999639256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359</text:p>
              </table:table-cell>
              <table:table-cell office:value-type="float" office:value="0.00143199996382464">
                <text:p>0.00143199996382464</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60</text:p>
              </table:table-cell>
              <table:table-cell office:value-type="float" office:value="0.00143599996372359">
                <text:p>0.0014359999637235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361</text:p>
              </table:table-cell>
              <table:table-cell office:value-type="float" office:value="0.00143999996362254">
                <text:p>0.0014399999636225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362</text:p>
              </table:table-cell>
              <table:table-cell office:value-type="float" office:value="0.00144399996352149">
                <text:p>0.0014439999635214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63</text:p>
              </table:table-cell>
              <table:table-cell office:value-type="float" office:value="0.00144799996342044">
                <text:p>0.0014479999634204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364</text:p>
              </table:table-cell>
              <table:table-cell office:value-type="float" office:value="0.00145199996331939">
                <text:p>0.0014519999633193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365</text:p>
              </table:table-cell>
              <table:table-cell office:value-type="float" office:value="0.00145599996321835">
                <text:p>0.00145599996321835</text:p>
              </table:table-cell>
              <table:table-cell office:value-type="float" office:value="0.0379999987781048">
                <text:p>0.0379999987781048</text:p>
              </table:table-cell>
              <table:table-cell office:value-type="float" office:value="NaN">
                <text:p>NaN</text:p>
              </table:table-cell>
            </table:table-row>
            <table:table-row>
              <table:table-cell office:value-type="string">
                <text:p>366</text:p>
              </table:table-cell>
              <table:table-cell office:value-type="float" office:value="0.0014599999631173">
                <text:p>0.0014599999631173</text:p>
              </table:table-cell>
              <table:table-cell office:value-type="float" office:value="0.034000001847744">
                <text:p>0.034000001847744</text:p>
              </table:table-cell>
              <table:table-cell office:value-type="float" office:value="NaN">
                <text:p>NaN</text:p>
              </table:table-cell>
            </table:table-row>
            <table:table-row>
              <table:table-cell office:value-type="string">
                <text:p>367</text:p>
              </table:table-cell>
              <table:table-cell office:value-type="float" office:value="0.00146399996301625">
                <text:p>0.00146399996301625</text:p>
              </table:table-cell>
              <table:table-cell office:value-type="float" office:value="0.0280000008642674">
                <text:p>0.0280000008642674</text:p>
              </table:table-cell>
              <table:table-cell office:value-type="float" office:value="NaN">
                <text:p>NaN</text:p>
              </table:table-cell>
            </table:table-row>
            <table:table-row>
              <table:table-cell office:value-type="string">
                <text:p>368</text:p>
              </table:table-cell>
              <table:table-cell office:value-type="float" office:value="0.0014679999629152">
                <text:p>0.0014679999629152</text:p>
              </table:table-cell>
              <table:table-cell office:value-type="float" office:value="0.0219999998807907">
                <text:p>0.0219999998807907</text:p>
              </table:table-cell>
              <table:table-cell office:value-type="float" office:value="NaN">
                <text:p>NaN</text:p>
              </table:table-cell>
            </table:table-row>
            <table:table-row>
              <table:table-cell office:value-type="string">
                <text:p>369</text:p>
              </table:table-cell>
              <table:table-cell office:value-type="float" office:value="0.00147199996281415">
                <text:p>0.0014719999628141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0</text:p>
              </table:table-cell>
              <table:table-cell office:value-type="float" office:value="0.0014759999627131">
                <text:p>0.001475999962713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371</text:p>
              </table:table-cell>
              <table:table-cell office:value-type="float" office:value="0.00147999996261206">
                <text:p>0.0014799999626120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2</text:p>
              </table:table-cell>
              <table:table-cell office:value-type="float" office:value="0.00148399996251101">
                <text:p>0.00148399996251101</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373</text:p>
              </table:table-cell>
              <table:table-cell office:value-type="float" office:value="0.00148799996240996">
                <text:p>0.0014879999624099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374</text:p>
              </table:table-cell>
              <table:table-cell office:value-type="float" office:value="0.00149199996230891">
                <text:p>0.0014919999623089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375</text:p>
              </table:table-cell>
              <table:table-cell office:value-type="float" office:value="0.00149599996220786">
                <text:p>0.0014959999622078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6</text:p>
              </table:table-cell>
              <table:table-cell office:value-type="float" office:value="0.00149999996210681">
                <text:p>0.00149999996210681</text:p>
              </table:table-cell>
              <table:table-cell office:value-type="float" office:value="-0.0160000007599592">
                <text:p>-0.0160000007599592</text:p>
              </table:table-cell>
              <table:table-cell office:value-type="float" office:value="NaN">
                <text:p>NaN</text:p>
              </table:table-cell>
            </table:table-row>
            <table:table-row>
              <table:table-cell office:value-type="string">
                <text:p>377</text:p>
              </table:table-cell>
              <table:table-cell office:value-type="float" office:value="0.00150399996200576">
                <text:p>0.0015039999620057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8</text:p>
              </table:table-cell>
              <table:table-cell office:value-type="float" office:value="0.00150799996190472">
                <text:p>0.00150799996190472</text:p>
              </table:table-cell>
              <table:table-cell office:value-type="float" office:value="-0.0260000005364418">
                <text:p>-0.0260000005364418</text:p>
              </table:table-cell>
              <table:table-cell office:value-type="float" office:value="NaN">
                <text:p>NaN</text:p>
              </table:table-cell>
            </table:table-row>
            <table:table-row>
              <table:table-cell office:value-type="string">
                <text:p>379</text:p>
              </table:table-cell>
              <table:table-cell office:value-type="float" office:value="0.00151199996180367">
                <text:p>0.00151199996180367</text:p>
              </table:table-cell>
              <table:table-cell office:value-type="float" office:value="-0.0300000011920929">
                <text:p>-0.0300000011920929</text:p>
              </table:table-cell>
              <table:table-cell office:value-type="float" office:value="NaN">
                <text:p>NaN</text:p>
              </table:table-cell>
            </table:table-row>
            <table:table-row>
              <table:table-cell office:value-type="string">
                <text:p>380</text:p>
              </table:table-cell>
              <table:table-cell office:value-type="float" office:value="0.00151599996170262">
                <text:p>0.0015159999617026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381</text:p>
              </table:table-cell>
              <table:table-cell office:value-type="float" office:value="0.00151999996160157">
                <text:p>0.00151999996160157</text:p>
              </table:table-cell>
              <table:table-cell office:value-type="float" office:value="-0.0399999991059303">
                <text:p>-0.0399999991059303</text:p>
              </table:table-cell>
              <table:table-cell office:value-type="float" office:value="NaN">
                <text:p>NaN</text:p>
              </table:table-cell>
            </table:table-row>
            <table:table-row>
              <table:table-cell office:value-type="string">
                <text:p>382</text:p>
              </table:table-cell>
              <table:table-cell office:value-type="float" office:value="0.00152399996150052">
                <text:p>0.00152399996150052</text:p>
              </table:table-cell>
              <table:table-cell office:value-type="float" office:value="-0.046000000089407">
                <text:p>-0.046000000089407</text:p>
              </table:table-cell>
              <table:table-cell office:value-type="float" office:value="NaN">
                <text:p>NaN</text:p>
              </table:table-cell>
            </table:table-row>
            <table:table-row>
              <table:table-cell office:value-type="string">
                <text:p>383</text:p>
              </table:table-cell>
              <table:table-cell office:value-type="float" office:value="0.00152799996139947">
                <text:p>0.0015279999613994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84</text:p>
              </table:table-cell>
              <table:table-cell office:value-type="float" office:value="0.00153199996129842">
                <text:p>0.00153199996129842</text:p>
              </table:table-cell>
              <table:table-cell office:value-type="float" office:value="-0.0540000014007092">
                <text:p>-0.0540000014007092</text:p>
              </table:table-cell>
              <table:table-cell office:value-type="float" office:value="NaN">
                <text:p>NaN</text:p>
              </table:table-cell>
            </table:table-row>
            <table:table-row>
              <table:table-cell office:value-type="string">
                <text:p>385</text:p>
              </table:table-cell>
              <table:table-cell office:value-type="float" office:value="0.00153599996119738">
                <text:p>0.0015359999611973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386</text:p>
              </table:table-cell>
              <table:table-cell office:value-type="float" office:value="0.00153999996109633">
                <text:p>0.0015399999610963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87</text:p>
              </table:table-cell>
              <table:table-cell office:value-type="float" office:value="0.00154399996099528">
                <text:p>0.0015439999609952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388</text:p>
              </table:table-cell>
              <table:table-cell office:value-type="float" office:value="0.00154799996089423">
                <text:p>0.001547999960894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389</text:p>
              </table:table-cell>
              <table:table-cell office:value-type="float" office:value="0.00155199996079318">
                <text:p>0.0015519999607931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90</text:p>
              </table:table-cell>
              <table:table-cell office:value-type="float" office:value="0.00155599996069213">
                <text:p>0.0015559999606921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391</text:p>
              </table:table-cell>
              <table:table-cell office:value-type="float" office:value="0.00155999996059109">
                <text:p>0.00155999996059109</text:p>
              </table:table-cell>
              <table:table-cell office:value-type="float" office:value="-0.0900000035762787">
                <text:p>-0.0900000035762787</text:p>
              </table:table-cell>
              <table:table-cell office:value-type="float" office:value="NaN">
                <text:p>NaN</text:p>
              </table:table-cell>
            </table:table-row>
            <table:table-row>
              <table:table-cell office:value-type="string">
                <text:p>392</text:p>
              </table:table-cell>
              <table:table-cell office:value-type="float" office:value="0.00156399996049004">
                <text:p>0.0015639999604900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393</text:p>
              </table:table-cell>
              <table:table-cell office:value-type="float" office:value="0.00156799996038899">
                <text:p>0.00156799996038899</text:p>
              </table:table-cell>
              <table:table-cell office:value-type="float" office:value="-0.097000002861023">
                <text:p>-0.097000002861023</text:p>
              </table:table-cell>
              <table:table-cell office:value-type="float" office:value="NaN">
                <text:p>NaN</text:p>
              </table:table-cell>
            </table:table-row>
            <table:table-row>
              <table:table-cell office:value-type="string">
                <text:p>394</text:p>
              </table:table-cell>
              <table:table-cell office:value-type="float" office:value="0.00157199996028794">
                <text:p>0.00157199996028794</text:p>
              </table:table-cell>
              <table:table-cell office:value-type="float" office:value="-0.101999998092651">
                <text:p>-0.101999998092651</text:p>
              </table:table-cell>
              <table:table-cell office:value-type="float" office:value="NaN">
                <text:p>NaN</text:p>
              </table:table-cell>
            </table:table-row>
            <table:table-row>
              <table:table-cell office:value-type="string">
                <text:p>395</text:p>
              </table:table-cell>
              <table:table-cell office:value-type="float" office:value="0.00157599996018689">
                <text:p>0.00157599996018689</text:p>
              </table:table-cell>
              <table:table-cell office:value-type="float" office:value="-0.108000002801418">
                <text:p>-0.108000002801418</text:p>
              </table:table-cell>
              <table:table-cell office:value-type="float" office:value="NaN">
                <text:p>NaN</text:p>
              </table:table-cell>
            </table:table-row>
            <table:table-row>
              <table:table-cell office:value-type="string">
                <text:p>396</text:p>
              </table:table-cell>
              <table:table-cell office:value-type="float" office:value="0.00157999996008584">
                <text:p>0.00157999996008584</text:p>
              </table:table-cell>
              <table:table-cell office:value-type="float" office:value="-0.114000000059605">
                <text:p>-0.114000000059605</text:p>
              </table:table-cell>
              <table:table-cell office:value-type="float" office:value="NaN">
                <text:p>NaN</text:p>
              </table:table-cell>
            </table:table-row>
            <table:table-row>
              <table:table-cell office:value-type="string">
                <text:p>397</text:p>
              </table:table-cell>
              <table:table-cell office:value-type="float" office:value="0.00158399995998479">
                <text:p>0.00158399995998479</text:p>
              </table:table-cell>
              <table:table-cell office:value-type="float" office:value="-0.119000002741814">
                <text:p>-0.119000002741814</text:p>
              </table:table-cell>
              <table:table-cell office:value-type="float" office:value="NaN">
                <text:p>NaN</text:p>
              </table:table-cell>
            </table:table-row>
            <table:table-row>
              <table:table-cell office:value-type="string">
                <text:p>398</text:p>
              </table:table-cell>
              <table:table-cell office:value-type="float" office:value="0.00158799995988375">
                <text:p>0.00158799995988375</text:p>
              </table:table-cell>
              <table:table-cell office:value-type="float" office:value="-0.124000005424023">
                <text:p>-0.124000005424023</text:p>
              </table:table-cell>
              <table:table-cell office:value-type="float" office:value="NaN">
                <text:p>NaN</text:p>
              </table:table-cell>
            </table:table-row>
            <table:table-row>
              <table:table-cell office:value-type="string">
                <text:p>399</text:p>
              </table:table-cell>
              <table:table-cell office:value-type="float" office:value="0.0015919999597827">
                <text:p>0.0015919999597827</text:p>
              </table:table-cell>
              <table:table-cell office:value-type="float" office:value="-0.128000006079674">
                <text:p>-0.128000006079674</text:p>
              </table:table-cell>
              <table:table-cell office:value-type="float" office:value="NaN">
                <text:p>NaN</text:p>
              </table:table-cell>
            </table:table-row>
            <table:table-row>
              <table:table-cell office:value-type="string">
                <text:p>400</text:p>
              </table:table-cell>
              <table:table-cell office:value-type="float" office:value="0.00159599995968165">
                <text:p>0.00159599995968165</text:p>
              </table:table-cell>
              <table:table-cell office:value-type="float" office:value="-0.13400000333786">
                <text:p>-0.13400000333786</text:p>
              </table:table-cell>
              <table:table-cell office:value-type="float" office:value="NaN">
                <text:p>NaN</text:p>
              </table:table-cell>
            </table:table-row>
            <table:table-row>
              <table:table-cell office:value-type="string">
                <text:p>401</text:p>
              </table:table-cell>
              <table:table-cell office:value-type="float" office:value="0.0015999999595806">
                <text:p>0.0015999999595806</text:p>
              </table:table-cell>
              <table:table-cell office:value-type="float" office:value="-0.137999996542931">
                <text:p>-0.137999996542931</text:p>
              </table:table-cell>
              <table:table-cell office:value-type="float" office:value="NaN">
                <text:p>NaN</text:p>
              </table:table-cell>
            </table:table-row>
            <table:table-row>
              <table:table-cell office:value-type="string">
                <text:p>402</text:p>
              </table:table-cell>
              <table:table-cell office:value-type="float" office:value="0.00160399995947955">
                <text:p>0.00160399995947955</text:p>
              </table:table-cell>
              <table:table-cell office:value-type="float" office:value="-0.142000004649162">
                <text:p>-0.142000004649162</text:p>
              </table:table-cell>
              <table:table-cell office:value-type="float" office:value="NaN">
                <text:p>NaN</text:p>
              </table:table-cell>
            </table:table-row>
            <table:table-row>
              <table:table-cell office:value-type="string">
                <text:p>403</text:p>
              </table:table-cell>
              <table:table-cell office:value-type="float" office:value="0.0016079999593785">
                <text:p>0.0016079999593785</text:p>
              </table:table-cell>
              <table:table-cell office:value-type="float" office:value="-0.145999997854233">
                <text:p>-0.145999997854233</text:p>
              </table:table-cell>
              <table:table-cell office:value-type="float" office:value="NaN">
                <text:p>NaN</text:p>
              </table:table-cell>
            </table:table-row>
            <table:table-row>
              <table:table-cell office:value-type="string">
                <text:p>404</text:p>
              </table:table-cell>
              <table:table-cell office:value-type="float" office:value="0.00161199995927745">
                <text:p>0.00161199995927745</text:p>
              </table:table-cell>
              <table:table-cell office:value-type="float" office:value="-0.151999995112419">
                <text:p>-0.151999995112419</text:p>
              </table:table-cell>
              <table:table-cell office:value-type="float" office:value="NaN">
                <text:p>NaN</text:p>
              </table:table-cell>
            </table:table-row>
            <table:table-row>
              <table:table-cell office:value-type="string">
                <text:p>405</text:p>
              </table:table-cell>
              <table:table-cell office:value-type="float" office:value="0.00161599995917641">
                <text:p>0.00161599995917641</text:p>
              </table:table-cell>
              <table:table-cell office:value-type="float" office:value="-0.156000003218651">
                <text:p>-0.156000003218651</text:p>
              </table:table-cell>
              <table:table-cell office:value-type="float" office:value="NaN">
                <text:p>NaN</text:p>
              </table:table-cell>
            </table:table-row>
            <table:table-row>
              <table:table-cell office:value-type="string">
                <text:p>406</text:p>
              </table:table-cell>
              <table:table-cell office:value-type="float" office:value="0.00161999995907536">
                <text:p>0.00161999995907536</text:p>
              </table:table-cell>
              <table:table-cell office:value-type="float" office:value="-0.162000000476837">
                <text:p>-0.162000000476837</text:p>
              </table:table-cell>
              <table:table-cell office:value-type="float" office:value="NaN">
                <text:p>NaN</text:p>
              </table:table-cell>
            </table:table-row>
            <table:table-row>
              <table:table-cell office:value-type="string">
                <text:p>407</text:p>
              </table:table-cell>
              <table:table-cell office:value-type="float" office:value="0.00162399995897431">
                <text:p>0.00162399995897431</text:p>
              </table:table-cell>
              <table:table-cell office:value-type="float" office:value="-0.166999995708466">
                <text:p>-0.166999995708466</text:p>
              </table:table-cell>
              <table:table-cell office:value-type="float" office:value="NaN">
                <text:p>NaN</text:p>
              </table:table-cell>
            </table:table-row>
            <table:table-row>
              <table:table-cell office:value-type="string">
                <text:p>408</text:p>
              </table:table-cell>
              <table:table-cell office:value-type="float" office:value="0.00162799995887326">
                <text:p>0.00162799995887326</text:p>
              </table:table-cell>
              <table:table-cell office:value-type="float" office:value="-0.170000001788139">
                <text:p>-0.170000001788139</text:p>
              </table:table-cell>
              <table:table-cell office:value-type="float" office:value="NaN">
                <text:p>NaN</text:p>
              </table:table-cell>
            </table:table-row>
            <table:table-row>
              <table:table-cell office:value-type="string">
                <text:p>409</text:p>
              </table:table-cell>
              <table:table-cell office:value-type="float" office:value="0.00163199995877221">
                <text:p>0.00163199995877221</text:p>
              </table:table-cell>
              <table:table-cell office:value-type="float" office:value="-0.175999999046326">
                <text:p>-0.175999999046326</text:p>
              </table:table-cell>
              <table:table-cell office:value-type="float" office:value="NaN">
                <text:p>NaN</text:p>
              </table:table-cell>
            </table:table-row>
            <table:table-row>
              <table:table-cell office:value-type="string">
                <text:p>410</text:p>
              </table:table-cell>
              <table:table-cell office:value-type="float" office:value="0.00163599995867116">
                <text:p>0.00163599995867116</text:p>
              </table:table-cell>
              <table:table-cell office:value-type="float" office:value="-0.184000000357628">
                <text:p>-0.184000000357628</text:p>
              </table:table-cell>
              <table:table-cell office:value-type="float" office:value="NaN">
                <text:p>NaN</text:p>
              </table:table-cell>
            </table:table-row>
            <table:table-row>
              <table:table-cell office:value-type="string">
                <text:p>411</text:p>
              </table:table-cell>
              <table:table-cell office:value-type="float" office:value="0.00163999995857012">
                <text:p>0.00163999995857012</text:p>
              </table:table-cell>
              <table:table-cell office:value-type="float" office:value="-0.186000004410744">
                <text:p>-0.186000004410744</text:p>
              </table:table-cell>
              <table:table-cell office:value-type="float" office:value="NaN">
                <text:p>NaN</text:p>
              </table:table-cell>
            </table:table-row>
            <table:table-row>
              <table:table-cell office:value-type="string">
                <text:p>412</text:p>
              </table:table-cell>
              <table:table-cell office:value-type="float" office:value="0.00164399995846907">
                <text:p>0.00164399995846907</text:p>
              </table:table-cell>
              <table:table-cell office:value-type="float" office:value="-0.188999995589256">
                <text:p>-0.188999995589256</text:p>
              </table:table-cell>
              <table:table-cell office:value-type="float" office:value="NaN">
                <text:p>NaN</text:p>
              </table:table-cell>
            </table:table-row>
            <table:table-row>
              <table:table-cell office:value-type="string">
                <text:p>413</text:p>
              </table:table-cell>
              <table:table-cell office:value-type="float" office:value="0.00164799995836802">
                <text:p>0.00164799995836802</text:p>
              </table:table-cell>
              <table:table-cell office:value-type="float" office:value="-0.194000005722046">
                <text:p>-0.194000005722046</text:p>
              </table:table-cell>
              <table:table-cell office:value-type="float" office:value="NaN">
                <text:p>NaN</text:p>
              </table:table-cell>
            </table:table-row>
            <table:table-row>
              <table:table-cell office:value-type="string">
                <text:p>414</text:p>
              </table:table-cell>
              <table:table-cell office:value-type="float" office:value="0.00165199995826697">
                <text:p>0.00165199995826697</text:p>
              </table:table-cell>
              <table:table-cell office:value-type="float" office:value="-0.197999998927116">
                <text:p>-0.197999998927116</text:p>
              </table:table-cell>
              <table:table-cell office:value-type="float" office:value="NaN">
                <text:p>NaN</text:p>
              </table:table-cell>
            </table:table-row>
            <table:table-row>
              <table:table-cell office:value-type="string">
                <text:p>415</text:p>
              </table:table-cell>
              <table:table-cell office:value-type="float" office:value="0.00165599995816592">
                <text:p>0.00165599995816592</text:p>
              </table:table-cell>
              <table:table-cell office:value-type="float" office:value="-0.203000009059906">
                <text:p>-0.203000009059906</text:p>
              </table:table-cell>
              <table:table-cell office:value-type="float" office:value="NaN">
                <text:p>NaN</text:p>
              </table:table-cell>
            </table:table-row>
            <table:table-row>
              <table:table-cell office:value-type="string">
                <text:p>416</text:p>
              </table:table-cell>
              <table:table-cell office:value-type="float" office:value="0.00165999995806487">
                <text:p>0.0016599999580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417</text:p>
              </table:table-cell>
              <table:table-cell office:value-type="float" office:value="0.00166399995796382">
                <text:p>0.0016639999579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418</text:p>
              </table:table-cell>
              <table:table-cell office:value-type="float" office:value="0.00166799995786278">
                <text:p>0.00166799995786278</text:p>
              </table:table-cell>
              <table:table-cell office:value-type="float" office:value="-0.203999996185303">
                <text:p>-0.203999996185303</text:p>
              </table:table-cell>
              <table:table-cell office:value-type="float" office:value="NaN">
                <text:p>NaN</text:p>
              </table:table-cell>
            </table:table-row>
            <table:table-row>
              <table:table-cell office:value-type="string">
                <text:p>419</text:p>
              </table:table-cell>
              <table:table-cell office:value-type="float" office:value="0.00167199995776173">
                <text:p>0.00167199995776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0</text:p>
              </table:table-cell>
              <table:table-cell office:value-type="float" office:value="0.00167599995766068">
                <text:p>0.0016759999576606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1</text:p>
              </table:table-cell>
              <table:table-cell office:value-type="float" office:value="0.00167999995755963">
                <text:p>0.0016799999575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2</text:p>
              </table:table-cell>
              <table:table-cell office:value-type="float" office:value="0.00168399995745858">
                <text:p>0.0016839999574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3</text:p>
              </table:table-cell>
              <table:table-cell office:value-type="float" office:value="0.00168799995735753">
                <text:p>0.0016879999573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4</text:p>
              </table:table-cell>
              <table:table-cell office:value-type="float" office:value="0.00169199995725648">
                <text:p>0.0016919999572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5</text:p>
              </table:table-cell>
              <table:table-cell office:value-type="float" office:value="0.00169599995715544">
                <text:p>0.0016959999571554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6</text:p>
              </table:table-cell>
              <table:table-cell office:value-type="float" office:value="0.00169999995705439">
                <text:p>0.00169999995705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7</text:p>
              </table:table-cell>
              <table:table-cell office:value-type="float" office:value="0.00170399995695334">
                <text:p>0.0017039999569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8</text:p>
              </table:table-cell>
              <table:table-cell office:value-type="float" office:value="0.00170799995685229">
                <text:p>0.0017079999568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9</text:p>
              </table:table-cell>
              <table:table-cell office:value-type="float" office:value="0.00171199995675124">
                <text:p>0.0017119999567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430</text:p>
              </table:table-cell>
              <table:table-cell office:value-type="float" office:value="0.00171599995665019">
                <text:p>0.0017159999566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1</text:p>
              </table:table-cell>
              <table:table-cell office:value-type="float" office:value="0.00171999995654915">
                <text:p>0.0017199999565491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2</text:p>
              </table:table-cell>
              <table:table-cell office:value-type="float" office:value="0.0017239999564481">
                <text:p>0.00172399995644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3</text:p>
              </table:table-cell>
              <table:table-cell office:value-type="float" office:value="0.00172799995634705">
                <text:p>0.0017279999563470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4</text:p>
              </table:table-cell>
              <table:table-cell office:value-type="float" office:value="0.001731999956246">
                <text:p>0.001731999956246</text:p>
              </table:table-cell>
              <table:table-cell office:value-type="float" office:value="-0.203999996185303">
                <text:p>-0.203999996185303</text:p>
              </table:table-cell>
              <table:table-cell office:value-type="float" office:value="NaN">
                <text:p>NaN</text:p>
              </table:table-cell>
            </table:table-row>
            <table:table-row>
              <table:table-cell office:value-type="string">
                <text:p>435</text:p>
              </table:table-cell>
              <table:table-cell office:value-type="float" office:value="0.00173599995614495">
                <text:p>0.0017359999561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6</text:p>
              </table:table-cell>
              <table:table-cell office:value-type="float" office:value="0.0017399999560439">
                <text:p>0.0017399999560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7</text:p>
              </table:table-cell>
              <table:table-cell office:value-type="float" office:value="0.00174399995594285">
                <text:p>0.0017439999559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8</text:p>
              </table:table-cell>
              <table:table-cell office:value-type="float" office:value="0.00174799995584181">
                <text:p>0.001747999955841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9</text:p>
              </table:table-cell>
              <table:table-cell office:value-type="float" office:value="0.00175199995574076">
                <text:p>0.00175199995574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0</text:p>
              </table:table-cell>
              <table:table-cell office:value-type="float" office:value="0.00175599995563971">
                <text:p>0.0017559999556397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1</text:p>
              </table:table-cell>
              <table:table-cell office:value-type="float" office:value="0.00175999995553866">
                <text:p>0.0017599999555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2</text:p>
              </table:table-cell>
              <table:table-cell office:value-type="float" office:value="0.00176399995543761">
                <text:p>0.0017639999554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3</text:p>
              </table:table-cell>
              <table:table-cell office:value-type="float" office:value="0.00176799995533656">
                <text:p>0.0017679999553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4</text:p>
              </table:table-cell>
              <table:table-cell office:value-type="float" office:value="0.00177199995523551">
                <text:p>0.0017719999552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5</text:p>
              </table:table-cell>
              <table:table-cell office:value-type="float" office:value="0.00177599995513447">
                <text:p>0.0017759999551344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6</text:p>
              </table:table-cell>
              <table:table-cell office:value-type="float" office:value="0.00177999995503342">
                <text:p>0.0017799999550334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7</text:p>
              </table:table-cell>
              <table:table-cell office:value-type="float" office:value="0.00178399995493237">
                <text:p>0.0017839999549323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8</text:p>
              </table:table-cell>
              <table:table-cell office:value-type="float" office:value="0.00178799995483132">
                <text:p>0.0017879999548313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9</text:p>
              </table:table-cell>
              <table:table-cell office:value-type="float" office:value="0.00179199995473027">
                <text:p>0.00179199995473027</text:p>
              </table:table-cell>
              <table:table-cell office:value-type="float" office:value="-0.203999996185303">
                <text:p>-0.203999996185303</text:p>
              </table:table-cell>
              <table:table-cell office:value-type="float" office:value="NaN">
                <text:p>NaN</text:p>
              </table:table-cell>
            </table:table-row>
            <table:table-row>
              <table:table-cell office:value-type="string">
                <text:p>450</text:p>
              </table:table-cell>
              <table:table-cell office:value-type="float" office:value="0.00179599995462922">
                <text:p>0.00179599995462922</text:p>
              </table:table-cell>
              <table:table-cell office:value-type="float" office:value="-0.203999996185303">
                <text:p>-0.203999996185303</text:p>
              </table:table-cell>
              <table:table-cell office:value-type="float" office:value="NaN">
                <text:p>NaN</text:p>
              </table:table-cell>
            </table:table-row>
            <table:table-row>
              <table:table-cell office:value-type="string">
                <text:p>451</text:p>
              </table:table-cell>
              <table:table-cell office:value-type="float" office:value="0.00179999995452818">
                <text:p>0.0017999999545281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2</text:p>
              </table:table-cell>
              <table:table-cell office:value-type="float" office:value="0.00180399995442713">
                <text:p>0.0018039999544271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3</text:p>
              </table:table-cell>
              <table:table-cell office:value-type="float" office:value="0.00180799995432608">
                <text:p>0.0018079999543260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4</text:p>
              </table:table-cell>
              <table:table-cell office:value-type="float" office:value="0.00181199995422503">
                <text:p>0.0018119999542250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5</text:p>
              </table:table-cell>
              <table:table-cell office:value-type="float" office:value="0.00181599995412398">
                <text:p>0.0018159999541239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6</text:p>
              </table:table-cell>
              <table:table-cell office:value-type="float" office:value="0.00181999995402293">
                <text:p>0.0018199999540229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7</text:p>
              </table:table-cell>
              <table:table-cell office:value-type="float" office:value="0.00182399995392188">
                <text:p>0.0018239999539218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8</text:p>
              </table:table-cell>
              <table:table-cell office:value-type="float" office:value="0.00182799995382084">
                <text:p>0.00182799995382084</text:p>
              </table:table-cell>
              <table:table-cell office:value-type="float" office:value="-0.202000007033348">
                <text:p>-0.202000007033348</text:p>
              </table:table-cell>
              <table:table-cell office:value-type="float" office:value="NaN">
                <text:p>NaN</text:p>
              </table:table-cell>
            </table:table-row>
            <table:table-row>
              <table:table-cell office:value-type="string">
                <text:p>459</text:p>
              </table:table-cell>
              <table:table-cell office:value-type="float" office:value="0.00183199995371979">
                <text:p>0.00183199995371979</text:p>
              </table:table-cell>
              <table:table-cell office:value-type="float" office:value="-0.197999998927116">
                <text:p>-0.197999998927116</text:p>
              </table:table-cell>
              <table:table-cell office:value-type="float" office:value="NaN">
                <text:p>NaN</text:p>
              </table:table-cell>
            </table:table-row>
            <table:table-row>
              <table:table-cell office:value-type="string">
                <text:p>460</text:p>
              </table:table-cell>
              <table:table-cell office:value-type="float" office:value="0.00183599995361874">
                <text:p>0.00183599995361874</text:p>
              </table:table-cell>
              <table:table-cell office:value-type="float" office:value="-0.194000005722046">
                <text:p>-0.194000005722046</text:p>
              </table:table-cell>
              <table:table-cell office:value-type="float" office:value="NaN">
                <text:p>NaN</text:p>
              </table:table-cell>
            </table:table-row>
            <table:table-row>
              <table:table-cell office:value-type="string">
                <text:p>461</text:p>
              </table:table-cell>
              <table:table-cell office:value-type="float" office:value="0.00183999995351769">
                <text:p>0.00183999995351769</text:p>
              </table:table-cell>
              <table:table-cell office:value-type="float" office:value="-0.188999995589256">
                <text:p>-0.188999995589256</text:p>
              </table:table-cell>
              <table:table-cell office:value-type="float" office:value="NaN">
                <text:p>NaN</text:p>
              </table:table-cell>
            </table:table-row>
            <table:table-row>
              <table:table-cell office:value-type="string">
                <text:p>462</text:p>
              </table:table-cell>
              <table:table-cell office:value-type="float" office:value="0.00184399995341664">
                <text:p>0.00184399995341664</text:p>
              </table:table-cell>
              <table:table-cell office:value-type="float" office:value="-0.186000004410744">
                <text:p>-0.186000004410744</text:p>
              </table:table-cell>
              <table:table-cell office:value-type="float" office:value="NaN">
                <text:p>NaN</text:p>
              </table:table-cell>
            </table:table-row>
            <table:table-row>
              <table:table-cell office:value-type="string">
                <text:p>463</text:p>
              </table:table-cell>
              <table:table-cell office:value-type="float" office:value="0.00184799995331559">
                <text:p>0.00184799995331559</text:p>
              </table:table-cell>
              <table:table-cell office:value-type="float" office:value="-0.181999996304512">
                <text:p>-0.181999996304512</text:p>
              </table:table-cell>
              <table:table-cell office:value-type="float" office:value="NaN">
                <text:p>NaN</text:p>
              </table:table-cell>
            </table:table-row>
            <table:table-row>
              <table:table-cell office:value-type="string">
                <text:p>464</text:p>
              </table:table-cell>
              <table:table-cell office:value-type="float" office:value="0.00185199995321454">
                <text:p>0.00185199995321454</text:p>
              </table:table-cell>
              <table:table-cell office:value-type="float" office:value="-0.174000009894371">
                <text:p>-0.174000009894371</text:p>
              </table:table-cell>
              <table:table-cell office:value-type="float" office:value="NaN">
                <text:p>NaN</text:p>
              </table:table-cell>
            </table:table-row>
            <table:table-row>
              <table:table-cell office:value-type="string">
                <text:p>465</text:p>
              </table:table-cell>
              <table:table-cell office:value-type="float" office:value="0.0018559999531135">
                <text:p>0.0018559999531135</text:p>
              </table:table-cell>
              <table:table-cell office:value-type="float" office:value="-0.170000001788139">
                <text:p>-0.170000001788139</text:p>
              </table:table-cell>
              <table:table-cell office:value-type="float" office:value="NaN">
                <text:p>NaN</text:p>
              </table:table-cell>
            </table:table-row>
            <table:table-row>
              <table:table-cell office:value-type="string">
                <text:p>466</text:p>
              </table:table-cell>
              <table:table-cell office:value-type="float" office:value="0.00185999995301245">
                <text:p>0.00185999995301245</text:p>
              </table:table-cell>
              <table:table-cell office:value-type="float" office:value="-0.166000008583069">
                <text:p>-0.166000008583069</text:p>
              </table:table-cell>
              <table:table-cell office:value-type="float" office:value="NaN">
                <text:p>NaN</text:p>
              </table:table-cell>
            </table:table-row>
            <table:table-row>
              <table:table-cell office:value-type="string">
                <text:p>467</text:p>
              </table:table-cell>
              <table:table-cell office:value-type="float" office:value="0.0018639999529114">
                <text:p>0.0018639999529114</text:p>
              </table:table-cell>
              <table:table-cell office:value-type="float" office:value="-0.159999996423721">
                <text:p>-0.159999996423721</text:p>
              </table:table-cell>
              <table:table-cell office:value-type="float" office:value="NaN">
                <text:p>NaN</text:p>
              </table:table-cell>
            </table:table-row>
            <table:table-row>
              <table:table-cell office:value-type="string">
                <text:p>468</text:p>
              </table:table-cell>
              <table:table-cell office:value-type="float" office:value="0.00186799995281035">
                <text:p>0.00186799995281035</text:p>
              </table:table-cell>
              <table:table-cell office:value-type="float" office:value="-0.156000003218651">
                <text:p>-0.156000003218651</text:p>
              </table:table-cell>
              <table:table-cell office:value-type="float" office:value="NaN">
                <text:p>NaN</text:p>
              </table:table-cell>
            </table:table-row>
            <table:table-row>
              <table:table-cell office:value-type="string">
                <text:p>469</text:p>
              </table:table-cell>
              <table:table-cell office:value-type="float" office:value="0.0018719999527093">
                <text:p>0.0018719999527093</text:p>
              </table:table-cell>
              <table:table-cell office:value-type="float" office:value="-0.151999995112419">
                <text:p>-0.151999995112419</text:p>
              </table:table-cell>
              <table:table-cell office:value-type="float" office:value="NaN">
                <text:p>NaN</text:p>
              </table:table-cell>
            </table:table-row>
            <table:table-row>
              <table:table-cell office:value-type="string">
                <text:p>470</text:p>
              </table:table-cell>
              <table:table-cell office:value-type="float" office:value="0.00187599995260825">
                <text:p>0.00187599995260825</text:p>
              </table:table-cell>
              <table:table-cell office:value-type="float" office:value="-0.145999997854233">
                <text:p>-0.145999997854233</text:p>
              </table:table-cell>
              <table:table-cell office:value-type="float" office:value="NaN">
                <text:p>NaN</text:p>
              </table:table-cell>
            </table:table-row>
            <table:table-row>
              <table:table-cell office:value-type="string">
                <text:p>471</text:p>
              </table:table-cell>
              <table:table-cell office:value-type="float" office:value="0.00187999995250721">
                <text:p>0.00187999995250721</text:p>
              </table:table-cell>
              <table:table-cell office:value-type="float" office:value="-0.142000004649162">
                <text:p>-0.142000004649162</text:p>
              </table:table-cell>
              <table:table-cell office:value-type="float" office:value="NaN">
                <text:p>NaN</text:p>
              </table:table-cell>
            </table:table-row>
            <table:table-row>
              <table:table-cell office:value-type="string">
                <text:p>472</text:p>
              </table:table-cell>
              <table:table-cell office:value-type="float" office:value="0.00188399995240616">
                <text:p>0.00188399995240616</text:p>
              </table:table-cell>
              <table:table-cell office:value-type="float" office:value="-0.137999996542931">
                <text:p>-0.137999996542931</text:p>
              </table:table-cell>
              <table:table-cell office:value-type="float" office:value="NaN">
                <text:p>NaN</text:p>
              </table:table-cell>
            </table:table-row>
            <table:table-row>
              <table:table-cell office:value-type="string">
                <text:p>473</text:p>
              </table:table-cell>
              <table:table-cell office:value-type="float" office:value="0.00188799995230511">
                <text:p>0.00188799995230511</text:p>
              </table:table-cell>
              <table:table-cell office:value-type="float" office:value="-0.129999995231628">
                <text:p>-0.129999995231628</text:p>
              </table:table-cell>
              <table:table-cell office:value-type="float" office:value="NaN">
                <text:p>NaN</text:p>
              </table:table-cell>
            </table:table-row>
            <table:table-row>
              <table:table-cell office:value-type="string">
                <text:p>474</text:p>
              </table:table-cell>
              <table:table-cell office:value-type="float" office:value="0.00189199995220406">
                <text:p>0.00189199995220406</text:p>
              </table:table-cell>
              <table:table-cell office:value-type="float" office:value="-0.126000002026558">
                <text:p>-0.126000002026558</text:p>
              </table:table-cell>
              <table:table-cell office:value-type="float" office:value="NaN">
                <text:p>NaN</text:p>
              </table:table-cell>
            </table:table-row>
            <table:table-row>
              <table:table-cell office:value-type="string">
                <text:p>475</text:p>
              </table:table-cell>
              <table:table-cell office:value-type="float" office:value="0.00189599995210301">
                <text:p>0.00189599995210301</text:p>
              </table:table-cell>
              <table:table-cell office:value-type="float" office:value="-0.124000005424023">
                <text:p>-0.124000005424023</text:p>
              </table:table-cell>
              <table:table-cell office:value-type="float" office:value="NaN">
                <text:p>NaN</text:p>
              </table:table-cell>
            </table:table-row>
            <table:table-row>
              <table:table-cell office:value-type="string">
                <text:p>476</text:p>
              </table:table-cell>
              <table:table-cell office:value-type="float" office:value="0.00189999995200196">
                <text:p>0.00189999995200196</text:p>
              </table:table-cell>
              <table:table-cell office:value-type="float" office:value="-0.11600000411272">
                <text:p>-0.11600000411272</text:p>
              </table:table-cell>
              <table:table-cell office:value-type="float" office:value="NaN">
                <text:p>NaN</text:p>
              </table:table-cell>
            </table:table-row>
            <table:table-row>
              <table:table-cell office:value-type="string">
                <text:p>477</text:p>
              </table:table-cell>
              <table:table-cell office:value-type="float" office:value="0.00190399995190091">
                <text:p>0.00190399995190091</text:p>
              </table:table-cell>
              <table:table-cell office:value-type="float" office:value="-0.112000003457069">
                <text:p>-0.112000003457069</text:p>
              </table:table-cell>
              <table:table-cell office:value-type="float" office:value="NaN">
                <text:p>NaN</text:p>
              </table:table-cell>
            </table:table-row>
            <table:table-row>
              <table:table-cell office:value-type="string">
                <text:p>478</text:p>
              </table:table-cell>
              <table:table-cell office:value-type="float" office:value="0.00190799995179987">
                <text:p>0.00190799995179987</text:p>
              </table:table-cell>
              <table:table-cell office:value-type="float" office:value="-0.105999998748302">
                <text:p>-0.105999998748302</text:p>
              </table:table-cell>
              <table:table-cell office:value-type="float" office:value="NaN">
                <text:p>NaN</text:p>
              </table:table-cell>
            </table:table-row>
            <table:table-row>
              <table:table-cell office:value-type="string">
                <text:p>479</text:p>
              </table:table-cell>
              <table:table-cell office:value-type="float" office:value="0.00191199995169882">
                <text:p>0.00191199995169882</text:p>
              </table:table-cell>
              <table:table-cell office:value-type="float" office:value="-0.100000001490116">
                <text:p>-0.100000001490116</text:p>
              </table:table-cell>
              <table:table-cell office:value-type="float" office:value="NaN">
                <text:p>NaN</text:p>
              </table:table-cell>
            </table:table-row>
            <table:table-row>
              <table:table-cell office:value-type="string">
                <text:p>480</text:p>
              </table:table-cell>
              <table:table-cell office:value-type="float" office:value="0.00191599995159777">
                <text:p>0.0019159999515977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481</text:p>
              </table:table-cell>
              <table:table-cell office:value-type="float" office:value="0.00191999995149672">
                <text:p>0.00191999995149672</text:p>
              </table:table-cell>
              <table:table-cell office:value-type="float" office:value="-0.0940000042319298">
                <text:p>-0.0940000042319298</text:p>
              </table:table-cell>
              <table:table-cell office:value-type="float" office:value="NaN">
                <text:p>NaN</text:p>
              </table:table-cell>
            </table:table-row>
            <table:table-row>
              <table:table-cell office:value-type="string">
                <text:p>482</text:p>
              </table:table-cell>
              <table:table-cell office:value-type="float" office:value="0.00192399995139567">
                <text:p>0.00192399995139567</text:p>
              </table:table-cell>
              <table:table-cell office:value-type="float" office:value="-0.0879999995231628">
                <text:p>-0.0879999995231628</text:p>
              </table:table-cell>
              <table:table-cell office:value-type="float" office:value="NaN">
                <text:p>NaN</text:p>
              </table:table-cell>
            </table:table-row>
            <table:table-row>
              <table:table-cell office:value-type="string">
                <text:p>483</text:p>
              </table:table-cell>
              <table:table-cell office:value-type="float" office:value="0.00192799995129462">
                <text:p>0.00192799995129462</text:p>
              </table:table-cell>
              <table:table-cell office:value-type="float" office:value="-0.0839999988675118">
                <text:p>-0.0839999988675118</text:p>
              </table:table-cell>
              <table:table-cell office:value-type="float" office:value="NaN">
                <text:p>NaN</text:p>
              </table:table-cell>
            </table:table-row>
            <table:table-row>
              <table:table-cell office:value-type="string">
                <text:p>484</text:p>
              </table:table-cell>
              <table:table-cell office:value-type="float" office:value="0.00193199995119357">
                <text:p>0.00193199995119357</text:p>
              </table:table-cell>
              <table:table-cell office:value-type="float" office:value="-0.0780000016093254">
                <text:p>-0.0780000016093254</text:p>
              </table:table-cell>
              <table:table-cell office:value-type="float" office:value="NaN">
                <text:p>NaN</text:p>
              </table:table-cell>
            </table:table-row>
            <table:table-row>
              <table:table-cell office:value-type="string">
                <text:p>485</text:p>
              </table:table-cell>
              <table:table-cell office:value-type="float" office:value="0.00193599995109253">
                <text:p>0.0019359999510925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486</text:p>
              </table:table-cell>
              <table:table-cell office:value-type="float" office:value="0.00193999995099148">
                <text:p>0.00193999995099148</text:p>
              </table:table-cell>
              <table:table-cell office:value-type="float" office:value="-0.068000003695488">
                <text:p>-0.068000003695488</text:p>
              </table:table-cell>
              <table:table-cell office:value-type="float" office:value="NaN">
                <text:p>NaN</text:p>
              </table:table-cell>
            </table:table-row>
            <table:table-row>
              <table:table-cell office:value-type="string">
                <text:p>487</text:p>
              </table:table-cell>
              <table:table-cell office:value-type="float" office:value="0.00194399995089043">
                <text:p>0.0019439999508904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488</text:p>
              </table:table-cell>
              <table:table-cell office:value-type="float" office:value="0.00194799995078938">
                <text:p>0.0019479999507893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489</text:p>
              </table:table-cell>
              <table:table-cell office:value-type="float" office:value="0.00195199995068833">
                <text:p>0.0019519999506883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490</text:p>
              </table:table-cell>
              <table:table-cell office:value-type="float" office:value="0.00195599995058728">
                <text:p>0.00195599995058728</text:p>
              </table:table-cell>
              <table:table-cell office:value-type="float" office:value="-0.0500000007450581">
                <text:p>-0.0500000007450581</text:p>
              </table:table-cell>
              <table:table-cell office:value-type="float" office:value="NaN">
                <text:p>NaN</text:p>
              </table:table-cell>
            </table:table-row>
            <table:table-row>
              <table:table-cell office:value-type="string">
                <text:p>491</text:p>
              </table:table-cell>
              <table:table-cell office:value-type="float" office:value="0.00195999995048624">
                <text:p>0.00195999995048624</text:p>
              </table:table-cell>
              <table:table-cell office:value-type="float" office:value="-0.046000000089407">
                <text:p>-0.046000000089407</text:p>
              </table:table-cell>
              <table:table-cell office:value-type="float" office:value="NaN">
                <text:p>NaN</text:p>
              </table:table-cell>
            </table:table-row>
            <table:table-row>
              <table:table-cell office:value-type="string">
                <text:p>492</text:p>
              </table:table-cell>
              <table:table-cell office:value-type="float" office:value="0.00196399995038519">
                <text:p>0.0019639999503851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493</text:p>
              </table:table-cell>
              <table:table-cell office:value-type="float" office:value="0.00196799995028414">
                <text:p>0.0019679999502841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494</text:p>
              </table:table-cell>
              <table:table-cell office:value-type="float" office:value="0.00197199995018309">
                <text:p>0.00197199995018309</text:p>
              </table:table-cell>
              <table:table-cell office:value-type="float" office:value="-0.0300000011920929">
                <text:p>-0.0300000011920929</text:p>
              </table:table-cell>
              <table:table-cell office:value-type="float" office:value="NaN">
                <text:p>NaN</text:p>
              </table:table-cell>
            </table:table-row>
            <table:table-row>
              <table:table-cell office:value-type="string">
                <text:p>495</text:p>
              </table:table-cell>
              <table:table-cell office:value-type="float" office:value="0.00197599995008204">
                <text:p>0.0019759999500820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496</text:p>
              </table:table-cell>
              <table:table-cell office:value-type="float" office:value="0.00197999994998099">
                <text:p>0.0019799999499809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97</text:p>
              </table:table-cell>
              <table:table-cell office:value-type="float" office:value="0.00198399994987994">
                <text:p>0.0019839999498799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498</text:p>
              </table:table-cell>
              <table:table-cell office:value-type="float" office:value="0.0019879999497789">
                <text:p>0.0019879999497789</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499</text:p>
              </table:table-cell>
              <table:table-cell office:value-type="float" office:value="0.00199199994967785">
                <text:p>0.0019919999496778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500</text:p>
              </table:table-cell>
              <table:table-cell office:value-type="float" office:value="0.0019959999495768">
                <text:p>0.0019959999495768</text:p>
              </table:table-cell>
              <table:table-cell office:value-type="float" office:value="-0.0020000000949949">
                <text:p>-0.0020000000949949</text:p>
              </table:table-cell>
              <table:table-cell office:value-type="float" office:value="NaN">
                <text:p>NaN</text:p>
              </table:table-cell>
            </table:table-row>
            <table:table-row>
              <table:table-cell office:value-type="string">
                <text:p>501</text:p>
              </table:table-cell>
              <table:table-cell office:value-type="float" office:value="0.00199999994947575">
                <text:p>0.00199999994947575</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502</text:p>
              </table:table-cell>
              <table:table-cell office:value-type="float" office:value="0.0020039999493747">
                <text:p>0.0020039999493747</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503</text:p>
              </table:table-cell>
              <table:table-cell office:value-type="float" office:value="0.00200799994927365">
                <text:p>0.0020079999492736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504</text:p>
              </table:table-cell>
              <table:table-cell office:value-type="float" office:value="0.0020119999491726">
                <text:p>0.0020119999491726</text:p>
              </table:table-cell>
              <table:table-cell office:value-type="float" office:value="0.0180000010877848">
                <text:p>0.0180000010877848</text:p>
              </table:table-cell>
              <table:table-cell office:value-type="float" office:value="NaN">
                <text:p>NaN</text:p>
              </table:table-cell>
            </table:table-row>
            <table:table-row>
              <table:table-cell office:value-type="string">
                <text:p>505</text:p>
              </table:table-cell>
              <table:table-cell office:value-type="float" office:value="0.00201599994907156">
                <text:p>0.002015999949071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506</text:p>
              </table:table-cell>
              <table:table-cell office:value-type="float" office:value="0.00201999994897051">
                <text:p>0.0020199999489705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507</text:p>
              </table:table-cell>
              <table:table-cell office:value-type="float" office:value="0.00202399994886946">
                <text:p>0.00202399994886946</text:p>
              </table:table-cell>
              <table:table-cell office:value-type="float" office:value="0.034000001847744">
                <text:p>0.034000001847744</text:p>
              </table:table-cell>
              <table:table-cell office:value-type="float" office:value="NaN">
                <text:p>NaN</text:p>
              </table:table-cell>
            </table:table-row>
            <table:table-row>
              <table:table-cell office:value-type="string">
                <text:p>508</text:p>
              </table:table-cell>
              <table:table-cell office:value-type="float" office:value="0.00202799994876841">
                <text:p>0.00202799994876841</text:p>
              </table:table-cell>
              <table:table-cell office:value-type="float" office:value="0.0390000008046627">
                <text:p>0.0390000008046627</text:p>
              </table:table-cell>
              <table:table-cell office:value-type="float" office:value="NaN">
                <text:p>NaN</text:p>
              </table:table-cell>
            </table:table-row>
            <table:table-row>
              <table:table-cell office:value-type="string">
                <text:p>509</text:p>
              </table:table-cell>
              <table:table-cell office:value-type="float" office:value="0.00203199994866736">
                <text:p>0.00203199994866736</text:p>
              </table:table-cell>
              <table:table-cell office:value-type="float" office:value="0.0439999997615814">
                <text:p>0.0439999997615814</text:p>
              </table:table-cell>
              <table:table-cell office:value-type="float" office:value="NaN">
                <text:p>NaN</text:p>
              </table:table-cell>
            </table:table-row>
            <table:table-row>
              <table:table-cell office:value-type="string">
                <text:p>510</text:p>
              </table:table-cell>
              <table:table-cell office:value-type="float" office:value="0.00203599994856631">
                <text:p>0.00203599994856631</text:p>
              </table:table-cell>
              <table:table-cell office:value-type="float" office:value="0.0480000004172325">
                <text:p>0.0480000004172325</text:p>
              </table:table-cell>
              <table:table-cell office:value-type="float" office:value="NaN">
                <text:p>NaN</text:p>
              </table:table-cell>
            </table:table-row>
            <table:table-row>
              <table:table-cell office:value-type="string">
                <text:p>511</text:p>
              </table:table-cell>
              <table:table-cell office:value-type="float" office:value="0.00203999994846527">
                <text:p>0.0020399999484652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512</text:p>
              </table:table-cell>
              <table:table-cell office:value-type="float" office:value="0.00204399994836422">
                <text:p>0.00204399994836422</text:p>
              </table:table-cell>
              <table:table-cell office:value-type="float" office:value="0.0580000020563602">
                <text:p>0.0580000020563602</text:p>
              </table:table-cell>
              <table:table-cell office:value-type="float" office:value="NaN">
                <text:p>NaN</text:p>
              </table:table-cell>
            </table:table-row>
            <table:table-row>
              <table:table-cell office:value-type="string">
                <text:p>513</text:p>
              </table:table-cell>
              <table:table-cell office:value-type="float" office:value="0.00204799994826317">
                <text:p>0.0020479999482631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514</text:p>
              </table:table-cell>
              <table:table-cell office:value-type="float" office:value="0.00205199994816212">
                <text:p>0.00205199994816212</text:p>
              </table:table-cell>
              <table:table-cell office:value-type="float" office:value="0.068000003695488">
                <text:p>0.068000003695488</text:p>
              </table:table-cell>
              <table:table-cell office:value-type="float" office:value="NaN">
                <text:p>NaN</text:p>
              </table:table-cell>
            </table:table-row>
            <table:table-row>
              <table:table-cell office:value-type="string">
                <text:p>515</text:p>
              </table:table-cell>
              <table:table-cell office:value-type="float" office:value="0.00205599994806107">
                <text:p>0.00205599994806107</text:p>
              </table:table-cell>
              <table:table-cell office:value-type="float" office:value="0.0720000043511391">
                <text:p>0.0720000043511391</text:p>
              </table:table-cell>
              <table:table-cell office:value-type="float" office:value="NaN">
                <text:p>NaN</text:p>
              </table:table-cell>
            </table:table-row>
            <table:table-row>
              <table:table-cell office:value-type="string">
                <text:p>516</text:p>
              </table:table-cell>
              <table:table-cell office:value-type="float" office:value="0.00205999994796002">
                <text:p>0.0020599999479600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517</text:p>
              </table:table-cell>
              <table:table-cell office:value-type="float" office:value="0.00206399994785897">
                <text:p>0.0020639999478589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518</text:p>
              </table:table-cell>
              <table:table-cell office:value-type="float" office:value="0.00206799994775793">
                <text:p>0.00206799994775793</text:p>
              </table:table-cell>
              <table:table-cell office:value-type="float" office:value="0.0870000049471855">
                <text:p>0.0870000049471855</text:p>
              </table:table-cell>
              <table:table-cell office:value-type="float" office:value="NaN">
                <text:p>NaN</text:p>
              </table:table-cell>
            </table:table-row>
            <table:table-row>
              <table:table-cell office:value-type="string">
                <text:p>519</text:p>
              </table:table-cell>
              <table:table-cell office:value-type="float" office:value="0.00207199994765688">
                <text:p>0.0020719999476568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520</text:p>
              </table:table-cell>
              <table:table-cell office:value-type="float" office:value="0.00207599994755583">
                <text:p>0.00207599994755583</text:p>
              </table:table-cell>
              <table:table-cell office:value-type="float" office:value="0.096000000834465">
                <text:p>0.096000000834465</text:p>
              </table:table-cell>
              <table:table-cell office:value-type="float" office:value="NaN">
                <text:p>NaN</text:p>
              </table:table-cell>
            </table:table-row>
            <table:table-row>
              <table:table-cell office:value-type="string">
                <text:p>521</text:p>
              </table:table-cell>
              <table:table-cell office:value-type="float" office:value="0.00207999994745478">
                <text:p>0.00207999994745478</text:p>
              </table:table-cell>
              <table:table-cell office:value-type="float" office:value="0.100000001490116">
                <text:p>0.100000001490116</text:p>
              </table:table-cell>
              <table:table-cell office:value-type="float" office:value="NaN">
                <text:p>NaN</text:p>
              </table:table-cell>
            </table:table-row>
            <table:table-row>
              <table:table-cell office:value-type="string">
                <text:p>522</text:p>
              </table:table-cell>
              <table:table-cell office:value-type="float" office:value="0.00208399994735373">
                <text:p>0.00208399994735373</text:p>
              </table:table-cell>
              <table:table-cell office:value-type="float" office:value="0.108000002801418">
                <text:p>0.108000002801418</text:p>
              </table:table-cell>
              <table:table-cell office:value-type="float" office:value="NaN">
                <text:p>NaN</text:p>
              </table:table-cell>
            </table:table-row>
            <table:table-row>
              <table:table-cell office:value-type="string">
                <text:p>523</text:p>
              </table:table-cell>
              <table:table-cell office:value-type="float" office:value="0.00208799994725268">
                <text:p>0.00208799994725268</text:p>
              </table:table-cell>
              <table:table-cell office:value-type="float" office:value="0.109999999403954">
                <text:p>0.109999999403954</text:p>
              </table:table-cell>
              <table:table-cell office:value-type="float" office:value="NaN">
                <text:p>NaN</text:p>
              </table:table-cell>
            </table:table-row>
            <table:table-row>
              <table:table-cell office:value-type="string">
                <text:p>524</text:p>
              </table:table-cell>
              <table:table-cell office:value-type="float" office:value="0.00209199994715163">
                <text:p>0.00209199994715163</text:p>
              </table:table-cell>
              <table:table-cell office:value-type="float" office:value="0.11600000411272">
                <text:p>0.11600000411272</text:p>
              </table:table-cell>
              <table:table-cell office:value-type="float" office:value="NaN">
                <text:p>NaN</text:p>
              </table:table-cell>
            </table:table-row>
            <table:table-row>
              <table:table-cell office:value-type="string">
                <text:p>525</text:p>
              </table:table-cell>
              <table:table-cell office:value-type="float" office:value="0.00209599994705059">
                <text:p>0.00209599994705059</text:p>
              </table:table-cell>
              <table:table-cell office:value-type="float" office:value="0.120000004768372">
                <text:p>0.120000004768372</text:p>
              </table:table-cell>
              <table:table-cell office:value-type="float" office:value="NaN">
                <text:p>NaN</text:p>
              </table:table-cell>
            </table:table-row>
            <table:table-row>
              <table:table-cell office:value-type="string">
                <text:p>526</text:p>
              </table:table-cell>
              <table:table-cell office:value-type="float" office:value="0.00209999994694954">
                <text:p>0.00209999994694954</text:p>
              </table:table-cell>
              <table:table-cell office:value-type="float" office:value="0.126000002026558">
                <text:p>0.126000002026558</text:p>
              </table:table-cell>
              <table:table-cell office:value-type="float" office:value="NaN">
                <text:p>NaN</text:p>
              </table:table-cell>
            </table:table-row>
            <table:table-row>
              <table:table-cell office:value-type="string">
                <text:p>527</text:p>
              </table:table-cell>
              <table:table-cell office:value-type="float" office:value="0.00210399994684849">
                <text:p>0.00210399994684849</text:p>
              </table:table-cell>
              <table:table-cell office:value-type="float" office:value="0.130999997258186">
                <text:p>0.130999997258186</text:p>
              </table:table-cell>
              <table:table-cell office:value-type="float" office:value="NaN">
                <text:p>NaN</text:p>
              </table:table-cell>
            </table:table-row>
            <table:table-row>
              <table:table-cell office:value-type="string">
                <text:p>528</text:p>
              </table:table-cell>
              <table:table-cell office:value-type="float" office:value="0.00210799994674744">
                <text:p>0.00210799994674744</text:p>
              </table:table-cell>
              <table:table-cell office:value-type="float" office:value="0.136000007390976">
                <text:p>0.136000007390976</text:p>
              </table:table-cell>
              <table:table-cell office:value-type="float" office:value="NaN">
                <text:p>NaN</text:p>
              </table:table-cell>
            </table:table-row>
            <table:table-row>
              <table:table-cell office:value-type="string">
                <text:p>529</text:p>
              </table:table-cell>
              <table:table-cell office:value-type="float" office:value="0.00211199994664639">
                <text:p>0.00211199994664639</text:p>
              </table:table-cell>
              <table:table-cell office:value-type="float" office:value="0.140000000596046">
                <text:p>0.140000000596046</text:p>
              </table:table-cell>
              <table:table-cell office:value-type="float" office:value="NaN">
                <text:p>NaN</text:p>
              </table:table-cell>
            </table:table-row>
            <table:table-row>
              <table:table-cell office:value-type="string">
                <text:p>530</text:p>
              </table:table-cell>
              <table:table-cell office:value-type="float" office:value="0.00211599994654534">
                <text:p>0.00211599994654534</text:p>
              </table:table-cell>
              <table:table-cell office:value-type="float" office:value="0.145999997854233">
                <text:p>0.145999997854233</text:p>
              </table:table-cell>
              <table:table-cell office:value-type="float" office:value="NaN">
                <text:p>NaN</text:p>
              </table:table-cell>
            </table:table-row>
            <table:table-row>
              <table:table-cell office:value-type="string">
                <text:p>531</text:p>
              </table:table-cell>
              <table:table-cell office:value-type="float" office:value="0.0021199999464443">
                <text:p>0.0021199999464443</text:p>
              </table:table-cell>
              <table:table-cell office:value-type="float" office:value="0.150000005960464">
                <text:p>0.150000005960464</text:p>
              </table:table-cell>
              <table:table-cell office:value-type="float" office:value="NaN">
                <text:p>NaN</text:p>
              </table:table-cell>
            </table:table-row>
            <table:table-row>
              <table:table-cell office:value-type="string">
                <text:p>532</text:p>
              </table:table-cell>
              <table:table-cell office:value-type="float" office:value="0.00212399994634325">
                <text:p>0.00212399994634325</text:p>
              </table:table-cell>
              <table:table-cell office:value-type="float" office:value="0.156000003218651">
                <text:p>0.156000003218651</text:p>
              </table:table-cell>
              <table:table-cell office:value-type="float" office:value="NaN">
                <text:p>NaN</text:p>
              </table:table-cell>
            </table:table-row>
            <table:table-row>
              <table:table-cell office:value-type="string">
                <text:p>533</text:p>
              </table:table-cell>
              <table:table-cell office:value-type="float" office:value="0.0021279999462422">
                <text:p>0.0021279999462422</text:p>
              </table:table-cell>
              <table:table-cell office:value-type="float" office:value="0.158000007271767">
                <text:p>0.158000007271767</text:p>
              </table:table-cell>
              <table:table-cell office:value-type="float" office:value="NaN">
                <text:p>NaN</text:p>
              </table:table-cell>
            </table:table-row>
            <table:table-row>
              <table:table-cell office:value-type="string">
                <text:p>534</text:p>
              </table:table-cell>
              <table:table-cell office:value-type="float" office:value="0.00213199994614115">
                <text:p>0.00213199994614115</text:p>
              </table:table-cell>
              <table:table-cell office:value-type="float" office:value="0.166000008583069">
                <text:p>0.166000008583069</text:p>
              </table:table-cell>
              <table:table-cell office:value-type="float" office:value="NaN">
                <text:p>NaN</text:p>
              </table:table-cell>
            </table:table-row>
            <table:table-row>
              <table:table-cell office:value-type="string">
                <text:p>535</text:p>
              </table:table-cell>
              <table:table-cell office:value-type="float" office:value="0.0021359999460401">
                <text:p>0.0021359999460401</text:p>
              </table:table-cell>
              <table:table-cell office:value-type="float" office:value="0.170000001788139">
                <text:p>0.170000001788139</text:p>
              </table:table-cell>
              <table:table-cell office:value-type="float" office:value="NaN">
                <text:p>NaN</text:p>
              </table:table-cell>
            </table:table-row>
            <table:table-row>
              <table:table-cell office:value-type="string">
                <text:p>536</text:p>
              </table:table-cell>
              <table:table-cell office:value-type="float" office:value="0.00213999994593905">
                <text:p>0.00213999994593905</text:p>
              </table:table-cell>
              <table:table-cell office:value-type="float" office:value="0.172000005841255">
                <text:p>0.172000005841255</text:p>
              </table:table-cell>
              <table:table-cell office:value-type="float" office:value="NaN">
                <text:p>NaN</text:p>
              </table:table-cell>
            </table:table-row>
            <table:table-row>
              <table:table-cell office:value-type="string">
                <text:p>537</text:p>
              </table:table-cell>
              <table:table-cell office:value-type="float" office:value="0.002143999945838">
                <text:p>0.002143999945838</text:p>
              </table:table-cell>
              <table:table-cell office:value-type="float" office:value="0.179000005125999">
                <text:p>0.179000005125999</text:p>
              </table:table-cell>
              <table:table-cell office:value-type="float" office:value="NaN">
                <text:p>NaN</text:p>
              </table:table-cell>
            </table:table-row>
            <table:table-row>
              <table:table-cell office:value-type="string">
                <text:p>538</text:p>
              </table:table-cell>
              <table:table-cell office:value-type="float" office:value="0.00214799994573696">
                <text:p>0.00214799994573696</text:p>
              </table:table-cell>
              <table:table-cell office:value-type="float" office:value="0.181999996304512">
                <text:p>0.181999996304512</text:p>
              </table:table-cell>
              <table:table-cell office:value-type="float" office:value="NaN">
                <text:p>NaN</text:p>
              </table:table-cell>
            </table:table-row>
            <table:table-row>
              <table:table-cell office:value-type="string">
                <text:p>539</text:p>
              </table:table-cell>
              <table:table-cell office:value-type="float" office:value="0.00215199994563591">
                <text:p>0.00215199994563591</text:p>
              </table:table-cell>
              <table:table-cell office:value-type="float" office:value="0.18800000846386">
                <text:p>0.18800000846386</text:p>
              </table:table-cell>
              <table:table-cell office:value-type="float" office:value="NaN">
                <text:p>NaN</text:p>
              </table:table-cell>
            </table:table-row>
            <table:table-row>
              <table:table-cell office:value-type="string">
                <text:p>540</text:p>
              </table:table-cell>
              <table:table-cell office:value-type="float" office:value="0.00215599994553486">
                <text:p>0.00215599994553486</text:p>
              </table:table-cell>
              <table:table-cell office:value-type="float" office:value="0.194000005722046">
                <text:p>0.194000005722046</text:p>
              </table:table-cell>
              <table:table-cell office:value-type="float" office:value="NaN">
                <text:p>NaN</text:p>
              </table:table-cell>
            </table:table-row>
            <table:table-row>
              <table:table-cell office:value-type="string">
                <text:p>541</text:p>
              </table:table-cell>
              <table:table-cell office:value-type="float" office:value="0.00215999994543381">
                <text:p>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2</text:p>
              </table:table-cell>
              <table:table-cell office:value-type="float" office:value="0.00216399994533276">
                <text:p>0.0021639999453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3</text:p>
              </table:table-cell>
              <table:table-cell office:value-type="float" office:value="0.00216799994523171">
                <text:p>0.0021679999452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4</text:p>
              </table:table-cell>
              <table:table-cell office:value-type="float" office:value="0.00217199994513066">
                <text:p>0.0021719999451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5</text:p>
              </table:table-cell>
              <table:table-cell office:value-type="float" office:value="0.00217599994502962">
                <text:p>0.0021759999450296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6</text:p>
              </table:table-cell>
              <table:table-cell office:value-type="float" office:value="0.00217999994492857">
                <text:p>0.0021799999449285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7</text:p>
              </table:table-cell>
              <table:table-cell office:value-type="float" office:value="0.00218399994482752">
                <text:p>0.0021839999448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8</text:p>
              </table:table-cell>
              <table:table-cell office:value-type="float" office:value="0.00218799994472647">
                <text:p>0.0021879999447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9</text:p>
              </table:table-cell>
              <table:table-cell office:value-type="float" office:value="0.00219199994462542">
                <text:p>0.0021919999446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550</text:p>
              </table:table-cell>
              <table:table-cell office:value-type="float" office:value="0.00219599994452437">
                <text:p>0.0021959999445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551</text:p>
              </table:table-cell>
              <table:table-cell office:value-type="float" office:value="0.00219999994442333">
                <text:p>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2</text:p>
              </table:table-cell>
              <table:table-cell office:value-type="float" office:value="0.00220399994432228">
                <text:p>0.0022039999443222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3</text:p>
              </table:table-cell>
              <table:table-cell office:value-type="float" office:value="0.00220799994422123">
                <text:p>0.0022079999442212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4</text:p>
              </table:table-cell>
              <table:table-cell office:value-type="float" office:value="0.00221199994412018">
                <text:p>0.0022119999441201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5</text:p>
              </table:table-cell>
              <table:table-cell office:value-type="float" office:value="0.00221599994401913">
                <text:p>0.0022159999440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6</text:p>
              </table:table-cell>
              <table:table-cell office:value-type="float" office:value="0.00221999994391808">
                <text:p>0.0022199999439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7</text:p>
              </table:table-cell>
              <table:table-cell office:value-type="float" office:value="0.00222399994381703">
                <text:p>0.0022239999438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8</text:p>
              </table:table-cell>
              <table:table-cell office:value-type="float" office:value="0.00222799994371599">
                <text:p>0.00222799994371599</text:p>
              </table:table-cell>
              <table:table-cell office:value-type="float" office:value="0.196999996900558">
                <text:p>0.196999996900558</text:p>
              </table:table-cell>
              <table:table-cell office:value-type="float" office:value="NaN">
                <text:p>NaN</text:p>
              </table:table-cell>
            </table:table-row>
            <table:table-row>
              <table:table-cell office:value-type="string">
                <text:p>559</text:p>
              </table:table-cell>
              <table:table-cell office:value-type="float" office:value="0.00223199994361494">
                <text:p>0.0022319999436149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0</text:p>
              </table:table-cell>
              <table:table-cell office:value-type="float" office:value="0.00223599994351389">
                <text:p>0.0022359999435138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1</text:p>
              </table:table-cell>
              <table:table-cell office:value-type="float" office:value="0.00223999994341284">
                <text:p>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2</text:p>
              </table:table-cell>
              <table:table-cell office:value-type="float" office:value="0.00224399994331179">
                <text:p>0.0022439999433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3</text:p>
              </table:table-cell>
              <table:table-cell office:value-type="float" office:value="0.00224799994321074">
                <text:p>0.0022479999432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4</text:p>
              </table:table-cell>
              <table:table-cell office:value-type="float" office:value="0.00225199994310969">
                <text:p>0.0022519999431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5</text:p>
              </table:table-cell>
              <table:table-cell office:value-type="float" office:value="0.00225599994300865">
                <text:p>0.00225599994300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6</text:p>
              </table:table-cell>
              <table:table-cell office:value-type="float" office:value="0.0022599999429076">
                <text:p>0.00225999994290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67</text:p>
              </table:table-cell>
              <table:table-cell office:value-type="float" office:value="0.00226399994280655">
                <text:p>0.0022639999428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8</text:p>
              </table:table-cell>
              <table:table-cell office:value-type="float" office:value="0.0022679999427055">
                <text:p>0.0022679999427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9</text:p>
              </table:table-cell>
              <table:table-cell office:value-type="float" office:value="0.00227199994260445">
                <text:p>0.0022719999426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570</text:p>
              </table:table-cell>
              <table:table-cell office:value-type="float" office:value="0.0022759999425034">
                <text:p>0.0022759999425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571</text:p>
              </table:table-cell>
              <table:table-cell office:value-type="float" office:value="0.00227999994240236">
                <text:p>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2</text:p>
              </table:table-cell>
              <table:table-cell office:value-type="float" office:value="0.00228399994230131">
                <text:p>0.0022839999423013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3</text:p>
              </table:table-cell>
              <table:table-cell office:value-type="float" office:value="0.00228799994220026">
                <text:p>0.0022879999422002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4</text:p>
              </table:table-cell>
              <table:table-cell office:value-type="float" office:value="0.00229199994209921">
                <text:p>0.0022919999420992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5</text:p>
              </table:table-cell>
              <table:table-cell office:value-type="float" office:value="0.00229599994199816">
                <text:p>0.0022959999419981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6</text:p>
              </table:table-cell>
              <table:table-cell office:value-type="float" office:value="0.00229999994189711">
                <text:p>0.0022999999418971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7</text:p>
              </table:table-cell>
              <table:table-cell office:value-type="float" office:value="0.00230399994179606">
                <text:p>0.0023039999417960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8</text:p>
              </table:table-cell>
              <table:table-cell office:value-type="float" office:value="0.00230799994169502">
                <text:p>0.00230799994169502</text:p>
              </table:table-cell>
              <table:table-cell office:value-type="float" office:value="0.196999996900558">
                <text:p>0.196999996900558</text:p>
              </table:table-cell>
              <table:table-cell office:value-type="float" office:value="NaN">
                <text:p>NaN</text:p>
              </table:table-cell>
            </table:table-row>
            <table:table-row>
              <table:table-cell office:value-type="string">
                <text:p>579</text:p>
              </table:table-cell>
              <table:table-cell office:value-type="float" office:value="0.00231199994159397">
                <text:p>0.0023119999415939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0</text:p>
              </table:table-cell>
              <table:table-cell office:value-type="float" office:value="0.00231599994149292">
                <text:p>0.0023159999414929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1</text:p>
              </table:table-cell>
              <table:table-cell office:value-type="float" office:value="0.00231999994139187">
                <text:p>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2</text:p>
              </table:table-cell>
              <table:table-cell office:value-type="float" office:value="0.00232399994129082">
                <text:p>0.0023239999412908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3</text:p>
              </table:table-cell>
              <table:table-cell office:value-type="float" office:value="0.00232799994118977">
                <text:p>0.00232799994118977</text:p>
              </table:table-cell>
              <table:table-cell office:value-type="float" office:value="0.196000009775162">
                <text:p>0.196000009775162</text:p>
              </table:table-cell>
              <table:table-cell office:value-type="float" office:value="NaN">
                <text:p>NaN</text:p>
              </table:table-cell>
            </table:table-row>
            <table:table-row>
              <table:table-cell office:value-type="string">
                <text:p>584</text:p>
              </table:table-cell>
              <table:table-cell office:value-type="float" office:value="0.00233199994108872">
                <text:p>0.00233199994108872</text:p>
              </table:table-cell>
              <table:table-cell office:value-type="float" office:value="0.194000005722046">
                <text:p>0.194000005722046</text:p>
              </table:table-cell>
              <table:table-cell office:value-type="float" office:value="NaN">
                <text:p>NaN</text:p>
              </table:table-cell>
            </table:table-row>
            <table:table-row>
              <table:table-cell office:value-type="string">
                <text:p>585</text:p>
              </table:table-cell>
              <table:table-cell office:value-type="float" office:value="0.00233599994098768">
                <text:p>0.00233599994098768</text:p>
              </table:table-cell>
              <table:table-cell office:value-type="float" office:value="0.18800000846386">
                <text:p>0.18800000846386</text:p>
              </table:table-cell>
              <table:table-cell office:value-type="float" office:value="NaN">
                <text:p>NaN</text:p>
              </table:table-cell>
            </table:table-row>
            <table:table-row>
              <table:table-cell office:value-type="string">
                <text:p>586</text:p>
              </table:table-cell>
              <table:table-cell office:value-type="float" office:value="0.00233999994088663">
                <text:p>0.00233999994088663</text:p>
              </table:table-cell>
              <table:table-cell office:value-type="float" office:value="0.181999996304512">
                <text:p>0.181999996304512</text:p>
              </table:table-cell>
              <table:table-cell office:value-type="float" office:value="NaN">
                <text:p>NaN</text:p>
              </table:table-cell>
            </table:table-row>
            <table:table-row>
              <table:table-cell office:value-type="string">
                <text:p>587</text:p>
              </table:table-cell>
              <table:table-cell office:value-type="float" office:value="0.00234399994078558">
                <text:p>0.00234399994078558</text:p>
              </table:table-cell>
              <table:table-cell office:value-type="float" office:value="0.179000005125999">
                <text:p>0.179000005125999</text:p>
              </table:table-cell>
              <table:table-cell office:value-type="float" office:value="NaN">
                <text:p>NaN</text:p>
              </table:table-cell>
            </table:table-row>
            <table:table-row>
              <table:table-cell office:value-type="string">
                <text:p>588</text:p>
              </table:table-cell>
              <table:table-cell office:value-type="float" office:value="0.00234799994068453">
                <text:p>0.00234799994068453</text:p>
              </table:table-cell>
              <table:table-cell office:value-type="float" office:value="0.172000005841255">
                <text:p>0.172000005841255</text:p>
              </table:table-cell>
              <table:table-cell office:value-type="float" office:value="NaN">
                <text:p>NaN</text:p>
              </table:table-cell>
            </table:table-row>
            <table:table-row>
              <table:table-cell office:value-type="string">
                <text:p>589</text:p>
              </table:table-cell>
              <table:table-cell office:value-type="float" office:value="0.00235199994058348">
                <text:p>0.00235199994058348</text:p>
              </table:table-cell>
              <table:table-cell office:value-type="float" office:value="0.167999997735024">
                <text:p>0.167999997735024</text:p>
              </table:table-cell>
              <table:table-cell office:value-type="float" office:value="NaN">
                <text:p>NaN</text:p>
              </table:table-cell>
            </table:table-row>
            <table:table-row>
              <table:table-cell office:value-type="string">
                <text:p>590</text:p>
              </table:table-cell>
              <table:table-cell office:value-type="float" office:value="0.00235599994048243">
                <text:p>0.00235599994048243</text:p>
              </table:table-cell>
              <table:table-cell office:value-type="float" office:value="0.164000004529953">
                <text:p>0.164000004529953</text:p>
              </table:table-cell>
              <table:table-cell office:value-type="float" office:value="NaN">
                <text:p>NaN</text:p>
              </table:table-cell>
            </table:table-row>
            <table:table-row>
              <table:table-cell office:value-type="string">
                <text:p>591</text:p>
              </table:table-cell>
              <table:table-cell office:value-type="float" office:value="0.00235999994038139">
                <text:p>0.00235999994038139</text:p>
              </table:table-cell>
              <table:table-cell office:value-type="float" office:value="0.157000005245209">
                <text:p>0.157000005245209</text:p>
              </table:table-cell>
              <table:table-cell office:value-type="float" office:value="NaN">
                <text:p>NaN</text:p>
              </table:table-cell>
            </table:table-row>
            <table:table-row>
              <table:table-cell office:value-type="string">
                <text:p>592</text:p>
              </table:table-cell>
              <table:table-cell office:value-type="float" office:value="0.00236399994028034">
                <text:p>0.00236399994028034</text:p>
              </table:table-cell>
              <table:table-cell office:value-type="float" office:value="0.153999999165535">
                <text:p>0.153999999165535</text:p>
              </table:table-cell>
              <table:table-cell office:value-type="float" office:value="NaN">
                <text:p>NaN</text:p>
              </table:table-cell>
            </table:table-row>
            <table:table-row>
              <table:table-cell office:value-type="string">
                <text:p>593</text:p>
              </table:table-cell>
              <table:table-cell office:value-type="float" office:value="0.00236799994017929">
                <text:p>0.00236799994017929</text:p>
              </table:table-cell>
              <table:table-cell office:value-type="float" office:value="0.148000001907349">
                <text:p>0.148000001907349</text:p>
              </table:table-cell>
              <table:table-cell office:value-type="float" office:value="NaN">
                <text:p>NaN</text:p>
              </table:table-cell>
            </table:table-row>
            <table:table-row>
              <table:table-cell office:value-type="string">
                <text:p>594</text:p>
              </table:table-cell>
              <table:table-cell office:value-type="float" office:value="0.00237199994007824">
                <text:p>0.00237199994007824</text:p>
              </table:table-cell>
              <table:table-cell office:value-type="float" office:value="0.142000004649162">
                <text:p>0.142000004649162</text:p>
              </table:table-cell>
              <table:table-cell office:value-type="float" office:value="NaN">
                <text:p>NaN</text:p>
              </table:table-cell>
            </table:table-row>
            <table:table-row>
              <table:table-cell office:value-type="string">
                <text:p>595</text:p>
              </table:table-cell>
              <table:table-cell office:value-type="float" office:value="0.00237599993997719">
                <text:p>0.00237599993997719</text:p>
              </table:table-cell>
              <table:table-cell office:value-type="float" office:value="0.137999996542931">
                <text:p>0.137999996542931</text:p>
              </table:table-cell>
              <table:table-cell office:value-type="float" office:value="NaN">
                <text:p>NaN</text:p>
              </table:table-cell>
            </table:table-row>
            <table:table-row>
              <table:table-cell office:value-type="string">
                <text:p>596</text:p>
              </table:table-cell>
              <table:table-cell office:value-type="float" office:value="0.00237999993987614">
                <text:p>0.00237999993987614</text:p>
              </table:table-cell>
              <table:table-cell office:value-type="float" office:value="0.13400000333786">
                <text:p>0.13400000333786</text:p>
              </table:table-cell>
              <table:table-cell office:value-type="float" office:value="NaN">
                <text:p>NaN</text:p>
              </table:table-cell>
            </table:table-row>
            <table:table-row>
              <table:table-cell office:value-type="string">
                <text:p>597</text:p>
              </table:table-cell>
              <table:table-cell office:value-type="float" office:value="0.00238399993977509">
                <text:p>0.00238399993977509</text:p>
              </table:table-cell>
              <table:table-cell office:value-type="float" office:value="0.129999995231628">
                <text:p>0.129999995231628</text:p>
              </table:table-cell>
              <table:table-cell office:value-type="float" office:value="NaN">
                <text:p>NaN</text:p>
              </table:table-cell>
            </table:table-row>
            <table:table-row>
              <table:table-cell office:value-type="string">
                <text:p>598</text:p>
              </table:table-cell>
              <table:table-cell office:value-type="float" office:value="0.00238799993967405">
                <text:p>0.00238799993967405</text:p>
              </table:table-cell>
              <table:table-cell office:value-type="float" office:value="0.124000005424023">
                <text:p>0.124000005424023</text:p>
              </table:table-cell>
              <table:table-cell office:value-type="float" office:value="NaN">
                <text:p>NaN</text:p>
              </table:table-cell>
            </table:table-row>
            <table:table-row>
              <table:table-cell office:value-type="string">
                <text:p>599</text:p>
              </table:table-cell>
              <table:table-cell office:value-type="float" office:value="0.002391999939573">
                <text:p>0.002391999939573</text:p>
              </table:table-cell>
              <table:table-cell office:value-type="float" office:value="0.120000004768372">
                <text:p>0.120000004768372</text:p>
              </table:table-cell>
              <table:table-cell office:value-type="float" office:value="NaN">
                <text:p>NaN</text:p>
              </table:table-cell>
            </table:table-row>
            <table:table-row>
              <table:table-cell office:value-type="string">
                <text:p>600</text:p>
              </table:table-cell>
              <table:table-cell office:value-type="float" office:value="0.00239599993947195">
                <text:p>0.00239599993947195</text:p>
              </table:table-cell>
              <table:table-cell office:value-type="float" office:value="0.109999999403954">
                <text:p>0.109999999403954</text:p>
              </table:table-cell>
              <table:table-cell office:value-type="float" office:value="NaN">
                <text:p>NaN</text:p>
              </table:table-cell>
            </table:table-row>
            <table:table-row>
              <table:table-cell office:value-type="string">
                <text:p>601</text:p>
              </table:table-cell>
              <table:table-cell office:value-type="float" office:value="0.0023999999393709">
                <text:p>0.0023999999393709</text:p>
              </table:table-cell>
              <table:table-cell office:value-type="float" office:value="0.109000004827976">
                <text:p>0.109000004827976</text:p>
              </table:table-cell>
              <table:table-cell office:value-type="float" office:value="NaN">
                <text:p>NaN</text:p>
              </table:table-cell>
            </table:table-row>
            <table:table-row>
              <table:table-cell office:value-type="string">
                <text:p>602</text:p>
              </table:table-cell>
              <table:table-cell office:value-type="float" office:value="0.00240399993926985">
                <text:p>0.00240399993926985</text:p>
              </table:table-cell>
              <table:table-cell office:value-type="float" office:value="0.105999998748302">
                <text:p>0.105999998748302</text:p>
              </table:table-cell>
              <table:table-cell office:value-type="float" office:value="NaN">
                <text:p>NaN</text:p>
              </table:table-cell>
            </table:table-row>
            <table:table-row>
              <table:table-cell office:value-type="string">
                <text:p>603</text:p>
              </table:table-cell>
              <table:table-cell office:value-type="float" office:value="0.0024079999391688">
                <text:p>0.0024079999391688</text:p>
              </table:table-cell>
              <table:table-cell office:value-type="float" office:value="0.100000001490116">
                <text:p>0.100000001490116</text:p>
              </table:table-cell>
              <table:table-cell office:value-type="float" office:value="NaN">
                <text:p>NaN</text:p>
              </table:table-cell>
            </table:table-row>
            <table:table-row>
              <table:table-cell office:value-type="string">
                <text:p>604</text:p>
              </table:table-cell>
              <table:table-cell office:value-type="float" office:value="0.00241199993906775">
                <text:p>0.00241199993906775</text:p>
              </table:table-cell>
              <table:table-cell office:value-type="float" office:value="0.096000000834465">
                <text:p>0.096000000834465</text:p>
              </table:table-cell>
              <table:table-cell office:value-type="float" office:value="NaN">
                <text:p>NaN</text:p>
              </table:table-cell>
            </table:table-row>
            <table:table-row>
              <table:table-cell office:value-type="string">
                <text:p>605</text:p>
              </table:table-cell>
              <table:table-cell office:value-type="float" office:value="0.00241599993896671">
                <text:p>0.00241599993896671</text:p>
              </table:table-cell>
              <table:table-cell office:value-type="float" office:value="0.0879999995231628">
                <text:p>0.0879999995231628</text:p>
              </table:table-cell>
              <table:table-cell office:value-type="float" office:value="NaN">
                <text:p>NaN</text:p>
              </table:table-cell>
            </table:table-row>
            <table:table-row>
              <table:table-cell office:value-type="string">
                <text:p>606</text:p>
              </table:table-cell>
              <table:table-cell office:value-type="float" office:value="0.00241999993886566">
                <text:p>0.0024199999388656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07</text:p>
              </table:table-cell>
              <table:table-cell office:value-type="float" office:value="0.00242399993876461">
                <text:p>0.0024239999387646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608</text:p>
              </table:table-cell>
              <table:table-cell office:value-type="float" office:value="0.00242799993866356">
                <text:p>0.0024279999386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09</text:p>
              </table:table-cell>
              <table:table-cell office:value-type="float" office:value="0.00243199993856251">
                <text:p>0.002431999938562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10</text:p>
              </table:table-cell>
              <table:table-cell office:value-type="float" office:value="0.00243599993846146">
                <text:p>0.00243599993846146</text:p>
              </table:table-cell>
              <table:table-cell office:value-type="float" office:value="0.0649999976158142">
                <text:p>0.0649999976158142</text:p>
              </table:table-cell>
              <table:table-cell office:value-type="float" office:value="NaN">
                <text:p>NaN</text:p>
              </table:table-cell>
            </table:table-row>
            <table:table-row>
              <table:table-cell office:value-type="string">
                <text:p>611</text:p>
              </table:table-cell>
              <table:table-cell office:value-type="float" office:value="0.00243999993836042">
                <text:p>0.0024399999383604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612</text:p>
              </table:table-cell>
              <table:table-cell office:value-type="float" office:value="0.00244399993825937">
                <text:p>0.00244399993825937</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13</text:p>
              </table:table-cell>
              <table:table-cell office:value-type="float" office:value="0.00244799993815832">
                <text:p>0.0024479999381583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614</text:p>
              </table:table-cell>
              <table:table-cell office:value-type="float" office:value="0.00245199993805727">
                <text:p>0.00245199993805727</text:p>
              </table:table-cell>
              <table:table-cell office:value-type="float" office:value="0.046000000089407">
                <text:p>0.046000000089407</text:p>
              </table:table-cell>
              <table:table-cell office:value-type="float" office:value="NaN">
                <text:p>NaN</text:p>
              </table:table-cell>
            </table:table-row>
            <table:table-row>
              <table:table-cell office:value-type="string">
                <text:p>615</text:p>
              </table:table-cell>
              <table:table-cell office:value-type="float" office:value="0.00245599993795622">
                <text:p>0.0024559999379562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616</text:p>
              </table:table-cell>
              <table:table-cell office:value-type="float" office:value="0.00245999993785517">
                <text:p>0.0024599999378551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17</text:p>
              </table:table-cell>
              <table:table-cell office:value-type="float" office:value="0.00246399993775412">
                <text:p>0.00246399993775412</text:p>
              </table:table-cell>
              <table:table-cell office:value-type="float" office:value="0.034000001847744">
                <text:p>0.034000001847744</text:p>
              </table:table-cell>
              <table:table-cell office:value-type="float" office:value="NaN">
                <text:p>NaN</text:p>
              </table:table-cell>
            </table:table-row>
            <table:table-row>
              <table:table-cell office:value-type="string">
                <text:p>618</text:p>
              </table:table-cell>
              <table:table-cell office:value-type="float" office:value="0.00246799993765308">
                <text:p>0.0024679999376530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19</text:p>
              </table:table-cell>
              <table:table-cell office:value-type="float" office:value="0.00247199993755203">
                <text:p>0.002471999937552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0</text:p>
              </table:table-cell>
              <table:table-cell office:value-type="float" office:value="0.00247599993745098">
                <text:p>0.0024759999374509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621</text:p>
              </table:table-cell>
              <table:table-cell office:value-type="float" office:value="0.00247999993734993">
                <text:p>0.0024799999373499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622</text:p>
              </table:table-cell>
              <table:table-cell office:value-type="float" office:value="0.00248399993724888">
                <text:p>0.00248399993724888</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623</text:p>
              </table:table-cell>
              <table:table-cell office:value-type="float" office:value="0.00248799993714783">
                <text:p>0.00248799993714783</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4</text:p>
              </table:table-cell>
              <table:table-cell office:value-type="float" office:value="0.00249199993704678">
                <text:p>0.0024919999370467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5</text:p>
              </table:table-cell>
              <table:table-cell office:value-type="float" office:value="0.00249599993694574">
                <text:p>0.0024959999369457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626</text:p>
              </table:table-cell>
              <table:table-cell office:value-type="float" office:value="0.00249999993684469">
                <text:p>0.0024999999368446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627</text:p>
              </table:table-cell>
              <table:table-cell office:value-type="float" office:value="0.00250399993674364">
                <text:p>0.0025039999367436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628</text:p>
              </table:table-cell>
              <table:table-cell office:value-type="float" office:value="0.00250799993664259">
                <text:p>0.0025079999366425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9</text:p>
              </table:table-cell>
              <table:table-cell office:value-type="float" office:value="0.00251199993654154">
                <text:p>0.0025119999365415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30</text:p>
              </table:table-cell>
              <table:table-cell office:value-type="float" office:value="0.00251599993644049">
                <text:p>0.0025159999364404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31</text:p>
              </table:table-cell>
              <table:table-cell office:value-type="float" office:value="0.00251999993633945">
                <text:p>0.0025199999363394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32</text:p>
              </table:table-cell>
              <table:table-cell office:value-type="float" office:value="0.0025239999362384">
                <text:p>0.0025239999362384</text:p>
              </table:table-cell>
              <table:table-cell office:value-type="float" office:value="-0.0419999994337559">
                <text:p>-0.0419999994337559</text:p>
              </table:table-cell>
              <table:table-cell office:value-type="float" office:value="NaN">
                <text:p>NaN</text:p>
              </table:table-cell>
            </table:table-row>
            <table:table-row>
              <table:table-cell office:value-type="string">
                <text:p>633</text:p>
              </table:table-cell>
              <table:table-cell office:value-type="float" office:value="0.00252799993613735">
                <text:p>0.0025279999361373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634</text:p>
              </table:table-cell>
              <table:table-cell office:value-type="float" office:value="0.0025319999360363">
                <text:p>0.002531999936036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635</text:p>
              </table:table-cell>
              <table:table-cell office:value-type="float" office:value="0.00253599993593525">
                <text:p>0.0025359999359352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36</text:p>
              </table:table-cell>
              <table:table-cell office:value-type="float" office:value="0.0025399999358342">
                <text:p>0.002539999935834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637</text:p>
              </table:table-cell>
              <table:table-cell office:value-type="float" office:value="0.00254399993573315">
                <text:p>0.0025439999357331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638</text:p>
              </table:table-cell>
              <table:table-cell office:value-type="float" office:value="0.00254799993563211">
                <text:p>0.0025479999356321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39</text:p>
              </table:table-cell>
              <table:table-cell office:value-type="float" office:value="0.00255199993553106">
                <text:p>0.00255199993553106</text:p>
              </table:table-cell>
              <table:table-cell office:value-type="float" office:value="-0.0750000029802322">
                <text:p>-0.0750000029802322</text:p>
              </table:table-cell>
              <table:table-cell office:value-type="float" office:value="NaN">
                <text:p>NaN</text:p>
              </table:table-cell>
            </table:table-row>
            <table:table-row>
              <table:table-cell office:value-type="string">
                <text:p>640</text:p>
              </table:table-cell>
              <table:table-cell office:value-type="float" office:value="0.00255599993543001">
                <text:p>0.0025559999354300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41</text:p>
              </table:table-cell>
              <table:table-cell office:value-type="float" office:value="0.00255999993532896">
                <text:p>0.0025599999353289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42</text:p>
              </table:table-cell>
              <table:table-cell office:value-type="float" office:value="0.00256399993522791">
                <text:p>0.0025639999352279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643</text:p>
              </table:table-cell>
              <table:table-cell office:value-type="float" office:value="0.00256799993512686">
                <text:p>0.00256799993512686</text:p>
              </table:table-cell>
              <table:table-cell office:value-type="float" office:value="-0.096000000834465">
                <text:p>-0.096000000834465</text:p>
              </table:table-cell>
              <table:table-cell office:value-type="float" office:value="NaN">
                <text:p>NaN</text:p>
              </table:table-cell>
            </table:table-row>
            <table:table-row>
              <table:table-cell office:value-type="string">
                <text:p>644</text:p>
              </table:table-cell>
              <table:table-cell office:value-type="float" office:value="0.00257199993502581">
                <text:p>0.00257199993502581</text:p>
              </table:table-cell>
              <table:table-cell office:value-type="float" office:value="-0.0980000048875809">
                <text:p>-0.0980000048875809</text:p>
              </table:table-cell>
              <table:table-cell office:value-type="float" office:value="NaN">
                <text:p>NaN</text:p>
              </table:table-cell>
            </table:table-row>
            <table:table-row>
              <table:table-cell office:value-type="string">
                <text:p>645</text:p>
              </table:table-cell>
              <table:table-cell office:value-type="float" office:value="0.00257599993492477">
                <text:p>0.00257599993492477</text:p>
              </table:table-cell>
              <table:table-cell office:value-type="float" office:value="-0.104000002145767">
                <text:p>-0.104000002145767</text:p>
              </table:table-cell>
              <table:table-cell office:value-type="float" office:value="NaN">
                <text:p>NaN</text:p>
              </table:table-cell>
            </table:table-row>
            <table:table-row>
              <table:table-cell office:value-type="string">
                <text:p>646</text:p>
              </table:table-cell>
              <table:table-cell office:value-type="float" office:value="0.00257999993482372">
                <text:p>0.00257999993482372</text:p>
              </table:table-cell>
              <table:table-cell office:value-type="float" office:value="-0.109999999403954">
                <text:p>-0.109999999403954</text:p>
              </table:table-cell>
              <table:table-cell office:value-type="float" office:value="NaN">
                <text:p>NaN</text:p>
              </table:table-cell>
            </table:table-row>
            <table:table-row>
              <table:table-cell office:value-type="string">
                <text:p>647</text:p>
              </table:table-cell>
              <table:table-cell office:value-type="float" office:value="0.00258399993472267">
                <text:p>0.00258399993472267</text:p>
              </table:table-cell>
              <table:table-cell office:value-type="float" office:value="-0.114000000059605">
                <text:p>-0.114000000059605</text:p>
              </table:table-cell>
              <table:table-cell office:value-type="float" office:value="NaN">
                <text:p>NaN</text:p>
              </table:table-cell>
            </table:table-row>
            <table:table-row>
              <table:table-cell office:value-type="string">
                <text:p>648</text:p>
              </table:table-cell>
              <table:table-cell office:value-type="float" office:value="0.00258799993462162">
                <text:p>0.00258799993462162</text:p>
              </table:table-cell>
              <table:table-cell office:value-type="float" office:value="-0.119000002741814">
                <text:p>-0.119000002741814</text:p>
              </table:table-cell>
              <table:table-cell office:value-type="float" office:value="NaN">
                <text:p>NaN</text:p>
              </table:table-cell>
            </table:table-row>
            <table:table-row>
              <table:table-cell office:value-type="string">
                <text:p>649</text:p>
              </table:table-cell>
              <table:table-cell office:value-type="float" office:value="0.00259199993452057">
                <text:p>0.00259199993452057</text:p>
              </table:table-cell>
              <table:table-cell office:value-type="float" office:value="-0.124000005424023">
                <text:p>-0.124000005424023</text:p>
              </table:table-cell>
              <table:table-cell office:value-type="float" office:value="NaN">
                <text:p>NaN</text:p>
              </table:table-cell>
            </table:table-row>
            <table:table-row>
              <table:table-cell office:value-type="string">
                <text:p>650</text:p>
              </table:table-cell>
              <table:table-cell office:value-type="float" office:value="0.00259599993441952">
                <text:p>0.00259599993441952</text:p>
              </table:table-cell>
              <table:table-cell office:value-type="float" office:value="-0.128000006079674">
                <text:p>-0.128000006079674</text:p>
              </table:table-cell>
              <table:table-cell office:value-type="float" office:value="NaN">
                <text:p>NaN</text:p>
              </table:table-cell>
            </table:table-row>
            <table:table-row>
              <table:table-cell office:value-type="string">
                <text:p>651</text:p>
              </table:table-cell>
              <table:table-cell office:value-type="float" office:value="0.00259999993431848">
                <text:p>0.00259999993431848</text:p>
              </table:table-cell>
              <table:table-cell office:value-type="float" office:value="-0.13400000333786">
                <text:p>-0.13400000333786</text:p>
              </table:table-cell>
              <table:table-cell office:value-type="float" office:value="NaN">
                <text:p>NaN</text:p>
              </table:table-cell>
            </table:table-row>
            <table:table-row>
              <table:table-cell office:value-type="string">
                <text:p>652</text:p>
              </table:table-cell>
              <table:table-cell office:value-type="float" office:value="0.00260399993421743">
                <text:p>0.00260399993421743</text:p>
              </table:table-cell>
              <table:table-cell office:value-type="float" office:value="-0.140000000596046">
                <text:p>-0.140000000596046</text:p>
              </table:table-cell>
              <table:table-cell office:value-type="float" office:value="NaN">
                <text:p>NaN</text:p>
              </table:table-cell>
            </table:table-row>
            <table:table-row>
              <table:table-cell office:value-type="string">
                <text:p>653</text:p>
              </table:table-cell>
              <table:table-cell office:value-type="float" office:value="0.00260799993411638">
                <text:p>0.00260799993411638</text:p>
              </table:table-cell>
              <table:table-cell office:value-type="float" office:value="-0.144000008702278">
                <text:p>-0.144000008702278</text:p>
              </table:table-cell>
              <table:table-cell office:value-type="float" office:value="NaN">
                <text:p>NaN</text:p>
              </table:table-cell>
            </table:table-row>
            <table:table-row>
              <table:table-cell office:value-type="string">
                <text:p>654</text:p>
              </table:table-cell>
              <table:table-cell office:value-type="float" office:value="0.00261199993401533">
                <text:p>0.00261199993401533</text:p>
              </table:table-cell>
              <table:table-cell office:value-type="float" office:value="-0.148000001907349">
                <text:p>-0.148000001907349</text:p>
              </table:table-cell>
              <table:table-cell office:value-type="float" office:value="NaN">
                <text:p>NaN</text:p>
              </table:table-cell>
            </table:table-row>
            <table:table-row>
              <table:table-cell office:value-type="string">
                <text:p>655</text:p>
              </table:table-cell>
              <table:table-cell office:value-type="float" office:value="0.00261599993391428">
                <text:p>0.00261599993391428</text:p>
              </table:table-cell>
              <table:table-cell office:value-type="float" office:value="-0.153999999165535">
                <text:p>-0.153999999165535</text:p>
              </table:table-cell>
              <table:table-cell office:value-type="float" office:value="NaN">
                <text:p>NaN</text:p>
              </table:table-cell>
            </table:table-row>
            <table:table-row>
              <table:table-cell office:value-type="string">
                <text:p>656</text:p>
              </table:table-cell>
              <table:table-cell office:value-type="float" office:value="0.00261999993381323">
                <text:p>0.00261999993381323</text:p>
              </table:table-cell>
              <table:table-cell office:value-type="float" office:value="-0.158000007271767">
                <text:p>-0.158000007271767</text:p>
              </table:table-cell>
              <table:table-cell office:value-type="float" office:value="NaN">
                <text:p>NaN</text:p>
              </table:table-cell>
            </table:table-row>
            <table:table-row>
              <table:table-cell office:value-type="string">
                <text:p>657</text:p>
              </table:table-cell>
              <table:table-cell office:value-type="float" office:value="0.00262399993371218">
                <text:p>0.00262399993371218</text:p>
              </table:table-cell>
              <table:table-cell office:value-type="float" office:value="-0.164000004529953">
                <text:p>-0.164000004529953</text:p>
              </table:table-cell>
              <table:table-cell office:value-type="float" office:value="NaN">
                <text:p>NaN</text:p>
              </table:table-cell>
            </table:table-row>
            <table:table-row>
              <table:table-cell office:value-type="string">
                <text:p>658</text:p>
              </table:table-cell>
              <table:table-cell office:value-type="float" office:value="0.00262799993361114">
                <text:p>0.00262799993361114</text:p>
              </table:table-cell>
              <table:table-cell office:value-type="float" office:value="-0.167999997735024">
                <text:p>-0.167999997735024</text:p>
              </table:table-cell>
              <table:table-cell office:value-type="float" office:value="NaN">
                <text:p>NaN</text:p>
              </table:table-cell>
            </table:table-row>
            <table:table-row>
              <table:table-cell office:value-type="string">
                <text:p>659</text:p>
              </table:table-cell>
              <table:table-cell office:value-type="float" office:value="0.00263199993351009">
                <text:p>0.00263199993351009</text:p>
              </table:table-cell>
              <table:table-cell office:value-type="float" office:value="-0.172000005841255">
                <text:p>-0.172000005841255</text:p>
              </table:table-cell>
              <table:table-cell office:value-type="float" office:value="NaN">
                <text:p>NaN</text:p>
              </table:table-cell>
            </table:table-row>
            <table:table-row>
              <table:table-cell office:value-type="string">
                <text:p>660</text:p>
              </table:table-cell>
              <table:table-cell office:value-type="float" office:value="0.00263599993340904">
                <text:p>0.00263599993340904</text:p>
              </table:table-cell>
              <table:table-cell office:value-type="float" office:value="-0.175999999046326">
                <text:p>-0.175999999046326</text:p>
              </table:table-cell>
              <table:table-cell office:value-type="float" office:value="NaN">
                <text:p>NaN</text:p>
              </table:table-cell>
            </table:table-row>
            <table:table-row>
              <table:table-cell office:value-type="string">
                <text:p>661</text:p>
              </table:table-cell>
              <table:table-cell office:value-type="float" office:value="0.00263999993330799">
                <text:p>0.00263999993330799</text:p>
              </table:table-cell>
              <table:table-cell office:value-type="float" office:value="-0.184000000357628">
                <text:p>-0.184000000357628</text:p>
              </table:table-cell>
              <table:table-cell office:value-type="float" office:value="NaN">
                <text:p>NaN</text:p>
              </table:table-cell>
            </table:table-row>
            <table:table-row>
              <table:table-cell office:value-type="string">
                <text:p>662</text:p>
              </table:table-cell>
              <table:table-cell office:value-type="float" office:value="0.00264399993320694">
                <text:p>0.00264399993320694</text:p>
              </table:table-cell>
              <table:table-cell office:value-type="float" office:value="-0.18800000846386">
                <text:p>-0.18800000846386</text:p>
              </table:table-cell>
              <table:table-cell office:value-type="float" office:value="NaN">
                <text:p>NaN</text:p>
              </table:table-cell>
            </table:table-row>
            <table:table-row>
              <table:table-cell office:value-type="string">
                <text:p>663</text:p>
              </table:table-cell>
              <table:table-cell office:value-type="float" office:value="0.00264799993310589">
                <text:p>0.00264799993310589</text:p>
              </table:table-cell>
              <table:table-cell office:value-type="float" office:value="-0.19200000166893">
                <text:p>-0.19200000166893</text:p>
              </table:table-cell>
              <table:table-cell office:value-type="float" office:value="NaN">
                <text:p>NaN</text:p>
              </table:table-cell>
            </table:table-row>
            <table:table-row>
              <table:table-cell office:value-type="string">
                <text:p>664</text:p>
              </table:table-cell>
              <table:table-cell office:value-type="float" office:value="0.00265199993300484">
                <text:p>0.00265199993300484</text:p>
              </table:table-cell>
              <table:table-cell office:value-type="float" office:value="-0.196000009775162">
                <text:p>-0.196000009775162</text:p>
              </table:table-cell>
              <table:table-cell office:value-type="float" office:value="NaN">
                <text:p>NaN</text:p>
              </table:table-cell>
            </table:table-row>
            <table:table-row>
              <table:table-cell office:value-type="string">
                <text:p>665</text:p>
              </table:table-cell>
              <table:table-cell office:value-type="float" office:value="0.0026559999329038">
                <text:p>0.0026559999329038</text:p>
              </table:table-cell>
              <table:table-cell office:value-type="float" office:value="-0.202000007033348">
                <text:p>-0.202000007033348</text:p>
              </table:table-cell>
              <table:table-cell office:value-type="float" office:value="NaN">
                <text:p>NaN</text:p>
              </table:table-cell>
            </table:table-row>
            <table:table-row>
              <table:table-cell office:value-type="string">
                <text:p>666</text:p>
              </table:table-cell>
              <table:table-cell office:value-type="float" office:value="0.00265999993280275">
                <text:p>0.00265999993280275</text:p>
              </table:table-cell>
              <table:table-cell office:value-type="float" office:value="-0.203000009059906">
                <text:p>-0.203000009059906</text:p>
              </table:table-cell>
              <table:table-cell office:value-type="float" office:value="NaN">
                <text:p>NaN</text:p>
              </table:table-cell>
            </table:table-row>
            <table:table-row>
              <table:table-cell office:value-type="string">
                <text:p>667</text:p>
              </table:table-cell>
              <table:table-cell office:value-type="float" office:value="0.0026639999327017">
                <text:p>0.0026639999327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68</text:p>
              </table:table-cell>
              <table:table-cell office:value-type="float" office:value="0.00266799993260065">
                <text:p>0.0026679999326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669</text:p>
              </table:table-cell>
              <table:table-cell office:value-type="float" office:value="0.0026719999324996">
                <text:p>0.0026719999324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0</text:p>
              </table:table-cell>
              <table:table-cell office:value-type="float" office:value="0.00267599993239855">
                <text:p>0.0026759999323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671</text:p>
              </table:table-cell>
              <table:table-cell office:value-type="float" office:value="0.00267999993229751">
                <text:p>0.0026799999322975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2</text:p>
              </table:table-cell>
              <table:table-cell office:value-type="float" office:value="0.00268399993219646">
                <text:p>0.0026839999321964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3</text:p>
              </table:table-cell>
              <table:table-cell office:value-type="float" office:value="0.00268799993209541">
                <text:p>0.0026879999320954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4</text:p>
              </table:table-cell>
              <table:table-cell office:value-type="float" office:value="0.00269199993199436">
                <text:p>0.0026919999319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5</text:p>
              </table:table-cell>
              <table:table-cell office:value-type="float" office:value="0.00269599993189331">
                <text:p>0.0026959999318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6</text:p>
              </table:table-cell>
              <table:table-cell office:value-type="float" office:value="0.00269999993179226">
                <text:p>0.0026999999317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7</text:p>
              </table:table-cell>
              <table:table-cell office:value-type="float" office:value="0.00270399993169121">
                <text:p>0.0027039999316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8</text:p>
              </table:table-cell>
              <table:table-cell office:value-type="float" office:value="0.00270799993159017">
                <text:p>0.00270799993159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79</text:p>
              </table:table-cell>
              <table:table-cell office:value-type="float" office:value="0.00271199993148912">
                <text:p>0.0027119999314891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0</text:p>
              </table:table-cell>
              <table:table-cell office:value-type="float" office:value="0.00271599993138807">
                <text:p>0.0027159999313880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1</text:p>
              </table:table-cell>
              <table:table-cell office:value-type="float" office:value="0.00271999993128702">
                <text:p>0.0027199999312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2</text:p>
              </table:table-cell>
              <table:table-cell office:value-type="float" office:value="0.00272399993118597">
                <text:p>0.0027239999311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3</text:p>
              </table:table-cell>
              <table:table-cell office:value-type="float" office:value="0.00272799993108492">
                <text:p>0.0027279999310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4</text:p>
              </table:table-cell>
              <table:table-cell office:value-type="float" office:value="0.00273199993098387">
                <text:p>0.0027319999309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5</text:p>
              </table:table-cell>
              <table:table-cell office:value-type="float" office:value="0.00273599993088283">
                <text:p>0.0027359999308828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6</text:p>
              </table:table-cell>
              <table:table-cell office:value-type="float" office:value="0.00273999993078178">
                <text:p>0.0027399999307817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7</text:p>
              </table:table-cell>
              <table:table-cell office:value-type="float" office:value="0.00274399993068073">
                <text:p>0.0027439999306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8</text:p>
              </table:table-cell>
              <table:table-cell office:value-type="float" office:value="0.00274799993057968">
                <text:p>0.0027479999305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9</text:p>
              </table:table-cell>
              <table:table-cell office:value-type="float" office:value="0.00275199993047863">
                <text:p>0.0027519999304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690</text:p>
              </table:table-cell>
              <table:table-cell office:value-type="float" office:value="0.00275599993037758">
                <text:p>0.0027559999303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691</text:p>
              </table:table-cell>
              <table:table-cell office:value-type="float" office:value="0.00275999993027654">
                <text:p>0.0027599999302765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2</text:p>
              </table:table-cell>
              <table:table-cell office:value-type="float" office:value="0.00276399993017549">
                <text:p>0.0027639999301754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3</text:p>
              </table:table-cell>
              <table:table-cell office:value-type="float" office:value="0.00276799993007444">
                <text:p>0.0027679999300744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4</text:p>
              </table:table-cell>
              <table:table-cell office:value-type="float" office:value="0.00277199992997339">
                <text:p>0.0027719999299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5</text:p>
              </table:table-cell>
              <table:table-cell office:value-type="float" office:value="0.00277599992987234">
                <text:p>0.0027759999298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6</text:p>
              </table:table-cell>
              <table:table-cell office:value-type="float" office:value="0.00277999992977129">
                <text:p>0.0027799999297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7</text:p>
              </table:table-cell>
              <table:table-cell office:value-type="float" office:value="0.00278399992967024">
                <text:p>0.0027839999296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8</text:p>
              </table:table-cell>
              <table:table-cell office:value-type="float" office:value="0.0027879999295692">
                <text:p>0.00278799992956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99</text:p>
              </table:table-cell>
              <table:table-cell office:value-type="float" office:value="0.00279199992946815">
                <text:p>0.0027919999294681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0</text:p>
              </table:table-cell>
              <table:table-cell office:value-type="float" office:value="0.0027959999293671">
                <text:p>0.002795999929367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1</text:p>
              </table:table-cell>
              <table:table-cell office:value-type="float" office:value="0.00279999992926605">
                <text:p>0.0027999999292660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2</text:p>
              </table:table-cell>
              <table:table-cell office:value-type="float" office:value="0.002803999929165">
                <text:p>0.00280399992916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3</text:p>
              </table:table-cell>
              <table:table-cell office:value-type="float" office:value="0.00280799992906395">
                <text:p>0.0028079999290639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4</text:p>
              </table:table-cell>
              <table:table-cell office:value-type="float" office:value="0.00281199992896291">
                <text:p>0.0028119999289629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5</text:p>
              </table:table-cell>
              <table:table-cell office:value-type="float" office:value="0.00281599992886186">
                <text:p>0.00281599992886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6</text:p>
              </table:table-cell>
              <table:table-cell office:value-type="float" office:value="0.00281999992876081">
                <text:p>0.0028199999287608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7</text:p>
              </table:table-cell>
              <table:table-cell office:value-type="float" office:value="0.00282399992865976">
                <text:p>0.0028239999286597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8</text:p>
              </table:table-cell>
              <table:table-cell office:value-type="float" office:value="0.00282799992855871">
                <text:p>0.00282799992855871</text:p>
              </table:table-cell>
              <table:table-cell office:value-type="float" office:value="-0.203000009059906">
                <text:p>-0.203000009059906</text:p>
              </table:table-cell>
              <table:table-cell office:value-type="float" office:value="NaN">
                <text:p>NaN</text:p>
              </table:table-cell>
            </table:table-row>
            <table:table-row>
              <table:table-cell office:value-type="string">
                <text:p>709</text:p>
              </table:table-cell>
              <table:table-cell office:value-type="float" office:value="0.00283199992845766">
                <text:p>0.00283199992845766</text:p>
              </table:table-cell>
              <table:table-cell office:value-type="float" office:value="-0.202000007033348">
                <text:p>-0.202000007033348</text:p>
              </table:table-cell>
              <table:table-cell office:value-type="float" office:value="NaN">
                <text:p>NaN</text:p>
              </table:table-cell>
            </table:table-row>
            <table:table-row>
              <table:table-cell office:value-type="string">
                <text:p>710</text:p>
              </table:table-cell>
              <table:table-cell office:value-type="float" office:value="0.00283599992835661">
                <text:p>0.00283599992835661</text:p>
              </table:table-cell>
              <table:table-cell office:value-type="float" office:value="-0.196000009775162">
                <text:p>-0.196000009775162</text:p>
              </table:table-cell>
              <table:table-cell office:value-type="float" office:value="NaN">
                <text:p>NaN</text:p>
              </table:table-cell>
            </table:table-row>
            <table:table-row>
              <table:table-cell office:value-type="string">
                <text:p>711</text:p>
              </table:table-cell>
              <table:table-cell office:value-type="float" office:value="0.00283999992825557">
                <text:p>0.00283999992825557</text:p>
              </table:table-cell>
              <table:table-cell office:value-type="float" office:value="-0.19200000166893">
                <text:p>-0.19200000166893</text:p>
              </table:table-cell>
              <table:table-cell office:value-type="float" office:value="NaN">
                <text:p>NaN</text:p>
              </table:table-cell>
            </table:table-row>
            <table:table-row>
              <table:table-cell office:value-type="string">
                <text:p>712</text:p>
              </table:table-cell>
              <table:table-cell office:value-type="float" office:value="0.00284399992815452">
                <text:p>0.00284399992815452</text:p>
              </table:table-cell>
              <table:table-cell office:value-type="float" office:value="-0.18800000846386">
                <text:p>-0.18800000846386</text:p>
              </table:table-cell>
              <table:table-cell office:value-type="float" office:value="NaN">
                <text:p>NaN</text:p>
              </table:table-cell>
            </table:table-row>
            <table:table-row>
              <table:table-cell office:value-type="string">
                <text:p>713</text:p>
              </table:table-cell>
              <table:table-cell office:value-type="float" office:value="0.00284799992805347">
                <text:p>0.00284799992805347</text:p>
              </table:table-cell>
              <table:table-cell office:value-type="float" office:value="-0.184000000357628">
                <text:p>-0.184000000357628</text:p>
              </table:table-cell>
              <table:table-cell office:value-type="float" office:value="NaN">
                <text:p>NaN</text:p>
              </table:table-cell>
            </table:table-row>
            <table:table-row>
              <table:table-cell office:value-type="string">
                <text:p>714</text:p>
              </table:table-cell>
              <table:table-cell office:value-type="float" office:value="0.00285199992795242">
                <text:p>0.00285199992795242</text:p>
              </table:table-cell>
              <table:table-cell office:value-type="float" office:value="-0.180000007152557">
                <text:p>-0.180000007152557</text:p>
              </table:table-cell>
              <table:table-cell office:value-type="float" office:value="NaN">
                <text:p>NaN</text:p>
              </table:table-cell>
            </table:table-row>
            <table:table-row>
              <table:table-cell office:value-type="string">
                <text:p>715</text:p>
              </table:table-cell>
              <table:table-cell office:value-type="float" office:value="0.00285599992785137">
                <text:p>0.00285599992785137</text:p>
              </table:table-cell>
              <table:table-cell office:value-type="float" office:value="-0.174000009894371">
                <text:p>-0.174000009894371</text:p>
              </table:table-cell>
              <table:table-cell office:value-type="float" office:value="NaN">
                <text:p>NaN</text:p>
              </table:table-cell>
            </table:table-row>
            <table:table-row>
              <table:table-cell office:value-type="string">
                <text:p>716</text:p>
              </table:table-cell>
              <table:table-cell office:value-type="float" office:value="0.00285999992775032">
                <text:p>0.00285999992775032</text:p>
              </table:table-cell>
              <table:table-cell office:value-type="float" office:value="-0.167999997735024">
                <text:p>-0.167999997735024</text:p>
              </table:table-cell>
              <table:table-cell office:value-type="float" office:value="NaN">
                <text:p>NaN</text:p>
              </table:table-cell>
            </table:table-row>
            <table:table-row>
              <table:table-cell office:value-type="string">
                <text:p>717</text:p>
              </table:table-cell>
              <table:table-cell office:value-type="float" office:value="0.00286399992764927">
                <text:p>0.00286399992764927</text:p>
              </table:table-cell>
              <table:table-cell office:value-type="float" office:value="-0.166000008583069">
                <text:p>-0.166000008583069</text:p>
              </table:table-cell>
              <table:table-cell office:value-type="float" office:value="NaN">
                <text:p>NaN</text:p>
              </table:table-cell>
            </table:table-row>
            <table:table-row>
              <table:table-cell office:value-type="string">
                <text:p>718</text:p>
              </table:table-cell>
              <table:table-cell office:value-type="float" office:value="0.00286799992754823">
                <text:p>0.00286799992754823</text:p>
              </table:table-cell>
              <table:table-cell office:value-type="float" office:value="-0.159999996423721">
                <text:p>-0.159999996423721</text:p>
              </table:table-cell>
              <table:table-cell office:value-type="float" office:value="NaN">
                <text:p>NaN</text:p>
              </table:table-cell>
            </table:table-row>
            <table:table-row>
              <table:table-cell office:value-type="string">
                <text:p>719</text:p>
              </table:table-cell>
              <table:table-cell office:value-type="float" office:value="0.00287199992744718">
                <text:p>0.00287199992744718</text:p>
              </table:table-cell>
              <table:table-cell office:value-type="float" office:value="-0.156000003218651">
                <text:p>-0.156000003218651</text:p>
              </table:table-cell>
              <table:table-cell office:value-type="float" office:value="NaN">
                <text:p>NaN</text:p>
              </table:table-cell>
            </table:table-row>
            <table:table-row>
              <table:table-cell office:value-type="string">
                <text:p>720</text:p>
              </table:table-cell>
              <table:table-cell office:value-type="float" office:value="0.00287599992734613">
                <text:p>0.00287599992734613</text:p>
              </table:table-cell>
              <table:table-cell office:value-type="float" office:value="-0.151999995112419">
                <text:p>-0.151999995112419</text:p>
              </table:table-cell>
              <table:table-cell office:value-type="float" office:value="NaN">
                <text:p>NaN</text:p>
              </table:table-cell>
            </table:table-row>
            <table:table-row>
              <table:table-cell office:value-type="string">
                <text:p>721</text:p>
              </table:table-cell>
              <table:table-cell office:value-type="float" office:value="0.00287999992724508">
                <text:p>0.00287999992724508</text:p>
              </table:table-cell>
              <table:table-cell office:value-type="float" office:value="-0.144000008702278">
                <text:p>-0.144000008702278</text:p>
              </table:table-cell>
              <table:table-cell office:value-type="float" office:value="NaN">
                <text:p>NaN</text:p>
              </table:table-cell>
            </table:table-row>
            <table:table-row>
              <table:table-cell office:value-type="string">
                <text:p>722</text:p>
              </table:table-cell>
              <table:table-cell office:value-type="float" office:value="0.00288399992714403">
                <text:p>0.00288399992714403</text:p>
              </table:table-cell>
              <table:table-cell office:value-type="float" office:value="-0.142000004649162">
                <text:p>-0.142000004649162</text:p>
              </table:table-cell>
              <table:table-cell office:value-type="float" office:value="NaN">
                <text:p>NaN</text:p>
              </table:table-cell>
            </table:table-row>
            <table:table-row>
              <table:table-cell office:value-type="string">
                <text:p>723</text:p>
              </table:table-cell>
              <table:table-cell office:value-type="float" office:value="0.00288799992704298">
                <text:p>0.00288799992704298</text:p>
              </table:table-cell>
              <table:table-cell office:value-type="float" office:value="-0.136000007390976">
                <text:p>-0.136000007390976</text:p>
              </table:table-cell>
              <table:table-cell office:value-type="float" office:value="NaN">
                <text:p>NaN</text:p>
              </table:table-cell>
            </table:table-row>
            <table:table-row>
              <table:table-cell office:value-type="string">
                <text:p>724</text:p>
              </table:table-cell>
              <table:table-cell office:value-type="float" office:value="0.00289199992694194">
                <text:p>0.00289199992694194</text:p>
              </table:table-cell>
              <table:table-cell office:value-type="float" office:value="-0.128000006079674">
                <text:p>-0.128000006079674</text:p>
              </table:table-cell>
              <table:table-cell office:value-type="float" office:value="NaN">
                <text:p>NaN</text:p>
              </table:table-cell>
            </table:table-row>
            <table:table-row>
              <table:table-cell office:value-type="string">
                <text:p>725</text:p>
              </table:table-cell>
              <table:table-cell office:value-type="float" office:value="0.00289599992684089">
                <text:p>0.00289599992684089</text:p>
              </table:table-cell>
              <table:table-cell office:value-type="float" office:value="-0.126000002026558">
                <text:p>-0.126000002026558</text:p>
              </table:table-cell>
              <table:table-cell office:value-type="float" office:value="NaN">
                <text:p>NaN</text:p>
              </table:table-cell>
            </table:table-row>
            <table:table-row>
              <table:table-cell office:value-type="string">
                <text:p>726</text:p>
              </table:table-cell>
              <table:table-cell office:value-type="float" office:value="0.00289999992673984">
                <text:p>0.00289999992673984</text:p>
              </table:table-cell>
              <table:table-cell office:value-type="float" office:value="-0.122000001370907">
                <text:p>-0.122000001370907</text:p>
              </table:table-cell>
              <table:table-cell office:value-type="float" office:value="NaN">
                <text:p>NaN</text:p>
              </table:table-cell>
            </table:table-row>
            <table:table-row>
              <table:table-cell office:value-type="string">
                <text:p>727</text:p>
              </table:table-cell>
              <table:table-cell office:value-type="float" office:value="0.00290399992663879">
                <text:p>0.00290399992663879</text:p>
              </table:table-cell>
              <table:table-cell office:value-type="float" office:value="-0.11600000411272">
                <text:p>-0.11600000411272</text:p>
              </table:table-cell>
              <table:table-cell office:value-type="float" office:value="NaN">
                <text:p>NaN</text:p>
              </table:table-cell>
            </table:table-row>
            <table:table-row>
              <table:table-cell office:value-type="string">
                <text:p>728</text:p>
              </table:table-cell>
              <table:table-cell office:value-type="float" office:value="0.00290799992653774">
                <text:p>0.00290799992653774</text:p>
              </table:table-cell>
              <table:table-cell office:value-type="float" office:value="-0.109999999403954">
                <text:p>-0.109999999403954</text:p>
              </table:table-cell>
              <table:table-cell office:value-type="float" office:value="NaN">
                <text:p>NaN</text:p>
              </table:table-cell>
            </table:table-row>
            <table:table-row>
              <table:table-cell office:value-type="string">
                <text:p>729</text:p>
              </table:table-cell>
              <table:table-cell office:value-type="float" office:value="0.00291199992643669">
                <text:p>0.00291199992643669</text:p>
              </table:table-cell>
              <table:table-cell office:value-type="float" office:value="-0.105999998748302">
                <text:p>-0.105999998748302</text:p>
              </table:table-cell>
              <table:table-cell office:value-type="float" office:value="NaN">
                <text:p>NaN</text:p>
              </table:table-cell>
            </table:table-row>
            <table:table-row>
              <table:table-cell office:value-type="string">
                <text:p>730</text:p>
              </table:table-cell>
              <table:table-cell office:value-type="float" office:value="0.00291599992633564">
                <text:p>0.00291599992633564</text:p>
              </table:table-cell>
              <table:table-cell office:value-type="float" office:value="-0.100000001490116">
                <text:p>-0.100000001490116</text:p>
              </table:table-cell>
              <table:table-cell office:value-type="float" office:value="NaN">
                <text:p>NaN</text:p>
              </table:table-cell>
            </table:table-row>
            <table:table-row>
              <table:table-cell office:value-type="string">
                <text:p>731</text:p>
              </table:table-cell>
              <table:table-cell office:value-type="float" office:value="0.0029199999262346">
                <text:p>0.0029199999262346</text:p>
              </table:table-cell>
              <table:table-cell office:value-type="float" office:value="-0.097000002861023">
                <text:p>-0.097000002861023</text:p>
              </table:table-cell>
              <table:table-cell office:value-type="float" office:value="NaN">
                <text:p>NaN</text:p>
              </table:table-cell>
            </table:table-row>
            <table:table-row>
              <table:table-cell office:value-type="string">
                <text:p>732</text:p>
              </table:table-cell>
              <table:table-cell office:value-type="float" office:value="0.00292399992613355">
                <text:p>0.0029239999261335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733</text:p>
              </table:table-cell>
              <table:table-cell office:value-type="float" office:value="0.0029279999260325">
                <text:p>0.0029279999260325</text:p>
              </table:table-cell>
              <table:table-cell office:value-type="float" office:value="-0.0860000029206276">
                <text:p>-0.0860000029206276</text:p>
              </table:table-cell>
              <table:table-cell office:value-type="float" office:value="NaN">
                <text:p>NaN</text:p>
              </table:table-cell>
            </table:table-row>
            <table:table-row>
              <table:table-cell office:value-type="string">
                <text:p>734</text:p>
              </table:table-cell>
              <table:table-cell office:value-type="float" office:value="0.00293199992593145">
                <text:p>0.0029319999259314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735</text:p>
              </table:table-cell>
              <table:table-cell office:value-type="float" office:value="0.0029359999258304">
                <text:p>0.0029359999258304</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36</text:p>
              </table:table-cell>
              <table:table-cell office:value-type="float" office:value="0.00293999992572935">
                <text:p>0.0029399999257293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737</text:p>
              </table:table-cell>
              <table:table-cell office:value-type="float" office:value="0.0029439999256283">
                <text:p>0.0029439999256283</text:p>
              </table:table-cell>
              <table:table-cell office:value-type="float" office:value="-0.068000003695488">
                <text:p>-0.068000003695488</text:p>
              </table:table-cell>
              <table:table-cell office:value-type="float" office:value="NaN">
                <text:p>NaN</text:p>
              </table:table-cell>
            </table:table-row>
            <table:table-row>
              <table:table-cell office:value-type="string">
                <text:p>738</text:p>
              </table:table-cell>
              <table:table-cell office:value-type="float" office:value="0.00294799992552726">
                <text:p>0.0029479999255272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739</text:p>
              </table:table-cell>
              <table:table-cell office:value-type="float" office:value="0.00295199992542621">
                <text:p>0.00295199992542621</text:p>
              </table:table-cell>
              <table:table-cell office:value-type="float" office:value="-0.0560000017285347">
                <text:p>-0.0560000017285347</text:p>
              </table:table-cell>
              <table:table-cell office:value-type="float" office:value="NaN">
                <text:p>NaN</text:p>
              </table:table-cell>
            </table:table-row>
            <table:table-row>
              <table:table-cell office:value-type="string">
                <text:p>740</text:p>
              </table:table-cell>
              <table:table-cell office:value-type="float" office:value="0.00295599992532516">
                <text:p>0.0029559999253251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741</text:p>
              </table:table-cell>
              <table:table-cell office:value-type="float" office:value="0.00295999992522411">
                <text:p>0.00295999992522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742</text:p>
              </table:table-cell>
              <table:table-cell office:value-type="float" office:value="0.00296399992512306">
                <text:p>0.0029639999251230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743</text:p>
              </table:table-cell>
              <table:table-cell office:value-type="float" office:value="0.00296799992502201">
                <text:p>0.0029679999250220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744</text:p>
              </table:table-cell>
              <table:table-cell office:value-type="float" office:value="0.00297199992492097">
                <text:p>0.00297199992492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45</text:p>
              </table:table-cell>
              <table:table-cell office:value-type="float" office:value="0.00297599992481992">
                <text:p>0.00297599992481992</text:p>
              </table:table-cell>
              <table:table-cell office:value-type="float" office:value="-0.0280000008642674">
                <text:p>-0.0280000008642674</text:p>
              </table:table-cell>
              <table:table-cell office:value-type="float" office:value="NaN">
                <text:p>NaN</text:p>
              </table:table-cell>
            </table:table-row>
            <table:table-row>
              <table:table-cell office:value-type="string">
                <text:p>746</text:p>
              </table:table-cell>
              <table:table-cell office:value-type="float" office:value="0.00297999992471887">
                <text:p>0.0029799999247188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747</text:p>
              </table:table-cell>
              <table:table-cell office:value-type="float" office:value="0.00298399992461782">
                <text:p>0.00298399992461782</text:p>
              </table:table-cell>
              <table:table-cell office:value-type="float" office:value="-0.0180000010877848">
                <text:p>-0.0180000010877848</text:p>
              </table:table-cell>
              <table:table-cell office:value-type="float" office:value="NaN">
                <text:p>NaN</text:p>
              </table:table-cell>
            </table:table-row>
            <table:table-row>
              <table:table-cell office:value-type="string">
                <text:p>748</text:p>
              </table:table-cell>
              <table:table-cell office:value-type="float" office:value="0.00298799992451677">
                <text:p>0.00298799992451677</text:p>
              </table:table-cell>
              <table:table-cell office:value-type="float" office:value="-0.0140000004321337">
                <text:p>-0.0140000004321337</text:p>
              </table:table-cell>
              <table:table-cell office:value-type="float" office:value="NaN">
                <text:p>NaN</text:p>
              </table:table-cell>
            </table:table-row>
            <table:table-row>
              <table:table-cell office:value-type="string">
                <text:p>749</text:p>
              </table:table-cell>
              <table:table-cell office:value-type="float" office:value="0.00299199992441572">
                <text:p>0.00299199992441572</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0</text:p>
              </table:table-cell>
              <table:table-cell office:value-type="float" office:value="0.00299599992431467">
                <text:p>0.00299599992431467</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751</text:p>
              </table:table-cell>
              <table:table-cell office:value-type="float" office:value="0.00299999992421363">
                <text:p>0.0029999999242136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752</text:p>
              </table:table-cell>
              <table:table-cell office:value-type="float" office:value="0.00300399992411258">
                <text:p>0.00300399992411258</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3</text:p>
              </table:table-cell>
              <table:table-cell office:value-type="float" office:value="0.00300799992401153">
                <text:p>0.0030079999240115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754</text:p>
              </table:table-cell>
              <table:table-cell office:value-type="float" office:value="0.00301199992391048">
                <text:p>0.00301199992391048</text:p>
              </table:table-cell>
              <table:table-cell office:value-type="float" office:value="0.017000000923872">
                <text:p>0.017000000923872</text:p>
              </table:table-cell>
              <table:table-cell office:value-type="float" office:value="NaN">
                <text:p>NaN</text:p>
              </table:table-cell>
            </table:table-row>
            <table:table-row>
              <table:table-cell office:value-type="string">
                <text:p>755</text:p>
              </table:table-cell>
              <table:table-cell office:value-type="float" office:value="0.00301599992380943">
                <text:p>0.0030159999238094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756</text:p>
              </table:table-cell>
              <table:table-cell office:value-type="float" office:value="0.00301999992370838">
                <text:p>0.0030199999237083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757</text:p>
              </table:table-cell>
              <table:table-cell office:value-type="float" office:value="0.00302399992360733">
                <text:p>0.0030239999236073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758</text:p>
              </table:table-cell>
              <table:table-cell office:value-type="float" office:value="0.00302799992350629">
                <text:p>0.00302799992350629</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59</text:p>
              </table:table-cell>
              <table:table-cell office:value-type="float" office:value="0.00303199992340524">
                <text:p>0.0030319999234052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760</text:p>
              </table:table-cell>
              <table:table-cell office:value-type="float" office:value="0.00303599992330419">
                <text:p>0.0030359999233041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761</text:p>
              </table:table-cell>
              <table:table-cell office:value-type="float" office:value="0.00303999992320314">
                <text:p>0.0030399999232031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762</text:p>
              </table:table-cell>
              <table:table-cell office:value-type="float" office:value="0.00304399992310209">
                <text:p>0.003043999923102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763</text:p>
              </table:table-cell>
              <table:table-cell office:value-type="float" office:value="0.00304799992300104">
                <text:p>0.0030479999230010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764</text:p>
              </table:table-cell>
              <table:table-cell office:value-type="float" office:value="0.0030519999229">
                <text:p>0.0030519999229</text:p>
              </table:table-cell>
              <table:table-cell office:value-type="float" office:value="0.0649999976158142">
                <text:p>0.0649999976158142</text:p>
              </table:table-cell>
              <table:table-cell office:value-type="float" office:value="NaN">
                <text:p>NaN</text:p>
              </table:table-cell>
            </table:table-row>
            <table:table-row>
              <table:table-cell office:value-type="string">
                <text:p>765</text:p>
              </table:table-cell>
              <table:table-cell office:value-type="float" office:value="0.00305599992279895">
                <text:p>0.00305599992279895</text:p>
              </table:table-cell>
              <table:table-cell office:value-type="float" office:value="0.068000003695488">
                <text:p>0.068000003695488</text:p>
              </table:table-cell>
              <table:table-cell office:value-type="float" office:value="NaN">
                <text:p>NaN</text:p>
              </table:table-cell>
            </table:table-row>
            <table:table-row>
              <table:table-cell office:value-type="string">
                <text:p>766</text:p>
              </table:table-cell>
              <table:table-cell office:value-type="float" office:value="0.0030599999226979">
                <text:p>0.003059999922697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67</text:p>
              </table:table-cell>
              <table:table-cell office:value-type="float" office:value="0.00306399992259685">
                <text:p>0.00306399992259685</text:p>
              </table:table-cell>
              <table:table-cell office:value-type="float" office:value="0.0799999982118607">
                <text:p>0.0799999982118607</text:p>
              </table:table-cell>
              <table:table-cell office:value-type="float" office:value="NaN">
                <text:p>NaN</text:p>
              </table:table-cell>
            </table:table-row>
            <table:table-row>
              <table:table-cell office:value-type="string">
                <text:p>768</text:p>
              </table:table-cell>
              <table:table-cell office:value-type="float" office:value="0.0030679999224958">
                <text:p>0.0030679999224958</text:p>
              </table:table-cell>
              <table:table-cell office:value-type="float" office:value="0.0839999988675118">
                <text:p>0.0839999988675118</text:p>
              </table:table-cell>
              <table:table-cell office:value-type="float" office:value="NaN">
                <text:p>NaN</text:p>
              </table:table-cell>
            </table:table-row>
            <table:table-row>
              <table:table-cell office:value-type="string">
                <text:p>769</text:p>
              </table:table-cell>
              <table:table-cell office:value-type="float" office:value="0.00307199992239475">
                <text:p>0.0030719999223947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770</text:p>
              </table:table-cell>
              <table:table-cell office:value-type="float" office:value="0.0030759999222937">
                <text:p>0.0030759999222937</text:p>
              </table:table-cell>
              <table:table-cell office:value-type="float" office:value="0.0920000001788139">
                <text:p>0.0920000001788139</text:p>
              </table:table-cell>
              <table:table-cell office:value-type="float" office:value="NaN">
                <text:p>NaN</text:p>
              </table:table-cell>
            </table:table-row>
            <table:table-row>
              <table:table-cell office:value-type="string">
                <text:p>771</text:p>
              </table:table-cell>
              <table:table-cell office:value-type="float" office:value="0.00307999992219266">
                <text:p>0.0030799999221926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772</text:p>
              </table:table-cell>
              <table:table-cell office:value-type="float" office:value="0.00308399992209161">
                <text:p>0.00308399992209161</text:p>
              </table:table-cell>
              <table:table-cell office:value-type="float" office:value="0.104000002145767">
                <text:p>0.104000002145767</text:p>
              </table:table-cell>
              <table:table-cell office:value-type="float" office:value="NaN">
                <text:p>NaN</text:p>
              </table:table-cell>
            </table:table-row>
            <table:table-row>
              <table:table-cell office:value-type="string">
                <text:p>773</text:p>
              </table:table-cell>
              <table:table-cell office:value-type="float" office:value="0.00308799992199056">
                <text:p>0.00308799992199056</text:p>
              </table:table-cell>
              <table:table-cell office:value-type="float" office:value="0.109000004827976">
                <text:p>0.109000004827976</text:p>
              </table:table-cell>
              <table:table-cell office:value-type="float" office:value="NaN">
                <text:p>NaN</text:p>
              </table:table-cell>
            </table:table-row>
            <table:table-row>
              <table:table-cell office:value-type="string">
                <text:p>774</text:p>
              </table:table-cell>
              <table:table-cell office:value-type="float" office:value="0.00309199992188951">
                <text:p>0.00309199992188951</text:p>
              </table:table-cell>
              <table:table-cell office:value-type="float" office:value="0.109999999403954">
                <text:p>0.109999999403954</text:p>
              </table:table-cell>
              <table:table-cell office:value-type="float" office:value="NaN">
                <text:p>NaN</text:p>
              </table:table-cell>
            </table:table-row>
            <table:table-row>
              <table:table-cell office:value-type="string">
                <text:p>775</text:p>
              </table:table-cell>
              <table:table-cell office:value-type="float" office:value="0.00309599992178846">
                <text:p>0.00309599992178846</text:p>
              </table:table-cell>
              <table:table-cell office:value-type="float" office:value="0.118000000715256">
                <text:p>0.118000000715256</text:p>
              </table:table-cell>
              <table:table-cell office:value-type="float" office:value="NaN">
                <text:p>NaN</text:p>
              </table:table-cell>
            </table:table-row>
            <table:table-row>
              <table:table-cell office:value-type="string">
                <text:p>776</text:p>
              </table:table-cell>
              <table:table-cell office:value-type="float" office:value="0.00309999992168741">
                <text:p>0.00309999992168741</text:p>
              </table:table-cell>
              <table:table-cell office:value-type="float" office:value="0.124000005424023">
                <text:p>0.124000005424023</text:p>
              </table:table-cell>
              <table:table-cell office:value-type="float" office:value="NaN">
                <text:p>NaN</text:p>
              </table:table-cell>
            </table:table-row>
            <table:table-row>
              <table:table-cell office:value-type="string">
                <text:p>777</text:p>
              </table:table-cell>
              <table:table-cell office:value-type="float" office:value="0.00310399992158636">
                <text:p>0.00310399992158636</text:p>
              </table:table-cell>
              <table:table-cell office:value-type="float" office:value="0.128000006079674">
                <text:p>0.128000006079674</text:p>
              </table:table-cell>
              <table:table-cell office:value-type="float" office:value="NaN">
                <text:p>NaN</text:p>
              </table:table-cell>
            </table:table-row>
            <table:table-row>
              <table:table-cell office:value-type="string">
                <text:p>778</text:p>
              </table:table-cell>
              <table:table-cell office:value-type="float" office:value="0.00310799992148532">
                <text:p>0.00310799992148532</text:p>
              </table:table-cell>
              <table:table-cell office:value-type="float" office:value="0.130999997258186">
                <text:p>0.130999997258186</text:p>
              </table:table-cell>
              <table:table-cell office:value-type="float" office:value="NaN">
                <text:p>NaN</text:p>
              </table:table-cell>
            </table:table-row>
            <table:table-row>
              <table:table-cell office:value-type="string">
                <text:p>779</text:p>
              </table:table-cell>
              <table:table-cell office:value-type="float" office:value="0.00311199992138427">
                <text:p>0.00311199992138427</text:p>
              </table:table-cell>
              <table:table-cell office:value-type="float" office:value="0.137999996542931">
                <text:p>0.137999996542931</text:p>
              </table:table-cell>
              <table:table-cell office:value-type="float" office:value="NaN">
                <text:p>NaN</text:p>
              </table:table-cell>
            </table:table-row>
            <table:table-row>
              <table:table-cell office:value-type="string">
                <text:p>780</text:p>
              </table:table-cell>
              <table:table-cell office:value-type="float" office:value="0.00311599992128322">
                <text:p>0.00311599992128322</text:p>
              </table:table-cell>
              <table:table-cell office:value-type="float" office:value="0.140000000596046">
                <text:p>0.140000000596046</text:p>
              </table:table-cell>
              <table:table-cell office:value-type="float" office:value="NaN">
                <text:p>NaN</text:p>
              </table:table-cell>
            </table:table-row>
            <table:table-row>
              <table:table-cell office:value-type="string">
                <text:p>781</text:p>
              </table:table-cell>
              <table:table-cell office:value-type="float" office:value="0.00311999992118217">
                <text:p>0.00311999992118217</text:p>
              </table:table-cell>
              <table:table-cell office:value-type="float" office:value="0.148000001907349">
                <text:p>0.148000001907349</text:p>
              </table:table-cell>
              <table:table-cell office:value-type="float" office:value="NaN">
                <text:p>NaN</text:p>
              </table:table-cell>
            </table:table-row>
            <table:table-row>
              <table:table-cell office:value-type="string">
                <text:p>782</text:p>
              </table:table-cell>
              <table:table-cell office:value-type="float" office:value="0.00312399992108112">
                <text:p>0.00312399992108112</text:p>
              </table:table-cell>
              <table:table-cell office:value-type="float" office:value="0.151999995112419">
                <text:p>0.151999995112419</text:p>
              </table:table-cell>
              <table:table-cell office:value-type="float" office:value="NaN">
                <text:p>NaN</text:p>
              </table:table-cell>
            </table:table-row>
            <table:table-row>
              <table:table-cell office:value-type="string">
                <text:p>783</text:p>
              </table:table-cell>
              <table:table-cell office:value-type="float" office:value="0.00312799992098007">
                <text:p>0.00312799992098007</text:p>
              </table:table-cell>
              <table:table-cell office:value-type="float" office:value="0.156000003218651">
                <text:p>0.156000003218651</text:p>
              </table:table-cell>
              <table:table-cell office:value-type="float" office:value="NaN">
                <text:p>NaN</text:p>
              </table:table-cell>
            </table:table-row>
            <table:table-row>
              <table:table-cell office:value-type="string">
                <text:p>784</text:p>
              </table:table-cell>
              <table:table-cell office:value-type="float" office:value="0.00313199992087903">
                <text:p>0.00313199992087903</text:p>
              </table:table-cell>
              <table:table-cell office:value-type="float" office:value="0.159999996423721">
                <text:p>0.159999996423721</text:p>
              </table:table-cell>
              <table:table-cell office:value-type="float" office:value="NaN">
                <text:p>NaN</text:p>
              </table:table-cell>
            </table:table-row>
            <table:table-row>
              <table:table-cell office:value-type="string">
                <text:p>785</text:p>
              </table:table-cell>
              <table:table-cell office:value-type="float" office:value="0.00313599992077798">
                <text:p>0.00313599992077798</text:p>
              </table:table-cell>
              <table:table-cell office:value-type="float" office:value="0.166000008583069">
                <text:p>0.166000008583069</text:p>
              </table:table-cell>
              <table:table-cell office:value-type="float" office:value="NaN">
                <text:p>NaN</text:p>
              </table:table-cell>
            </table:table-row>
            <table:table-row>
              <table:table-cell office:value-type="string">
                <text:p>786</text:p>
              </table:table-cell>
              <table:table-cell office:value-type="float" office:value="0.00313999992067693">
                <text:p>0.00313999992067693</text:p>
              </table:table-cell>
              <table:table-cell office:value-type="float" office:value="0.170000001788139">
                <text:p>0.170000001788139</text:p>
              </table:table-cell>
              <table:table-cell office:value-type="float" office:value="NaN">
                <text:p>NaN</text:p>
              </table:table-cell>
            </table:table-row>
            <table:table-row>
              <table:table-cell office:value-type="string">
                <text:p>787</text:p>
              </table:table-cell>
              <table:table-cell office:value-type="float" office:value="0.00314399992057588">
                <text:p>0.00314399992057588</text:p>
              </table:table-cell>
              <table:table-cell office:value-type="float" office:value="0.174000009894371">
                <text:p>0.174000009894371</text:p>
              </table:table-cell>
              <table:table-cell office:value-type="float" office:value="NaN">
                <text:p>NaN</text:p>
              </table:table-cell>
            </table:table-row>
            <table:table-row>
              <table:table-cell office:value-type="string">
                <text:p>788</text:p>
              </table:table-cell>
              <table:table-cell office:value-type="float" office:value="0.00314799992047483">
                <text:p>0.00314799992047483</text:p>
              </table:table-cell>
              <table:table-cell office:value-type="float" office:value="0.180000007152557">
                <text:p>0.180000007152557</text:p>
              </table:table-cell>
              <table:table-cell office:value-type="float" office:value="NaN">
                <text:p>NaN</text:p>
              </table:table-cell>
            </table:table-row>
            <table:table-row>
              <table:table-cell office:value-type="string">
                <text:p>789</text:p>
              </table:table-cell>
              <table:table-cell office:value-type="float" office:value="0.00315199992037378">
                <text:p>0.00315199992037378</text:p>
              </table:table-cell>
              <table:table-cell office:value-type="float" office:value="0.186000004410744">
                <text:p>0.186000004410744</text:p>
              </table:table-cell>
              <table:table-cell office:value-type="float" office:value="NaN">
                <text:p>NaN</text:p>
              </table:table-cell>
            </table:table-row>
            <table:table-row>
              <table:table-cell office:value-type="string">
                <text:p>790</text:p>
              </table:table-cell>
              <table:table-cell office:value-type="float" office:value="0.00315599992027273">
                <text:p>0.00315599992027273</text:p>
              </table:table-cell>
              <table:table-cell office:value-type="float" office:value="0.189999997615814">
                <text:p>0.189999997615814</text:p>
              </table:table-cell>
              <table:table-cell office:value-type="float" office:value="NaN">
                <text:p>NaN</text:p>
              </table:table-cell>
            </table:table-row>
            <table:table-row>
              <table:table-cell office:value-type="string">
                <text:p>791</text:p>
              </table:table-cell>
              <table:table-cell office:value-type="float" office:value="0.00315999992017169">
                <text:p>0.00315999992017169</text:p>
              </table:table-cell>
              <table:table-cell office:value-type="float" office:value="0.196000009775162">
                <text:p>0.196000009775162</text:p>
              </table:table-cell>
              <table:table-cell office:value-type="float" office:value="NaN">
                <text:p>NaN</text:p>
              </table:table-cell>
            </table:table-row>
            <table:table-row>
              <table:table-cell office:value-type="string">
                <text:p>792</text:p>
              </table:table-cell>
              <table:table-cell office:value-type="float" office:value="0.00316399992007064">
                <text:p>0.00316399992007064</text:p>
              </table:table-cell>
              <table:table-cell office:value-type="float" office:value="0.196000009775162">
                <text:p>0.196000009775162</text:p>
              </table:table-cell>
              <table:table-cell office:value-type="float" office:value="NaN">
                <text:p>NaN</text:p>
              </table:table-cell>
            </table:table-row>
            <table:table-row>
              <table:table-cell office:value-type="string">
                <text:p>793</text:p>
              </table:table-cell>
              <table:table-cell office:value-type="float" office:value="0.00316799991996959">
                <text:p>0.0031679999199695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4</text:p>
              </table:table-cell>
              <table:table-cell office:value-type="float" office:value="0.00317199991986854">
                <text:p>0.003171999919868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5</text:p>
              </table:table-cell>
              <table:table-cell office:value-type="float" office:value="0.00317599991976749">
                <text:p>0.0031759999197674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6</text:p>
              </table:table-cell>
              <table:table-cell office:value-type="float" office:value="0.00317999991966644">
                <text:p>0.0031799999196664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7</text:p>
              </table:table-cell>
              <table:table-cell office:value-type="float" office:value="0.00318399991956539">
                <text:p>0.0031839999195653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8</text:p>
              </table:table-cell>
              <table:table-cell office:value-type="float" office:value="0.00318799991946435">
                <text:p>0.00318799991946435</text:p>
              </table:table-cell>
              <table:table-cell office:value-type="float" office:value="0.196999996900558">
                <text:p>0.196999996900558</text:p>
              </table:table-cell>
              <table:table-cell office:value-type="float" office:value="NaN">
                <text:p>NaN</text:p>
              </table:table-cell>
            </table:table-row>
            <table:table-row>
              <table:table-cell office:value-type="string">
                <text:p>799</text:p>
              </table:table-cell>
              <table:table-cell office:value-type="float" office:value="0.0031919999193633">
                <text:p>0.00319199991936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00</text:p>
              </table:table-cell>
              <table:table-cell office:value-type="float" office:value="0.00319599991926225">
                <text:p>0.0031959999192622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1</text:p>
              </table:table-cell>
              <table:table-cell office:value-type="float" office:value="0.0031999999191612">
                <text:p>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02</text:p>
              </table:table-cell>
              <table:table-cell office:value-type="float" office:value="0.00320399991906015">
                <text:p>0.0032039999190601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3</text:p>
              </table:table-cell>
              <table:table-cell office:value-type="float" office:value="0.0032079999189591">
                <text:p>0.00320799991895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4</text:p>
              </table:table-cell>
              <table:table-cell office:value-type="float" office:value="0.00321199991885806">
                <text:p>0.0032119999188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5</text:p>
              </table:table-cell>
              <table:table-cell office:value-type="float" office:value="0.00321599991875701">
                <text:p>0.0032159999187570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6</text:p>
              </table:table-cell>
              <table:table-cell office:value-type="float" office:value="0.00321999991865596">
                <text:p>0.0032199999186559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7</text:p>
              </table:table-cell>
              <table:table-cell office:value-type="float" office:value="0.00322399991855491">
                <text:p>0.003223999918554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8</text:p>
              </table:table-cell>
              <table:table-cell office:value-type="float" office:value="0.00322799991845386">
                <text:p>0.0032279999184538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9</text:p>
              </table:table-cell>
              <table:table-cell office:value-type="float" office:value="0.00323199991835281">
                <text:p>0.00323199991835281</text:p>
              </table:table-cell>
              <table:table-cell office:value-type="float" office:value="0.196999996900558">
                <text:p>0.196999996900558</text:p>
              </table:table-cell>
              <table:table-cell office:value-type="float" office:value="NaN">
                <text:p>NaN</text:p>
              </table:table-cell>
            </table:table-row>
            <table:table-row>
              <table:table-cell office:value-type="string">
                <text:p>810</text:p>
              </table:table-cell>
              <table:table-cell office:value-type="float" office:value="0.00323599991825176">
                <text:p>0.00323599991825176</text:p>
              </table:table-cell>
              <table:table-cell office:value-type="float" office:value="0.196999996900558">
                <text:p>0.196999996900558</text:p>
              </table:table-cell>
              <table:table-cell office:value-type="float" office:value="NaN">
                <text:p>NaN</text:p>
              </table:table-cell>
            </table:table-row>
            <table:table-row>
              <table:table-cell office:value-type="string">
                <text:p>811</text:p>
              </table:table-cell>
              <table:table-cell office:value-type="float" office:value="0.00323999991815072">
                <text:p>0.0032399999181507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2</text:p>
              </table:table-cell>
              <table:table-cell office:value-type="float" office:value="0.00324399991804967">
                <text:p>0.0032439999180496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3</text:p>
              </table:table-cell>
              <table:table-cell office:value-type="float" office:value="0.00324799991794862">
                <text:p>0.0032479999179486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4</text:p>
              </table:table-cell>
              <table:table-cell office:value-type="float" office:value="0.00325199991784757">
                <text:p>0.0032519999178475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5</text:p>
              </table:table-cell>
              <table:table-cell office:value-type="float" office:value="0.00325599991774652">
                <text:p>0.0032559999177465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6</text:p>
              </table:table-cell>
              <table:table-cell office:value-type="float" office:value="0.00325999991764547">
                <text:p>0.0032599999176454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7</text:p>
              </table:table-cell>
              <table:table-cell office:value-type="float" office:value="0.00326399991754442">
                <text:p>0.0032639999175444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8</text:p>
              </table:table-cell>
              <table:table-cell office:value-type="float" office:value="0.00326799991744338">
                <text:p>0.00326799991744338</text:p>
              </table:table-cell>
              <table:table-cell office:value-type="float" office:value="0.196999996900558">
                <text:p>0.196999996900558</text:p>
              </table:table-cell>
              <table:table-cell office:value-type="float" office:value="NaN">
                <text:p>NaN</text:p>
              </table:table-cell>
            </table:table-row>
            <table:table-row>
              <table:table-cell office:value-type="string">
                <text:p>819</text:p>
              </table:table-cell>
              <table:table-cell office:value-type="float" office:value="0.00327199991734233">
                <text:p>0.003271999917342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0</text:p>
              </table:table-cell>
              <table:table-cell office:value-type="float" office:value="0.00327599991724128">
                <text:p>0.0032759999172412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1</text:p>
              </table:table-cell>
              <table:table-cell office:value-type="float" office:value="0.00327999991714023">
                <text:p>0.0032799999171402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2</text:p>
              </table:table-cell>
              <table:table-cell office:value-type="float" office:value="0.00328399991703918">
                <text:p>0.0032839999170391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3</text:p>
              </table:table-cell>
              <table:table-cell office:value-type="float" office:value="0.00328799991693813">
                <text:p>0.0032879999169381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4</text:p>
              </table:table-cell>
              <table:table-cell office:value-type="float" office:value="0.00329199991683709">
                <text:p>0.0032919999168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5</text:p>
              </table:table-cell>
              <table:table-cell office:value-type="float" office:value="0.00329599991673604">
                <text:p>0.0032959999167360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6</text:p>
              </table:table-cell>
              <table:table-cell office:value-type="float" office:value="0.00329999991663499">
                <text:p>0.0032999999166349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7</text:p>
              </table:table-cell>
              <table:table-cell office:value-type="float" office:value="0.00330399991653394">
                <text:p>0.0033039999165339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8</text:p>
              </table:table-cell>
              <table:table-cell office:value-type="float" office:value="0.00330799991643289">
                <text:p>0.0033079999164328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9</text:p>
              </table:table-cell>
              <table:table-cell office:value-type="float" office:value="0.00331199991633184">
                <text:p>0.00331199991633184</text:p>
              </table:table-cell>
              <table:table-cell office:value-type="float" office:value="0.196999996900558">
                <text:p>0.196999996900558</text:p>
              </table:table-cell>
              <table:table-cell office:value-type="float" office:value="NaN">
                <text:p>NaN</text:p>
              </table:table-cell>
            </table:table-row>
            <table:table-row>
              <table:table-cell office:value-type="string">
                <text:p>830</text:p>
              </table:table-cell>
              <table:table-cell office:value-type="float" office:value="0.00331599991623079">
                <text:p>0.00331599991623079</text:p>
              </table:table-cell>
              <table:table-cell office:value-type="float" office:value="0.196999996900558">
                <text:p>0.196999996900558</text:p>
              </table:table-cell>
              <table:table-cell office:value-type="float" office:value="NaN">
                <text:p>NaN</text:p>
              </table:table-cell>
            </table:table-row>
            <table:table-row>
              <table:table-cell office:value-type="string">
                <text:p>831</text:p>
              </table:table-cell>
              <table:table-cell office:value-type="float" office:value="0.00331999991612975">
                <text:p>0.0033199999161297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2</text:p>
              </table:table-cell>
              <table:table-cell office:value-type="float" office:value="0.0033239999160287">
                <text:p>0.0033239999160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833</text:p>
              </table:table-cell>
              <table:table-cell office:value-type="float" office:value="0.00332799991592765">
                <text:p>0.0033279999159276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4</text:p>
              </table:table-cell>
              <table:table-cell office:value-type="float" office:value="0.0033319999158266">
                <text:p>0.0033319999158266</text:p>
              </table:table-cell>
              <table:table-cell office:value-type="float" office:value="0.196000009775162">
                <text:p>0.196000009775162</text:p>
              </table:table-cell>
              <table:table-cell office:value-type="float" office:value="NaN">
                <text:p>NaN</text:p>
              </table:table-cell>
            </table:table-row>
            <table:table-row>
              <table:table-cell office:value-type="string">
                <text:p>835</text:p>
              </table:table-cell>
              <table:table-cell office:value-type="float" office:value="0.00333599991572555">
                <text:p>0.00333599991572555</text:p>
              </table:table-cell>
              <table:table-cell office:value-type="float" office:value="0.189999997615814">
                <text:p>0.189999997615814</text:p>
              </table:table-cell>
              <table:table-cell office:value-type="float" office:value="NaN">
                <text:p>NaN</text:p>
              </table:table-cell>
            </table:table-row>
            <table:table-row>
              <table:table-cell office:value-type="string">
                <text:p>836</text:p>
              </table:table-cell>
              <table:table-cell office:value-type="float" office:value="0.0033399999156245">
                <text:p>0.0033399999156245</text:p>
              </table:table-cell>
              <table:table-cell office:value-type="float" office:value="0.186000004410744">
                <text:p>0.186000004410744</text:p>
              </table:table-cell>
              <table:table-cell office:value-type="float" office:value="NaN">
                <text:p>NaN</text:p>
              </table:table-cell>
            </table:table-row>
            <table:table-row>
              <table:table-cell office:value-type="string">
                <text:p>837</text:p>
              </table:table-cell>
              <table:table-cell office:value-type="float" office:value="0.00334399991552345">
                <text:p>0.00334399991552345</text:p>
              </table:table-cell>
              <table:table-cell office:value-type="float" office:value="0.180000007152557">
                <text:p>0.180000007152557</text:p>
              </table:table-cell>
              <table:table-cell office:value-type="float" office:value="NaN">
                <text:p>NaN</text:p>
              </table:table-cell>
            </table:table-row>
            <table:table-row>
              <table:table-cell office:value-type="string">
                <text:p>838</text:p>
              </table:table-cell>
              <table:table-cell office:value-type="float" office:value="0.00334799991542241">
                <text:p>0.00334799991542241</text:p>
              </table:table-cell>
              <table:table-cell office:value-type="float" office:value="0.175999999046326">
                <text:p>0.175999999046326</text:p>
              </table:table-cell>
              <table:table-cell office:value-type="float" office:value="NaN">
                <text:p>NaN</text:p>
              </table:table-cell>
            </table:table-row>
            <table:table-row>
              <table:table-cell office:value-type="string">
                <text:p>839</text:p>
              </table:table-cell>
              <table:table-cell office:value-type="float" office:value="0.00335199991532136">
                <text:p>0.00335199991532136</text:p>
              </table:table-cell>
              <table:table-cell office:value-type="float" office:value="0.170000001788139">
                <text:p>0.170000001788139</text:p>
              </table:table-cell>
              <table:table-cell office:value-type="float" office:value="NaN">
                <text:p>NaN</text:p>
              </table:table-cell>
            </table:table-row>
            <table:table-row>
              <table:table-cell office:value-type="string">
                <text:p>840</text:p>
              </table:table-cell>
              <table:table-cell office:value-type="float" office:value="0.00335599991522031">
                <text:p>0.00335599991522031</text:p>
              </table:table-cell>
              <table:table-cell office:value-type="float" office:value="0.166000008583069">
                <text:p>0.166000008583069</text:p>
              </table:table-cell>
              <table:table-cell office:value-type="float" office:value="NaN">
                <text:p>NaN</text:p>
              </table:table-cell>
            </table:table-row>
            <table:table-row>
              <table:table-cell office:value-type="string">
                <text:p>841</text:p>
              </table:table-cell>
              <table:table-cell office:value-type="float" office:value="0.00335999991511926">
                <text:p>0.00335999991511926</text:p>
              </table:table-cell>
              <table:table-cell office:value-type="float" office:value="0.162000000476837">
                <text:p>0.162000000476837</text:p>
              </table:table-cell>
              <table:table-cell office:value-type="float" office:value="NaN">
                <text:p>NaN</text:p>
              </table:table-cell>
            </table:table-row>
            <table:table-row>
              <table:table-cell office:value-type="string">
                <text:p>842</text:p>
              </table:table-cell>
              <table:table-cell office:value-type="float" office:value="0.00336399991501821">
                <text:p>0.00336399991501821</text:p>
              </table:table-cell>
              <table:table-cell office:value-type="float" office:value="0.157000005245209">
                <text:p>0.157000005245209</text:p>
              </table:table-cell>
              <table:table-cell office:value-type="float" office:value="NaN">
                <text:p>NaN</text:p>
              </table:table-cell>
            </table:table-row>
            <table:table-row>
              <table:table-cell office:value-type="string">
                <text:p>843</text:p>
              </table:table-cell>
              <table:table-cell office:value-type="float" office:value="0.00336799991491716">
                <text:p>0.00336799991491716</text:p>
              </table:table-cell>
              <table:table-cell office:value-type="float" office:value="0.153999999165535">
                <text:p>0.153999999165535</text:p>
              </table:table-cell>
              <table:table-cell office:value-type="float" office:value="NaN">
                <text:p>NaN</text:p>
              </table:table-cell>
            </table:table-row>
            <table:table-row>
              <table:table-cell office:value-type="string">
                <text:p>844</text:p>
              </table:table-cell>
              <table:table-cell office:value-type="float" office:value="0.00337199991481612">
                <text:p>0.00337199991481612</text:p>
              </table:table-cell>
              <table:table-cell office:value-type="float" office:value="0.145999997854233">
                <text:p>0.145999997854233</text:p>
              </table:table-cell>
              <table:table-cell office:value-type="float" office:value="NaN">
                <text:p>NaN</text:p>
              </table:table-cell>
            </table:table-row>
            <table:table-row>
              <table:table-cell office:value-type="string">
                <text:p>845</text:p>
              </table:table-cell>
              <table:table-cell office:value-type="float" office:value="0.00337599991471507">
                <text:p>0.00337599991471507</text:p>
              </table:table-cell>
              <table:table-cell office:value-type="float" office:value="0.140000000596046">
                <text:p>0.140000000596046</text:p>
              </table:table-cell>
              <table:table-cell office:value-type="float" office:value="NaN">
                <text:p>NaN</text:p>
              </table:table-cell>
            </table:table-row>
            <table:table-row>
              <table:table-cell office:value-type="string">
                <text:p>846</text:p>
              </table:table-cell>
              <table:table-cell office:value-type="float" office:value="0.00337999991461402">
                <text:p>0.00337999991461402</text:p>
              </table:table-cell>
              <table:table-cell office:value-type="float" office:value="0.137999996542931">
                <text:p>0.137999996542931</text:p>
              </table:table-cell>
              <table:table-cell office:value-type="float" office:value="NaN">
                <text:p>NaN</text:p>
              </table:table-cell>
            </table:table-row>
            <table:table-row>
              <table:table-cell office:value-type="string">
                <text:p>847</text:p>
              </table:table-cell>
              <table:table-cell office:value-type="float" office:value="0.00338399991451297">
                <text:p>0.00338399991451297</text:p>
              </table:table-cell>
              <table:table-cell office:value-type="float" office:value="0.131999999284744">
                <text:p>0.131999999284744</text:p>
              </table:table-cell>
              <table:table-cell office:value-type="float" office:value="NaN">
                <text:p>NaN</text:p>
              </table:table-cell>
            </table:table-row>
            <table:table-row>
              <table:table-cell office:value-type="string">
                <text:p>848</text:p>
              </table:table-cell>
              <table:table-cell office:value-type="float" office:value="0.00338799991441192">
                <text:p>0.00338799991441192</text:p>
              </table:table-cell>
              <table:table-cell office:value-type="float" office:value="0.128000006079674">
                <text:p>0.128000006079674</text:p>
              </table:table-cell>
              <table:table-cell office:value-type="float" office:value="NaN">
                <text:p>NaN</text:p>
              </table:table-cell>
            </table:table-row>
            <table:table-row>
              <table:table-cell office:value-type="string">
                <text:p>849</text:p>
              </table:table-cell>
              <table:table-cell office:value-type="float" office:value="0.00339199991431087">
                <text:p>0.00339199991431087</text:p>
              </table:table-cell>
              <table:table-cell office:value-type="float" office:value="0.124000005424023">
                <text:p>0.124000005424023</text:p>
              </table:table-cell>
              <table:table-cell office:value-type="float" office:value="NaN">
                <text:p>NaN</text:p>
              </table:table-cell>
            </table:table-row>
            <table:table-row>
              <table:table-cell office:value-type="string">
                <text:p>850</text:p>
              </table:table-cell>
              <table:table-cell office:value-type="float" office:value="0.00339599991420982">
                <text:p>0.00339599991420982</text:p>
              </table:table-cell>
              <table:table-cell office:value-type="float" office:value="0.118000000715256">
                <text:p>0.118000000715256</text:p>
              </table:table-cell>
              <table:table-cell office:value-type="float" office:value="NaN">
                <text:p>NaN</text:p>
              </table:table-cell>
            </table:table-row>
            <table:table-row>
              <table:table-cell office:value-type="string">
                <text:p>851</text:p>
              </table:table-cell>
              <table:table-cell office:value-type="float" office:value="0.00339999991410878">
                <text:p>0.00339999991410878</text:p>
              </table:table-cell>
              <table:table-cell office:value-type="float" office:value="0.112000003457069">
                <text:p>0.112000003457069</text:p>
              </table:table-cell>
              <table:table-cell office:value-type="float" office:value="NaN">
                <text:p>NaN</text:p>
              </table:table-cell>
            </table:table-row>
            <table:table-row>
              <table:table-cell office:value-type="string">
                <text:p>852</text:p>
              </table:table-cell>
              <table:table-cell office:value-type="float" office:value="0.00340399991400773">
                <text:p>0.00340399991400773</text:p>
              </table:table-cell>
              <table:table-cell office:value-type="float" office:value="0.108000002801418">
                <text:p>0.108000002801418</text:p>
              </table:table-cell>
              <table:table-cell office:value-type="float" office:value="NaN">
                <text:p>NaN</text:p>
              </table:table-cell>
            </table:table-row>
            <table:table-row>
              <table:table-cell office:value-type="string">
                <text:p>853</text:p>
              </table:table-cell>
              <table:table-cell office:value-type="float" office:value="0.00340799991390668">
                <text:p>0.00340799991390668</text:p>
              </table:table-cell>
              <table:table-cell office:value-type="float" office:value="0.101999998092651">
                <text:p>0.101999998092651</text:p>
              </table:table-cell>
              <table:table-cell office:value-type="float" office:value="NaN">
                <text:p>NaN</text:p>
              </table:table-cell>
            </table:table-row>
            <table:table-row>
              <table:table-cell office:value-type="string">
                <text:p>854</text:p>
              </table:table-cell>
              <table:table-cell office:value-type="float" office:value="0.00341199991380563">
                <text:p>0.0034119999138056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855</text:p>
              </table:table-cell>
              <table:table-cell office:value-type="float" office:value="0.00341599991370458">
                <text:p>0.0034159999137045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856</text:p>
              </table:table-cell>
              <table:table-cell office:value-type="float" office:value="0.00341999991360353">
                <text:p>0.00341999991360353</text:p>
              </table:table-cell>
              <table:table-cell office:value-type="float" office:value="0.0879999995231628">
                <text:p>0.0879999995231628</text:p>
              </table:table-cell>
              <table:table-cell office:value-type="float" office:value="NaN">
                <text:p>NaN</text:p>
              </table:table-cell>
            </table:table-row>
            <table:table-row>
              <table:table-cell office:value-type="string">
                <text:p>857</text:p>
              </table:table-cell>
              <table:table-cell office:value-type="float" office:value="0.00342399991350248">
                <text:p>0.0034239999135024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58</text:p>
              </table:table-cell>
              <table:table-cell office:value-type="float" office:value="0.00342799991340144">
                <text:p>0.0034279999134014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859</text:p>
              </table:table-cell>
              <table:table-cell office:value-type="float" office:value="0.00343199991330039">
                <text:p>0.0034319999133003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60</text:p>
              </table:table-cell>
              <table:table-cell office:value-type="float" office:value="0.00343599991319934">
                <text:p>0.00343599991319934</text:p>
              </table:table-cell>
              <table:table-cell office:value-type="float" office:value="0.068000003695488">
                <text:p>0.068000003695488</text:p>
              </table:table-cell>
              <table:table-cell office:value-type="float" office:value="NaN">
                <text:p>NaN</text:p>
              </table:table-cell>
            </table:table-row>
            <table:table-row>
              <table:table-cell office:value-type="string">
                <text:p>861</text:p>
              </table:table-cell>
              <table:table-cell office:value-type="float" office:value="0.00343999991309829">
                <text:p>0.0034399999130982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62</text:p>
              </table:table-cell>
              <table:table-cell office:value-type="float" office:value="0.00344399991299724">
                <text:p>0.0034439999129972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863</text:p>
              </table:table-cell>
              <table:table-cell office:value-type="float" office:value="0.00344799991289619">
                <text:p>0.0034479999128961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864</text:p>
              </table:table-cell>
              <table:table-cell office:value-type="float" office:value="0.00345199991279515">
                <text:p>0.0034519999127951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65</text:p>
              </table:table-cell>
              <table:table-cell office:value-type="float" office:value="0.0034559999126941">
                <text:p>0.0034559999126941</text:p>
              </table:table-cell>
              <table:table-cell office:value-type="float" office:value="0.0419999994337559">
                <text:p>0.0419999994337559</text:p>
              </table:table-cell>
              <table:table-cell office:value-type="float" office:value="NaN">
                <text:p>NaN</text:p>
              </table:table-cell>
            </table:table-row>
            <table:table-row>
              <table:table-cell office:value-type="string">
                <text:p>866</text:p>
              </table:table-cell>
              <table:table-cell office:value-type="float" office:value="0.00345999991259305">
                <text:p>0.0034599999125930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867</text:p>
              </table:table-cell>
              <table:table-cell office:value-type="float" office:value="0.003463999912492">
                <text:p>0.00346399991249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868</text:p>
              </table:table-cell>
              <table:table-cell office:value-type="float" office:value="0.00346799991239095">
                <text:p>0.00346799991239095</text:p>
              </table:table-cell>
              <table:table-cell office:value-type="float" office:value="0.0300000011920929">
                <text:p>0.0300000011920929</text:p>
              </table:table-cell>
              <table:table-cell office:value-type="float" office:value="NaN">
                <text:p>NaN</text:p>
              </table:table-cell>
            </table:table-row>
            <table:table-row>
              <table:table-cell office:value-type="string">
                <text:p>869</text:p>
              </table:table-cell>
              <table:table-cell office:value-type="float" office:value="0.0034719999122899">
                <text:p>0.0034719999122899</text:p>
              </table:table-cell>
              <table:table-cell office:value-type="float" office:value="0.0219999998807907">
                <text:p>0.0219999998807907</text:p>
              </table:table-cell>
              <table:table-cell office:value-type="float" office:value="NaN">
                <text:p>NaN</text:p>
              </table:table-cell>
            </table:table-row>
            <table:table-row>
              <table:table-cell office:value-type="string">
                <text:p>870</text:p>
              </table:table-cell>
              <table:table-cell office:value-type="float" office:value="0.00347599991218885">
                <text:p>0.0034759999121888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871</text:p>
              </table:table-cell>
              <table:table-cell office:value-type="float" office:value="0.00347999991208781">
                <text:p>0.00347999991208781</text:p>
              </table:table-cell>
              <table:table-cell office:value-type="float" office:value="0.0150000005960464">
                <text:p>0.0150000005960464</text:p>
              </table:table-cell>
              <table:table-cell office:value-type="float" office:value="NaN">
                <text:p>NaN</text:p>
              </table:table-cell>
            </table:table-row>
            <table:table-row>
              <table:table-cell office:value-type="string">
                <text:p>872</text:p>
              </table:table-cell>
              <table:table-cell office:value-type="float" office:value="0.00348399991198676">
                <text:p>0.0034839999119867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873</text:p>
              </table:table-cell>
              <table:table-cell office:value-type="float" office:value="0.00348799991188571">
                <text:p>0.0034879999118857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4</text:p>
              </table:table-cell>
              <table:table-cell office:value-type="float" office:value="0.00349199991178466">
                <text:p>0.0034919999117846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875</text:p>
              </table:table-cell>
              <table:table-cell office:value-type="float" office:value="0.00349599991168361">
                <text:p>0.0034959999116836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6</text:p>
              </table:table-cell>
              <table:table-cell office:value-type="float" office:value="0.00349999991158256">
                <text:p>0.0034999999115825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877</text:p>
              </table:table-cell>
              <table:table-cell office:value-type="float" office:value="0.00350399991148151">
                <text:p>0.0035039999114815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878</text:p>
              </table:table-cell>
              <table:table-cell office:value-type="float" office:value="0.00350799991138047">
                <text:p>0.0035079999113804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879</text:p>
              </table:table-cell>
              <table:table-cell office:value-type="float" office:value="0.00351199991127942">
                <text:p>0.0035119999112794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880</text:p>
              </table:table-cell>
              <table:table-cell office:value-type="float" office:value="0.00351599991117837">
                <text:p>0.00351599991117837</text:p>
              </table:table-cell>
              <table:table-cell office:value-type="float" office:value="-0.0280000008642674">
                <text:p>-0.0280000008642674</text:p>
              </table:table-cell>
              <table:table-cell office:value-type="float" office:value="NaN">
                <text:p>NaN</text:p>
              </table:table-cell>
            </table:table-row>
            <table:table-row>
              <table:table-cell office:value-type="string">
                <text:p>881</text:p>
              </table:table-cell>
              <table:table-cell office:value-type="float" office:value="0.00351999991107732">
                <text:p>0.00351999991107732</text:p>
              </table:table-cell>
              <table:table-cell office:value-type="float" office:value="-0.034000001847744">
                <text:p>-0.034000001847744</text:p>
              </table:table-cell>
              <table:table-cell office:value-type="float" office:value="NaN">
                <text:p>NaN</text:p>
              </table:table-cell>
            </table:table-row>
            <table:table-row>
              <table:table-cell office:value-type="string">
                <text:p>882</text:p>
              </table:table-cell>
              <table:table-cell office:value-type="float" office:value="0.00352399991097627">
                <text:p>0.0035239999109762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883</text:p>
              </table:table-cell>
              <table:table-cell office:value-type="float" office:value="0.00352799991087522">
                <text:p>0.00352799991087522</text:p>
              </table:table-cell>
              <table:table-cell office:value-type="float" office:value="-0.0439999997615814">
                <text:p>-0.0439999997615814</text:p>
              </table:table-cell>
              <table:table-cell office:value-type="float" office:value="NaN">
                <text:p>NaN</text:p>
              </table:table-cell>
            </table:table-row>
            <table:table-row>
              <table:table-cell office:value-type="string">
                <text:p>884</text:p>
              </table:table-cell>
              <table:table-cell office:value-type="float" office:value="0.00353199991077418">
                <text:p>0.0035319999107741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85</text:p>
              </table:table-cell>
              <table:table-cell office:value-type="float" office:value="0.00353599991067313">
                <text:p>0.00353599991067313</text:p>
              </table:table-cell>
              <table:table-cell office:value-type="float" office:value="-0.0529999993741512">
                <text:p>-0.0529999993741512</text:p>
              </table:table-cell>
              <table:table-cell office:value-type="float" office:value="NaN">
                <text:p>NaN</text:p>
              </table:table-cell>
            </table:table-row>
            <table:table-row>
              <table:table-cell office:value-type="string">
                <text:p>886</text:p>
              </table:table-cell>
              <table:table-cell office:value-type="float" office:value="0.00353999991057208">
                <text:p>0.0035399999105720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887</text:p>
              </table:table-cell>
              <table:table-cell office:value-type="float" office:value="0.00354399991047103">
                <text:p>0.0035439999104710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88</text:p>
              </table:table-cell>
              <table:table-cell office:value-type="float" office:value="0.00354799991036998">
                <text:p>0.00354799991036998</text:p>
              </table:table-cell>
              <table:table-cell office:value-type="float" office:value="-0.068000003695488">
                <text:p>-0.068000003695488</text:p>
              </table:table-cell>
              <table:table-cell office:value-type="float" office:value="NaN">
                <text:p>NaN</text:p>
              </table:table-cell>
            </table:table-row>
            <table:table-row>
              <table:table-cell office:value-type="string">
                <text:p>889</text:p>
              </table:table-cell>
              <table:table-cell office:value-type="float" office:value="0.00355199991026893">
                <text:p>0.00355199991026893</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90</text:p>
              </table:table-cell>
              <table:table-cell office:value-type="float" office:value="0.00355599991016788">
                <text:p>0.00355599991016788</text:p>
              </table:table-cell>
              <table:table-cell office:value-type="float" office:value="-0.0759999975562096">
                <text:p>-0.0759999975562096</text:p>
              </table:table-cell>
              <table:table-cell office:value-type="float" office:value="NaN">
                <text:p>NaN</text:p>
              </table:table-cell>
            </table:table-row>
            <table:table-row>
              <table:table-cell office:value-type="string">
                <text:p>891</text:p>
              </table:table-cell>
              <table:table-cell office:value-type="float" office:value="0.00355999991006684">
                <text:p>0.0035599999100668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92</text:p>
              </table:table-cell>
              <table:table-cell office:value-type="float" office:value="0.00356399990996579">
                <text:p>0.0035639999099657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893</text:p>
              </table:table-cell>
              <table:table-cell office:value-type="float" office:value="0.00356799990986474">
                <text:p>0.0035679999098647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894</text:p>
              </table:table-cell>
              <table:table-cell office:value-type="float" office:value="0.00357199990976369">
                <text:p>0.00357199990976369</text:p>
              </table:table-cell>
              <table:table-cell office:value-type="float" office:value="-0.096000000834465">
                <text:p>-0.096000000834465</text:p>
              </table:table-cell>
              <table:table-cell office:value-type="float" office:value="NaN">
                <text:p>NaN</text:p>
              </table:table-cell>
            </table:table-row>
            <table:table-row>
              <table:table-cell office:value-type="string">
                <text:p>895</text:p>
              </table:table-cell>
              <table:table-cell office:value-type="float" office:value="0.00357599990966264">
                <text:p>0.00357599990966264</text:p>
              </table:table-cell>
              <table:table-cell office:value-type="float" office:value="-0.100000001490116">
                <text:p>-0.100000001490116</text:p>
              </table:table-cell>
              <table:table-cell office:value-type="float" office:value="NaN">
                <text:p>NaN</text:p>
              </table:table-cell>
            </table:table-row>
            <table:table-row>
              <table:table-cell office:value-type="string">
                <text:p>896</text:p>
              </table:table-cell>
              <table:table-cell office:value-type="float" office:value="0.00357999990956159">
                <text:p>0.00357999990956159</text:p>
              </table:table-cell>
              <table:table-cell office:value-type="float" office:value="-0.108000002801418">
                <text:p>-0.108000002801418</text:p>
              </table:table-cell>
              <table:table-cell office:value-type="float" office:value="NaN">
                <text:p>NaN</text:p>
              </table:table-cell>
            </table:table-row>
            <table:table-row>
              <table:table-cell office:value-type="string">
                <text:p>897</text:p>
              </table:table-cell>
              <table:table-cell office:value-type="float" office:value="0.00358399990946054">
                <text:p>0.00358399990946054</text:p>
              </table:table-cell>
              <table:table-cell office:value-type="float" office:value="-0.112000003457069">
                <text:p>-0.112000003457069</text:p>
              </table:table-cell>
              <table:table-cell office:value-type="float" office:value="NaN">
                <text:p>NaN</text:p>
              </table:table-cell>
            </table:table-row>
            <table:table-row>
              <table:table-cell office:value-type="string">
                <text:p>898</text:p>
              </table:table-cell>
              <table:table-cell office:value-type="float" office:value="0.0035879999093595">
                <text:p>0.0035879999093595</text:p>
              </table:table-cell>
              <table:table-cell office:value-type="float" office:value="-0.11600000411272">
                <text:p>-0.11600000411272</text:p>
              </table:table-cell>
              <table:table-cell office:value-type="float" office:value="NaN">
                <text:p>NaN</text:p>
              </table:table-cell>
            </table:table-row>
            <table:table-row>
              <table:table-cell office:value-type="string">
                <text:p>899</text:p>
              </table:table-cell>
              <table:table-cell office:value-type="float" office:value="0.00359199990925845">
                <text:p>0.00359199990925845</text:p>
              </table:table-cell>
              <table:table-cell office:value-type="float" office:value="-0.122000001370907">
                <text:p>-0.122000001370907</text:p>
              </table:table-cell>
              <table:table-cell office:value-type="float" office:value="NaN">
                <text:p>NaN</text:p>
              </table:table-cell>
            </table:table-row>
            <table:table-row>
              <table:table-cell office:value-type="string">
                <text:p>900</text:p>
              </table:table-cell>
              <table:table-cell office:value-type="float" office:value="0.0035959999091574">
                <text:p>0.0035959999091574</text:p>
              </table:table-cell>
              <table:table-cell office:value-type="float" office:value="-0.126000002026558">
                <text:p>-0.126000002026558</text:p>
              </table:table-cell>
              <table:table-cell office:value-type="float" office:value="NaN">
                <text:p>NaN</text:p>
              </table:table-cell>
            </table:table-row>
            <table:table-row>
              <table:table-cell office:value-type="string">
                <text:p>901</text:p>
              </table:table-cell>
              <table:table-cell office:value-type="float" office:value="0.00359999990905635">
                <text:p>0.00359999990905635</text:p>
              </table:table-cell>
              <table:table-cell office:value-type="float" office:value="-0.129999995231628">
                <text:p>-0.129999995231628</text:p>
              </table:table-cell>
              <table:table-cell office:value-type="float" office:value="NaN">
                <text:p>NaN</text:p>
              </table:table-cell>
            </table:table-row>
            <table:table-row>
              <table:table-cell office:value-type="string">
                <text:p>902</text:p>
              </table:table-cell>
              <table:table-cell office:value-type="float" office:value="0.0036039999089553">
                <text:p>0.0036039999089553</text:p>
              </table:table-cell>
              <table:table-cell office:value-type="float" office:value="-0.136000007390976">
                <text:p>-0.136000007390976</text:p>
              </table:table-cell>
              <table:table-cell office:value-type="float" office:value="NaN">
                <text:p>NaN</text:p>
              </table:table-cell>
            </table:table-row>
            <table:table-row>
              <table:table-cell office:value-type="string">
                <text:p>903</text:p>
              </table:table-cell>
              <table:table-cell office:value-type="float" office:value="0.00360799990885425">
                <text:p>0.00360799990885425</text:p>
              </table:table-cell>
              <table:table-cell office:value-type="float" office:value="-0.142000004649162">
                <text:p>-0.142000004649162</text:p>
              </table:table-cell>
              <table:table-cell office:value-type="float" office:value="NaN">
                <text:p>NaN</text:p>
              </table:table-cell>
            </table:table-row>
            <table:table-row>
              <table:table-cell office:value-type="string">
                <text:p>904</text:p>
              </table:table-cell>
              <table:table-cell office:value-type="float" office:value="0.00361199990875321">
                <text:p>0.00361199990875321</text:p>
              </table:table-cell>
              <table:table-cell office:value-type="float" office:value="-0.144999995827675">
                <text:p>-0.144999995827675</text:p>
              </table:table-cell>
              <table:table-cell office:value-type="float" office:value="NaN">
                <text:p>NaN</text:p>
              </table:table-cell>
            </table:table-row>
            <table:table-row>
              <table:table-cell office:value-type="string">
                <text:p>905</text:p>
              </table:table-cell>
              <table:table-cell office:value-type="float" office:value="0.00361599990865216">
                <text:p>0.00361599990865216</text:p>
              </table:table-cell>
              <table:table-cell office:value-type="float" office:value="-0.151999995112419">
                <text:p>-0.151999995112419</text:p>
              </table:table-cell>
              <table:table-cell office:value-type="float" office:value="NaN">
                <text:p>NaN</text:p>
              </table:table-cell>
            </table:table-row>
            <table:table-row>
              <table:table-cell office:value-type="string">
                <text:p>906</text:p>
              </table:table-cell>
              <table:table-cell office:value-type="float" office:value="0.00361999990855111">
                <text:p>0.00361999990855111</text:p>
              </table:table-cell>
              <table:table-cell office:value-type="float" office:value="-0.153999999165535">
                <text:p>-0.153999999165535</text:p>
              </table:table-cell>
              <table:table-cell office:value-type="float" office:value="NaN">
                <text:p>NaN</text:p>
              </table:table-cell>
            </table:table-row>
            <table:table-row>
              <table:table-cell office:value-type="string">
                <text:p>907</text:p>
              </table:table-cell>
              <table:table-cell office:value-type="float" office:value="0.00362399990845006">
                <text:p>0.00362399990845006</text:p>
              </table:table-cell>
              <table:table-cell office:value-type="float" office:value="-0.158000007271767">
                <text:p>-0.158000007271767</text:p>
              </table:table-cell>
              <table:table-cell office:value-type="float" office:value="NaN">
                <text:p>NaN</text:p>
              </table:table-cell>
            </table:table-row>
            <table:table-row>
              <table:table-cell office:value-type="string">
                <text:p>908</text:p>
              </table:table-cell>
              <table:table-cell office:value-type="float" office:value="0.00362799990834901">
                <text:p>0.00362799990834901</text:p>
              </table:table-cell>
              <table:table-cell office:value-type="float" office:value="-0.166999995708466">
                <text:p>-0.166999995708466</text:p>
              </table:table-cell>
              <table:table-cell office:value-type="float" office:value="NaN">
                <text:p>NaN</text:p>
              </table:table-cell>
            </table:table-row>
            <table:table-row>
              <table:table-cell office:value-type="string">
                <text:p>909</text:p>
              </table:table-cell>
              <table:table-cell office:value-type="float" office:value="0.00363199990824796">
                <text:p>0.00363199990824796</text:p>
              </table:table-cell>
              <table:table-cell office:value-type="float" office:value="-0.167999997735024">
                <text:p>-0.167999997735024</text:p>
              </table:table-cell>
              <table:table-cell office:value-type="float" office:value="NaN">
                <text:p>NaN</text:p>
              </table:table-cell>
            </table:table-row>
            <table:table-row>
              <table:table-cell office:value-type="string">
                <text:p>910</text:p>
              </table:table-cell>
              <table:table-cell office:value-type="float" office:value="0.00363599990814691">
                <text:p>0.00363599990814691</text:p>
              </table:table-cell>
              <table:table-cell office:value-type="float" office:value="-0.174000009894371">
                <text:p>-0.174000009894371</text:p>
              </table:table-cell>
              <table:table-cell office:value-type="float" office:value="NaN">
                <text:p>NaN</text:p>
              </table:table-cell>
            </table:table-row>
            <table:table-row>
              <table:table-cell office:value-type="string">
                <text:p>911</text:p>
              </table:table-cell>
              <table:table-cell office:value-type="float" office:value="0.00363999990804587">
                <text:p>0.00363999990804587</text:p>
              </table:table-cell>
              <table:table-cell office:value-type="float" office:value="-0.180000007152557">
                <text:p>-0.180000007152557</text:p>
              </table:table-cell>
              <table:table-cell office:value-type="float" office:value="NaN">
                <text:p>NaN</text:p>
              </table:table-cell>
            </table:table-row>
            <table:table-row>
              <table:table-cell office:value-type="string">
                <text:p>912</text:p>
              </table:table-cell>
              <table:table-cell office:value-type="float" office:value="0.00364399990794482">
                <text:p>0.00364399990794482</text:p>
              </table:table-cell>
              <table:table-cell office:value-type="float" office:value="-0.184000000357628">
                <text:p>-0.184000000357628</text:p>
              </table:table-cell>
              <table:table-cell office:value-type="float" office:value="NaN">
                <text:p>NaN</text:p>
              </table:table-cell>
            </table:table-row>
            <table:table-row>
              <table:table-cell office:value-type="string">
                <text:p>913</text:p>
              </table:table-cell>
              <table:table-cell office:value-type="float" office:value="0.00364799990784377">
                <text:p>0.00364799990784377</text:p>
              </table:table-cell>
              <table:table-cell office:value-type="float" office:value="-0.18800000846386">
                <text:p>-0.18800000846386</text:p>
              </table:table-cell>
              <table:table-cell office:value-type="float" office:value="NaN">
                <text:p>NaN</text:p>
              </table:table-cell>
            </table:table-row>
            <table:table-row>
              <table:table-cell office:value-type="string">
                <text:p>914</text:p>
              </table:table-cell>
              <table:table-cell office:value-type="float" office:value="0.00365199990774272">
                <text:p>0.00365199990774272</text:p>
              </table:table-cell>
              <table:table-cell office:value-type="float" office:value="-0.19200000166893">
                <text:p>-0.19200000166893</text:p>
              </table:table-cell>
              <table:table-cell office:value-type="float" office:value="NaN">
                <text:p>NaN</text:p>
              </table:table-cell>
            </table:table-row>
            <table:table-row>
              <table:table-cell office:value-type="string">
                <text:p>915</text:p>
              </table:table-cell>
              <table:table-cell office:value-type="float" office:value="0.00365599990764167">
                <text:p>0.00365599990764167</text:p>
              </table:table-cell>
              <table:table-cell office:value-type="float" office:value="-0.197999998927116">
                <text:p>-0.197999998927116</text:p>
              </table:table-cell>
              <table:table-cell office:value-type="float" office:value="NaN">
                <text:p>NaN</text:p>
              </table:table-cell>
            </table:table-row>
            <table:table-row>
              <table:table-cell office:value-type="string">
                <text:p>916</text:p>
              </table:table-cell>
              <table:table-cell office:value-type="float" office:value="0.00365999990754062">
                <text:p>0.00365999990754062</text:p>
              </table:table-cell>
              <table:table-cell office:value-type="float" office:value="-0.203000009059906">
                <text:p>-0.203000009059906</text:p>
              </table:table-cell>
              <table:table-cell office:value-type="float" office:value="NaN">
                <text:p>NaN</text:p>
              </table:table-cell>
            </table:table-row>
            <table:table-row>
              <table:table-cell office:value-type="string">
                <text:p>917</text:p>
              </table:table-cell>
              <table:table-cell office:value-type="float" office:value="0.00366399990743957">
                <text:p>0.00366399990743957</text:p>
              </table:table-cell>
              <table:table-cell office:value-type="float" office:value="-0.203999996185303">
                <text:p>-0.203999996185303</text:p>
              </table:table-cell>
              <table:table-cell office:value-type="float" office:value="NaN">
                <text:p>NaN</text:p>
              </table:table-cell>
            </table:table-row>
            <table:table-row>
              <table:table-cell office:value-type="string">
                <text:p>918</text:p>
              </table:table-cell>
              <table:table-cell office:value-type="float" office:value="0.00366799990733853">
                <text:p>0.00366799990733853</text:p>
              </table:table-cell>
              <table:table-cell office:value-type="float" office:value="-0.203999996185303">
                <text:p>-0.203999996185303</text:p>
              </table:table-cell>
              <table:table-cell office:value-type="float" office:value="NaN">
                <text:p>NaN</text:p>
              </table:table-cell>
            </table:table-row>
            <table:table-row>
              <table:table-cell office:value-type="string">
                <text:p>919</text:p>
              </table:table-cell>
              <table:table-cell office:value-type="float" office:value="0.00367199990723748">
                <text:p>0.0036719999072374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0</text:p>
              </table:table-cell>
              <table:table-cell office:value-type="float" office:value="0.00367599990713643">
                <text:p>0.0036759999071364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1</text:p>
              </table:table-cell>
              <table:table-cell office:value-type="float" office:value="0.00367999990703538">
                <text:p>0.0036799999070353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2</text:p>
              </table:table-cell>
              <table:table-cell office:value-type="float" office:value="0.00368399990693433">
                <text:p>0.0036839999069343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3</text:p>
              </table:table-cell>
              <table:table-cell office:value-type="float" office:value="0.00368799990683328">
                <text:p>0.003687999906833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4</text:p>
              </table:table-cell>
              <table:table-cell office:value-type="float" office:value="0.00369199990673224">
                <text:p>0.0036919999067322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5</text:p>
              </table:table-cell>
              <table:table-cell office:value-type="float" office:value="0.00369599990663119">
                <text:p>0.0036959999066311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6</text:p>
              </table:table-cell>
              <table:table-cell office:value-type="float" office:value="0.00369999990653014">
                <text:p>0.0036999999065301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7</text:p>
              </table:table-cell>
              <table:table-cell office:value-type="float" office:value="0.00370399990642909">
                <text:p>0.0037039999064290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8</text:p>
              </table:table-cell>
              <table:table-cell office:value-type="float" office:value="0.00370799990632804">
                <text:p>0.0037079999063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9</text:p>
              </table:table-cell>
              <table:table-cell office:value-type="float" office:value="0.00371199990622699">
                <text:p>0.0037119999062269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0</text:p>
              </table:table-cell>
              <table:table-cell office:value-type="float" office:value="0.00371599990612594">
                <text:p>0.00371599990612594</text:p>
              </table:table-cell>
              <table:table-cell office:value-type="float" office:value="-0.203999996185303">
                <text:p>-0.203999996185303</text:p>
              </table:table-cell>
              <table:table-cell office:value-type="float" office:value="NaN">
                <text:p>NaN</text:p>
              </table:table-cell>
            </table:table-row>
            <table:table-row>
              <table:table-cell office:value-type="string">
                <text:p>931</text:p>
              </table:table-cell>
              <table:table-cell office:value-type="float" office:value="0.0037199999060249">
                <text:p>0.003719999906024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2</text:p>
              </table:table-cell>
              <table:table-cell office:value-type="float" office:value="0.00372399990592385">
                <text:p>0.0037239999059238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3</text:p>
              </table:table-cell>
              <table:table-cell office:value-type="float" office:value="0.0037279999058228">
                <text:p>0.00372799990582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34</text:p>
              </table:table-cell>
              <table:table-cell office:value-type="float" office:value="0.00373199990572175">
                <text:p>0.0037319999057217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5</text:p>
              </table:table-cell>
              <table:table-cell office:value-type="float" office:value="0.0037359999056207">
                <text:p>0.00373599990562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36</text:p>
              </table:table-cell>
              <table:table-cell office:value-type="float" office:value="0.00373999990551965">
                <text:p>0.0037399999055196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7</text:p>
              </table:table-cell>
              <table:table-cell office:value-type="float" office:value="0.0037439999054186">
                <text:p>0.0037439999054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8</text:p>
              </table:table-cell>
              <table:table-cell office:value-type="float" office:value="0.00374799990531756">
                <text:p>0.0037479999053175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9</text:p>
              </table:table-cell>
              <table:table-cell office:value-type="float" office:value="0.00375199990521651">
                <text:p>0.0037519999052165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0</text:p>
              </table:table-cell>
              <table:table-cell office:value-type="float" office:value="0.00375599990511546">
                <text:p>0.0037559999051154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1</text:p>
              </table:table-cell>
              <table:table-cell office:value-type="float" office:value="0.00375999990501441">
                <text:p>0.0037599999050144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2</text:p>
              </table:table-cell>
              <table:table-cell office:value-type="float" office:value="0.00376399990491336">
                <text:p>0.0037639999049133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3</text:p>
              </table:table-cell>
              <table:table-cell office:value-type="float" office:value="0.00376799990481231">
                <text:p>0.0037679999048123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4</text:p>
              </table:table-cell>
              <table:table-cell office:value-type="float" office:value="0.00377199990471127">
                <text:p>0.0037719999047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5</text:p>
              </table:table-cell>
              <table:table-cell office:value-type="float" office:value="0.00377599990461022">
                <text:p>0.0037759999046102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6</text:p>
              </table:table-cell>
              <table:table-cell office:value-type="float" office:value="0.00377999990450917">
                <text:p>0.0037799999045091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7</text:p>
              </table:table-cell>
              <table:table-cell office:value-type="float" office:value="0.00378399990440812">
                <text:p>0.0037839999044081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8</text:p>
              </table:table-cell>
              <table:table-cell office:value-type="float" office:value="0.00378799990430707">
                <text:p>0.0037879999043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9</text:p>
              </table:table-cell>
              <table:table-cell office:value-type="float" office:value="0.00379199990420602">
                <text:p>0.00379199990420602</text:p>
              </table:table-cell>
              <table:table-cell office:value-type="float" office:value="-0.203999996185303">
                <text:p>-0.203999996185303</text:p>
              </table:table-cell>
              <table:table-cell office:value-type="float" office:value="NaN">
                <text:p>NaN</text:p>
              </table:table-cell>
            </table:table-row>
            <table:table-row>
              <table:table-cell office:value-type="string">
                <text:p>950</text:p>
              </table:table-cell>
              <table:table-cell office:value-type="float" office:value="0.00379599990410497">
                <text:p>0.00379599990410497</text:p>
              </table:table-cell>
              <table:table-cell office:value-type="float" office:value="-0.203999996185303">
                <text:p>-0.203999996185303</text:p>
              </table:table-cell>
              <table:table-cell office:value-type="float" office:value="NaN">
                <text:p>NaN</text:p>
              </table:table-cell>
            </table:table-row>
            <table:table-row>
              <table:table-cell office:value-type="string">
                <text:p>951</text:p>
              </table:table-cell>
              <table:table-cell office:value-type="float" office:value="0.00379999990400393">
                <text:p>0.0037999999040039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2</text:p>
              </table:table-cell>
              <table:table-cell office:value-type="float" office:value="0.00380399990390288">
                <text:p>0.0038039999039028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3</text:p>
              </table:table-cell>
              <table:table-cell office:value-type="float" office:value="0.00380799990380183">
                <text:p>0.0038079999038018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4</text:p>
              </table:table-cell>
              <table:table-cell office:value-type="float" office:value="0.00381199990370078">
                <text:p>0.0038119999037007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5</text:p>
              </table:table-cell>
              <table:table-cell office:value-type="float" office:value="0.00381599990359973">
                <text:p>0.0038159999035997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6</text:p>
              </table:table-cell>
              <table:table-cell office:value-type="float" office:value="0.00381999990349868">
                <text:p>0.0038199999034986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7</text:p>
              </table:table-cell>
              <table:table-cell office:value-type="float" office:value="0.00382399990339763">
                <text:p>0.0038239999033976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8</text:p>
              </table:table-cell>
              <table:table-cell office:value-type="float" office:value="0.00382799990329659">
                <text:p>0.00382799990329659</text:p>
              </table:table-cell>
              <table:table-cell office:value-type="float" office:value="-0.203999996185303">
                <text:p>-0.203999996185303</text:p>
              </table:table-cell>
              <table:table-cell office:value-type="float" office:value="NaN">
                <text:p>NaN</text:p>
              </table:table-cell>
            </table:table-row>
            <table:table-row>
              <table:table-cell office:value-type="string">
                <text:p>959</text:p>
              </table:table-cell>
              <table:table-cell office:value-type="float" office:value="0.00383199990319554">
                <text:p>0.00383199990319554</text:p>
              </table:table-cell>
              <table:table-cell office:value-type="float" office:value="-0.203999996185303">
                <text:p>-0.203999996185303</text:p>
              </table:table-cell>
              <table:table-cell office:value-type="float" office:value="NaN">
                <text:p>NaN</text:p>
              </table:table-cell>
            </table:table-row>
            <table:table-row>
              <table:table-cell office:value-type="string">
                <text:p>960</text:p>
              </table:table-cell>
              <table:table-cell office:value-type="float" office:value="0.00383599990309449">
                <text:p>0.00383599990309449</text:p>
              </table:table-cell>
              <table:table-cell office:value-type="float" office:value="-0.200000002980232">
                <text:p>-0.200000002980232</text:p>
              </table:table-cell>
              <table:table-cell office:value-type="float" office:value="NaN">
                <text:p>NaN</text:p>
              </table:table-cell>
            </table:table-row>
            <table:table-row>
              <table:table-cell office:value-type="string">
                <text:p>961</text:p>
              </table:table-cell>
              <table:table-cell office:value-type="float" office:value="0.00383999990299344">
                <text:p>0.00383999990299344</text:p>
              </table:table-cell>
              <table:table-cell office:value-type="float" office:value="-0.196000009775162">
                <text:p>-0.196000009775162</text:p>
              </table:table-cell>
              <table:table-cell office:value-type="float" office:value="NaN">
                <text:p>NaN</text:p>
              </table:table-cell>
            </table:table-row>
            <table:table-row>
              <table:table-cell office:value-type="string">
                <text:p>962</text:p>
              </table:table-cell>
              <table:table-cell office:value-type="float" office:value="0.00384399990289239">
                <text:p>0.00384399990289239</text:p>
              </table:table-cell>
              <table:table-cell office:value-type="float" office:value="-0.189999997615814">
                <text:p>-0.189999997615814</text:p>
              </table:table-cell>
              <table:table-cell office:value-type="float" office:value="NaN">
                <text:p>NaN</text:p>
              </table:table-cell>
            </table:table-row>
            <table:table-row>
              <table:table-cell office:value-type="string">
                <text:p>963</text:p>
              </table:table-cell>
              <table:table-cell office:value-type="float" office:value="0.00384799990279134">
                <text:p>0.00384799990279134</text:p>
              </table:table-cell>
              <table:table-cell office:value-type="float" office:value="-0.18800000846386">
                <text:p>-0.18800000846386</text:p>
              </table:table-cell>
              <table:table-cell office:value-type="float" office:value="NaN">
                <text:p>NaN</text:p>
              </table:table-cell>
            </table:table-row>
            <table:table-row>
              <table:table-cell office:value-type="string">
                <text:p>964</text:p>
              </table:table-cell>
              <table:table-cell office:value-type="float" office:value="0.0038519999026903">
                <text:p>0.0038519999026903</text:p>
              </table:table-cell>
              <table:table-cell office:value-type="float" office:value="-0.184000000357628">
                <text:p>-0.184000000357628</text:p>
              </table:table-cell>
              <table:table-cell office:value-type="float" office:value="NaN">
                <text:p>NaN</text:p>
              </table:table-cell>
            </table:table-row>
            <table:table-row>
              <table:table-cell office:value-type="string">
                <text:p>965</text:p>
              </table:table-cell>
              <table:table-cell office:value-type="float" office:value="0.00385599990258925">
                <text:p>0.00385599990258925</text:p>
              </table:table-cell>
              <table:table-cell office:value-type="float" office:value="-0.175999999046326">
                <text:p>-0.175999999046326</text:p>
              </table:table-cell>
              <table:table-cell office:value-type="float" office:value="NaN">
                <text:p>NaN</text:p>
              </table:table-cell>
            </table:table-row>
            <table:table-row>
              <table:table-cell office:value-type="string">
                <text:p>966</text:p>
              </table:table-cell>
              <table:table-cell office:value-type="float" office:value="0.0038599999024882">
                <text:p>0.0038599999024882</text:p>
              </table:table-cell>
              <table:table-cell office:value-type="float" office:value="-0.170000001788139">
                <text:p>-0.170000001788139</text:p>
              </table:table-cell>
              <table:table-cell office:value-type="float" office:value="NaN">
                <text:p>NaN</text:p>
              </table:table-cell>
            </table:table-row>
            <table:table-row>
              <table:table-cell office:value-type="string">
                <text:p>967</text:p>
              </table:table-cell>
              <table:table-cell office:value-type="float" office:value="0.00386399990238715">
                <text:p>0.00386399990238715</text:p>
              </table:table-cell>
              <table:table-cell office:value-type="float" office:value="-0.166999995708466">
                <text:p>-0.166999995708466</text:p>
              </table:table-cell>
              <table:table-cell office:value-type="float" office:value="NaN">
                <text:p>NaN</text:p>
              </table:table-cell>
            </table:table-row>
            <table:table-row>
              <table:table-cell office:value-type="string">
                <text:p>968</text:p>
              </table:table-cell>
              <table:table-cell office:value-type="float" office:value="0.0038679999022861">
                <text:p>0.0038679999022861</text:p>
              </table:table-cell>
              <table:table-cell office:value-type="float" office:value="-0.159999996423721">
                <text:p>-0.159999996423721</text:p>
              </table:table-cell>
              <table:table-cell office:value-type="float" office:value="NaN">
                <text:p>NaN</text:p>
              </table:table-cell>
            </table:table-row>
            <table:table-row>
              <table:table-cell office:value-type="string">
                <text:p>969</text:p>
              </table:table-cell>
              <table:table-cell office:value-type="float" office:value="0.00387199990218505">
                <text:p>0.00387199990218505</text:p>
              </table:table-cell>
              <table:table-cell office:value-type="float" office:value="-0.156000003218651">
                <text:p>-0.156000003218651</text:p>
              </table:table-cell>
              <table:table-cell office:value-type="float" office:value="NaN">
                <text:p>NaN</text:p>
              </table:table-cell>
            </table:table-row>
            <table:table-row>
              <table:table-cell office:value-type="string">
                <text:p>970</text:p>
              </table:table-cell>
              <table:table-cell office:value-type="float" office:value="0.003875999902084">
                <text:p>0.003875999902084</text:p>
              </table:table-cell>
              <table:table-cell office:value-type="float" office:value="-0.151999995112419">
                <text:p>-0.151999995112419</text:p>
              </table:table-cell>
              <table:table-cell office:value-type="float" office:value="NaN">
                <text:p>NaN</text:p>
              </table:table-cell>
            </table:table-row>
            <table:table-row>
              <table:table-cell office:value-type="string">
                <text:p>971</text:p>
              </table:table-cell>
              <table:table-cell office:value-type="float" office:value="0.00387999990198296">
                <text:p>0.00387999990198296</text:p>
              </table:table-cell>
              <table:table-cell office:value-type="float" office:value="-0.148000001907349">
                <text:p>-0.148000001907349</text:p>
              </table:table-cell>
              <table:table-cell office:value-type="float" office:value="NaN">
                <text:p>NaN</text:p>
              </table:table-cell>
            </table:table-row>
            <table:table-row>
              <table:table-cell office:value-type="string">
                <text:p>972</text:p>
              </table:table-cell>
              <table:table-cell office:value-type="float" office:value="0.00388399990188191">
                <text:p>0.00388399990188191</text:p>
              </table:table-cell>
              <table:table-cell office:value-type="float" office:value="-0.144000008702278">
                <text:p>-0.144000008702278</text:p>
              </table:table-cell>
              <table:table-cell office:value-type="float" office:value="NaN">
                <text:p>NaN</text:p>
              </table:table-cell>
            </table:table-row>
            <table:table-row>
              <table:table-cell office:value-type="string">
                <text:p>973</text:p>
              </table:table-cell>
              <table:table-cell office:value-type="float" office:value="0.00388799990178086">
                <text:p>0.00388799990178086</text:p>
              </table:table-cell>
              <table:table-cell office:value-type="float" office:value="-0.137999996542931">
                <text:p>-0.137999996542931</text:p>
              </table:table-cell>
              <table:table-cell office:value-type="float" office:value="NaN">
                <text:p>NaN</text:p>
              </table:table-cell>
            </table:table-row>
            <table:table-row>
              <table:table-cell office:value-type="string">
                <text:p>974</text:p>
              </table:table-cell>
              <table:table-cell office:value-type="float" office:value="0.00389199990167981">
                <text:p>0.00389199990167981</text:p>
              </table:table-cell>
              <table:table-cell office:value-type="float" office:value="-0.136000007390976">
                <text:p>-0.136000007390976</text:p>
              </table:table-cell>
              <table:table-cell office:value-type="float" office:value="NaN">
                <text:p>NaN</text:p>
              </table:table-cell>
            </table:table-row>
            <table:table-row>
              <table:table-cell office:value-type="string">
                <text:p>975</text:p>
              </table:table-cell>
              <table:table-cell office:value-type="float" office:value="0.00389599990157876">
                <text:p>0.00389599990157876</text:p>
              </table:table-cell>
              <table:table-cell office:value-type="float" office:value="-0.128000006079674">
                <text:p>-0.128000006079674</text:p>
              </table:table-cell>
              <table:table-cell office:value-type="float" office:value="NaN">
                <text:p>NaN</text:p>
              </table:table-cell>
            </table:table-row>
            <table:table-row>
              <table:table-cell office:value-type="string">
                <text:p>976</text:p>
              </table:table-cell>
              <table:table-cell office:value-type="float" office:value="0.00389999990147771">
                <text:p>0.00389999990147771</text:p>
              </table:table-cell>
              <table:table-cell office:value-type="float" office:value="-0.126000002026558">
                <text:p>-0.126000002026558</text:p>
              </table:table-cell>
              <table:table-cell office:value-type="float" office:value="NaN">
                <text:p>NaN</text:p>
              </table:table-cell>
            </table:table-row>
            <table:table-row>
              <table:table-cell office:value-type="string">
                <text:p>977</text:p>
              </table:table-cell>
              <table:table-cell office:value-type="float" office:value="0.00390399990137666">
                <text:p>0.00390399990137666</text:p>
              </table:table-cell>
              <table:table-cell office:value-type="float" office:value="-0.119000002741814">
                <text:p>-0.119000002741814</text:p>
              </table:table-cell>
              <table:table-cell office:value-type="float" office:value="NaN">
                <text:p>NaN</text:p>
              </table:table-cell>
            </table:table-row>
            <table:table-row>
              <table:table-cell office:value-type="string">
                <text:p>978</text:p>
              </table:table-cell>
              <table:table-cell office:value-type="float" office:value="0.00390799990127562">
                <text:p>0.00390799990127562</text:p>
              </table:table-cell>
              <table:table-cell office:value-type="float" office:value="-0.114000000059605">
                <text:p>-0.114000000059605</text:p>
              </table:table-cell>
              <table:table-cell office:value-type="float" office:value="NaN">
                <text:p>NaN</text:p>
              </table:table-cell>
            </table:table-row>
            <table:table-row>
              <table:table-cell office:value-type="string">
                <text:p>979</text:p>
              </table:table-cell>
              <table:table-cell office:value-type="float" office:value="0.00391199990117457">
                <text:p>0.00391199990117457</text:p>
              </table:table-cell>
              <table:table-cell office:value-type="float" office:value="-0.109999999403954">
                <text:p>-0.109999999403954</text:p>
              </table:table-cell>
              <table:table-cell office:value-type="float" office:value="NaN">
                <text:p>NaN</text:p>
              </table:table-cell>
            </table:table-row>
            <table:table-row>
              <table:table-cell office:value-type="string">
                <text:p>980</text:p>
              </table:table-cell>
              <table:table-cell office:value-type="float" office:value="0.00391599990107352">
                <text:p>0.00391599990107352</text:p>
              </table:table-cell>
              <table:table-cell office:value-type="float" office:value="-0.104000002145767">
                <text:p>-0.104000002145767</text:p>
              </table:table-cell>
              <table:table-cell office:value-type="float" office:value="NaN">
                <text:p>NaN</text:p>
              </table:table-cell>
            </table:table-row>
            <table:table-row>
              <table:table-cell office:value-type="string">
                <text:p>981</text:p>
              </table:table-cell>
              <table:table-cell office:value-type="float" office:value="0.00391999990097247">
                <text:p>0.0039199999009724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982</text:p>
              </table:table-cell>
              <table:table-cell office:value-type="float" office:value="0.00392399990087142">
                <text:p>0.00392399990087142</text:p>
              </table:table-cell>
              <table:table-cell office:value-type="float" office:value="-0.096000000834465">
                <text:p>-0.096000000834465</text:p>
              </table:table-cell>
              <table:table-cell office:value-type="float" office:value="NaN">
                <text:p>NaN</text:p>
              </table:table-cell>
            </table:table-row>
            <table:table-row>
              <table:table-cell office:value-type="string">
                <text:p>983</text:p>
              </table:table-cell>
              <table:table-cell office:value-type="float" office:value="0.00392799990077037">
                <text:p>0.00392799990077037</text:p>
              </table:table-cell>
              <table:table-cell office:value-type="float" office:value="-0.0900000035762787">
                <text:p>-0.0900000035762787</text:p>
              </table:table-cell>
              <table:table-cell office:value-type="float" office:value="NaN">
                <text:p>NaN</text:p>
              </table:table-cell>
            </table:table-row>
            <table:table-row>
              <table:table-cell office:value-type="string">
                <text:p>984</text:p>
              </table:table-cell>
              <table:table-cell office:value-type="float" office:value="0.00393199990066933">
                <text:p>0.0039319999006693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985</text:p>
              </table:table-cell>
              <table:table-cell office:value-type="float" office:value="0.00393599990056828">
                <text:p>0.0039359999005682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986</text:p>
              </table:table-cell>
              <table:table-cell office:value-type="float" office:value="0.00393999990046723">
                <text:p>0.003939999900467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987</text:p>
              </table:table-cell>
              <table:table-cell office:value-type="float" office:value="0.00394399990036618">
                <text:p>0.0039439999003661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988</text:p>
              </table:table-cell>
              <table:table-cell office:value-type="float" office:value="0.00394799990026513">
                <text:p>0.0039479999002651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989</text:p>
              </table:table-cell>
              <table:table-cell office:value-type="float" office:value="0.00395199990016408">
                <text:p>0.0039519999001640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990</text:p>
              </table:table-cell>
              <table:table-cell office:value-type="float" office:value="0.00395599990006303">
                <text:p>0.0039559999000630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991</text:p>
              </table:table-cell>
              <table:table-cell office:value-type="float" office:value="0.00395999989996199">
                <text:p>0.0039599998999619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992</text:p>
              </table:table-cell>
              <table:table-cell office:value-type="float" office:value="0.00396399989986094">
                <text:p>0.0039639998998609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993</text:p>
              </table:table-cell>
              <table:table-cell office:value-type="float" office:value="0.00396799989975989">
                <text:p>0.003967999899759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994</text:p>
              </table:table-cell>
              <table:table-cell office:value-type="float" office:value="0.00397199989965884">
                <text:p>0.0039719998996588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995</text:p>
              </table:table-cell>
              <table:table-cell office:value-type="float" office:value="0.00397599989955779">
                <text:p>0.0039759998995577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996</text:p>
              </table:table-cell>
              <table:table-cell office:value-type="float" office:value="0.00397999989945674">
                <text:p>0.00397999989945674</text:p>
              </table:table-cell>
              <table:table-cell office:value-type="float" office:value="-0.0270000007003546">
                <text:p>-0.0270000007003546</text:p>
              </table:table-cell>
              <table:table-cell office:value-type="float" office:value="NaN">
                <text:p>NaN</text:p>
              </table:table-cell>
            </table:table-row>
            <table:table-row>
              <table:table-cell office:value-type="string">
                <text:p>997</text:p>
              </table:table-cell>
              <table:table-cell office:value-type="float" office:value="0.00398399989935569">
                <text:p>0.00398399989935569</text:p>
              </table:table-cell>
              <table:table-cell office:value-type="float" office:value="-0.0240000002086163">
                <text:p>-0.0240000002086163</text:p>
              </table:table-cell>
              <table:table-cell office:value-type="float" office:value="NaN">
                <text:p>NaN</text:p>
              </table:table-cell>
            </table:table-row>
            <table:table-row>
              <table:table-cell office:value-type="string">
                <text:p>998</text:p>
              </table:table-cell>
              <table:table-cell office:value-type="float" office:value="0.00398799989925465">
                <text:p>0.00398799989925465</text:p>
              </table:table-cell>
              <table:table-cell office:value-type="float" office:value="-0.0180000010877848">
                <text:p>-0.0180000010877848</text:p>
              </table:table-cell>
              <table:table-cell office:value-type="float" office:value="NaN">
                <text:p>NaN</text:p>
              </table:table-cell>
            </table:table-row>
            <table:table-row>
              <table:table-cell office:value-type="string">
                <text:p>999</text:p>
              </table:table-cell>
              <table:table-cell office:value-type="float" office:value="0.0039919998991536">
                <text:p>0.003991999899153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000</text:p>
              </table:table-cell>
              <table:table-cell office:value-type="float" office:value="0.00399599989905255">
                <text:p>0.0039959998990525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1</text:p>
              </table:table-cell>
              <table:table-cell office:value-type="float" office:value="0.0039999998989515">
                <text:p>0.0039999998989515</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1002</text:p>
              </table:table-cell>
              <table:table-cell office:value-type="float" office:value="0.00400399989885045">
                <text:p>0.00400399989885045</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003</text:p>
              </table:table-cell>
              <table:table-cell office:value-type="float" office:value="0.0040079998987494">
                <text:p>0.004007999898749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4</text:p>
              </table:table-cell>
              <table:table-cell office:value-type="float" office:value="0.00401199989864836">
                <text:p>0.0040119998986483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005</text:p>
              </table:table-cell>
              <table:table-cell office:value-type="float" office:value="0.00401599989854731">
                <text:p>0.0040159998985473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006</text:p>
              </table:table-cell>
              <table:table-cell office:value-type="float" office:value="0.00401999989844626">
                <text:p>0.0040199998984462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007</text:p>
              </table:table-cell>
              <table:table-cell office:value-type="float" office:value="0.00402399989834521">
                <text:p>0.00402399989834521</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008</text:p>
              </table:table-cell>
              <table:table-cell office:value-type="float" office:value="0.00402799989824416">
                <text:p>0.0040279998982441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009</text:p>
              </table:table-cell>
              <table:table-cell office:value-type="float" office:value="0.00403199989814311">
                <text:p>0.0040319998981431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010</text:p>
              </table:table-cell>
              <table:table-cell office:value-type="float" office:value="0.00403599989804206">
                <text:p>0.00403599989804206</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011</text:p>
              </table:table-cell>
              <table:table-cell office:value-type="float" office:value="0.00403999989794102">
                <text:p>0.00403999989794102</text:p>
              </table:table-cell>
              <table:table-cell office:value-type="float" office:value="0.046000000089407">
                <text:p>0.046000000089407</text:p>
              </table:table-cell>
              <table:table-cell office:value-type="float" office:value="NaN">
                <text:p>NaN</text:p>
              </table:table-cell>
            </table:table-row>
            <table:table-row>
              <table:table-cell office:value-type="string">
                <text:p>1012</text:p>
              </table:table-cell>
              <table:table-cell office:value-type="float" office:value="0.00404399989783997">
                <text:p>0.0040439998978399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13</text:p>
              </table:table-cell>
              <table:table-cell office:value-type="float" office:value="0.00404799989773892">
                <text:p>0.00404799989773892</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014</text:p>
              </table:table-cell>
              <table:table-cell office:value-type="float" office:value="0.00405199989763787">
                <text:p>0.0040519998976378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015</text:p>
              </table:table-cell>
              <table:table-cell office:value-type="float" office:value="0.00405599989753682">
                <text:p>0.00405599989753682</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016</text:p>
              </table:table-cell>
              <table:table-cell office:value-type="float" office:value="0.00405999989743577">
                <text:p>0.00405999989743577</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017</text:p>
              </table:table-cell>
              <table:table-cell office:value-type="float" office:value="0.00406399989733472">
                <text:p>0.0040639998973347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018</text:p>
              </table:table-cell>
              <table:table-cell office:value-type="float" office:value="0.00406799989723368">
                <text:p>0.0040679998972336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19</text:p>
              </table:table-cell>
              <table:table-cell office:value-type="float" office:value="0.00407199989713263">
                <text:p>0.0040719998971326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020</text:p>
              </table:table-cell>
              <table:table-cell office:value-type="float" office:value="0.00407599989703158">
                <text:p>0.0040759998970315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21</text:p>
              </table:table-cell>
              <table:table-cell office:value-type="float" office:value="0.00407999989693053">
                <text:p>0.00407999989693053</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022</text:p>
              </table:table-cell>
              <table:table-cell office:value-type="float" office:value="0.00408399989682948">
                <text:p>0.00408399989682948</text:p>
              </table:table-cell>
              <table:table-cell office:value-type="float" office:value="0.100000001490116">
                <text:p>0.100000001490116</text:p>
              </table:table-cell>
              <table:table-cell office:value-type="float" office:value="NaN">
                <text:p>NaN</text:p>
              </table:table-cell>
            </table:table-row>
            <table:table-row>
              <table:table-cell office:value-type="string">
                <text:p>1023</text:p>
              </table:table-cell>
              <table:table-cell office:value-type="float" office:value="0.00408799989672843">
                <text:p>0.00408799989672843</text:p>
              </table:table-cell>
              <table:table-cell office:value-type="float" office:value="0.104000002145767">
                <text:p>0.104000002145767</text:p>
              </table:table-cell>
              <table:table-cell office:value-type="float" office:value="NaN">
                <text:p>NaN</text:p>
              </table:table-cell>
            </table:table-row>
            <table:table-row>
              <table:table-cell office:value-type="string">
                <text:p>1024</text:p>
              </table:table-cell>
              <table:table-cell office:value-type="float" office:value="0.00409199989662739">
                <text:p>0.00409199989662739</text:p>
              </table:table-cell>
              <table:table-cell office:value-type="float" office:value="0.109000004827976">
                <text:p>0.109000004827976</text:p>
              </table:table-cell>
              <table:table-cell office:value-type="float" office:value="NaN">
                <text:p>NaN</text:p>
              </table:table-cell>
            </table:table-row>
            <table:table-row>
              <table:table-cell office:value-type="string">
                <text:p>1025</text:p>
              </table:table-cell>
              <table:table-cell office:value-type="float" office:value="0.00409599989652634">
                <text:p>0.00409599989652634</text:p>
              </table:table-cell>
              <table:table-cell office:value-type="float" office:value="0.112000003457069">
                <text:p>0.112000003457069</text:p>
              </table:table-cell>
              <table:table-cell office:value-type="float" office:value="NaN">
                <text:p>NaN</text:p>
              </table:table-cell>
            </table:table-row>
            <table:table-row>
              <table:table-cell office:value-type="string">
                <text:p>1026</text:p>
              </table:table-cell>
              <table:table-cell office:value-type="float" office:value="0.00409999989642529">
                <text:p>0.00409999989642529</text:p>
              </table:table-cell>
              <table:table-cell office:value-type="float" office:value="0.11600000411272">
                <text:p>0.11600000411272</text:p>
              </table:table-cell>
              <table:table-cell office:value-type="float" office:value="NaN">
                <text:p>NaN</text:p>
              </table:table-cell>
            </table:table-row>
            <table:table-row>
              <table:table-cell office:value-type="string">
                <text:p>1027</text:p>
              </table:table-cell>
              <table:table-cell office:value-type="float" office:value="0.00410399989632424">
                <text:p>0.00410399989632424</text:p>
              </table:table-cell>
              <table:table-cell office:value-type="float" office:value="0.124000005424023">
                <text:p>0.124000005424023</text:p>
              </table:table-cell>
              <table:table-cell office:value-type="float" office:value="NaN">
                <text:p>NaN</text:p>
              </table:table-cell>
            </table:table-row>
            <table:table-row>
              <table:table-cell office:value-type="string">
                <text:p>1028</text:p>
              </table:table-cell>
              <table:table-cell office:value-type="float" office:value="0.00410799989622319">
                <text:p>0.00410799989622319</text:p>
              </table:table-cell>
              <table:table-cell office:value-type="float" office:value="0.129999995231628">
                <text:p>0.129999995231628</text:p>
              </table:table-cell>
              <table:table-cell office:value-type="float" office:value="NaN">
                <text:p>NaN</text:p>
              </table:table-cell>
            </table:table-row>
            <table:table-row>
              <table:table-cell office:value-type="string">
                <text:p>1029</text:p>
              </table:table-cell>
              <table:table-cell office:value-type="float" office:value="0.00411199989612214">
                <text:p>0.00411199989612214</text:p>
              </table:table-cell>
              <table:table-cell office:value-type="float" office:value="0.136000007390976">
                <text:p>0.136000007390976</text:p>
              </table:table-cell>
              <table:table-cell office:value-type="float" office:value="NaN">
                <text:p>NaN</text:p>
              </table:table-cell>
            </table:table-row>
            <table:table-row>
              <table:table-cell office:value-type="string">
                <text:p>1030</text:p>
              </table:table-cell>
              <table:table-cell office:value-type="float" office:value="0.00411599989602109">
                <text:p>0.00411599989602109</text:p>
              </table:table-cell>
              <table:table-cell office:value-type="float" office:value="0.137999996542931">
                <text:p>0.137999996542931</text:p>
              </table:table-cell>
              <table:table-cell office:value-type="float" office:value="NaN">
                <text:p>NaN</text:p>
              </table:table-cell>
            </table:table-row>
            <table:table-row>
              <table:table-cell office:value-type="string">
                <text:p>1031</text:p>
              </table:table-cell>
              <table:table-cell office:value-type="float" office:value="0.00411999989592005">
                <text:p>0.00411999989592005</text:p>
              </table:table-cell>
              <table:table-cell office:value-type="float" office:value="0.142000004649162">
                <text:p>0.142000004649162</text:p>
              </table:table-cell>
              <table:table-cell office:value-type="float" office:value="NaN">
                <text:p>NaN</text:p>
              </table:table-cell>
            </table:table-row>
            <table:table-row>
              <table:table-cell office:value-type="string">
                <text:p>1032</text:p>
              </table:table-cell>
              <table:table-cell office:value-type="float" office:value="0.004123999895819">
                <text:p>0.004123999895819</text:p>
              </table:table-cell>
              <table:table-cell office:value-type="float" office:value="0.150000005960464">
                <text:p>0.150000005960464</text:p>
              </table:table-cell>
              <table:table-cell office:value-type="float" office:value="NaN">
                <text:p>NaN</text:p>
              </table:table-cell>
            </table:table-row>
            <table:table-row>
              <table:table-cell office:value-type="string">
                <text:p>1033</text:p>
              </table:table-cell>
              <table:table-cell office:value-type="float" office:value="0.00412799989571795">
                <text:p>0.00412799989571795</text:p>
              </table:table-cell>
              <table:table-cell office:value-type="float" office:value="0.153999999165535">
                <text:p>0.153999999165535</text:p>
              </table:table-cell>
              <table:table-cell office:value-type="float" office:value="NaN">
                <text:p>NaN</text:p>
              </table:table-cell>
            </table:table-row>
            <table:table-row>
              <table:table-cell office:value-type="string">
                <text:p>1034</text:p>
              </table:table-cell>
              <table:table-cell office:value-type="float" office:value="0.0041319998956169">
                <text:p>0.0041319998956169</text:p>
              </table:table-cell>
              <table:table-cell office:value-type="float" office:value="0.157000005245209">
                <text:p>0.157000005245209</text:p>
              </table:table-cell>
              <table:table-cell office:value-type="float" office:value="NaN">
                <text:p>NaN</text:p>
              </table:table-cell>
            </table:table-row>
            <table:table-row>
              <table:table-cell office:value-type="string">
                <text:p>1035</text:p>
              </table:table-cell>
              <table:table-cell office:value-type="float" office:value="0.00413599989551585">
                <text:p>0.00413599989551585</text:p>
              </table:table-cell>
              <table:table-cell office:value-type="float" office:value="0.164000004529953">
                <text:p>0.164000004529953</text:p>
              </table:table-cell>
              <table:table-cell office:value-type="float" office:value="NaN">
                <text:p>NaN</text:p>
              </table:table-cell>
            </table:table-row>
            <table:table-row>
              <table:table-cell office:value-type="string">
                <text:p>1036</text:p>
              </table:table-cell>
              <table:table-cell office:value-type="float" office:value="0.0041399998954148">
                <text:p>0.004139999895414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37</text:p>
              </table:table-cell>
              <table:table-cell office:value-type="float" office:value="0.00414399989531375">
                <text:p>0.00414399989531375</text:p>
              </table:table-cell>
              <table:table-cell office:value-type="float" office:value="0.170000001788139">
                <text:p>0.170000001788139</text:p>
              </table:table-cell>
              <table:table-cell office:value-type="float" office:value="NaN">
                <text:p>NaN</text:p>
              </table:table-cell>
            </table:table-row>
            <table:table-row>
              <table:table-cell office:value-type="string">
                <text:p>1038</text:p>
              </table:table-cell>
              <table:table-cell office:value-type="float" office:value="0.00414799989521271">
                <text:p>0.00414799989521271</text:p>
              </table:table-cell>
              <table:table-cell office:value-type="float" office:value="0.179000005125999">
                <text:p>0.179000005125999</text:p>
              </table:table-cell>
              <table:table-cell office:value-type="float" office:value="NaN">
                <text:p>NaN</text:p>
              </table:table-cell>
            </table:table-row>
            <table:table-row>
              <table:table-cell office:value-type="string">
                <text:p>1039</text:p>
              </table:table-cell>
              <table:table-cell office:value-type="float" office:value="0.00415199989511166">
                <text:p>0.00415199989511166</text:p>
              </table:table-cell>
              <table:table-cell office:value-type="float" office:value="0.181999996304512">
                <text:p>0.181999996304512</text:p>
              </table:table-cell>
              <table:table-cell office:value-type="float" office:value="NaN">
                <text:p>NaN</text:p>
              </table:table-cell>
            </table:table-row>
            <table:table-row>
              <table:table-cell office:value-type="string">
                <text:p>1040</text:p>
              </table:table-cell>
              <table:table-cell office:value-type="float" office:value="0.00415599989501061">
                <text:p>0.00415599989501061</text:p>
              </table:table-cell>
              <table:table-cell office:value-type="float" office:value="0.186000004410744">
                <text:p>0.186000004410744</text:p>
              </table:table-cell>
              <table:table-cell office:value-type="float" office:value="NaN">
                <text:p>NaN</text:p>
              </table:table-cell>
            </table:table-row>
            <table:table-row>
              <table:table-cell office:value-type="string">
                <text:p>1041</text:p>
              </table:table-cell>
              <table:table-cell office:value-type="float" office:value="0.00415999989490956">
                <text:p>0.00415999989490956</text:p>
              </table:table-cell>
              <table:table-cell office:value-type="float" office:value="0.194000005722046">
                <text:p>0.194000005722046</text:p>
              </table:table-cell>
              <table:table-cell office:value-type="float" office:value="NaN">
                <text:p>NaN</text:p>
              </table:table-cell>
            </table:table-row>
            <table:table-row>
              <table:table-cell office:value-type="string">
                <text:p>1042</text:p>
              </table:table-cell>
              <table:table-cell office:value-type="float" office:value="0.00416399989480851">
                <text:p>0.00416399989480851</text:p>
              </table:table-cell>
              <table:table-cell office:value-type="float" office:value="0.196000009775162">
                <text:p>0.196000009775162</text:p>
              </table:table-cell>
              <table:table-cell office:value-type="float" office:value="NaN">
                <text:p>NaN</text:p>
              </table:table-cell>
            </table:table-row>
            <table:table-row>
              <table:table-cell office:value-type="string">
                <text:p>1043</text:p>
              </table:table-cell>
              <table:table-cell office:value-type="float" office:value="0.00416799989470746">
                <text:p>0.0041679998947074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4</text:p>
              </table:table-cell>
              <table:table-cell office:value-type="float" office:value="0.00417199989460642">
                <text:p>0.004171999894606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5</text:p>
              </table:table-cell>
              <table:table-cell office:value-type="float" office:value="0.00417599989450537">
                <text:p>0.004175999894505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6</text:p>
              </table:table-cell>
              <table:table-cell office:value-type="float" office:value="0.00417999989440432">
                <text:p>0.004179999894404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7</text:p>
              </table:table-cell>
              <table:table-cell office:value-type="float" office:value="0.00418399989430327">
                <text:p>0.004183999894303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8</text:p>
              </table:table-cell>
              <table:table-cell office:value-type="float" office:value="0.00418799989420222">
                <text:p>0.004187999894202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9</text:p>
              </table:table-cell>
              <table:table-cell office:value-type="float" office:value="0.00419199989410117">
                <text:p>0.004191999894101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0</text:p>
              </table:table-cell>
              <table:table-cell office:value-type="float" office:value="0.00419599989400012">
                <text:p>0.00419599989400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1</text:p>
              </table:table-cell>
              <table:table-cell office:value-type="float" office:value="0.00419999989389908">
                <text:p>0.004199999893899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2</text:p>
              </table:table-cell>
              <table:table-cell office:value-type="float" office:value="0.00420399989379803">
                <text:p>0.004203999893798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3</text:p>
              </table:table-cell>
              <table:table-cell office:value-type="float" office:value="0.00420799989369698">
                <text:p>0.004207999893696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4</text:p>
              </table:table-cell>
              <table:table-cell office:value-type="float" office:value="0.00421199989359593">
                <text:p>0.004211999893595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5</text:p>
              </table:table-cell>
              <table:table-cell office:value-type="float" office:value="0.00421599989349488">
                <text:p>0.004215999893494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6</text:p>
              </table:table-cell>
              <table:table-cell office:value-type="float" office:value="0.00421999989339383">
                <text:p>0.0042199998933938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7</text:p>
              </table:table-cell>
              <table:table-cell office:value-type="float" office:value="0.00422399989329278">
                <text:p>0.0042239998932927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8</text:p>
              </table:table-cell>
              <table:table-cell office:value-type="float" office:value="0.00422799989319174">
                <text:p>0.0042279998931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9</text:p>
              </table:table-cell>
              <table:table-cell office:value-type="float" office:value="0.00423199989309069">
                <text:p>0.0042319998930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0</text:p>
              </table:table-cell>
              <table:table-cell office:value-type="float" office:value="0.00423599989298964">
                <text:p>0.0042359998929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1</text:p>
              </table:table-cell>
              <table:table-cell office:value-type="float" office:value="0.00423999989288859">
                <text:p>0.004239999892888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2</text:p>
              </table:table-cell>
              <table:table-cell office:value-type="float" office:value="0.00424399989278754">
                <text:p>0.0042439998927875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3</text:p>
              </table:table-cell>
              <table:table-cell office:value-type="float" office:value="0.00424799989268649">
                <text:p>0.0042479998926864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4</text:p>
              </table:table-cell>
              <table:table-cell office:value-type="float" office:value="0.00425199989258545">
                <text:p>0.0042519998925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5</text:p>
              </table:table-cell>
              <table:table-cell office:value-type="float" office:value="0.0042559998924844">
                <text:p>0.0042559998924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6</text:p>
              </table:table-cell>
              <table:table-cell office:value-type="float" office:value="0.00425999989238335">
                <text:p>0.0042599998923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7</text:p>
              </table:table-cell>
              <table:table-cell office:value-type="float" office:value="0.0042639998922823">
                <text:p>0.0042639998922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8</text:p>
              </table:table-cell>
              <table:table-cell office:value-type="float" office:value="0.00426799989218125">
                <text:p>0.0042679998921812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9</text:p>
              </table:table-cell>
              <table:table-cell office:value-type="float" office:value="0.0042719998920802">
                <text:p>0.004271999892080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0</text:p>
              </table:table-cell>
              <table:table-cell office:value-type="float" office:value="0.00427599989197915">
                <text:p>0.00427599989197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1</text:p>
              </table:table-cell>
              <table:table-cell office:value-type="float" office:value="0.00427999989187811">
                <text:p>0.0042799998918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2</text:p>
              </table:table-cell>
              <table:table-cell office:value-type="float" office:value="0.00428399989177706">
                <text:p>0.0042839998917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3</text:p>
              </table:table-cell>
              <table:table-cell office:value-type="float" office:value="0.00428799989167601">
                <text:p>0.0042879998916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4</text:p>
              </table:table-cell>
              <table:table-cell office:value-type="float" office:value="0.00429199989157496">
                <text:p>0.0042919998915749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5</text:p>
              </table:table-cell>
              <table:table-cell office:value-type="float" office:value="0.00429599989147391">
                <text:p>0.0042959998914739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6</text:p>
              </table:table-cell>
              <table:table-cell office:value-type="float" office:value="0.00429999989137286">
                <text:p>0.0042999998913728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7</text:p>
              </table:table-cell>
              <table:table-cell office:value-type="float" office:value="0.00430399989127181">
                <text:p>0.004303999891271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8</text:p>
              </table:table-cell>
              <table:table-cell office:value-type="float" office:value="0.00430799989117077">
                <text:p>0.0043079998911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9</text:p>
              </table:table-cell>
              <table:table-cell office:value-type="float" office:value="0.00431199989106972">
                <text:p>0.0043119998910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0</text:p>
              </table:table-cell>
              <table:table-cell office:value-type="float" office:value="0.00431599989096867">
                <text:p>0.0043159998909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1</text:p>
              </table:table-cell>
              <table:table-cell office:value-type="float" office:value="0.00431999989086762">
                <text:p>0.0043199998908676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2</text:p>
              </table:table-cell>
              <table:table-cell office:value-type="float" office:value="0.00432399989076657">
                <text:p>0.0043239998907665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3</text:p>
              </table:table-cell>
              <table:table-cell office:value-type="float" office:value="0.00432799989066552">
                <text:p>0.004327999890665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4</text:p>
              </table:table-cell>
              <table:table-cell office:value-type="float" office:value="0.00433199989056448">
                <text:p>0.0043319998905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5</text:p>
              </table:table-cell>
              <table:table-cell office:value-type="float" office:value="0.00433599989046343">
                <text:p>0.00433599989046343</text:p>
              </table:table-cell>
              <table:table-cell office:value-type="float" office:value="0.196000009775162">
                <text:p>0.196000009775162</text:p>
              </table:table-cell>
              <table:table-cell office:value-type="float" office:value="NaN">
                <text:p>NaN</text:p>
              </table:table-cell>
            </table:table-row>
            <table:table-row>
              <table:table-cell office:value-type="string">
                <text:p>1086</text:p>
              </table:table-cell>
              <table:table-cell office:value-type="float" office:value="0.00433999989036238">
                <text:p>0.00433999989036238</text:p>
              </table:table-cell>
              <table:table-cell office:value-type="float" office:value="0.186000004410744">
                <text:p>0.186000004410744</text:p>
              </table:table-cell>
              <table:table-cell office:value-type="float" office:value="NaN">
                <text:p>NaN</text:p>
              </table:table-cell>
            </table:table-row>
            <table:table-row>
              <table:table-cell office:value-type="string">
                <text:p>1087</text:p>
              </table:table-cell>
              <table:table-cell office:value-type="float" office:value="0.00434399989026133">
                <text:p>0.00434399989026133</text:p>
              </table:table-cell>
              <table:table-cell office:value-type="float" office:value="0.181999996304512">
                <text:p>0.181999996304512</text:p>
              </table:table-cell>
              <table:table-cell office:value-type="float" office:value="NaN">
                <text:p>NaN</text:p>
              </table:table-cell>
            </table:table-row>
            <table:table-row>
              <table:table-cell office:value-type="string">
                <text:p>1088</text:p>
              </table:table-cell>
              <table:table-cell office:value-type="float" office:value="0.00434799989016028">
                <text:p>0.00434799989016028</text:p>
              </table:table-cell>
              <table:table-cell office:value-type="float" office:value="0.179000005125999">
                <text:p>0.179000005125999</text:p>
              </table:table-cell>
              <table:table-cell office:value-type="float" office:value="NaN">
                <text:p>NaN</text:p>
              </table:table-cell>
            </table:table-row>
            <table:table-row>
              <table:table-cell office:value-type="string">
                <text:p>1089</text:p>
              </table:table-cell>
              <table:table-cell office:value-type="float" office:value="0.00435199989005923">
                <text:p>0.00435199989005923</text:p>
              </table:table-cell>
              <table:table-cell office:value-type="float" office:value="0.174000009894371">
                <text:p>0.174000009894371</text:p>
              </table:table-cell>
              <table:table-cell office:value-type="float" office:value="NaN">
                <text:p>NaN</text:p>
              </table:table-cell>
            </table:table-row>
            <table:table-row>
              <table:table-cell office:value-type="string">
                <text:p>1090</text:p>
              </table:table-cell>
              <table:table-cell office:value-type="float" office:value="0.00435599988995818">
                <text:p>0.0043559998899581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91</text:p>
              </table:table-cell>
              <table:table-cell office:value-type="float" office:value="0.00435999988985714">
                <text:p>0.00435999988985714</text:p>
              </table:table-cell>
              <table:table-cell office:value-type="float" office:value="0.166000008583069">
                <text:p>0.166000008583069</text:p>
              </table:table-cell>
              <table:table-cell office:value-type="float" office:value="NaN">
                <text:p>NaN</text:p>
              </table:table-cell>
            </table:table-row>
            <table:table-row>
              <table:table-cell office:value-type="string">
                <text:p>1092</text:p>
              </table:table-cell>
              <table:table-cell office:value-type="float" office:value="0.00436399988975609">
                <text:p>0.00436399988975609</text:p>
              </table:table-cell>
              <table:table-cell office:value-type="float" office:value="0.159999996423721">
                <text:p>0.159999996423721</text:p>
              </table:table-cell>
              <table:table-cell office:value-type="float" office:value="NaN">
                <text:p>NaN</text:p>
              </table:table-cell>
            </table:table-row>
            <table:table-row>
              <table:table-cell office:value-type="string">
                <text:p>1093</text:p>
              </table:table-cell>
              <table:table-cell office:value-type="float" office:value="0.00436799988965504">
                <text:p>0.00436799988965504</text:p>
              </table:table-cell>
              <table:table-cell office:value-type="float" office:value="0.156000003218651">
                <text:p>0.156000003218651</text:p>
              </table:table-cell>
              <table:table-cell office:value-type="float" office:value="NaN">
                <text:p>NaN</text:p>
              </table:table-cell>
            </table:table-row>
            <table:table-row>
              <table:table-cell office:value-type="string">
                <text:p>1094</text:p>
              </table:table-cell>
              <table:table-cell office:value-type="float" office:value="0.00437199988955399">
                <text:p>0.00437199988955399</text:p>
              </table:table-cell>
              <table:table-cell office:value-type="float" office:value="0.151999995112419">
                <text:p>0.151999995112419</text:p>
              </table:table-cell>
              <table:table-cell office:value-type="float" office:value="NaN">
                <text:p>NaN</text:p>
              </table:table-cell>
            </table:table-row>
            <table:table-row>
              <table:table-cell office:value-type="string">
                <text:p>1095</text:p>
              </table:table-cell>
              <table:table-cell office:value-type="float" office:value="0.00437599988945294">
                <text:p>0.00437599988945294</text:p>
              </table:table-cell>
              <table:table-cell office:value-type="float" office:value="0.144000008702278">
                <text:p>0.144000008702278</text:p>
              </table:table-cell>
              <table:table-cell office:value-type="float" office:value="NaN">
                <text:p>NaN</text:p>
              </table:table-cell>
            </table:table-row>
            <table:table-row>
              <table:table-cell office:value-type="string">
                <text:p>1096</text:p>
              </table:table-cell>
              <table:table-cell office:value-type="float" office:value="0.00437999988935189">
                <text:p>0.00437999988935189</text:p>
              </table:table-cell>
              <table:table-cell office:value-type="float" office:value="0.140000000596046">
                <text:p>0.140000000596046</text:p>
              </table:table-cell>
              <table:table-cell office:value-type="float" office:value="NaN">
                <text:p>NaN</text:p>
              </table:table-cell>
            </table:table-row>
            <table:table-row>
              <table:table-cell office:value-type="string">
                <text:p>1097</text:p>
              </table:table-cell>
              <table:table-cell office:value-type="float" office:value="0.00438399988925084">
                <text:p>0.00438399988925084</text:p>
              </table:table-cell>
              <table:table-cell office:value-type="float" office:value="0.137999996542931">
                <text:p>0.137999996542931</text:p>
              </table:table-cell>
              <table:table-cell office:value-type="float" office:value="NaN">
                <text:p>NaN</text:p>
              </table:table-cell>
            </table:table-row>
            <table:table-row>
              <table:table-cell office:value-type="string">
                <text:p>1098</text:p>
              </table:table-cell>
              <table:table-cell office:value-type="float" office:value="0.0043879998891498">
                <text:p>0.0043879998891498</text:p>
              </table:table-cell>
              <table:table-cell office:value-type="float" office:value="0.130999997258186">
                <text:p>0.130999997258186</text:p>
              </table:table-cell>
              <table:table-cell office:value-type="float" office:value="NaN">
                <text:p>NaN</text:p>
              </table:table-cell>
            </table:table-row>
            <table:table-row>
              <table:table-cell office:value-type="string">
                <text:p>1099</text:p>
              </table:table-cell>
              <table:table-cell office:value-type="float" office:value="0.00439199988904875">
                <text:p>0.00439199988904875</text:p>
              </table:table-cell>
              <table:table-cell office:value-type="float" office:value="0.124000005424023">
                <text:p>0.124000005424023</text:p>
              </table:table-cell>
              <table:table-cell office:value-type="float" office:value="NaN">
                <text:p>NaN</text:p>
              </table:table-cell>
            </table:table-row>
            <table:table-row>
              <table:table-cell office:value-type="string">
                <text:p>1100</text:p>
              </table:table-cell>
              <table:table-cell office:value-type="float" office:value="0.0043959998889477">
                <text:p>0.0043959998889477</text:p>
              </table:table-cell>
              <table:table-cell office:value-type="float" office:value="0.122000001370907">
                <text:p>0.122000001370907</text:p>
              </table:table-cell>
              <table:table-cell office:value-type="float" office:value="NaN">
                <text:p>NaN</text:p>
              </table:table-cell>
            </table:table-row>
            <table:table-row>
              <table:table-cell office:value-type="string">
                <text:p>1101</text:p>
              </table:table-cell>
              <table:table-cell office:value-type="float" office:value="0.00439999988884665">
                <text:p>0.00439999988884665</text:p>
              </table:table-cell>
              <table:table-cell office:value-type="float" office:value="0.11600000411272">
                <text:p>0.11600000411272</text:p>
              </table:table-cell>
              <table:table-cell office:value-type="float" office:value="NaN">
                <text:p>NaN</text:p>
              </table:table-cell>
            </table:table-row>
            <table:table-row>
              <table:table-cell office:value-type="string">
                <text:p>1102</text:p>
              </table:table-cell>
              <table:table-cell office:value-type="float" office:value="0.0044039998887456">
                <text:p>0.0044039998887456</text:p>
              </table:table-cell>
              <table:table-cell office:value-type="float" office:value="0.109999999403954">
                <text:p>0.109999999403954</text:p>
              </table:table-cell>
              <table:table-cell office:value-type="float" office:value="NaN">
                <text:p>NaN</text:p>
              </table:table-cell>
            </table:table-row>
            <table:table-row>
              <table:table-cell office:value-type="string">
                <text:p>1103</text:p>
              </table:table-cell>
              <table:table-cell office:value-type="float" office:value="0.00440799988864455">
                <text:p>0.00440799988864455</text:p>
              </table:table-cell>
              <table:table-cell office:value-type="float" office:value="0.105999998748302">
                <text:p>0.105999998748302</text:p>
              </table:table-cell>
              <table:table-cell office:value-type="float" office:value="NaN">
                <text:p>NaN</text:p>
              </table:table-cell>
            </table:table-row>
            <table:table-row>
              <table:table-cell office:value-type="string">
                <text:p>1104</text:p>
              </table:table-cell>
              <table:table-cell office:value-type="float" office:value="0.00441199988854351">
                <text:p>0.00441199988854351</text:p>
              </table:table-cell>
              <table:table-cell office:value-type="float" office:value="0.101999998092651">
                <text:p>0.101999998092651</text:p>
              </table:table-cell>
              <table:table-cell office:value-type="float" office:value="NaN">
                <text:p>NaN</text:p>
              </table:table-cell>
            </table:table-row>
            <table:table-row>
              <table:table-cell office:value-type="string">
                <text:p>1105</text:p>
              </table:table-cell>
              <table:table-cell office:value-type="float" office:value="0.00441599988844246">
                <text:p>0.0044159998884424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106</text:p>
              </table:table-cell>
              <table:table-cell office:value-type="float" office:value="0.00441999988834141">
                <text:p>0.00441999988834141</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107</text:p>
              </table:table-cell>
              <table:table-cell office:value-type="float" office:value="0.00442399988824036">
                <text:p>0.0044239998882403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108</text:p>
              </table:table-cell>
              <table:table-cell office:value-type="float" office:value="0.00442799988813931">
                <text:p>0.0044279998881393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109</text:p>
              </table:table-cell>
              <table:table-cell office:value-type="float" office:value="0.00443199988803826">
                <text:p>0.0044319998880382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10</text:p>
              </table:table-cell>
              <table:table-cell office:value-type="float" office:value="0.00443599988793722">
                <text:p>0.00443599988793722</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11</text:p>
              </table:table-cell>
              <table:table-cell office:value-type="float" office:value="0.00443999988783617">
                <text:p>0.00443999988783617</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112</text:p>
              </table:table-cell>
              <table:table-cell office:value-type="float" office:value="0.00444399988773512">
                <text:p>0.0044439998877351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113</text:p>
              </table:table-cell>
              <table:table-cell office:value-type="float" office:value="0.00444799988763407">
                <text:p>0.00444799988763407</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14</text:p>
              </table:table-cell>
              <table:table-cell office:value-type="float" office:value="0.00445199988753302">
                <text:p>0.00445199988753302</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115</text:p>
              </table:table-cell>
              <table:table-cell office:value-type="float" office:value="0.00445599988743197">
                <text:p>0.00445599988743197</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116</text:p>
              </table:table-cell>
              <table:table-cell office:value-type="float" office:value="0.00445999988733092">
                <text:p>0.00445999988733092</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117</text:p>
              </table:table-cell>
              <table:table-cell office:value-type="float" office:value="0.00446399988722987">
                <text:p>0.0044639998872298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118</text:p>
              </table:table-cell>
              <table:table-cell office:value-type="float" office:value="0.00446799988712883">
                <text:p>0.00446799988712883</text:p>
              </table:table-cell>
              <table:table-cell office:value-type="float" office:value="0.034000001847744">
                <text:p>0.034000001847744</text:p>
              </table:table-cell>
              <table:table-cell office:value-type="float" office:value="NaN">
                <text:p>NaN</text:p>
              </table:table-cell>
            </table:table-row>
            <table:table-row>
              <table:table-cell office:value-type="string">
                <text:p>1119</text:p>
              </table:table-cell>
              <table:table-cell office:value-type="float" office:value="0.00447199988702778">
                <text:p>0.0044719998870277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20</text:p>
              </table:table-cell>
              <table:table-cell office:value-type="float" office:value="0.00447599988692673">
                <text:p>0.00447599988692673</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21</text:p>
              </table:table-cell>
              <table:table-cell office:value-type="float" office:value="0.00447999988682568">
                <text:p>0.00447999988682568</text:p>
              </table:table-cell>
              <table:table-cell office:value-type="float" office:value="0.017000000923872">
                <text:p>0.017000000923872</text:p>
              </table:table-cell>
              <table:table-cell office:value-type="float" office:value="NaN">
                <text:p>NaN</text:p>
              </table:table-cell>
            </table:table-row>
            <table:table-row>
              <table:table-cell office:value-type="string">
                <text:p>1122</text:p>
              </table:table-cell>
              <table:table-cell office:value-type="float" office:value="0.00448399988672463">
                <text:p>0.0044839998867246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123</text:p>
              </table:table-cell>
              <table:table-cell office:value-type="float" office:value="0.00448799988662358">
                <text:p>0.00448799988662358</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4</text:p>
              </table:table-cell>
              <table:table-cell office:value-type="float" office:value="0.00449199988652254">
                <text:p>0.00449199988652254</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125</text:p>
              </table:table-cell>
              <table:table-cell office:value-type="float" office:value="0.00449599988642149">
                <text:p>0.00449599988642149</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126</text:p>
              </table:table-cell>
              <table:table-cell office:value-type="float" office:value="0.00449999988632044">
                <text:p>0.0044999998863204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127</text:p>
              </table:table-cell>
              <table:table-cell office:value-type="float" office:value="0.00450399988621939">
                <text:p>0.0045039998862193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8</text:p>
              </table:table-cell>
              <table:table-cell office:value-type="float" office:value="0.00450799988611834">
                <text:p>0.0045079998861183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129</text:p>
              </table:table-cell>
              <table:table-cell office:value-type="float" office:value="0.00451199988601729">
                <text:p>0.0045119998860172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30</text:p>
              </table:table-cell>
              <table:table-cell office:value-type="float" office:value="0.00451599988591625">
                <text:p>0.0045159998859162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31</text:p>
              </table:table-cell>
              <table:table-cell office:value-type="float" office:value="0.0045199998858152">
                <text:p>0.004519999885815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32</text:p>
              </table:table-cell>
              <table:table-cell office:value-type="float" office:value="0.00452399988571415">
                <text:p>0.0045239998857141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33</text:p>
              </table:table-cell>
              <table:table-cell office:value-type="float" office:value="0.0045279998856131">
                <text:p>0.0045279998856131</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134</text:p>
              </table:table-cell>
              <table:table-cell office:value-type="float" office:value="0.00453199988551205">
                <text:p>0.00453199988551205</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35</text:p>
              </table:table-cell>
              <table:table-cell office:value-type="float" office:value="0.004535999885411">
                <text:p>0.004535999885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6</text:p>
              </table:table-cell>
              <table:table-cell office:value-type="float" office:value="0.00453999988530995">
                <text:p>0.0045399998853099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37</text:p>
              </table:table-cell>
              <table:table-cell office:value-type="float" office:value="0.0045439998852089">
                <text:p>0.0045439998852089</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38</text:p>
              </table:table-cell>
              <table:table-cell office:value-type="float" office:value="0.00454799988510786">
                <text:p>0.0045479998851078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39</text:p>
              </table:table-cell>
              <table:table-cell office:value-type="float" office:value="0.00455199988500681">
                <text:p>0.0045519998850068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40</text:p>
              </table:table-cell>
              <table:table-cell office:value-type="float" office:value="0.00455599988490576">
                <text:p>0.0045559998849057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141</text:p>
              </table:table-cell>
              <table:table-cell office:value-type="float" office:value="0.00455999988480471">
                <text:p>0.0045599998848047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42</text:p>
              </table:table-cell>
              <table:table-cell office:value-type="float" office:value="0.00456399988470366">
                <text:p>0.0045639998847036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143</text:p>
              </table:table-cell>
              <table:table-cell office:value-type="float" office:value="0.00456799988460261">
                <text:p>0.00456799988460261</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144</text:p>
              </table:table-cell>
              <table:table-cell office:value-type="float" office:value="0.00457199988450157">
                <text:p>0.00457199988450157</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145</text:p>
              </table:table-cell>
              <table:table-cell office:value-type="float" office:value="0.00457599988440052">
                <text:p>0.00457599988440052</text:p>
              </table:table-cell>
              <table:table-cell office:value-type="float" office:value="-0.097000002861023">
                <text:p>-0.097000002861023</text:p>
              </table:table-cell>
              <table:table-cell office:value-type="float" office:value="NaN">
                <text:p>NaN</text:p>
              </table:table-cell>
            </table:table-row>
            <table:table-row>
              <table:table-cell office:value-type="string">
                <text:p>1146</text:p>
              </table:table-cell>
              <table:table-cell office:value-type="float" office:value="0.00457999988429947">
                <text:p>0.00457999988429947</text:p>
              </table:table-cell>
              <table:table-cell office:value-type="float" office:value="-0.104000002145767">
                <text:p>-0.104000002145767</text:p>
              </table:table-cell>
              <table:table-cell office:value-type="float" office:value="NaN">
                <text:p>NaN</text:p>
              </table:table-cell>
            </table:table-row>
            <table:table-row>
              <table:table-cell office:value-type="string">
                <text:p>1147</text:p>
              </table:table-cell>
              <table:table-cell office:value-type="float" office:value="0.00458399988419842">
                <text:p>0.00458399988419842</text:p>
              </table:table-cell>
              <table:table-cell office:value-type="float" office:value="-0.108000002801418">
                <text:p>-0.108000002801418</text:p>
              </table:table-cell>
              <table:table-cell office:value-type="float" office:value="NaN">
                <text:p>NaN</text:p>
              </table:table-cell>
            </table:table-row>
            <table:table-row>
              <table:table-cell office:value-type="string">
                <text:p>1148</text:p>
              </table:table-cell>
              <table:table-cell office:value-type="float" office:value="0.00458799988409737">
                <text:p>0.00458799988409737</text:p>
              </table:table-cell>
              <table:table-cell office:value-type="float" office:value="-0.112000003457069">
                <text:p>-0.112000003457069</text:p>
              </table:table-cell>
              <table:table-cell office:value-type="float" office:value="NaN">
                <text:p>NaN</text:p>
              </table:table-cell>
            </table:table-row>
            <table:table-row>
              <table:table-cell office:value-type="string">
                <text:p>1149</text:p>
              </table:table-cell>
              <table:table-cell office:value-type="float" office:value="0.00459199988399632">
                <text:p>0.00459199988399632</text:p>
              </table:table-cell>
              <table:table-cell office:value-type="float" office:value="-0.118000000715256">
                <text:p>-0.118000000715256</text:p>
              </table:table-cell>
              <table:table-cell office:value-type="float" office:value="NaN">
                <text:p>NaN</text:p>
              </table:table-cell>
            </table:table-row>
            <table:table-row>
              <table:table-cell office:value-type="string">
                <text:p>1150</text:p>
              </table:table-cell>
              <table:table-cell office:value-type="float" office:value="0.00459599988389528">
                <text:p>0.00459599988389528</text:p>
              </table:table-cell>
              <table:table-cell office:value-type="float" office:value="-0.124000005424023">
                <text:p>-0.124000005424023</text:p>
              </table:table-cell>
              <table:table-cell office:value-type="float" office:value="NaN">
                <text:p>NaN</text:p>
              </table:table-cell>
            </table:table-row>
            <table:table-row>
              <table:table-cell office:value-type="string">
                <text:p>1151</text:p>
              </table:table-cell>
              <table:table-cell office:value-type="float" office:value="0.00459999988379423">
                <text:p>0.00459999988379423</text:p>
              </table:table-cell>
              <table:table-cell office:value-type="float" office:value="-0.128000006079674">
                <text:p>-0.128000006079674</text:p>
              </table:table-cell>
              <table:table-cell office:value-type="float" office:value="NaN">
                <text:p>NaN</text:p>
              </table:table-cell>
            </table:table-row>
            <table:table-row>
              <table:table-cell office:value-type="string">
                <text:p>1152</text:p>
              </table:table-cell>
              <table:table-cell office:value-type="float" office:value="0.00460399988369318">
                <text:p>0.00460399988369318</text:p>
              </table:table-cell>
              <table:table-cell office:value-type="float" office:value="-0.13400000333786">
                <text:p>-0.13400000333786</text:p>
              </table:table-cell>
              <table:table-cell office:value-type="float" office:value="NaN">
                <text:p>NaN</text:p>
              </table:table-cell>
            </table:table-row>
            <table:table-row>
              <table:table-cell office:value-type="string">
                <text:p>1153</text:p>
              </table:table-cell>
              <table:table-cell office:value-type="float" office:value="0.00460799988359213">
                <text:p>0.00460799988359213</text:p>
              </table:table-cell>
              <table:table-cell office:value-type="float" office:value="-0.137999996542931">
                <text:p>-0.137999996542931</text:p>
              </table:table-cell>
              <table:table-cell office:value-type="float" office:value="NaN">
                <text:p>NaN</text:p>
              </table:table-cell>
            </table:table-row>
            <table:table-row>
              <table:table-cell office:value-type="string">
                <text:p>1154</text:p>
              </table:table-cell>
              <table:table-cell office:value-type="float" office:value="0.00461199988349108">
                <text:p>0.00461199988349108</text:p>
              </table:table-cell>
              <table:table-cell office:value-type="float" office:value="-0.142000004649162">
                <text:p>-0.142000004649162</text:p>
              </table:table-cell>
              <table:table-cell office:value-type="float" office:value="NaN">
                <text:p>NaN</text:p>
              </table:table-cell>
            </table:table-row>
            <table:table-row>
              <table:table-cell office:value-type="string">
                <text:p>1155</text:p>
              </table:table-cell>
              <table:table-cell office:value-type="float" office:value="0.00461599988339003">
                <text:p>0.00461599988339003</text:p>
              </table:table-cell>
              <table:table-cell office:value-type="float" office:value="-0.148000001907349">
                <text:p>-0.148000001907349</text:p>
              </table:table-cell>
              <table:table-cell office:value-type="float" office:value="NaN">
                <text:p>NaN</text:p>
              </table:table-cell>
            </table:table-row>
            <table:table-row>
              <table:table-cell office:value-type="string">
                <text:p>1156</text:p>
              </table:table-cell>
              <table:table-cell office:value-type="float" office:value="0.00461999988328898">
                <text:p>0.00461999988328898</text:p>
              </table:table-cell>
              <table:table-cell office:value-type="float" office:value="-0.151999995112419">
                <text:p>-0.151999995112419</text:p>
              </table:table-cell>
              <table:table-cell office:value-type="float" office:value="NaN">
                <text:p>NaN</text:p>
              </table:table-cell>
            </table:table-row>
            <table:table-row>
              <table:table-cell office:value-type="string">
                <text:p>1157</text:p>
              </table:table-cell>
              <table:table-cell office:value-type="float" office:value="0.00462399988318793">
                <text:p>0.00462399988318793</text:p>
              </table:table-cell>
              <table:table-cell office:value-type="float" office:value="-0.156000003218651">
                <text:p>-0.156000003218651</text:p>
              </table:table-cell>
              <table:table-cell office:value-type="float" office:value="NaN">
                <text:p>NaN</text:p>
              </table:table-cell>
            </table:table-row>
            <table:table-row>
              <table:table-cell office:value-type="string">
                <text:p>1158</text:p>
              </table:table-cell>
              <table:table-cell office:value-type="float" office:value="0.00462799988308689">
                <text:p>0.00462799988308689</text:p>
              </table:table-cell>
              <table:table-cell office:value-type="float" office:value="-0.162000000476837">
                <text:p>-0.162000000476837</text:p>
              </table:table-cell>
              <table:table-cell office:value-type="float" office:value="NaN">
                <text:p>NaN</text:p>
              </table:table-cell>
            </table:table-row>
            <table:table-row>
              <table:table-cell office:value-type="string">
                <text:p>1159</text:p>
              </table:table-cell>
              <table:table-cell office:value-type="float" office:value="0.00463199988298584">
                <text:p>0.00463199988298584</text:p>
              </table:table-cell>
              <table:table-cell office:value-type="float" office:value="-0.166999995708466">
                <text:p>-0.166999995708466</text:p>
              </table:table-cell>
              <table:table-cell office:value-type="float" office:value="NaN">
                <text:p>NaN</text:p>
              </table:table-cell>
            </table:table-row>
            <table:table-row>
              <table:table-cell office:value-type="string">
                <text:p>1160</text:p>
              </table:table-cell>
              <table:table-cell office:value-type="float" office:value="0.00463599988288479">
                <text:p>0.00463599988288479</text:p>
              </table:table-cell>
              <table:table-cell office:value-type="float" office:value="-0.170000001788139">
                <text:p>-0.170000001788139</text:p>
              </table:table-cell>
              <table:table-cell office:value-type="float" office:value="NaN">
                <text:p>NaN</text:p>
              </table:table-cell>
            </table:table-row>
            <table:table-row>
              <table:table-cell office:value-type="string">
                <text:p>1161</text:p>
              </table:table-cell>
              <table:table-cell office:value-type="float" office:value="0.00463999988278374">
                <text:p>0.00463999988278374</text:p>
              </table:table-cell>
              <table:table-cell office:value-type="float" office:value="-0.178000003099442">
                <text:p>-0.178000003099442</text:p>
              </table:table-cell>
              <table:table-cell office:value-type="float" office:value="NaN">
                <text:p>NaN</text:p>
              </table:table-cell>
            </table:table-row>
            <table:table-row>
              <table:table-cell office:value-type="string">
                <text:p>1162</text:p>
              </table:table-cell>
              <table:table-cell office:value-type="float" office:value="0.00464399988268269">
                <text:p>0.00464399988268269</text:p>
              </table:table-cell>
              <table:table-cell office:value-type="float" office:value="-0.181999996304512">
                <text:p>-0.181999996304512</text:p>
              </table:table-cell>
              <table:table-cell office:value-type="float" office:value="NaN">
                <text:p>NaN</text:p>
              </table:table-cell>
            </table:table-row>
            <table:table-row>
              <table:table-cell office:value-type="string">
                <text:p>1163</text:p>
              </table:table-cell>
              <table:table-cell office:value-type="float" office:value="0.00464799988258164">
                <text:p>0.00464799988258164</text:p>
              </table:table-cell>
              <table:table-cell office:value-type="float" office:value="-0.186000004410744">
                <text:p>-0.186000004410744</text:p>
              </table:table-cell>
              <table:table-cell office:value-type="float" office:value="NaN">
                <text:p>NaN</text:p>
              </table:table-cell>
            </table:table-row>
            <table:table-row>
              <table:table-cell office:value-type="string">
                <text:p>1164</text:p>
              </table:table-cell>
              <table:table-cell office:value-type="float" office:value="0.0046519998824806">
                <text:p>0.0046519998824806</text:p>
              </table:table-cell>
              <table:table-cell office:value-type="float" office:value="-0.189999997615814">
                <text:p>-0.189999997615814</text:p>
              </table:table-cell>
              <table:table-cell office:value-type="float" office:value="NaN">
                <text:p>NaN</text:p>
              </table:table-cell>
            </table:table-row>
            <table:table-row>
              <table:table-cell office:value-type="string">
                <text:p>1165</text:p>
              </table:table-cell>
              <table:table-cell office:value-type="float" office:value="0.00465599988237955">
                <text:p>0.00465599988237955</text:p>
              </table:table-cell>
              <table:table-cell office:value-type="float" office:value="-0.194000005722046">
                <text:p>-0.194000005722046</text:p>
              </table:table-cell>
              <table:table-cell office:value-type="float" office:value="NaN">
                <text:p>NaN</text:p>
              </table:table-cell>
            </table:table-row>
            <table:table-row>
              <table:table-cell office:value-type="string">
                <text:p>1166</text:p>
              </table:table-cell>
              <table:table-cell office:value-type="float" office:value="0.0046599998822785">
                <text:p>0.0046599998822785</text:p>
              </table:table-cell>
              <table:table-cell office:value-type="float" office:value="-0.200000002980232">
                <text:p>-0.200000002980232</text:p>
              </table:table-cell>
              <table:table-cell office:value-type="float" office:value="NaN">
                <text:p>NaN</text:p>
              </table:table-cell>
            </table:table-row>
            <table:table-row>
              <table:table-cell office:value-type="string">
                <text:p>1167</text:p>
              </table:table-cell>
              <table:table-cell office:value-type="float" office:value="0.00466399988217745">
                <text:p>0.00466399988217745</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8</text:p>
              </table:table-cell>
              <table:table-cell office:value-type="float" office:value="0.0046679998820764">
                <text:p>0.0046679998820764</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9</text:p>
              </table:table-cell>
              <table:table-cell office:value-type="float" office:value="0.00467199988197535">
                <text:p>0.0046719998819753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0</text:p>
              </table:table-cell>
              <table:table-cell office:value-type="float" office:value="0.00467599988187431">
                <text:p>0.004675999881874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1</text:p>
              </table:table-cell>
              <table:table-cell office:value-type="float" office:value="0.00467999988177326">
                <text:p>0.004679999881773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2</text:p>
              </table:table-cell>
              <table:table-cell office:value-type="float" office:value="0.00468399988167221">
                <text:p>0.004683999881672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3</text:p>
              </table:table-cell>
              <table:table-cell office:value-type="float" office:value="0.00468799988157116">
                <text:p>0.004687999881571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4</text:p>
              </table:table-cell>
              <table:table-cell office:value-type="float" office:value="0.00469199988147011">
                <text:p>0.004691999881470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5</text:p>
              </table:table-cell>
              <table:table-cell office:value-type="float" office:value="0.00469599988136906">
                <text:p>0.004695999881369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6</text:p>
              </table:table-cell>
              <table:table-cell office:value-type="float" office:value="0.00469999988126801">
                <text:p>0.004699999881268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7</text:p>
              </table:table-cell>
              <table:table-cell office:value-type="float" office:value="0.00470399988116696">
                <text:p>0.004703999881166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8</text:p>
              </table:table-cell>
              <table:table-cell office:value-type="float" office:value="0.00470799988106592">
                <text:p>0.004707999881065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9</text:p>
              </table:table-cell>
              <table:table-cell office:value-type="float" office:value="0.00471199988096487">
                <text:p>0.0047119998809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0</text:p>
              </table:table-cell>
              <table:table-cell office:value-type="float" office:value="0.00471599988086382">
                <text:p>0.0047159998808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1</text:p>
              </table:table-cell>
              <table:table-cell office:value-type="float" office:value="0.00471999988076277">
                <text:p>0.004719999880762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2</text:p>
              </table:table-cell>
              <table:table-cell office:value-type="float" office:value="0.00472399988066172">
                <text:p>0.0047239998806617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3</text:p>
              </table:table-cell>
              <table:table-cell office:value-type="float" office:value="0.00472799988056067">
                <text:p>0.004727999880560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4</text:p>
              </table:table-cell>
              <table:table-cell office:value-type="float" office:value="0.00473199988045963">
                <text:p>0.0047319998804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5</text:p>
              </table:table-cell>
              <table:table-cell office:value-type="float" office:value="0.00473599988035858">
                <text:p>0.0047359998803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6</text:p>
              </table:table-cell>
              <table:table-cell office:value-type="float" office:value="0.00473999988025753">
                <text:p>0.0047399998802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7</text:p>
              </table:table-cell>
              <table:table-cell office:value-type="float" office:value="0.00474399988015648">
                <text:p>0.0047439998801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8</text:p>
              </table:table-cell>
              <table:table-cell office:value-type="float" office:value="0.00474799988005543">
                <text:p>0.0047479998800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9</text:p>
              </table:table-cell>
              <table:table-cell office:value-type="float" office:value="0.00475199987995438">
                <text:p>0.0047519998799543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0</text:p>
              </table:table-cell>
              <table:table-cell office:value-type="float" office:value="0.00475599987985334">
                <text:p>0.0047559998798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1</text:p>
              </table:table-cell>
              <table:table-cell office:value-type="float" office:value="0.00475999987975229">
                <text:p>0.0047599998797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2</text:p>
              </table:table-cell>
              <table:table-cell office:value-type="float" office:value="0.00476399987965124">
                <text:p>0.0047639998796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3</text:p>
              </table:table-cell>
              <table:table-cell office:value-type="float" office:value="0.00476799987955019">
                <text:p>0.0047679998795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4</text:p>
              </table:table-cell>
              <table:table-cell office:value-type="float" office:value="0.00477199987944914">
                <text:p>0.0047719998794491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5</text:p>
              </table:table-cell>
              <table:table-cell office:value-type="float" office:value="0.00477599987934809">
                <text:p>0.0047759998793480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6</text:p>
              </table:table-cell>
              <table:table-cell office:value-type="float" office:value="0.00477999987924704">
                <text:p>0.004779999879247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7</text:p>
              </table:table-cell>
              <table:table-cell office:value-type="float" office:value="0.00478399987914599">
                <text:p>0.004783999879145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8</text:p>
              </table:table-cell>
              <table:table-cell office:value-type="float" office:value="0.00478799987904495">
                <text:p>0.0047879998790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9</text:p>
              </table:table-cell>
              <table:table-cell office:value-type="float" office:value="0.0047919998789439">
                <text:p>0.0047919998789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0</text:p>
              </table:table-cell>
              <table:table-cell office:value-type="float" office:value="0.00479599987884285">
                <text:p>0.0047959998788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1</text:p>
              </table:table-cell>
              <table:table-cell office:value-type="float" office:value="0.0047999998787418">
                <text:p>0.00479999987874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2</text:p>
              </table:table-cell>
              <table:table-cell office:value-type="float" office:value="0.00480399987864075">
                <text:p>0.004803999878640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3</text:p>
              </table:table-cell>
              <table:table-cell office:value-type="float" office:value="0.0048079998785397">
                <text:p>0.0048079998785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4</text:p>
              </table:table-cell>
              <table:table-cell office:value-type="float" office:value="0.00481199987843866">
                <text:p>0.0048119998784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5</text:p>
              </table:table-cell>
              <table:table-cell office:value-type="float" office:value="0.00481599987833761">
                <text:p>0.0048159998783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6</text:p>
              </table:table-cell>
              <table:table-cell office:value-type="float" office:value="0.00481999987823656">
                <text:p>0.0048199998782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7</text:p>
              </table:table-cell>
              <table:table-cell office:value-type="float" office:value="0.00482399987813551">
                <text:p>0.0048239998781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8</text:p>
              </table:table-cell>
              <table:table-cell office:value-type="float" office:value="0.00482799987803446">
                <text:p>0.0048279998780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9</text:p>
              </table:table-cell>
              <table:table-cell office:value-type="float" office:value="0.00483199987793341">
                <text:p>0.0048319998779334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10</text:p>
              </table:table-cell>
              <table:table-cell office:value-type="float" office:value="0.00483599987783237">
                <text:p>0.00483599987783237</text:p>
              </table:table-cell>
              <table:table-cell office:value-type="float" office:value="-0.203000009059906">
                <text:p>-0.203000009059906</text:p>
              </table:table-cell>
              <table:table-cell office:value-type="float" office:value="NaN">
                <text:p>NaN</text:p>
              </table:table-cell>
            </table:table-row>
            <table:table-row>
              <table:table-cell office:value-type="string">
                <text:p>1211</text:p>
              </table:table-cell>
              <table:table-cell office:value-type="float" office:value="0.00483999987773132">
                <text:p>0.00483999987773132</text:p>
              </table:table-cell>
              <table:table-cell office:value-type="float" office:value="-0.200000002980232">
                <text:p>-0.200000002980232</text:p>
              </table:table-cell>
              <table:table-cell office:value-type="float" office:value="NaN">
                <text:p>NaN</text:p>
              </table:table-cell>
            </table:table-row>
            <table:table-row>
              <table:table-cell office:value-type="string">
                <text:p>1212</text:p>
              </table:table-cell>
              <table:table-cell office:value-type="float" office:value="0.00484399987763027">
                <text:p>0.00484399987763027</text:p>
              </table:table-cell>
              <table:table-cell office:value-type="float" office:value="-0.196000009775162">
                <text:p>-0.196000009775162</text:p>
              </table:table-cell>
              <table:table-cell office:value-type="float" office:value="NaN">
                <text:p>NaN</text:p>
              </table:table-cell>
            </table:table-row>
            <table:table-row>
              <table:table-cell office:value-type="string">
                <text:p>1213</text:p>
              </table:table-cell>
              <table:table-cell office:value-type="float" office:value="0.00484799987752922">
                <text:p>0.00484799987752922</text:p>
              </table:table-cell>
              <table:table-cell office:value-type="float" office:value="-0.188999995589256">
                <text:p>-0.188999995589256</text:p>
              </table:table-cell>
              <table:table-cell office:value-type="float" office:value="NaN">
                <text:p>NaN</text:p>
              </table:table-cell>
            </table:table-row>
            <table:table-row>
              <table:table-cell office:value-type="string">
                <text:p>1214</text:p>
              </table:table-cell>
              <table:table-cell office:value-type="float" office:value="0.00485199987742817">
                <text:p>0.00485199987742817</text:p>
              </table:table-cell>
              <table:table-cell office:value-type="float" office:value="-0.186000004410744">
                <text:p>-0.186000004410744</text:p>
              </table:table-cell>
              <table:table-cell office:value-type="float" office:value="NaN">
                <text:p>NaN</text:p>
              </table:table-cell>
            </table:table-row>
            <table:table-row>
              <table:table-cell office:value-type="string">
                <text:p>1215</text:p>
              </table:table-cell>
              <table:table-cell office:value-type="float" office:value="0.00485599987732712">
                <text:p>0.00485599987732712</text:p>
              </table:table-cell>
              <table:table-cell office:value-type="float" office:value="-0.181999996304512">
                <text:p>-0.181999996304512</text:p>
              </table:table-cell>
              <table:table-cell office:value-type="float" office:value="NaN">
                <text:p>NaN</text:p>
              </table:table-cell>
            </table:table-row>
            <table:table-row>
              <table:table-cell office:value-type="string">
                <text:p>1216</text:p>
              </table:table-cell>
              <table:table-cell office:value-type="float" office:value="0.00485999987722607">
                <text:p>0.00485999987722607</text:p>
              </table:table-cell>
              <table:table-cell office:value-type="float" office:value="-0.174000009894371">
                <text:p>-0.174000009894371</text:p>
              </table:table-cell>
              <table:table-cell office:value-type="float" office:value="NaN">
                <text:p>NaN</text:p>
              </table:table-cell>
            </table:table-row>
            <table:table-row>
              <table:table-cell office:value-type="string">
                <text:p>1217</text:p>
              </table:table-cell>
              <table:table-cell office:value-type="float" office:value="0.00486399987712502">
                <text:p>0.00486399987712502</text:p>
              </table:table-cell>
              <table:table-cell office:value-type="float" office:value="-0.170000001788139">
                <text:p>-0.170000001788139</text:p>
              </table:table-cell>
              <table:table-cell office:value-type="float" office:value="NaN">
                <text:p>NaN</text:p>
              </table:table-cell>
            </table:table-row>
            <table:table-row>
              <table:table-cell office:value-type="string">
                <text:p>1218</text:p>
              </table:table-cell>
              <table:table-cell office:value-type="float" office:value="0.00486799987702398">
                <text:p>0.00486799987702398</text:p>
              </table:table-cell>
              <table:table-cell office:value-type="float" office:value="-0.166999995708466">
                <text:p>-0.166999995708466</text:p>
              </table:table-cell>
              <table:table-cell office:value-type="float" office:value="NaN">
                <text:p>NaN</text:p>
              </table:table-cell>
            </table:table-row>
            <table:table-row>
              <table:table-cell office:value-type="string">
                <text:p>1219</text:p>
              </table:table-cell>
              <table:table-cell office:value-type="float" office:value="0.00487199987692293">
                <text:p>0.00487199987692293</text:p>
              </table:table-cell>
              <table:table-cell office:value-type="float" office:value="-0.159999996423721">
                <text:p>-0.159999996423721</text:p>
              </table:table-cell>
              <table:table-cell office:value-type="float" office:value="NaN">
                <text:p>NaN</text:p>
              </table:table-cell>
            </table:table-row>
            <table:table-row>
              <table:table-cell office:value-type="string">
                <text:p>1220</text:p>
              </table:table-cell>
              <table:table-cell office:value-type="float" office:value="0.00487599987682188">
                <text:p>0.00487599987682188</text:p>
              </table:table-cell>
              <table:table-cell office:value-type="float" office:value="-0.156000003218651">
                <text:p>-0.156000003218651</text:p>
              </table:table-cell>
              <table:table-cell office:value-type="float" office:value="NaN">
                <text:p>NaN</text:p>
              </table:table-cell>
            </table:table-row>
            <table:table-row>
              <table:table-cell office:value-type="string">
                <text:p>1221</text:p>
              </table:table-cell>
              <table:table-cell office:value-type="float" office:value="0.00487999987672083">
                <text:p>0.00487999987672083</text:p>
              </table:table-cell>
              <table:table-cell office:value-type="float" office:value="-0.151999995112419">
                <text:p>-0.151999995112419</text:p>
              </table:table-cell>
              <table:table-cell office:value-type="float" office:value="NaN">
                <text:p>NaN</text:p>
              </table:table-cell>
            </table:table-row>
            <table:table-row>
              <table:table-cell office:value-type="string">
                <text:p>1222</text:p>
              </table:table-cell>
              <table:table-cell office:value-type="float" office:value="0.00488399987661978">
                <text:p>0.00488399987661978</text:p>
              </table:table-cell>
              <table:table-cell office:value-type="float" office:value="-0.144999995827675">
                <text:p>-0.144999995827675</text:p>
              </table:table-cell>
              <table:table-cell office:value-type="float" office:value="NaN">
                <text:p>NaN</text:p>
              </table:table-cell>
            </table:table-row>
            <table:table-row>
              <table:table-cell office:value-type="string">
                <text:p>1223</text:p>
              </table:table-cell>
              <table:table-cell office:value-type="float" office:value="0.00488799987651873">
                <text:p>0.00488799987651873</text:p>
              </table:table-cell>
              <table:table-cell office:value-type="float" office:value="-0.142000004649162">
                <text:p>-0.142000004649162</text:p>
              </table:table-cell>
              <table:table-cell office:value-type="float" office:value="NaN">
                <text:p>NaN</text:p>
              </table:table-cell>
            </table:table-row>
            <table:table-row>
              <table:table-cell office:value-type="string">
                <text:p>1224</text:p>
              </table:table-cell>
              <table:table-cell office:value-type="float" office:value="0.00489199987641769">
                <text:p>0.00489199987641769</text:p>
              </table:table-cell>
              <table:table-cell office:value-type="float" office:value="-0.136000007390976">
                <text:p>-0.136000007390976</text:p>
              </table:table-cell>
              <table:table-cell office:value-type="float" office:value="NaN">
                <text:p>NaN</text:p>
              </table:table-cell>
            </table:table-row>
            <table:table-row>
              <table:table-cell office:value-type="string">
                <text:p>1225</text:p>
              </table:table-cell>
              <table:table-cell office:value-type="float" office:value="0.00489599987631664">
                <text:p>0.00489599987631664</text:p>
              </table:table-cell>
              <table:table-cell office:value-type="float" office:value="-0.131999999284744">
                <text:p>-0.131999999284744</text:p>
              </table:table-cell>
              <table:table-cell office:value-type="float" office:value="NaN">
                <text:p>NaN</text:p>
              </table:table-cell>
            </table:table-row>
            <table:table-row>
              <table:table-cell office:value-type="string">
                <text:p>1226</text:p>
              </table:table-cell>
              <table:table-cell office:value-type="float" office:value="0.00489999987621559">
                <text:p>0.00489999987621559</text:p>
              </table:table-cell>
              <table:table-cell office:value-type="float" office:value="-0.126000002026558">
                <text:p>-0.126000002026558</text:p>
              </table:table-cell>
              <table:table-cell office:value-type="float" office:value="NaN">
                <text:p>NaN</text:p>
              </table:table-cell>
            </table:table-row>
            <table:table-row>
              <table:table-cell office:value-type="string">
                <text:p>1227</text:p>
              </table:table-cell>
              <table:table-cell office:value-type="float" office:value="0.00490399987611454">
                <text:p>0.00490399987611454</text:p>
              </table:table-cell>
              <table:table-cell office:value-type="float" office:value="-0.122000001370907">
                <text:p>-0.122000001370907</text:p>
              </table:table-cell>
              <table:table-cell office:value-type="float" office:value="NaN">
                <text:p>NaN</text:p>
              </table:table-cell>
            </table:table-row>
            <table:table-row>
              <table:table-cell office:value-type="string">
                <text:p>1228</text:p>
              </table:table-cell>
              <table:table-cell office:value-type="float" office:value="0.00490799987601349">
                <text:p>0.00490799987601349</text:p>
              </table:table-cell>
              <table:table-cell office:value-type="float" office:value="-0.11600000411272">
                <text:p>-0.11600000411272</text:p>
              </table:table-cell>
              <table:table-cell office:value-type="float" office:value="NaN">
                <text:p>NaN</text:p>
              </table:table-cell>
            </table:table-row>
            <table:table-row>
              <table:table-cell office:value-type="string">
                <text:p>1229</text:p>
              </table:table-cell>
              <table:table-cell office:value-type="float" office:value="0.00491199987591244">
                <text:p>0.00491199987591244</text:p>
              </table:table-cell>
              <table:table-cell office:value-type="float" office:value="-0.112000003457069">
                <text:p>-0.112000003457069</text:p>
              </table:table-cell>
              <table:table-cell office:value-type="float" office:value="NaN">
                <text:p>NaN</text:p>
              </table:table-cell>
            </table:table-row>
            <table:table-row>
              <table:table-cell office:value-type="string">
                <text:p>1230</text:p>
              </table:table-cell>
              <table:table-cell office:value-type="float" office:value="0.0049159998758114">
                <text:p>0.0049159998758114</text:p>
              </table:table-cell>
              <table:table-cell office:value-type="float" office:value="-0.108000002801418">
                <text:p>-0.108000002801418</text:p>
              </table:table-cell>
              <table:table-cell office:value-type="float" office:value="NaN">
                <text:p>NaN</text:p>
              </table:table-cell>
            </table:table-row>
            <table:table-row>
              <table:table-cell office:value-type="string">
                <text:p>1231</text:p>
              </table:table-cell>
              <table:table-cell office:value-type="float" office:value="0.00491999987571035">
                <text:p>0.00491999987571035</text:p>
              </table:table-cell>
              <table:table-cell office:value-type="float" office:value="-0.100000001490116">
                <text:p>-0.100000001490116</text:p>
              </table:table-cell>
              <table:table-cell office:value-type="float" office:value="NaN">
                <text:p>NaN</text:p>
              </table:table-cell>
            </table:table-row>
            <table:table-row>
              <table:table-cell office:value-type="string">
                <text:p>1232</text:p>
              </table:table-cell>
              <table:table-cell office:value-type="float" office:value="0.0049239998756093">
                <text:p>0.004923999875609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233</text:p>
              </table:table-cell>
              <table:table-cell office:value-type="float" office:value="0.00492799987550825">
                <text:p>0.0049279998755082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234</text:p>
              </table:table-cell>
              <table:table-cell office:value-type="float" office:value="0.0049319998754072">
                <text:p>0.0049319998754072</text:p>
              </table:table-cell>
              <table:table-cell office:value-type="float" office:value="-0.0879999995231628">
                <text:p>-0.0879999995231628</text:p>
              </table:table-cell>
              <table:table-cell office:value-type="float" office:value="NaN">
                <text:p>NaN</text:p>
              </table:table-cell>
            </table:table-row>
            <table:table-row>
              <table:table-cell office:value-type="string">
                <text:p>1235</text:p>
              </table:table-cell>
              <table:table-cell office:value-type="float" office:value="0.00493599987530615">
                <text:p>0.004935999875306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36</text:p>
              </table:table-cell>
              <table:table-cell office:value-type="float" office:value="0.0049399998752051">
                <text:p>0.0049399998752051</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237</text:p>
              </table:table-cell>
              <table:table-cell office:value-type="float" office:value="0.00494399987510405">
                <text:p>0.0049439998751040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38</text:p>
              </table:table-cell>
              <table:table-cell office:value-type="float" office:value="0.00494799987500301">
                <text:p>0.00494799987500301</text:p>
              </table:table-cell>
              <table:table-cell office:value-type="float" office:value="-0.068000003695488">
                <text:p>-0.068000003695488</text:p>
              </table:table-cell>
              <table:table-cell office:value-type="float" office:value="NaN">
                <text:p>NaN</text:p>
              </table:table-cell>
            </table:table-row>
            <table:table-row>
              <table:table-cell office:value-type="string">
                <text:p>1239</text:p>
              </table:table-cell>
              <table:table-cell office:value-type="float" office:value="0.00495199987490196">
                <text:p>0.00495199987490196</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40</text:p>
              </table:table-cell>
              <table:table-cell office:value-type="float" office:value="0.00495599987480091">
                <text:p>0.00495599987480091</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41</text:p>
              </table:table-cell>
              <table:table-cell office:value-type="float" office:value="0.00495999987469986">
                <text:p>0.0049599998746998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242</text:p>
              </table:table-cell>
              <table:table-cell office:value-type="float" office:value="0.00496399987459881">
                <text:p>0.00496399987459881</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43</text:p>
              </table:table-cell>
              <table:table-cell office:value-type="float" office:value="0.00496799987449776">
                <text:p>0.00496799987449776</text:p>
              </table:table-cell>
              <table:table-cell office:value-type="float" office:value="-0.046000000089407">
                <text:p>-0.046000000089407</text:p>
              </table:table-cell>
              <table:table-cell office:value-type="float" office:value="NaN">
                <text:p>NaN</text:p>
              </table:table-cell>
            </table:table-row>
            <table:table-row>
              <table:table-cell office:value-type="string">
                <text:p>1244</text:p>
              </table:table-cell>
              <table:table-cell office:value-type="float" office:value="0.00497199987439672">
                <text:p>0.0049719998743967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245</text:p>
              </table:table-cell>
              <table:table-cell office:value-type="float" office:value="0.00497599987429567">
                <text:p>0.00497599987429567</text:p>
              </table:table-cell>
              <table:table-cell office:value-type="float" office:value="-0.034000001847744">
                <text:p>-0.034000001847744</text:p>
              </table:table-cell>
              <table:table-cell office:value-type="float" office:value="NaN">
                <text:p>NaN</text:p>
              </table:table-cell>
            </table:table-row>
            <table:table-row>
              <table:table-cell office:value-type="string">
                <text:p>1246</text:p>
              </table:table-cell>
              <table:table-cell office:value-type="float" office:value="0.00497999987419462">
                <text:p>0.0049799998741946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247</text:p>
              </table:table-cell>
              <table:table-cell office:value-type="float" office:value="0.00498399987409357">
                <text:p>0.0049839998740935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48</text:p>
              </table:table-cell>
              <table:table-cell office:value-type="float" office:value="0.00498799987399252">
                <text:p>0.00498799987399252</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49</text:p>
              </table:table-cell>
              <table:table-cell office:value-type="float" office:value="0.00499199987389147">
                <text:p>0.00499199987389147</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50</text:p>
              </table:table-cell>
              <table:table-cell office:value-type="float" office:value="0.00499599987379043">
                <text:p>0.0049959998737904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1</text:p>
              </table:table-cell>
              <table:table-cell office:value-type="float" office:value="0.00499999987368938">
                <text:p>0.00499999987368938</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52</text:p>
              </table:table-cell>
              <table:table-cell office:value-type="float" office:value="0.00500399987358833">
                <text:p>0.0050039998735883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53</text:p>
              </table:table-cell>
              <table:table-cell office:value-type="float" office:value="0.00500799987348728">
                <text:p>0.0050079998734872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54</text:p>
              </table:table-cell>
              <table:table-cell office:value-type="float" office:value="0.00501199987338623">
                <text:p>0.0050119998733862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5</text:p>
              </table:table-cell>
              <table:table-cell office:value-type="float" office:value="0.00501599987328518">
                <text:p>0.00501599987328518</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256</text:p>
              </table:table-cell>
              <table:table-cell office:value-type="float" office:value="0.00501999987318413">
                <text:p>0.00501999987318413</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257</text:p>
              </table:table-cell>
              <table:table-cell office:value-type="float" office:value="0.00502399987308308">
                <text:p>0.0050239998730830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258</text:p>
              </table:table-cell>
              <table:table-cell office:value-type="float" office:value="0.00502799987298204">
                <text:p>0.00502799987298204</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59</text:p>
              </table:table-cell>
              <table:table-cell office:value-type="float" office:value="0.00503199987288099">
                <text:p>0.00503199987288099</text:p>
              </table:table-cell>
              <table:table-cell office:value-type="float" office:value="0.034000001847744">
                <text:p>0.034000001847744</text:p>
              </table:table-cell>
              <table:table-cell office:value-type="float" office:value="NaN">
                <text:p>NaN</text:p>
              </table:table-cell>
            </table:table-row>
            <table:table-row>
              <table:table-cell office:value-type="string">
                <text:p>1260</text:p>
              </table:table-cell>
              <table:table-cell office:value-type="float" office:value="0.00503599987277994">
                <text:p>0.0050359998727799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261</text:p>
              </table:table-cell>
              <table:table-cell office:value-type="float" office:value="0.00503999987267889">
                <text:p>0.005039999872678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262</text:p>
              </table:table-cell>
              <table:table-cell office:value-type="float" office:value="0.00504399987257784">
                <text:p>0.0050439998725778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263</text:p>
              </table:table-cell>
              <table:table-cell office:value-type="float" office:value="0.00504799987247679">
                <text:p>0.0050479998724767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64</text:p>
              </table:table-cell>
              <table:table-cell office:value-type="float" office:value="0.00505199987237575">
                <text:p>0.00505199987237575</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65</text:p>
              </table:table-cell>
              <table:table-cell office:value-type="float" office:value="0.0050559998722747">
                <text:p>0.005055999872274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266</text:p>
              </table:table-cell>
              <table:table-cell office:value-type="float" office:value="0.00505999987217365">
                <text:p>0.0050599998721736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67</text:p>
              </table:table-cell>
              <table:table-cell office:value-type="float" office:value="0.0050639998720726">
                <text:p>0.005063999872072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68</text:p>
              </table:table-cell>
              <table:table-cell office:value-type="float" office:value="0.00506799987197155">
                <text:p>0.00506799987197155</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269</text:p>
              </table:table-cell>
              <table:table-cell office:value-type="float" office:value="0.0050719998718705">
                <text:p>0.005071999871870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70</text:p>
              </table:table-cell>
              <table:table-cell office:value-type="float" office:value="0.00507599987176946">
                <text:p>0.0050759998717694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271</text:p>
              </table:table-cell>
              <table:table-cell office:value-type="float" office:value="0.00507999987166841">
                <text:p>0.0050799998716684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272</text:p>
              </table:table-cell>
              <table:table-cell office:value-type="float" office:value="0.00508399987156736">
                <text:p>0.00508399987156736</text:p>
              </table:table-cell>
              <table:table-cell office:value-type="float" office:value="0.096000000834465">
                <text:p>0.096000000834465</text:p>
              </table:table-cell>
              <table:table-cell office:value-type="float" office:value="NaN">
                <text:p>NaN</text:p>
              </table:table-cell>
            </table:table-row>
            <table:table-row>
              <table:table-cell office:value-type="string">
                <text:p>1273</text:p>
              </table:table-cell>
              <table:table-cell office:value-type="float" office:value="0.00508799987146631">
                <text:p>0.00508799987146631</text:p>
              </table:table-cell>
              <table:table-cell office:value-type="float" office:value="0.100000001490116">
                <text:p>0.100000001490116</text:p>
              </table:table-cell>
              <table:table-cell office:value-type="float" office:value="NaN">
                <text:p>NaN</text:p>
              </table:table-cell>
            </table:table-row>
            <table:table-row>
              <table:table-cell office:value-type="string">
                <text:p>1274</text:p>
              </table:table-cell>
              <table:table-cell office:value-type="float" office:value="0.00509199987136526">
                <text:p>0.00509199987136526</text:p>
              </table:table-cell>
              <table:table-cell office:value-type="float" office:value="0.105999998748302">
                <text:p>0.105999998748302</text:p>
              </table:table-cell>
              <table:table-cell office:value-type="float" office:value="NaN">
                <text:p>NaN</text:p>
              </table:table-cell>
            </table:table-row>
            <table:table-row>
              <table:table-cell office:value-type="string">
                <text:p>1275</text:p>
              </table:table-cell>
              <table:table-cell office:value-type="float" office:value="0.00509599987126421">
                <text:p>0.00509599987126421</text:p>
              </table:table-cell>
              <table:table-cell office:value-type="float" office:value="0.109999999403954">
                <text:p>0.109999999403954</text:p>
              </table:table-cell>
              <table:table-cell office:value-type="float" office:value="NaN">
                <text:p>NaN</text:p>
              </table:table-cell>
            </table:table-row>
            <table:table-row>
              <table:table-cell office:value-type="string">
                <text:p>1276</text:p>
              </table:table-cell>
              <table:table-cell office:value-type="float" office:value="0.00509999987116316">
                <text:p>0.00509999987116316</text:p>
              </table:table-cell>
              <table:table-cell office:value-type="float" office:value="0.11600000411272">
                <text:p>0.11600000411272</text:p>
              </table:table-cell>
              <table:table-cell office:value-type="float" office:value="NaN">
                <text:p>NaN</text:p>
              </table:table-cell>
            </table:table-row>
            <table:table-row>
              <table:table-cell office:value-type="string">
                <text:p>1277</text:p>
              </table:table-cell>
              <table:table-cell office:value-type="float" office:value="0.00510399987106211">
                <text:p>0.00510399987106211</text:p>
              </table:table-cell>
              <table:table-cell office:value-type="float" office:value="0.122000001370907">
                <text:p>0.122000001370907</text:p>
              </table:table-cell>
              <table:table-cell office:value-type="float" office:value="NaN">
                <text:p>NaN</text:p>
              </table:table-cell>
            </table:table-row>
            <table:table-row>
              <table:table-cell office:value-type="string">
                <text:p>1278</text:p>
              </table:table-cell>
              <table:table-cell office:value-type="float" office:value="0.00510799987096107">
                <text:p>0.00510799987096107</text:p>
              </table:table-cell>
              <table:table-cell office:value-type="float" office:value="0.126000002026558">
                <text:p>0.126000002026558</text:p>
              </table:table-cell>
              <table:table-cell office:value-type="float" office:value="NaN">
                <text:p>NaN</text:p>
              </table:table-cell>
            </table:table-row>
            <table:table-row>
              <table:table-cell office:value-type="string">
                <text:p>1279</text:p>
              </table:table-cell>
              <table:table-cell office:value-type="float" office:value="0.00511199987086002">
                <text:p>0.00511199987086002</text:p>
              </table:table-cell>
              <table:table-cell office:value-type="float" office:value="0.130999997258186">
                <text:p>0.130999997258186</text:p>
              </table:table-cell>
              <table:table-cell office:value-type="float" office:value="NaN">
                <text:p>NaN</text:p>
              </table:table-cell>
            </table:table-row>
            <table:table-row>
              <table:table-cell office:value-type="string">
                <text:p>1280</text:p>
              </table:table-cell>
              <table:table-cell office:value-type="float" office:value="0.00511599987075897">
                <text:p>0.00511599987075897</text:p>
              </table:table-cell>
              <table:table-cell office:value-type="float" office:value="0.13400000333786">
                <text:p>0.13400000333786</text:p>
              </table:table-cell>
              <table:table-cell office:value-type="float" office:value="NaN">
                <text:p>NaN</text:p>
              </table:table-cell>
            </table:table-row>
            <table:table-row>
              <table:table-cell office:value-type="string">
                <text:p>1281</text:p>
              </table:table-cell>
              <table:table-cell office:value-type="float" office:value="0.00511999987065792">
                <text:p>0.00511999987065792</text:p>
              </table:table-cell>
              <table:table-cell office:value-type="float" office:value="0.140000000596046">
                <text:p>0.140000000596046</text:p>
              </table:table-cell>
              <table:table-cell office:value-type="float" office:value="NaN">
                <text:p>NaN</text:p>
              </table:table-cell>
            </table:table-row>
            <table:table-row>
              <table:table-cell office:value-type="string">
                <text:p>1282</text:p>
              </table:table-cell>
              <table:table-cell office:value-type="float" office:value="0.00512399987055687">
                <text:p>0.00512399987055687</text:p>
              </table:table-cell>
              <table:table-cell office:value-type="float" office:value="0.144000008702278">
                <text:p>0.144000008702278</text:p>
              </table:table-cell>
              <table:table-cell office:value-type="float" office:value="NaN">
                <text:p>NaN</text:p>
              </table:table-cell>
            </table:table-row>
            <table:table-row>
              <table:table-cell office:value-type="string">
                <text:p>1283</text:p>
              </table:table-cell>
              <table:table-cell office:value-type="float" office:value="0.00512799987045582">
                <text:p>0.00512799987045582</text:p>
              </table:table-cell>
              <table:table-cell office:value-type="float" office:value="0.150000005960464">
                <text:p>0.150000005960464</text:p>
              </table:table-cell>
              <table:table-cell office:value-type="float" office:value="NaN">
                <text:p>NaN</text:p>
              </table:table-cell>
            </table:table-row>
            <table:table-row>
              <table:table-cell office:value-type="string">
                <text:p>1284</text:p>
              </table:table-cell>
              <table:table-cell office:value-type="float" office:value="0.00513199987035478">
                <text:p>0.00513199987035478</text:p>
              </table:table-cell>
              <table:table-cell office:value-type="float" office:value="0.153999999165535">
                <text:p>0.153999999165535</text:p>
              </table:table-cell>
              <table:table-cell office:value-type="float" office:value="NaN">
                <text:p>NaN</text:p>
              </table:table-cell>
            </table:table-row>
            <table:table-row>
              <table:table-cell office:value-type="string">
                <text:p>1285</text:p>
              </table:table-cell>
              <table:table-cell office:value-type="float" office:value="0.00513599987025373">
                <text:p>0.00513599987025373</text:p>
              </table:table-cell>
              <table:table-cell office:value-type="float" office:value="0.158000007271767">
                <text:p>0.158000007271767</text:p>
              </table:table-cell>
              <table:table-cell office:value-type="float" office:value="NaN">
                <text:p>NaN</text:p>
              </table:table-cell>
            </table:table-row>
            <table:table-row>
              <table:table-cell office:value-type="string">
                <text:p>1286</text:p>
              </table:table-cell>
              <table:table-cell office:value-type="float" office:value="0.00513999987015268">
                <text:p>0.00513999987015268</text:p>
              </table:table-cell>
              <table:table-cell office:value-type="float" office:value="0.166000008583069">
                <text:p>0.166000008583069</text:p>
              </table:table-cell>
              <table:table-cell office:value-type="float" office:value="NaN">
                <text:p>NaN</text:p>
              </table:table-cell>
            </table:table-row>
            <table:table-row>
              <table:table-cell office:value-type="string">
                <text:p>1287</text:p>
              </table:table-cell>
              <table:table-cell office:value-type="float" office:value="0.00514399987005163">
                <text:p>0.00514399987005163</text:p>
              </table:table-cell>
              <table:table-cell office:value-type="float" office:value="0.170000001788139">
                <text:p>0.170000001788139</text:p>
              </table:table-cell>
              <table:table-cell office:value-type="float" office:value="NaN">
                <text:p>NaN</text:p>
              </table:table-cell>
            </table:table-row>
            <table:table-row>
              <table:table-cell office:value-type="string">
                <text:p>1288</text:p>
              </table:table-cell>
              <table:table-cell office:value-type="float" office:value="0.00514799986995058">
                <text:p>0.00514799986995058</text:p>
              </table:table-cell>
              <table:table-cell office:value-type="float" office:value="0.174000009894371">
                <text:p>0.174000009894371</text:p>
              </table:table-cell>
              <table:table-cell office:value-type="float" office:value="NaN">
                <text:p>NaN</text:p>
              </table:table-cell>
            </table:table-row>
            <table:table-row>
              <table:table-cell office:value-type="string">
                <text:p>1289</text:p>
              </table:table-cell>
              <table:table-cell office:value-type="float" office:value="0.00515199986984953">
                <text:p>0.00515199986984953</text:p>
              </table:table-cell>
              <table:table-cell office:value-type="float" office:value="0.179000005125999">
                <text:p>0.179000005125999</text:p>
              </table:table-cell>
              <table:table-cell office:value-type="float" office:value="NaN">
                <text:p>NaN</text:p>
              </table:table-cell>
            </table:table-row>
            <table:table-row>
              <table:table-cell office:value-type="string">
                <text:p>1290</text:p>
              </table:table-cell>
              <table:table-cell office:value-type="float" office:value="0.00515599986974849">
                <text:p>0.00515599986974849</text:p>
              </table:table-cell>
              <table:table-cell office:value-type="float" office:value="0.184000000357628">
                <text:p>0.184000000357628</text:p>
              </table:table-cell>
              <table:table-cell office:value-type="float" office:value="NaN">
                <text:p>NaN</text:p>
              </table:table-cell>
            </table:table-row>
            <table:table-row>
              <table:table-cell office:value-type="string">
                <text:p>1291</text:p>
              </table:table-cell>
              <table:table-cell office:value-type="float" office:value="0.00515999986964744">
                <text:p>0.00515999986964744</text:p>
              </table:table-cell>
              <table:table-cell office:value-type="float" office:value="0.18800000846386">
                <text:p>0.18800000846386</text:p>
              </table:table-cell>
              <table:table-cell office:value-type="float" office:value="NaN">
                <text:p>NaN</text:p>
              </table:table-cell>
            </table:table-row>
            <table:table-row>
              <table:table-cell office:value-type="string">
                <text:p>1292</text:p>
              </table:table-cell>
              <table:table-cell office:value-type="float" office:value="0.00516399986954639">
                <text:p>0.00516399986954639</text:p>
              </table:table-cell>
              <table:table-cell office:value-type="float" office:value="0.194000005722046">
                <text:p>0.194000005722046</text:p>
              </table:table-cell>
              <table:table-cell office:value-type="float" office:value="NaN">
                <text:p>NaN</text:p>
              </table:table-cell>
            </table:table-row>
            <table:table-row>
              <table:table-cell office:value-type="string">
                <text:p>1293</text:p>
              </table:table-cell>
              <table:table-cell office:value-type="float" office:value="0.00516799986944534">
                <text:p>0.005167999869445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4</text:p>
              </table:table-cell>
              <table:table-cell office:value-type="float" office:value="0.00517199986934429">
                <text:p>0.0051719998693442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5</text:p>
              </table:table-cell>
              <table:table-cell office:value-type="float" office:value="0.00517599986924324">
                <text:p>0.0051759998692432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6</text:p>
              </table:table-cell>
              <table:table-cell office:value-type="float" office:value="0.00517999986914219">
                <text:p>0.0051799998691421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7</text:p>
              </table:table-cell>
              <table:table-cell office:value-type="float" office:value="0.00518399986904114">
                <text:p>0.0051839998690411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8</text:p>
              </table:table-cell>
              <table:table-cell office:value-type="float" office:value="0.0051879998689401">
                <text:p>0.00518799986894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9</text:p>
              </table:table-cell>
              <table:table-cell office:value-type="float" office:value="0.00519199986883905">
                <text:p>0.0051919998688390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0</text:p>
              </table:table-cell>
              <table:table-cell office:value-type="float" office:value="0.005195999868738">
                <text:p>0.00519599986873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1</text:p>
              </table:table-cell>
              <table:table-cell office:value-type="float" office:value="0.00519999986863695">
                <text:p>0.0051999998686369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2</text:p>
              </table:table-cell>
              <table:table-cell office:value-type="float" office:value="0.0052039998685359">
                <text:p>0.00520399986853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3</text:p>
              </table:table-cell>
              <table:table-cell office:value-type="float" office:value="0.00520799986843485">
                <text:p>0.0052079998684348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4</text:p>
              </table:table-cell>
              <table:table-cell office:value-type="float" office:value="0.00521199986833381">
                <text:p>0.0052119998683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5</text:p>
              </table:table-cell>
              <table:table-cell office:value-type="float" office:value="0.00521599986823276">
                <text:p>0.0052159998682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6</text:p>
              </table:table-cell>
              <table:table-cell office:value-type="float" office:value="0.00521999986813171">
                <text:p>0.0052199998681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7</text:p>
              </table:table-cell>
              <table:table-cell office:value-type="float" office:value="0.00522399986803066">
                <text:p>0.0052239998680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8</text:p>
              </table:table-cell>
              <table:table-cell office:value-type="float" office:value="0.00522799986792961">
                <text:p>0.0052279998679296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9</text:p>
              </table:table-cell>
              <table:table-cell office:value-type="float" office:value="0.00523199986782856">
                <text:p>0.0052319998678285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0</text:p>
              </table:table-cell>
              <table:table-cell office:value-type="float" office:value="0.00523599986772752">
                <text:p>0.0052359998677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1</text:p>
              </table:table-cell>
              <table:table-cell office:value-type="float" office:value="0.00523999986762647">
                <text:p>0.0052399998676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2</text:p>
              </table:table-cell>
              <table:table-cell office:value-type="float" office:value="0.00524399986752542">
                <text:p>0.0052439998675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3</text:p>
              </table:table-cell>
              <table:table-cell office:value-type="float" office:value="0.00524799986742437">
                <text:p>0.0052479998674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4</text:p>
              </table:table-cell>
              <table:table-cell office:value-type="float" office:value="0.00525199986732332">
                <text:p>0.005251999867323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5</text:p>
              </table:table-cell>
              <table:table-cell office:value-type="float" office:value="0.00525599986722227">
                <text:p>0.005255999867222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6</text:p>
              </table:table-cell>
              <table:table-cell office:value-type="float" office:value="0.00525999986712122">
                <text:p>0.005259999867121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7</text:p>
              </table:table-cell>
              <table:table-cell office:value-type="float" office:value="0.00526399986702017">
                <text:p>0.005263999867020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8</text:p>
              </table:table-cell>
              <table:table-cell office:value-type="float" office:value="0.00526799986691913">
                <text:p>0.0052679998669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9</text:p>
              </table:table-cell>
              <table:table-cell office:value-type="float" office:value="0.00527199986681808">
                <text:p>0.0052719998668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0</text:p>
              </table:table-cell>
              <table:table-cell office:value-type="float" office:value="0.00527599986671703">
                <text:p>0.0052759998667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1</text:p>
              </table:table-cell>
              <table:table-cell office:value-type="float" office:value="0.00527999986661598">
                <text:p>0.005279999866615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2</text:p>
              </table:table-cell>
              <table:table-cell office:value-type="float" office:value="0.00528399986651493">
                <text:p>0.005283999866514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3</text:p>
              </table:table-cell>
              <table:table-cell office:value-type="float" office:value="0.00528799986641388">
                <text:p>0.005287999866413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4</text:p>
              </table:table-cell>
              <table:table-cell office:value-type="float" office:value="0.00529199986631284">
                <text:p>0.0052919998663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5</text:p>
              </table:table-cell>
              <table:table-cell office:value-type="float" office:value="0.00529599986621179">
                <text:p>0.0052959998662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6</text:p>
              </table:table-cell>
              <table:table-cell office:value-type="float" office:value="0.00529999986611074">
                <text:p>0.0052999998661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7</text:p>
              </table:table-cell>
              <table:table-cell office:value-type="float" office:value="0.00530399986600969">
                <text:p>0.0053039998660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8</text:p>
              </table:table-cell>
              <table:table-cell office:value-type="float" office:value="0.00530799986590864">
                <text:p>0.005307999865908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9</text:p>
              </table:table-cell>
              <table:table-cell office:value-type="float" office:value="0.00531199986580759">
                <text:p>0.005311999865807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0</text:p>
              </table:table-cell>
              <table:table-cell office:value-type="float" office:value="0.00531599986570655">
                <text:p>0.0053159998657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1</text:p>
              </table:table-cell>
              <table:table-cell office:value-type="float" office:value="0.0053199998656055">
                <text:p>0.0053199998656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2</text:p>
              </table:table-cell>
              <table:table-cell office:value-type="float" office:value="0.00532399986550445">
                <text:p>0.0053239998655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3</text:p>
              </table:table-cell>
              <table:table-cell office:value-type="float" office:value="0.0053279998654034">
                <text:p>0.0053279998654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4</text:p>
              </table:table-cell>
              <table:table-cell office:value-type="float" office:value="0.00533199986530235">
                <text:p>0.005331999865302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5</text:p>
              </table:table-cell>
              <table:table-cell office:value-type="float" office:value="0.0053359998652013">
                <text:p>0.0053359998652013</text:p>
              </table:table-cell>
              <table:table-cell office:value-type="float" office:value="0.196000009775162">
                <text:p>0.196000009775162</text:p>
              </table:table-cell>
              <table:table-cell office:value-type="float" office:value="NaN">
                <text:p>NaN</text:p>
              </table:table-cell>
            </table:table-row>
            <table:table-row>
              <table:table-cell office:value-type="string">
                <text:p>1336</text:p>
              </table:table-cell>
              <table:table-cell office:value-type="float" office:value="0.00533999986510025">
                <text:p>0.00533999986510025</text:p>
              </table:table-cell>
              <table:table-cell office:value-type="float" office:value="0.194000005722046">
                <text:p>0.194000005722046</text:p>
              </table:table-cell>
              <table:table-cell office:value-type="float" office:value="NaN">
                <text:p>NaN</text:p>
              </table:table-cell>
            </table:table-row>
            <table:table-row>
              <table:table-cell office:value-type="string">
                <text:p>1337</text:p>
              </table:table-cell>
              <table:table-cell office:value-type="float" office:value="0.0053439998649992">
                <text:p>0.0053439998649992</text:p>
              </table:table-cell>
              <table:table-cell office:value-type="float" office:value="0.186000004410744">
                <text:p>0.186000004410744</text:p>
              </table:table-cell>
              <table:table-cell office:value-type="float" office:value="NaN">
                <text:p>NaN</text:p>
              </table:table-cell>
            </table:table-row>
            <table:table-row>
              <table:table-cell office:value-type="string">
                <text:p>1338</text:p>
              </table:table-cell>
              <table:table-cell office:value-type="float" office:value="0.00534799986489816">
                <text:p>0.00534799986489816</text:p>
              </table:table-cell>
              <table:table-cell office:value-type="float" office:value="0.180000007152557">
                <text:p>0.180000007152557</text:p>
              </table:table-cell>
              <table:table-cell office:value-type="float" office:value="NaN">
                <text:p>NaN</text:p>
              </table:table-cell>
            </table:table-row>
            <table:table-row>
              <table:table-cell office:value-type="string">
                <text:p>1339</text:p>
              </table:table-cell>
              <table:table-cell office:value-type="float" office:value="0.00535199986479711">
                <text:p>0.00535199986479711</text:p>
              </table:table-cell>
              <table:table-cell office:value-type="float" office:value="0.178000003099442">
                <text:p>0.178000003099442</text:p>
              </table:table-cell>
              <table:table-cell office:value-type="float" office:value="NaN">
                <text:p>NaN</text:p>
              </table:table-cell>
            </table:table-row>
            <table:table-row>
              <table:table-cell office:value-type="string">
                <text:p>1340</text:p>
              </table:table-cell>
              <table:table-cell office:value-type="float" office:value="0.00535599986469606">
                <text:p>0.00535599986469606</text:p>
              </table:table-cell>
              <table:table-cell office:value-type="float" office:value="0.172000005841255">
                <text:p>0.172000005841255</text:p>
              </table:table-cell>
              <table:table-cell office:value-type="float" office:value="NaN">
                <text:p>NaN</text:p>
              </table:table-cell>
            </table:table-row>
            <table:table-row>
              <table:table-cell office:value-type="string">
                <text:p>1341</text:p>
              </table:table-cell>
              <table:table-cell office:value-type="float" office:value="0.00535999986459501">
                <text:p>0.00535999986459501</text:p>
              </table:table-cell>
              <table:table-cell office:value-type="float" office:value="0.167999997735024">
                <text:p>0.167999997735024</text:p>
              </table:table-cell>
              <table:table-cell office:value-type="float" office:value="NaN">
                <text:p>NaN</text:p>
              </table:table-cell>
            </table:table-row>
            <table:table-row>
              <table:table-cell office:value-type="string">
                <text:p>1342</text:p>
              </table:table-cell>
              <table:table-cell office:value-type="float" office:value="0.00536399986449396">
                <text:p>0.00536399986449396</text:p>
              </table:table-cell>
              <table:table-cell office:value-type="float" office:value="0.162000000476837">
                <text:p>0.162000000476837</text:p>
              </table:table-cell>
              <table:table-cell office:value-type="float" office:value="NaN">
                <text:p>NaN</text:p>
              </table:table-cell>
            </table:table-row>
            <table:table-row>
              <table:table-cell office:value-type="string">
                <text:p>1343</text:p>
              </table:table-cell>
              <table:table-cell office:value-type="float" office:value="0.00536799986439291">
                <text:p>0.00536799986439291</text:p>
              </table:table-cell>
              <table:table-cell office:value-type="float" office:value="0.158000007271767">
                <text:p>0.158000007271767</text:p>
              </table:table-cell>
              <table:table-cell office:value-type="float" office:value="NaN">
                <text:p>NaN</text:p>
              </table:table-cell>
            </table:table-row>
            <table:table-row>
              <table:table-cell office:value-type="string">
                <text:p>1344</text:p>
              </table:table-cell>
              <table:table-cell office:value-type="float" office:value="0.00537199986429187">
                <text:p>0.00537199986429187</text:p>
              </table:table-cell>
              <table:table-cell office:value-type="float" office:value="0.153999999165535">
                <text:p>0.153999999165535</text:p>
              </table:table-cell>
              <table:table-cell office:value-type="float" office:value="NaN">
                <text:p>NaN</text:p>
              </table:table-cell>
            </table:table-row>
            <table:table-row>
              <table:table-cell office:value-type="string">
                <text:p>1345</text:p>
              </table:table-cell>
              <table:table-cell office:value-type="float" office:value="0.00537599986419082">
                <text:p>0.00537599986419082</text:p>
              </table:table-cell>
              <table:table-cell office:value-type="float" office:value="0.148000001907349">
                <text:p>0.148000001907349</text:p>
              </table:table-cell>
              <table:table-cell office:value-type="float" office:value="NaN">
                <text:p>NaN</text:p>
              </table:table-cell>
            </table:table-row>
            <table:table-row>
              <table:table-cell office:value-type="string">
                <text:p>1346</text:p>
              </table:table-cell>
              <table:table-cell office:value-type="float" office:value="0.00537999986408977">
                <text:p>0.00537999986408977</text:p>
              </table:table-cell>
              <table:table-cell office:value-type="float" office:value="0.142000004649162">
                <text:p>0.142000004649162</text:p>
              </table:table-cell>
              <table:table-cell office:value-type="float" office:value="NaN">
                <text:p>NaN</text:p>
              </table:table-cell>
            </table:table-row>
            <table:table-row>
              <table:table-cell office:value-type="string">
                <text:p>1347</text:p>
              </table:table-cell>
              <table:table-cell office:value-type="float" office:value="0.00538399986398872">
                <text:p>0.00538399986398872</text:p>
              </table:table-cell>
              <table:table-cell office:value-type="float" office:value="0.137999996542931">
                <text:p>0.137999996542931</text:p>
              </table:table-cell>
              <table:table-cell office:value-type="float" office:value="NaN">
                <text:p>NaN</text:p>
              </table:table-cell>
            </table:table-row>
            <table:table-row>
              <table:table-cell office:value-type="string">
                <text:p>1348</text:p>
              </table:table-cell>
              <table:table-cell office:value-type="float" office:value="0.00538799986388767">
                <text:p>0.00538799986388767</text:p>
              </table:table-cell>
              <table:table-cell office:value-type="float" office:value="0.13400000333786">
                <text:p>0.13400000333786</text:p>
              </table:table-cell>
              <table:table-cell office:value-type="float" office:value="NaN">
                <text:p>NaN</text:p>
              </table:table-cell>
            </table:table-row>
            <table:table-row>
              <table:table-cell office:value-type="string">
                <text:p>1349</text:p>
              </table:table-cell>
              <table:table-cell office:value-type="float" office:value="0.00539199986378662">
                <text:p>0.00539199986378662</text:p>
              </table:table-cell>
              <table:table-cell office:value-type="float" office:value="0.129999995231628">
                <text:p>0.129999995231628</text:p>
              </table:table-cell>
              <table:table-cell office:value-type="float" office:value="NaN">
                <text:p>NaN</text:p>
              </table:table-cell>
            </table:table-row>
            <table:table-row>
              <table:table-cell office:value-type="string">
                <text:p>1350</text:p>
              </table:table-cell>
              <table:table-cell office:value-type="float" office:value="0.00539599986368558">
                <text:p>0.00539599986368558</text:p>
              </table:table-cell>
              <table:table-cell office:value-type="float" office:value="0.126000002026558">
                <text:p>0.126000002026558</text:p>
              </table:table-cell>
              <table:table-cell office:value-type="float" office:value="NaN">
                <text:p>NaN</text:p>
              </table:table-cell>
            </table:table-row>
            <table:table-row>
              <table:table-cell office:value-type="string">
                <text:p>1351</text:p>
              </table:table-cell>
              <table:table-cell office:value-type="float" office:value="0.00539999986358453">
                <text:p>0.00539999986358453</text:p>
              </table:table-cell>
              <table:table-cell office:value-type="float" office:value="0.118000000715256">
                <text:p>0.118000000715256</text:p>
              </table:table-cell>
              <table:table-cell office:value-type="float" office:value="NaN">
                <text:p>NaN</text:p>
              </table:table-cell>
            </table:table-row>
            <table:table-row>
              <table:table-cell office:value-type="string">
                <text:p>1352</text:p>
              </table:table-cell>
              <table:table-cell office:value-type="float" office:value="0.00540399986348348">
                <text:p>0.00540399986348348</text:p>
              </table:table-cell>
              <table:table-cell office:value-type="float" office:value="0.112000003457069">
                <text:p>0.112000003457069</text:p>
              </table:table-cell>
              <table:table-cell office:value-type="float" office:value="NaN">
                <text:p>NaN</text:p>
              </table:table-cell>
            </table:table-row>
            <table:table-row>
              <table:table-cell office:value-type="string">
                <text:p>1353</text:p>
              </table:table-cell>
              <table:table-cell office:value-type="float" office:value="0.00540799986338243">
                <text:p>0.00540799986338243</text:p>
              </table:table-cell>
              <table:table-cell office:value-type="float" office:value="0.109000004827976">
                <text:p>0.109000004827976</text:p>
              </table:table-cell>
              <table:table-cell office:value-type="float" office:value="NaN">
                <text:p>NaN</text:p>
              </table:table-cell>
            </table:table-row>
            <table:table-row>
              <table:table-cell office:value-type="string">
                <text:p>1354</text:p>
              </table:table-cell>
              <table:table-cell office:value-type="float" office:value="0.00541199986328138">
                <text:p>0.00541199986328138</text:p>
              </table:table-cell>
              <table:table-cell office:value-type="float" office:value="0.105999998748302">
                <text:p>0.105999998748302</text:p>
              </table:table-cell>
              <table:table-cell office:value-type="float" office:value="NaN">
                <text:p>NaN</text:p>
              </table:table-cell>
            </table:table-row>
            <table:table-row>
              <table:table-cell office:value-type="string">
                <text:p>1355</text:p>
              </table:table-cell>
              <table:table-cell office:value-type="float" office:value="0.00541599986318033">
                <text:p>0.00541599986318033</text:p>
              </table:table-cell>
              <table:table-cell office:value-type="float" office:value="0.100000001490116">
                <text:p>0.100000001490116</text:p>
              </table:table-cell>
              <table:table-cell office:value-type="float" office:value="NaN">
                <text:p>NaN</text:p>
              </table:table-cell>
            </table:table-row>
            <table:table-row>
              <table:table-cell office:value-type="string">
                <text:p>1356</text:p>
              </table:table-cell>
              <table:table-cell office:value-type="float" office:value="0.00541999986307928">
                <text:p>0.00541999986307928</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357</text:p>
              </table:table-cell>
              <table:table-cell office:value-type="float" office:value="0.00542399986297823">
                <text:p>0.00542399986297823</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358</text:p>
              </table:table-cell>
              <table:table-cell office:value-type="float" office:value="0.00542799986287719">
                <text:p>0.0054279998628771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59</text:p>
              </table:table-cell>
              <table:table-cell office:value-type="float" office:value="0.00543199986277614">
                <text:p>0.0054319998627761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360</text:p>
              </table:table-cell>
              <table:table-cell office:value-type="float" office:value="0.00543599986267509">
                <text:p>0.0054359998626750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361</text:p>
              </table:table-cell>
              <table:table-cell office:value-type="float" office:value="0.00543999986257404">
                <text:p>0.00543999986257404</text:p>
              </table:table-cell>
              <table:table-cell office:value-type="float" office:value="0.068000003695488">
                <text:p>0.068000003695488</text:p>
              </table:table-cell>
              <table:table-cell office:value-type="float" office:value="NaN">
                <text:p>NaN</text:p>
              </table:table-cell>
            </table:table-row>
            <table:table-row>
              <table:table-cell office:value-type="string">
                <text:p>1362</text:p>
              </table:table-cell>
              <table:table-cell office:value-type="float" office:value="0.00544399986247299">
                <text:p>0.0054439998624729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63</text:p>
              </table:table-cell>
              <table:table-cell office:value-type="float" office:value="0.00544799986237194">
                <text:p>0.0054479998623719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364</text:p>
              </table:table-cell>
              <table:table-cell office:value-type="float" office:value="0.0054519998622709">
                <text:p>0.00545199986227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65</text:p>
              </table:table-cell>
              <table:table-cell office:value-type="float" office:value="0.00545599986216985">
                <text:p>0.00545599986216985</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66</text:p>
              </table:table-cell>
              <table:table-cell office:value-type="float" office:value="0.0054599998620688">
                <text:p>0.0054599998620688</text:p>
              </table:table-cell>
              <table:table-cell office:value-type="float" office:value="0.046000000089407">
                <text:p>0.046000000089407</text:p>
              </table:table-cell>
              <table:table-cell office:value-type="float" office:value="NaN">
                <text:p>NaN</text:p>
              </table:table-cell>
            </table:table-row>
            <table:table-row>
              <table:table-cell office:value-type="string">
                <text:p>1367</text:p>
              </table:table-cell>
              <table:table-cell office:value-type="float" office:value="0.00546399986196775">
                <text:p>0.0054639998619677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368</text:p>
              </table:table-cell>
              <table:table-cell office:value-type="float" office:value="0.0054679998618667">
                <text:p>0.005467999861866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69</text:p>
              </table:table-cell>
              <table:table-cell office:value-type="float" office:value="0.00547199986176565">
                <text:p>0.00547199986176565</text:p>
              </table:table-cell>
              <table:table-cell office:value-type="float" office:value="0.034000001847744">
                <text:p>0.034000001847744</text:p>
              </table:table-cell>
              <table:table-cell office:value-type="float" office:value="NaN">
                <text:p>NaN</text:p>
              </table:table-cell>
            </table:table-row>
            <table:table-row>
              <table:table-cell office:value-type="string">
                <text:p>1370</text:p>
              </table:table-cell>
              <table:table-cell office:value-type="float" office:value="0.00547599986166461">
                <text:p>0.00547599986166461</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371</text:p>
              </table:table-cell>
              <table:table-cell office:value-type="float" office:value="0.00547999986156356">
                <text:p>0.005479999861563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372</text:p>
              </table:table-cell>
              <table:table-cell office:value-type="float" office:value="0.00548399986146251">
                <text:p>0.0054839998614625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73</text:p>
              </table:table-cell>
              <table:table-cell office:value-type="float" office:value="0.00548799986136146">
                <text:p>0.0054879998613614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374</text:p>
              </table:table-cell>
              <table:table-cell office:value-type="float" office:value="0.00549199986126041">
                <text:p>0.0054919998612604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5</text:p>
              </table:table-cell>
              <table:table-cell office:value-type="float" office:value="0.00549599986115936">
                <text:p>0.0054959998611593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376</text:p>
              </table:table-cell>
              <table:table-cell office:value-type="float" office:value="0.00549999986105831">
                <text:p>0.00549999986105831</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377</text:p>
              </table:table-cell>
              <table:table-cell office:value-type="float" office:value="0.00550399986095726">
                <text:p>0.0055039998609572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8</text:p>
              </table:table-cell>
              <table:table-cell office:value-type="float" office:value="0.00550799986085622">
                <text:p>0.00550799986085622</text:p>
              </table:table-cell>
              <table:table-cell office:value-type="float" office:value="-0.0120000001043081">
                <text:p>-0.0120000001043081</text:p>
              </table:table-cell>
              <table:table-cell office:value-type="float" office:value="NaN">
                <text:p>NaN</text:p>
              </table:table-cell>
            </table:table-row>
            <table:table-row>
              <table:table-cell office:value-type="string">
                <text:p>1379</text:p>
              </table:table-cell>
              <table:table-cell office:value-type="float" office:value="0.00551199986075517">
                <text:p>0.0055119998607551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80</text:p>
              </table:table-cell>
              <table:table-cell office:value-type="float" office:value="0.00551599986065412">
                <text:p>0.0055159998606541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381</text:p>
              </table:table-cell>
              <table:table-cell office:value-type="float" office:value="0.00551999986055307">
                <text:p>0.00551999986055307</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382</text:p>
              </table:table-cell>
              <table:table-cell office:value-type="float" office:value="0.00552399986045202">
                <text:p>0.00552399986045202</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383</text:p>
              </table:table-cell>
              <table:table-cell office:value-type="float" office:value="0.00552799986035097">
                <text:p>0.00552799986035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384</text:p>
              </table:table-cell>
              <table:table-cell office:value-type="float" office:value="0.00553199986024993">
                <text:p>0.00553199986024993</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85</text:p>
              </table:table-cell>
              <table:table-cell office:value-type="float" office:value="0.00553599986014888">
                <text:p>0.0055359998601488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386</text:p>
              </table:table-cell>
              <table:table-cell office:value-type="float" office:value="0.00553999986004783">
                <text:p>0.0055399998600478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387</text:p>
              </table:table-cell>
              <table:table-cell office:value-type="float" office:value="0.00554399985994678">
                <text:p>0.00554399985994678</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88</text:p>
              </table:table-cell>
              <table:table-cell office:value-type="float" office:value="0.00554799985984573">
                <text:p>0.0055479998598457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89</text:p>
              </table:table-cell>
              <table:table-cell office:value-type="float" office:value="0.00555199985974468">
                <text:p>0.00555199985974468</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90</text:p>
              </table:table-cell>
              <table:table-cell office:value-type="float" office:value="0.00555599985964364">
                <text:p>0.00555599985964364</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391</text:p>
              </table:table-cell>
              <table:table-cell office:value-type="float" office:value="0.00555999985954259">
                <text:p>0.00555999985954259</text:p>
              </table:table-cell>
              <table:table-cell office:value-type="float" office:value="-0.0750000029802322">
                <text:p>-0.0750000029802322</text:p>
              </table:table-cell>
              <table:table-cell office:value-type="float" office:value="NaN">
                <text:p>NaN</text:p>
              </table:table-cell>
            </table:table-row>
            <table:table-row>
              <table:table-cell office:value-type="string">
                <text:p>1392</text:p>
              </table:table-cell>
              <table:table-cell office:value-type="float" office:value="0.00556399985944154">
                <text:p>0.0055639998594415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393</text:p>
              </table:table-cell>
              <table:table-cell office:value-type="float" office:value="0.00556799985934049">
                <text:p>0.0055679998593404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94</text:p>
              </table:table-cell>
              <table:table-cell office:value-type="float" office:value="0.00557199985923944">
                <text:p>0.00557199985923944</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395</text:p>
              </table:table-cell>
              <table:table-cell office:value-type="float" office:value="0.00557599985913839">
                <text:p>0.00557599985913839</text:p>
              </table:table-cell>
              <table:table-cell office:value-type="float" office:value="-0.096000000834465">
                <text:p>-0.096000000834465</text:p>
              </table:table-cell>
              <table:table-cell office:value-type="float" office:value="NaN">
                <text:p>NaN</text:p>
              </table:table-cell>
            </table:table-row>
            <table:table-row>
              <table:table-cell office:value-type="string">
                <text:p>1396</text:p>
              </table:table-cell>
              <table:table-cell office:value-type="float" office:value="0.00557999985903734">
                <text:p>0.00557999985903734</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397</text:p>
              </table:table-cell>
              <table:table-cell office:value-type="float" office:value="0.0055839998589363">
                <text:p>0.0055839998589363</text:p>
              </table:table-cell>
              <table:table-cell office:value-type="float" office:value="-0.104000002145767">
                <text:p>-0.104000002145767</text:p>
              </table:table-cell>
              <table:table-cell office:value-type="float" office:value="NaN">
                <text:p>NaN</text:p>
              </table:table-cell>
            </table:table-row>
            <table:table-row>
              <table:table-cell office:value-type="string">
                <text:p>1398</text:p>
              </table:table-cell>
              <table:table-cell office:value-type="float" office:value="0.00558799985883525">
                <text:p>0.00558799985883525</text:p>
              </table:table-cell>
              <table:table-cell office:value-type="float" office:value="-0.109999999403954">
                <text:p>-0.109999999403954</text:p>
              </table:table-cell>
              <table:table-cell office:value-type="float" office:value="NaN">
                <text:p>NaN</text:p>
              </table:table-cell>
            </table:table-row>
            <table:table-row>
              <table:table-cell office:value-type="string">
                <text:p>1399</text:p>
              </table:table-cell>
              <table:table-cell office:value-type="float" office:value="0.0055919998587342">
                <text:p>0.0055919998587342</text:p>
              </table:table-cell>
              <table:table-cell office:value-type="float" office:value="-0.114000000059605">
                <text:p>-0.114000000059605</text:p>
              </table:table-cell>
              <table:table-cell office:value-type="float" office:value="NaN">
                <text:p>NaN</text:p>
              </table:table-cell>
            </table:table-row>
            <table:table-row>
              <table:table-cell office:value-type="string">
                <text:p>1400</text:p>
              </table:table-cell>
              <table:table-cell office:value-type="float" office:value="0.00559599985863315">
                <text:p>0.00559599985863315</text:p>
              </table:table-cell>
              <table:table-cell office:value-type="float" office:value="-0.120999999344349">
                <text:p>-0.120999999344349</text:p>
              </table:table-cell>
              <table:table-cell office:value-type="float" office:value="NaN">
                <text:p>NaN</text:p>
              </table:table-cell>
            </table:table-row>
            <table:table-row>
              <table:table-cell office:value-type="string">
                <text:p>1401</text:p>
              </table:table-cell>
              <table:table-cell office:value-type="float" office:value="0.0055999998585321">
                <text:p>0.0055999998585321</text:p>
              </table:table-cell>
              <table:table-cell office:value-type="float" office:value="-0.124000005424023">
                <text:p>-0.124000005424023</text:p>
              </table:table-cell>
              <table:table-cell office:value-type="float" office:value="NaN">
                <text:p>NaN</text:p>
              </table:table-cell>
            </table:table-row>
            <table:table-row>
              <table:table-cell office:value-type="string">
                <text:p>1402</text:p>
              </table:table-cell>
              <table:table-cell office:value-type="float" office:value="0.00560399985843105">
                <text:p>0.00560399985843105</text:p>
              </table:table-cell>
              <table:table-cell office:value-type="float" office:value="-0.128000006079674">
                <text:p>-0.128000006079674</text:p>
              </table:table-cell>
              <table:table-cell office:value-type="float" office:value="NaN">
                <text:p>NaN</text:p>
              </table:table-cell>
            </table:table-row>
            <table:table-row>
              <table:table-cell office:value-type="string">
                <text:p>1403</text:p>
              </table:table-cell>
              <table:table-cell office:value-type="float" office:value="0.00560799985833">
                <text:p>0.00560799985833</text:p>
              </table:table-cell>
              <table:table-cell office:value-type="float" office:value="-0.13400000333786">
                <text:p>-0.13400000333786</text:p>
              </table:table-cell>
              <table:table-cell office:value-type="float" office:value="NaN">
                <text:p>NaN</text:p>
              </table:table-cell>
            </table:table-row>
            <table:table-row>
              <table:table-cell office:value-type="string">
                <text:p>1404</text:p>
              </table:table-cell>
              <table:table-cell office:value-type="float" office:value="0.00561199985822896">
                <text:p>0.0056119998582289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05</text:p>
              </table:table-cell>
              <table:table-cell office:value-type="float" office:value="0.00561599985812791">
                <text:p>0.0056159998581279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06</text:p>
              </table:table-cell>
              <table:table-cell office:value-type="float" office:value="0.00561999985802686">
                <text:p>0.00561999985802686</text:p>
              </table:table-cell>
              <table:table-cell office:value-type="float" office:value="-0.150000005960464">
                <text:p>-0.150000005960464</text:p>
              </table:table-cell>
              <table:table-cell office:value-type="float" office:value="NaN">
                <text:p>NaN</text:p>
              </table:table-cell>
            </table:table-row>
            <table:table-row>
              <table:table-cell office:value-type="string">
                <text:p>1407</text:p>
              </table:table-cell>
              <table:table-cell office:value-type="float" office:value="0.00562399985792581">
                <text:p>0.00562399985792581</text:p>
              </table:table-cell>
              <table:table-cell office:value-type="float" office:value="-0.153999999165535">
                <text:p>-0.153999999165535</text:p>
              </table:table-cell>
              <table:table-cell office:value-type="float" office:value="NaN">
                <text:p>NaN</text:p>
              </table:table-cell>
            </table:table-row>
            <table:table-row>
              <table:table-cell office:value-type="string">
                <text:p>1408</text:p>
              </table:table-cell>
              <table:table-cell office:value-type="float" office:value="0.00562799985782476">
                <text:p>0.005627999857824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09</text:p>
              </table:table-cell>
              <table:table-cell office:value-type="float" office:value="0.00563199985772371">
                <text:p>0.00563199985772371</text:p>
              </table:table-cell>
              <table:table-cell office:value-type="float" office:value="-0.164000004529953">
                <text:p>-0.164000004529953</text:p>
              </table:table-cell>
              <table:table-cell office:value-type="float" office:value="NaN">
                <text:p>NaN</text:p>
              </table:table-cell>
            </table:table-row>
            <table:table-row>
              <table:table-cell office:value-type="string">
                <text:p>1410</text:p>
              </table:table-cell>
              <table:table-cell office:value-type="float" office:value="0.00563599985762267">
                <text:p>0.00563599985762267</text:p>
              </table:table-cell>
              <table:table-cell office:value-type="float" office:value="-0.166999995708466">
                <text:p>-0.166999995708466</text:p>
              </table:table-cell>
              <table:table-cell office:value-type="float" office:value="NaN">
                <text:p>NaN</text:p>
              </table:table-cell>
            </table:table-row>
            <table:table-row>
              <table:table-cell office:value-type="string">
                <text:p>1411</text:p>
              </table:table-cell>
              <table:table-cell office:value-type="float" office:value="0.00563999985752162">
                <text:p>0.00563999985752162</text:p>
              </table:table-cell>
              <table:table-cell office:value-type="float" office:value="-0.172000005841255">
                <text:p>-0.172000005841255</text:p>
              </table:table-cell>
              <table:table-cell office:value-type="float" office:value="NaN">
                <text:p>NaN</text:p>
              </table:table-cell>
            </table:table-row>
            <table:table-row>
              <table:table-cell office:value-type="string">
                <text:p>1412</text:p>
              </table:table-cell>
              <table:table-cell office:value-type="float" office:value="0.00564399985742057">
                <text:p>0.00564399985742057</text:p>
              </table:table-cell>
              <table:table-cell office:value-type="float" office:value="-0.178000003099442">
                <text:p>-0.178000003099442</text:p>
              </table:table-cell>
              <table:table-cell office:value-type="float" office:value="NaN">
                <text:p>NaN</text:p>
              </table:table-cell>
            </table:table-row>
            <table:table-row>
              <table:table-cell office:value-type="string">
                <text:p>1413</text:p>
              </table:table-cell>
              <table:table-cell office:value-type="float" office:value="0.00564799985731952">
                <text:p>0.00564799985731952</text:p>
              </table:table-cell>
              <table:table-cell office:value-type="float" office:value="-0.184000000357628">
                <text:p>-0.184000000357628</text:p>
              </table:table-cell>
              <table:table-cell office:value-type="float" office:value="NaN">
                <text:p>NaN</text:p>
              </table:table-cell>
            </table:table-row>
            <table:table-row>
              <table:table-cell office:value-type="string">
                <text:p>1414</text:p>
              </table:table-cell>
              <table:table-cell office:value-type="float" office:value="0.00565199985721847">
                <text:p>0.00565199985721847</text:p>
              </table:table-cell>
              <table:table-cell office:value-type="float" office:value="-0.18800000846386">
                <text:p>-0.18800000846386</text:p>
              </table:table-cell>
              <table:table-cell office:value-type="float" office:value="NaN">
                <text:p>NaN</text:p>
              </table:table-cell>
            </table:table-row>
            <table:table-row>
              <table:table-cell office:value-type="string">
                <text:p>1415</text:p>
              </table:table-cell>
              <table:table-cell office:value-type="float" office:value="0.00565599985711742">
                <text:p>0.00565599985711742</text:p>
              </table:table-cell>
              <table:table-cell office:value-type="float" office:value="-0.19200000166893">
                <text:p>-0.19200000166893</text:p>
              </table:table-cell>
              <table:table-cell office:value-type="float" office:value="NaN">
                <text:p>NaN</text:p>
              </table:table-cell>
            </table:table-row>
            <table:table-row>
              <table:table-cell office:value-type="string">
                <text:p>1416</text:p>
              </table:table-cell>
              <table:table-cell office:value-type="float" office:value="0.00565999985701637">
                <text:p>0.00565999985701637</text:p>
              </table:table-cell>
              <table:table-cell office:value-type="float" office:value="-0.196000009775162">
                <text:p>-0.196000009775162</text:p>
              </table:table-cell>
              <table:table-cell office:value-type="float" office:value="NaN">
                <text:p>NaN</text:p>
              </table:table-cell>
            </table:table-row>
            <table:table-row>
              <table:table-cell office:value-type="string">
                <text:p>1417</text:p>
              </table:table-cell>
              <table:table-cell office:value-type="float" office:value="0.00566399985691533">
                <text:p>0.00566399985691533</text:p>
              </table:table-cell>
              <table:table-cell office:value-type="float" office:value="-0.200000002980232">
                <text:p>-0.200000002980232</text:p>
              </table:table-cell>
              <table:table-cell office:value-type="float" office:value="NaN">
                <text:p>NaN</text:p>
              </table:table-cell>
            </table:table-row>
            <table:table-row>
              <table:table-cell office:value-type="string">
                <text:p>1418</text:p>
              </table:table-cell>
              <table:table-cell office:value-type="float" office:value="0.00566799985681428">
                <text:p>0.00566799985681428</text:p>
              </table:table-cell>
              <table:table-cell office:value-type="float" office:value="-0.203000009059906">
                <text:p>-0.203000009059906</text:p>
              </table:table-cell>
              <table:table-cell office:value-type="float" office:value="NaN">
                <text:p>NaN</text:p>
              </table:table-cell>
            </table:table-row>
            <table:table-row>
              <table:table-cell office:value-type="string">
                <text:p>1419</text:p>
              </table:table-cell>
              <table:table-cell office:value-type="float" office:value="0.00567199985671323">
                <text:p>0.0056719998567132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0</text:p>
              </table:table-cell>
              <table:table-cell office:value-type="float" office:value="0.00567599985661218">
                <text:p>0.005675999856612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1</text:p>
              </table:table-cell>
              <table:table-cell office:value-type="float" office:value="0.00567999985651113">
                <text:p>0.005679999856511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2</text:p>
              </table:table-cell>
              <table:table-cell office:value-type="float" office:value="0.00568399985641008">
                <text:p>0.0056839998564100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3</text:p>
              </table:table-cell>
              <table:table-cell office:value-type="float" office:value="0.00568799985630903">
                <text:p>0.00568799985630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4</text:p>
              </table:table-cell>
              <table:table-cell office:value-type="float" office:value="0.00569199985620799">
                <text:p>0.005691999856207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5</text:p>
              </table:table-cell>
              <table:table-cell office:value-type="float" office:value="0.00569599985610694">
                <text:p>0.005695999856106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6</text:p>
              </table:table-cell>
              <table:table-cell office:value-type="float" office:value="0.00569999985600589">
                <text:p>0.0056999998560058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7</text:p>
              </table:table-cell>
              <table:table-cell office:value-type="float" office:value="0.00570399985590484">
                <text:p>0.0057039998559048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8</text:p>
              </table:table-cell>
              <table:table-cell office:value-type="float" office:value="0.00570799985580379">
                <text:p>0.005707999855803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9</text:p>
              </table:table-cell>
              <table:table-cell office:value-type="float" office:value="0.00571199985570274">
                <text:p>0.0057119998557027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0</text:p>
              </table:table-cell>
              <table:table-cell office:value-type="float" office:value="0.0057159998556017">
                <text:p>0.0057159998556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1</text:p>
              </table:table-cell>
              <table:table-cell office:value-type="float" office:value="0.00571999985550065">
                <text:p>0.0057199998555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2</text:p>
              </table:table-cell>
              <table:table-cell office:value-type="float" office:value="0.0057239998553996">
                <text:p>0.0057239998553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3</text:p>
              </table:table-cell>
              <table:table-cell office:value-type="float" office:value="0.00572799985529855">
                <text:p>0.0057279998552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4</text:p>
              </table:table-cell>
              <table:table-cell office:value-type="float" office:value="0.0057319998551975">
                <text:p>0.00573199985519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5</text:p>
              </table:table-cell>
              <table:table-cell office:value-type="float" office:value="0.00573599985509645">
                <text:p>0.0057359998550964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6</text:p>
              </table:table-cell>
              <table:table-cell office:value-type="float" office:value="0.0057399998549954">
                <text:p>0.005739999854995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7</text:p>
              </table:table-cell>
              <table:table-cell office:value-type="float" office:value="0.00574399985489436">
                <text:p>0.0057439998548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8</text:p>
              </table:table-cell>
              <table:table-cell office:value-type="float" office:value="0.00574799985479331">
                <text:p>0.0057479998547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9</text:p>
              </table:table-cell>
              <table:table-cell office:value-type="float" office:value="0.00575199985469226">
                <text:p>0.0057519998546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0</text:p>
              </table:table-cell>
              <table:table-cell office:value-type="float" office:value="0.00575599985459121">
                <text:p>0.0057559998545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1</text:p>
              </table:table-cell>
              <table:table-cell office:value-type="float" office:value="0.00575999985449016">
                <text:p>0.005759999854490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2</text:p>
              </table:table-cell>
              <table:table-cell office:value-type="float" office:value="0.00576399985438911">
                <text:p>0.005763999854389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3</text:p>
              </table:table-cell>
              <table:table-cell office:value-type="float" office:value="0.00576799985428806">
                <text:p>0.005767999854288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4</text:p>
              </table:table-cell>
              <table:table-cell office:value-type="float" office:value="0.00577199985418702">
                <text:p>0.0057719998541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5</text:p>
              </table:table-cell>
              <table:table-cell office:value-type="float" office:value="0.00577599985408597">
                <text:p>0.0057759998540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6</text:p>
              </table:table-cell>
              <table:table-cell office:value-type="float" office:value="0.00577999985398492">
                <text:p>0.0057799998539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7</text:p>
              </table:table-cell>
              <table:table-cell office:value-type="float" office:value="0.00578399985388387">
                <text:p>0.0057839998538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8</text:p>
              </table:table-cell>
              <table:table-cell office:value-type="float" office:value="0.00578799985378282">
                <text:p>0.005787999853782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9</text:p>
              </table:table-cell>
              <table:table-cell office:value-type="float" office:value="0.00579199985368177">
                <text:p>0.005791999853681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0</text:p>
              </table:table-cell>
              <table:table-cell office:value-type="float" office:value="0.00579599985358073">
                <text:p>0.0057959998535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1</text:p>
              </table:table-cell>
              <table:table-cell office:value-type="float" office:value="0.00579999985347968">
                <text:p>0.0057999998534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2</text:p>
              </table:table-cell>
              <table:table-cell office:value-type="float" office:value="0.00580399985337863">
                <text:p>0.0058039998533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3</text:p>
              </table:table-cell>
              <table:table-cell office:value-type="float" office:value="0.00580799985327758">
                <text:p>0.0058079998532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4</text:p>
              </table:table-cell>
              <table:table-cell office:value-type="float" office:value="0.00581199985317653">
                <text:p>0.005811999853176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5</text:p>
              </table:table-cell>
              <table:table-cell office:value-type="float" office:value="0.00581599985307548">
                <text:p>0.005815999853075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6</text:p>
              </table:table-cell>
              <table:table-cell office:value-type="float" office:value="0.00581999985297443">
                <text:p>0.005819999852974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7</text:p>
              </table:table-cell>
              <table:table-cell office:value-type="float" office:value="0.00582399985287339">
                <text:p>0.0058239998528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8</text:p>
              </table:table-cell>
              <table:table-cell office:value-type="float" office:value="0.00582799985277234">
                <text:p>0.0058279998527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9</text:p>
              </table:table-cell>
              <table:table-cell office:value-type="float" office:value="0.00583199985267129">
                <text:p>0.0058319998526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0</text:p>
              </table:table-cell>
              <table:table-cell office:value-type="float" office:value="0.00583599985257024">
                <text:p>0.0058359998525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1</text:p>
              </table:table-cell>
              <table:table-cell office:value-type="float" office:value="0.00583999985246919">
                <text:p>0.00583999985246919</text:p>
              </table:table-cell>
              <table:table-cell office:value-type="float" office:value="-0.202000007033348">
                <text:p>-0.202000007033348</text:p>
              </table:table-cell>
              <table:table-cell office:value-type="float" office:value="NaN">
                <text:p>NaN</text:p>
              </table:table-cell>
            </table:table-row>
            <table:table-row>
              <table:table-cell office:value-type="string">
                <text:p>1462</text:p>
              </table:table-cell>
              <table:table-cell office:value-type="float" office:value="0.00584399985236814">
                <text:p>0.00584399985236814</text:p>
              </table:table-cell>
              <table:table-cell office:value-type="float" office:value="-0.196000009775162">
                <text:p>-0.196000009775162</text:p>
              </table:table-cell>
              <table:table-cell office:value-type="float" office:value="NaN">
                <text:p>NaN</text:p>
              </table:table-cell>
            </table:table-row>
            <table:table-row>
              <table:table-cell office:value-type="string">
                <text:p>1463</text:p>
              </table:table-cell>
              <table:table-cell office:value-type="float" office:value="0.00584799985226709">
                <text:p>0.00584799985226709</text:p>
              </table:table-cell>
              <table:table-cell office:value-type="float" office:value="-0.19200000166893">
                <text:p>-0.19200000166893</text:p>
              </table:table-cell>
              <table:table-cell office:value-type="float" office:value="NaN">
                <text:p>NaN</text:p>
              </table:table-cell>
            </table:table-row>
            <table:table-row>
              <table:table-cell office:value-type="string">
                <text:p>1464</text:p>
              </table:table-cell>
              <table:table-cell office:value-type="float" office:value="0.00585199985216605">
                <text:p>0.00585199985216605</text:p>
              </table:table-cell>
              <table:table-cell office:value-type="float" office:value="-0.18800000846386">
                <text:p>-0.18800000846386</text:p>
              </table:table-cell>
              <table:table-cell office:value-type="float" office:value="NaN">
                <text:p>NaN</text:p>
              </table:table-cell>
            </table:table-row>
            <table:table-row>
              <table:table-cell office:value-type="string">
                <text:p>1465</text:p>
              </table:table-cell>
              <table:table-cell office:value-type="float" office:value="0.005855999852065">
                <text:p>0.005855999852065</text:p>
              </table:table-cell>
              <table:table-cell office:value-type="float" office:value="-0.184000000357628">
                <text:p>-0.184000000357628</text:p>
              </table:table-cell>
              <table:table-cell office:value-type="float" office:value="NaN">
                <text:p>NaN</text:p>
              </table:table-cell>
            </table:table-row>
            <table:table-row>
              <table:table-cell office:value-type="string">
                <text:p>1466</text:p>
              </table:table-cell>
              <table:table-cell office:value-type="float" office:value="0.00585999985196395">
                <text:p>0.00585999985196395</text:p>
              </table:table-cell>
              <table:table-cell office:value-type="float" office:value="-0.178000003099442">
                <text:p>-0.178000003099442</text:p>
              </table:table-cell>
              <table:table-cell office:value-type="float" office:value="NaN">
                <text:p>NaN</text:p>
              </table:table-cell>
            </table:table-row>
            <table:table-row>
              <table:table-cell office:value-type="string">
                <text:p>1467</text:p>
              </table:table-cell>
              <table:table-cell office:value-type="float" office:value="0.0058639998518629">
                <text:p>0.0058639998518629</text:p>
              </table:table-cell>
              <table:table-cell office:value-type="float" office:value="-0.172000005841255">
                <text:p>-0.172000005841255</text:p>
              </table:table-cell>
              <table:table-cell office:value-type="float" office:value="NaN">
                <text:p>NaN</text:p>
              </table:table-cell>
            </table:table-row>
            <table:table-row>
              <table:table-cell office:value-type="string">
                <text:p>1468</text:p>
              </table:table-cell>
              <table:table-cell office:value-type="float" office:value="0.00586799985176185">
                <text:p>0.00586799985176185</text:p>
              </table:table-cell>
              <table:table-cell office:value-type="float" office:value="-0.168999999761581">
                <text:p>-0.168999999761581</text:p>
              </table:table-cell>
              <table:table-cell office:value-type="float" office:value="NaN">
                <text:p>NaN</text:p>
              </table:table-cell>
            </table:table-row>
            <table:table-row>
              <table:table-cell office:value-type="string">
                <text:p>1469</text:p>
              </table:table-cell>
              <table:table-cell office:value-type="float" office:value="0.0058719998516608">
                <text:p>0.0058719998516608</text:p>
              </table:table-cell>
              <table:table-cell office:value-type="float" office:value="-0.164000004529953">
                <text:p>-0.164000004529953</text:p>
              </table:table-cell>
              <table:table-cell office:value-type="float" office:value="NaN">
                <text:p>NaN</text:p>
              </table:table-cell>
            </table:table-row>
            <table:table-row>
              <table:table-cell office:value-type="string">
                <text:p>1470</text:p>
              </table:table-cell>
              <table:table-cell office:value-type="float" office:value="0.00587599985155976">
                <text:p>0.005875999851559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71</text:p>
              </table:table-cell>
              <table:table-cell office:value-type="float" office:value="0.00587999985145871">
                <text:p>0.00587999985145871</text:p>
              </table:table-cell>
              <table:table-cell office:value-type="float" office:value="-0.151999995112419">
                <text:p>-0.151999995112419</text:p>
              </table:table-cell>
              <table:table-cell office:value-type="float" office:value="NaN">
                <text:p>NaN</text:p>
              </table:table-cell>
            </table:table-row>
            <table:table-row>
              <table:table-cell office:value-type="string">
                <text:p>1472</text:p>
              </table:table-cell>
              <table:table-cell office:value-type="float" office:value="0.00588399985135766">
                <text:p>0.00588399985135766</text:p>
              </table:table-cell>
              <table:table-cell office:value-type="float" office:value="-0.148000001907349">
                <text:p>-0.148000001907349</text:p>
              </table:table-cell>
              <table:table-cell office:value-type="float" office:value="NaN">
                <text:p>NaN</text:p>
              </table:table-cell>
            </table:table-row>
            <table:table-row>
              <table:table-cell office:value-type="string">
                <text:p>1473</text:p>
              </table:table-cell>
              <table:table-cell office:value-type="float" office:value="0.00588799985125661">
                <text:p>0.0058879998512566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74</text:p>
              </table:table-cell>
              <table:table-cell office:value-type="float" office:value="0.00589199985115556">
                <text:p>0.0058919998511555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75</text:p>
              </table:table-cell>
              <table:table-cell office:value-type="float" office:value="0.00589599985105451">
                <text:p>0.00589599985105451</text:p>
              </table:table-cell>
              <table:table-cell office:value-type="float" office:value="-0.13400000333786">
                <text:p>-0.13400000333786</text:p>
              </table:table-cell>
              <table:table-cell office:value-type="float" office:value="NaN">
                <text:p>NaN</text:p>
              </table:table-cell>
            </table:table-row>
            <table:table-row>
              <table:table-cell office:value-type="string">
                <text:p>1476</text:p>
              </table:table-cell>
              <table:table-cell office:value-type="float" office:value="0.00589999985095346">
                <text:p>0.00589999985095346</text:p>
              </table:table-cell>
              <table:table-cell office:value-type="float" office:value="-0.129999995231628">
                <text:p>-0.129999995231628</text:p>
              </table:table-cell>
              <table:table-cell office:value-type="float" office:value="NaN">
                <text:p>NaN</text:p>
              </table:table-cell>
            </table:table-row>
            <table:table-row>
              <table:table-cell office:value-type="string">
                <text:p>1477</text:p>
              </table:table-cell>
              <table:table-cell office:value-type="float" office:value="0.00590399985085242">
                <text:p>0.00590399985085242</text:p>
              </table:table-cell>
              <table:table-cell office:value-type="float" office:value="-0.126000002026558">
                <text:p>-0.126000002026558</text:p>
              </table:table-cell>
              <table:table-cell office:value-type="float" office:value="NaN">
                <text:p>NaN</text:p>
              </table:table-cell>
            </table:table-row>
            <table:table-row>
              <table:table-cell office:value-type="string">
                <text:p>1478</text:p>
              </table:table-cell>
              <table:table-cell office:value-type="float" office:value="0.00590799985075137">
                <text:p>0.00590799985075137</text:p>
              </table:table-cell>
              <table:table-cell office:value-type="float" office:value="-0.120999999344349">
                <text:p>-0.120999999344349</text:p>
              </table:table-cell>
              <table:table-cell office:value-type="float" office:value="NaN">
                <text:p>NaN</text:p>
              </table:table-cell>
            </table:table-row>
            <table:table-row>
              <table:table-cell office:value-type="string">
                <text:p>1479</text:p>
              </table:table-cell>
              <table:table-cell office:value-type="float" office:value="0.00591199985065032">
                <text:p>0.00591199985065032</text:p>
              </table:table-cell>
              <table:table-cell office:value-type="float" office:value="-0.11600000411272">
                <text:p>-0.11600000411272</text:p>
              </table:table-cell>
              <table:table-cell office:value-type="float" office:value="NaN">
                <text:p>NaN</text:p>
              </table:table-cell>
            </table:table-row>
            <table:table-row>
              <table:table-cell office:value-type="string">
                <text:p>1480</text:p>
              </table:table-cell>
              <table:table-cell office:value-type="float" office:value="0.00591599985054927">
                <text:p>0.00591599985054927</text:p>
              </table:table-cell>
              <table:table-cell office:value-type="float" office:value="-0.112000003457069">
                <text:p>-0.112000003457069</text:p>
              </table:table-cell>
              <table:table-cell office:value-type="float" office:value="NaN">
                <text:p>NaN</text:p>
              </table:table-cell>
            </table:table-row>
            <table:table-row>
              <table:table-cell office:value-type="string">
                <text:p>1481</text:p>
              </table:table-cell>
              <table:table-cell office:value-type="float" office:value="0.00591999985044822">
                <text:p>0.00591999985044822</text:p>
              </table:table-cell>
              <table:table-cell office:value-type="float" office:value="-0.105999998748302">
                <text:p>-0.105999998748302</text:p>
              </table:table-cell>
              <table:table-cell office:value-type="float" office:value="NaN">
                <text:p>NaN</text:p>
              </table:table-cell>
            </table:table-row>
            <table:table-row>
              <table:table-cell office:value-type="string">
                <text:p>1482</text:p>
              </table:table-cell>
              <table:table-cell office:value-type="float" office:value="0.00592399985034717">
                <text:p>0.00592399985034717</text:p>
              </table:table-cell>
              <table:table-cell office:value-type="float" office:value="-0.100000001490116">
                <text:p>-0.100000001490116</text:p>
              </table:table-cell>
              <table:table-cell office:value-type="float" office:value="NaN">
                <text:p>NaN</text:p>
              </table:table-cell>
            </table:table-row>
            <table:table-row>
              <table:table-cell office:value-type="string">
                <text:p>1483</text:p>
              </table:table-cell>
              <table:table-cell office:value-type="float" office:value="0.00592799985024612">
                <text:p>0.00592799985024612</text:p>
              </table:table-cell>
              <table:table-cell office:value-type="float" office:value="-0.096000000834465">
                <text:p>-0.096000000834465</text:p>
              </table:table-cell>
              <table:table-cell office:value-type="float" office:value="NaN">
                <text:p>NaN</text:p>
              </table:table-cell>
            </table:table-row>
            <table:table-row>
              <table:table-cell office:value-type="string">
                <text:p>1484</text:p>
              </table:table-cell>
              <table:table-cell office:value-type="float" office:value="0.00593199985014508">
                <text:p>0.0059319998501450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485</text:p>
              </table:table-cell>
              <table:table-cell office:value-type="float" office:value="0.00593599985004403">
                <text:p>0.0059359998500440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86</text:p>
              </table:table-cell>
              <table:table-cell office:value-type="float" office:value="0.00593999984994298">
                <text:p>0.0059399998499429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487</text:p>
              </table:table-cell>
              <table:table-cell office:value-type="float" office:value="0.00594399984984193">
                <text:p>0.00594399984984193</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488</text:p>
              </table:table-cell>
              <table:table-cell office:value-type="float" office:value="0.00594799984974088">
                <text:p>0.00594799984974088</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489</text:p>
              </table:table-cell>
              <table:table-cell office:value-type="float" office:value="0.00595199984963983">
                <text:p>0.00595199984963983</text:p>
              </table:table-cell>
              <table:table-cell office:value-type="float" office:value="-0.068000003695488">
                <text:p>-0.068000003695488</text:p>
              </table:table-cell>
              <table:table-cell office:value-type="float" office:value="NaN">
                <text:p>NaN</text:p>
              </table:table-cell>
            </table:table-row>
            <table:table-row>
              <table:table-cell office:value-type="string">
                <text:p>1490</text:p>
              </table:table-cell>
              <table:table-cell office:value-type="float" office:value="0.00595599984953879">
                <text:p>0.0059559998495387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491</text:p>
              </table:table-cell>
              <table:table-cell office:value-type="float" office:value="0.00595999984943774">
                <text:p>0.0059599998494377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492</text:p>
              </table:table-cell>
              <table:table-cell office:value-type="float" office:value="0.00596399984933669">
                <text:p>0.00596399984933669</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493</text:p>
              </table:table-cell>
              <table:table-cell office:value-type="float" office:value="0.00596799984923564">
                <text:p>0.0059679998492356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494</text:p>
              </table:table-cell>
              <table:table-cell office:value-type="float" office:value="0.00597199984913459">
                <text:p>0.0059719998491345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495</text:p>
              </table:table-cell>
              <table:table-cell office:value-type="float" office:value="0.00597599984903354">
                <text:p>0.0059759998490335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496</text:p>
              </table:table-cell>
              <table:table-cell office:value-type="float" office:value="0.00597999984893249">
                <text:p>0.00597999984893249</text:p>
              </table:table-cell>
              <table:table-cell office:value-type="float" office:value="-0.034000001847744">
                <text:p>-0.034000001847744</text:p>
              </table:table-cell>
              <table:table-cell office:value-type="float" office:value="NaN">
                <text:p>NaN</text:p>
              </table:table-cell>
            </table:table-row>
            <table:table-row>
              <table:table-cell office:value-type="string">
                <text:p>1497</text:p>
              </table:table-cell>
              <table:table-cell office:value-type="float" office:value="0.00598399984883145">
                <text:p>0.00598399984883145</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498</text:p>
              </table:table-cell>
              <table:table-cell office:value-type="float" office:value="0.0059879998487304">
                <text:p>0.0059879998487304</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499</text:p>
              </table:table-cell>
              <table:table-cell office:value-type="float" office:value="0.00599199984862935">
                <text:p>0.0059919998486293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500</text:p>
              </table:table-cell>
              <table:table-cell office:value-type="float" office:value="0.0059959998485283">
                <text:p>0.0059959998485283</text:p>
              </table:table-cell>
              <table:table-cell office:value-type="float" office:value="-0.0140000004321337">
                <text:p>-0.0140000004321337</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3.2$Windows_X86_64 LibreOffice_project/70e089b17412e4cb7773e41413306b17a2328c34</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stroke-dash draw:name="msLineDash_20_1" draw:display-name="msLineDash 1" draw:style="rect" draw:dots1="1" draw:dots1-length="300%" draw:distance="100%"/>
    <draw:stroke-dash draw:name="msLineDash_20_2" draw:display-name="msLineDash 2" draw:style="rect" draw:dots1="1" draw:dots1-length="300%" draw:distance="100%"/>
  </office:styles>
</office:document-styles>
</file>