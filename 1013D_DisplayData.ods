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eta.xml" manifest:media-type="text/xml"/>
  <manifest:file-entry manifest:full-path="Basic/Standard/script-lb.xml" manifest:media-type="text/xml"/>
  <manifest:file-entry manifest:full-path="Basic/VBAProject/Tabelle1.xml" manifest:media-type="text/xml"/>
  <manifest:file-entry manifest:full-path="Basic/VBAProject/Modul1.xml" manifest:media-type="text/xml"/>
  <manifest:file-entry manifest:full-path="Basic/VBAProject/DieseArbeitsmappe.xml" manifest:media-type="text/xml"/>
  <manifest:file-entry manifest:full-path="Basic/VBAProject/script-lb.xml" manifest:media-type="text/xml"/>
  <manifest:file-entry manifest:full-path="Basic/script-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84cm"/>
    </style:style>
    <style:style style:name="co2" style:family="table-column">
      <style:table-column-properties fo:break-before="auto" style:column-width="2.097cm"/>
    </style:style>
    <style:style style:name="co3" style:family="table-column">
      <style:table-column-properties fo:break-before="auto" style:column-width="0.199cm"/>
    </style:style>
    <style:style style:name="co4" style:family="table-column">
      <style:table-column-properties fo:break-before="auto" style:column-width="2.977cm"/>
    </style:style>
    <style:style style:name="co5" style:family="table-column">
      <style:table-column-properties fo:break-before="auto" style:column-width="2.09cm"/>
    </style:style>
    <style:style style:name="ro1" style:family="table-row">
      <style:table-row-properties style:row-height="0.552cm" fo:break-before="auto" style:use-optimal-row-height="false"/>
    </style:style>
    <style:style style:name="ro2" style:family="table-row">
      <style:table-row-properties style:row-height="0.788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487cm" fo:break-before="auto" style:use-optimal-row-height="true"/>
    </style:style>
    <style:style style:name="ta1" style:family="table" style:master-page-name="PageStyle_5f_Tabelle1">
      <style:table-properties table:display="true" style:writing-mode="lr-tb"/>
    </style:style>
    <number:date-style style:name="N72" number:automatic-order="true">
      <number:day number:style="long"/>
      <number:text>.</number:text>
      <number:month number:style="long"/>
      <number:text>.</number:text>
      <number:year number:style="long"/>
      <number:text> </number:text>
      <number:hours number:style="long"/>
      <number:text>:</number:text>
      <number:minutes number:style="long"/>
    </number:date-style>
    <number:boolean-style style:name="N99">
      <number:boolean/>
    </number:boolean-style>
    <style:style style:name="ce3" style:family="table-cell" style:parent-style-name="Default" style:data-style-name="N153">
      <style:table-cell-properties fo:border-bottom="0.74pt solid #808080" fo:background-color="#9bbb59" style:diagonal-bl-tr="none" style:diagonal-tl-br="none" style:text-align-source="fix" style:repeat-content="false" fo:wrap-option="no-wrap" fo:border-left="0.74pt solid #808080"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accent3" loext:color-type="theme"/>
        <loext:border-left-complex-color loext:theme-type="light1" loext:color-type="theme">
          <loext:transformation loext:type="lummod" loext:value="50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 style:family="table-cell" style:parent-style-name="Default" style:data-style-name="N153">
      <style:table-cell-properties style:rotation-align="none"/>
      <style:text-properties fo:color="#4f622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3" loext:color-type="theme">
          <loext:transformation loext:type="lummod" loext:value="5000"/>
        </loext:char-complex-color>
      </style:text-properties>
    </style:style>
    <style:style style:name="ce11" style:family="table-cell" style:parent-style-name="Default" style:data-style-name="N153">
      <style:table-cell-properties fo:border-bottom="0.74pt solid #808080" fo:background-color="#c0504d" style:diagonal-bl-tr="none" style:diagonal-tl-br="none" style:text-align-source="fix" style:repeat-content="false" fo:wrap-option="no-wrap" fo:border-left="0.74pt solid #808080" style:direction="ltr" fo:border-right="0.74pt solid #808080"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6" style:family="table-cell" style:parent-style-name="Default" style:data-style-name="N153">
      <style:table-cell-properties fo:border-bottom="0.74pt solid #808080"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style:table-cell-properties>
      <style:paragraph-properties fo:text-align="end"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19" style:family="table-cell" style:parent-style-name="Default" style:data-style-name="N153">
      <style:table-cell-properties fo:border-bottom="none" fo:background-color="#4f81bd" style:diagonal-bl-tr="none" style:diagonal-tl-br="none" style:text-align-source="fix" style:repeat-content="false" fo:wrap-option="no-wrap" fo:border-left="0.74pt solid #808080" style:direction="ltr" fo:border-right="0.74pt solid #808080"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8" style:family="table-cell" style:parent-style-name="Default" style:data-style-name="N153">
      <style:table-cell-properties fo:border-bottom="none"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end" css3t:text-justify="auto" fo:margin-left="0cm" style:writing-mode="pag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1" loext:color-type="theme">
          <loext:transformation loext:type="lummod" loext:value="7500"/>
        </loext:char-complex-color>
      </style:text-properties>
    </style:style>
    <style:style style:name="ce2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808080" style:vertical-align="middle" loext:vertical-justify="auto">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0"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808080" style:vertical-align="bottom" loext:vertical-justify="auto">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15" style:family="table-cell" style:parent-style-name="Default">
      <style:table-cell-properties fo:border-bottom="0.74pt solid #808080" fo:background-color="#a6a6a6"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light1" loext:color-type="theme">
          <loext:transformation loext:type="lummod" loext:value="6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0" style:family="table-cell" style:parent-style-name="Default" style:data-style-name="N99">
      <style:table-cell-properties fo:background-color="#c0504d" style:cell-protect="none" style:print-content="tru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4" style:family="table-cell" style:parent-style-name="Default" style:data-style-name="N99">
      <style:table-cell-properties fo:background-color="#4f81bd" style:cell-protect="none" style:print-content="tru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7" style:family="table-cell" style:parent-style-name="Default">
      <style:table-cell-properties fo:border-bottom="none" fo:background-color="#ffffff" style:diagonal-bl-tr="none" style:diagonal-tl-br="none" style:text-align-source="fix" style:repeat-content="false" fo:wrap-option="no-wrap" fo:border-left="0.74pt solid #808080" style:direction="ltr" fo:border-right="none"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font-name="Calibri" fo:font-size="11pt" style:font-size-asian="11pt" style:font-size-complex="11pt"/>
    </style:style>
    <style:style style:name="ce18" style:family="table-cell" style:parent-style-name="Default">
      <style:table-cell-properties fo:border-bottom="none" fo:background-color="#ffffff" style:diagonal-bl-tr="none" style:diagonal-tl-br="none" style:text-align-source="fix" style:repeat-content="false" fo:wrap-option="no-wrap" fo:border-left="0.74pt solid #808080"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style:font-name="Calibri" fo:font-size="11pt" style:font-size-asian="11pt" style:font-size-complex="11pt"/>
    </style:style>
    <style:style style:name="ce21" style:family="table-cell" style:parent-style-name="Default">
      <style:table-cell-properties fo:border-bottom="0.74pt solid #808080" fo:background-color="#ffffff" style:diagonal-bl-tr="none" style:diagonal-tl-br="none" style:text-align-source="fix" style:repeat-content="false" fo:wrap-option="no-wrap" fo:border-left="0.74pt solid #808080"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style:font-name="Calibri" fo:font-size="11pt" style:font-size-asian="11pt" style:font-size-complex="11pt"/>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23"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24" style:family="table-cell" style:parent-style-name="Default">
      <style:table-cell-properties fo:border-bottom="0.74pt solid #808080"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25" style:family="table-cell" style:parent-style-name="Default">
      <style:table-cell-properties fo:border-bottom="none"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1" loext:color-type="theme">
          <loext:transformation loext:type="lummod" loext:value="7500"/>
        </loext:char-complex-color>
      </style:text-properties>
    </style:style>
    <style:style style:name="ce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font-name="Calibri" fo:font-size="11pt" style:font-size-asian="11pt" style:font-size-complex="11pt"/>
    </style:style>
    <style:style style:name="ce2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29" style:family="table-cell" style:parent-style-name="Default">
      <style:table-cell-properties fo:border-bottom="0.74pt solid #80808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style:table-cell-properties>
      <style:paragraph-properties fo:text-align="center" css3t:text-justify="auto" fo:margin-left="0cm" style:writing-mode="page"/>
      <style:text-properties style:font-name="Calibri" fo:font-size="11pt" style:font-size-asian="11pt" style:font-size-complex="11pt"/>
    </style:style>
    <style:style style:name="ce31" style:family="table-cell" style:parent-style-name="Default" style:data-style-name="N153">
      <style:table-cell-properties fo:border-bottom="0.74pt solid #808080"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32" style:family="table-cell" style:parent-style-name="Default" style:data-style-name="N153">
      <style:table-cell-properties fo:border-bottom="none"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1" loext:color-type="theme">
          <loext:transformation loext:type="lummod" loext:value="7500"/>
        </loext:char-complex-color>
      </style:text-properties>
    </style:style>
    <style:style style:name="ce62" style:family="table-cell" style:parent-style-name="Default" style:data-style-name="N153">
      <style:table-cell-properties fo:background-color="#ffffff" style:cell-protect="none" style:print-content="true" style:diagonal-bl-tr="none" style:diagonal-tl-br="none" style:text-align-source="fix" style:repeat-content="false" fo:wrap-option="wrap" fo:border="0.74pt solid #808080" style:direction="ltr" style:rotation-angle="0" style:rotation-align="none" style:shrink-to-fit="false" style:vertical-align="middle"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34" style:family="table-cell" style:parent-style-name="Default" style:data-style-name="N153">
      <style:table-cell-properties fo:border-bottom="0.74pt solid #808080" fo:background-color="#ffffff" style:cell-protect="none" style:print-content="true" style:diagonal-bl-tr="none" style:diagonal-tl-br="none" style:text-align-source="fix" style:repeat-content="false" fo:wrap-option="wrap" fo:border-left="0.74pt solid #808080"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64" style:family="table-cell" style:parent-style-name="Default" style:data-style-name="N72">
      <style:table-cell-properties fo:border-bottom="0.74pt solid #808080" fo:background-color="#a6a6a6"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light1" loext:color-type="theme">
          <loext:transformation loext:type="lummod" loext:value="6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36" style:family="table-cell" style:parent-style-name="Default" style:data-style-name="N153">
      <style:table-cell-properties fo:border-bottom="none"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808080" style:vertical-align="middle" loext:vertical-justify="auto">
        <loext:border-top-complex-color loext:theme-type="light1" loext:color-type="theme">
          <loext:transformation loext:type="lummod" loext:value="50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38" style:family="table-cell" style:parent-style-name="Default" style:data-style-name="N153">
      <style:table-cell-properties fo:border-bottom="0.74pt solid #808080"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39" style:family="table-cell" style:parent-style-name="Default" style:data-style-name="N72">
      <style:table-cell-properties fo:border-bottom="0.74pt solid #808080" fo:background-color="#a6a6a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light1" loext:color-type="theme">
          <loext:transformation loext:type="lummod" loext:value="6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1" style:family="table-cell" style:parent-style-name="Default">
      <style:table-cell-properties fo:border-bottom="none" fo:background-color="#ffffff" style:diagonal-bl-tr="none" style:diagonal-tl-br="none" fo:border-left="none" fo:border-right="none" style:rotation-align="none" fo:border-top="0.74pt solid #808080">
        <loext:border-top-complex-color loext:theme-type="light1" loext:color-type="theme">
          <loext:transformation loext:type="lummod" loext:value="5000"/>
        </loext:border-top-complex-color>
      </style:table-cell-properties>
      <style:text-properties style:font-name="Calibri" fo:font-size="11pt" style:font-size-asian="11pt" style:font-size-complex="11pt"/>
    </style:style>
    <style:style style:name="ce42" style:family="table-cell" style:parent-style-name="Default">
      <style:table-cell-properties fo:background-color="#ffffff" style:diagonal-bl-tr="none" style:diagonal-tl-br="none" fo:border="none" style:rotation-align="none"/>
      <style:text-properties style:font-name="Calibri" fo:font-size="11pt" style:font-size-asian="11pt" style:font-size-complex="11pt"/>
    </style:style>
    <style:style style:name="ce43" style:family="table-cell" style:parent-style-name="Default">
      <style:table-cell-properties fo:border-bottom="0.74pt solid #808080" fo:background-color="#ffffff"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style:font-name="Calibri" fo:font-size="11pt" style:font-size-asian="11pt" style:font-size-complex="11pt"/>
    </style:style>
    <style:style style:name="ce51" style:family="table-cell" style:parent-style-name="Default">
      <style:table-cell-properties fo:background-color="#ffffff" style:rotation-align="none"/>
      <style:text-properties style:font-name="Calibri" fo:font-size="11pt" style:font-size-asian="11pt" style:font-size-complex="11pt"/>
    </style:style>
    <style:style style:name="ce53" style:family="table-cell" style:parent-style-name="Default">
      <style:text-properties style:font-name="Calibri" fo:font-size="11pt" style:font-size-asian="11pt" style:font-size-complex="11pt"/>
    </style:style>
    <style:style style:name="ce58" style:family="table-cell" style:parent-style-name="Default" style:data-style-name="N153">
      <style:table-cell-properties fo:border-bottom="none" fo:background-color="#ffffff" style:cell-protect="none" style:print-content="true" style:diagonal-bl-tr="none" style:diagonal-tl-br="none" style:text-align-source="fix" style:repeat-content="false" fo:wrap-option="wrap" fo:border-left="none" style:direction="ltr" fo:border-right="0.74pt solid #808080" style:rotation-angle="0" style:rotation-align="none" style:shrink-to-fit="false" fo:border-top="0.74pt solid #808080" style:vertical-align="middle" loext:vertical-justify="auto">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59" style:family="table-cell" style:parent-style-name="Default" style:data-style-name="N153">
      <style:table-cell-properties fo:border-bottom="0.74pt solid #808080" fo:background-color="#ffffff" style:cell-protect="none" style:print-content="true" style:diagonal-bl-tr="none" style:diagonal-tl-br="none" style:text-align-source="fix" style:repeat-content="false" fo:wrap-option="wrap" fo:border-left="none" style:direction="ltr" fo:border-right="0.74pt solid #808080"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order-right-complex-color loext:theme-type="light1" loext:color-type="theme">
          <loext:transformation loext:type="lummod" loext:value="5000"/>
        </loext:border-right-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69" style:family="table-cell" style:parent-style-name="Default">
      <style:table-cell-properties fo:border-bottom="0.74pt solid #808080" fo:background-color="#ffc000" style:diagonal-bl-tr="none" style:diagonal-tl-br="none" style:text-align-source="fix" style:repeat-content="false" fo:wrap-option="no-wrap" fo:border-left="none" style:direction="ltr" fo:border-right="0.74pt solid #808080"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72" style:family="table-cell" style:parent-style-name="Default" style:data-style-name="N153">
      <style:table-cell-properties fo:background-color="#a6a6a6" style:diagonal-bl-tr="none" style:diagonal-tl-br="none" style:text-align-source="fix" style:repeat-content="false" fo:wrap-option="no-wrap" fo:border="0.74pt solid #808080" style:direction="ltr" style:rotation-angle="0" style:rotation-align="none" style:shrink-to-fit="fals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76" style:family="table-cell" style:parent-style-name="Default">
      <style:table-cell-properties fo:border-bottom="none" fo:background-color="#ffffff" style:diagonal-bl-tr="none" style:diagonal-tl-br="none" fo:border-left="none" fo:border-right="0.74pt solid #808080" style:rotation-align="none" fo:border-top="0.74pt solid #808080">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text-properties style:font-name="Calibri" fo:font-size="11pt" style:font-size-asian="11pt" style:font-size-complex="11pt"/>
    </style:style>
    <style:style style:name="ce80" style:family="table-cell" style:parent-style-name="Default">
      <style:table-cell-properties fo:border-bottom="none" fo:background-color="#ffffff" style:diagonal-bl-tr="none" style:diagonal-tl-br="none" fo:border-left="none" fo:border-right="0.74pt solid #808080" style:rotation-align="none" fo:border-top="none">
        <loext:border-right-complex-color loext:theme-type="light1" loext:color-type="theme">
          <loext:transformation loext:type="lummod" loext:value="5000"/>
        </loext:border-right-complex-color>
      </style:table-cell-properties>
      <style:text-properties style:font-name="Calibri" fo:font-size="11pt" style:font-size-asian="11pt" style:font-size-complex="11pt"/>
    </style:style>
    <style:style style:name="ce84" style:family="table-cell" style:parent-style-name="Default">
      <style:table-cell-properties fo:border-bottom="0.74pt solid #808080" fo:background-color="#ffffff" style:diagonal-bl-tr="none" style:diagonal-tl-br="none" fo:border-left="none" fo:border-right="0.74pt solid #808080" style:rotation-align="none" fo:border-top="none">
        <loext:border-bottom-complex-color loext:theme-type="light1" loext:color-type="theme">
          <loext:transformation loext:type="lummod" loext:value="5000"/>
        </loext:border-bottom-complex-color>
        <loext:border-right-complex-color loext:theme-type="light1" loext:color-type="theme">
          <loext:transformation loext:type="lummod" loext:value="5000"/>
        </loext:border-right-complex-color>
      </style:table-cell-properties>
      <style:text-properties style:font-name="Calibri" fo:font-size="11pt" style:font-size-asian="11pt" style:font-size-complex="11pt"/>
    </style:style>
    <style:style style:name="ce87"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88" style:family="table-cell" style:parent-style-name="Default">
      <style:table-cell-properties fo:background-color="#ffffff"/>
      <style:text-properties style:font-name="Calibri" fo:font-size="11pt" style:font-size-asian="11pt" style:font-size-complex="11pt"/>
    </style:style>
    <style:style style:name="ce89" style:family="table-cell" style:parent-style-name="Default">
      <style:table-cell-properties fo:background-color="transparent"/>
      <style:text-properties style:font-name="Calibri" fo:font-size="11pt" style:font-size-asian="11pt" style:font-size-complex="11pt"/>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paragraph-properties fo:text-align="left"/>
      <style:text-properties fo:font-size="18pt"/>
    </style:style>
    <style:style style:name="gr2" style:family="graphic" style:parent-style-name="Default">
      <style:graphic-properties draw:textarea-vertical-align="middle" fo:background-color="#c0504d" loext:decorative="false"/>
      <style:text-properties fo:color="#000000" style:text-line-through-style="none" style:text-line-through-type="none" fo:font-family="Tahoma" fo:font-size="8pt" fo:font-style="normal" style:text-underline-style="none" fo:font-weight="normal"/>
    </style:style>
    <style:style style:name="gr3" style:family="graphic" style:parent-style-name="Default">
      <style:graphic-properties draw:textarea-vertical-align="middle" fo:background-color="#ece9d8" loext:decorative="false"/>
      <style:text-properties fo:color="#000000" style:text-line-through-style="none" style:text-line-through-type="none" fo:font-family="Calibri" fo:font-size="11pt" fo:font-style="normal" style:text-underline-style="none" fo:font-weight="normal"/>
    </style:style>
    <style:style style:name="gr4" style:family="graphic" style:parent-style-name="Default">
      <style:graphic-properties draw:textarea-vertical-align="middle" fo:background-color="#4f81bd" loext:decorative="false"/>
      <style:text-properties fo:color="#000000" style:text-line-through-style="none" style:text-line-through-type="none" fo:font-family="Tahoma" fo:font-size="8pt" fo:font-style="normal" style:text-underline-style="none" fo:font-weight="normal"/>
    </style:style>
    <style:style style:name="P1" style:family="paragraph">
      <loext:graphic-properties draw:fill="none"/>
      <style:paragraph-properties fo:text-align="left"/>
      <style:text-properties fo:font-size="18pt"/>
    </style:style>
    <style:style style:name="P2" style:family="paragraph">
      <style:paragraph-properties fo:text-align="left"/>
      <style:text-properties fo:color="#000000" style:text-line-through-style="none" style:text-line-through-type="none" fo:font-family="Tahoma" fo:font-size="8pt" fo:font-style="normal" style:text-underline-style="none" fo:font-weight="normal"/>
    </style:style>
    <style:style style:name="P3" style:family="paragraph">
      <style:paragraph-properties fo:text-align="center"/>
      <style:text-properties fo:color="#000000" style:text-line-through-style="none" style:text-line-through-type="none" fo:font-family="Calibri" fo:font-size="11pt" fo:font-style="normal" style:text-underline-style="none" fo:font-weight="normal"/>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Tabelle1" table:style-name="ta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1" form:id="control1" form:label="Open Fil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D:/Documents/ELEKTRONIK/FNIRSI-1013D/1013D_DisplayData_Libre.ods/content.xml"/>
              </form:properties>
              <office:event-listeners>
                <script:event-listener script:language="ooo:script" script:event-name="form:performaction" xlink:href="vnd.sun.star.script:VBAProject.Modul1.Open_File?language=Basic&amp;location=document" xlink:type="simple"/>
              </office:event-listeners>
            </form:button>
            <form:checkbox form:name="Check Box 3" form:control-implementation="ooo:com.sun.star.form.component.CheckBox" xml:id="control2" form:id="control2" form:label="   CH1" form:visual-effect="flat" form:input-required="false" form:linked-cell="Tabelle1.E2" form:state="checked"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Referer" office:value-type="string" office:string-value="file:///D:/Documents/ELEKTRONIK/FNIRSI-1013D/1013D_DisplayData_Libre.ods/content.xml"/>
                <form:property form:property-name="SecondaryRefValue" office:value-type="string" office:string-value=""/>
              </form:properties>
              <office:event-listeners>
                <script:event-listener script:language="ooo:script" script:event-name="form:performaction" xlink:href="vnd.sun.star.script:VBAProject.Modul1.Chan_Select?language=Basic&amp;location=document" xlink:type="simple"/>
              </office:event-listeners>
            </form:checkbox>
            <form:checkbox form:name="Check Box 4" form:control-implementation="ooo:com.sun.star.form.component.CheckBox" xml:id="control3" form:id="control3" form:label="   CH2" form:visual-effect="flat" form:input-required="false" form:linked-cell="Tabelle1.E3" form:state="checked"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Referer" office:value-type="string" office:string-value="file:///D:/Documents/ELEKTRONIK/FNIRSI-1013D/1013D_DisplayData_Libre.ods/content.xml"/>
                <form:property form:property-name="SecondaryRefValue" office:value-type="string" office:string-value=""/>
              </form:properties>
              <office:event-listeners>
                <script:event-listener script:language="ooo:script" script:event-name="form:performaction" xlink:href="vnd.sun.star.script:VBAProject.Modul1.Chan_Select?language=Basic&amp;location=document" xlink:type="simple"/>
              </office:event-listeners>
            </form:checkbox>
            <form:button form:name="Button 2" form:control-implementation="ooo:com.sun.star.form.component.CommandButton" xml:id="control4" form:id="control4" form:label="Export CSV"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D:/Documents/ELEKTRONIK/FNIRSI-1013D/1013D_DisplayData_Libre.ods/content.xml"/>
              </form:properties>
              <office:event-listeners>
                <script:event-listener script:language="ooo:script" script:event-name="form:performaction" xlink:href="vnd.sun.star.script:VBAProject.Modul1.Export_CSV?language=Basic&amp;location=document" xlink:type="simple"/>
              </office:event-listeners>
            </form:button>
          </form:form>
        </office:forms>
        <table:shapes>
          <draw:frame draw:z-index="0" draw:name="Diagramm 1" draw:style-name="gr1" draw:text-style-name="P1" svg:width="25.855cm" svg:height="16.35cm" svg:x="6.451cm" svg:y="2.354cm">
            <draw:object draw:notify-on-update-of-ranges="Tabelle1.A2:Tabelle1.A1501 Tabelle1.B1:Tabelle1.B1 Tabelle1.B2:Tabelle1.B1501 Tabelle1.A2:Tabelle1.A1501 Tabelle1.C1:Tabelle1.C1 Tabelle1.C2:Tabelle1.C1501" xlink:href="./Object 1" xlink:type="simple" xlink:show="embed" xlink:actuate="onLoad">
              <loext:p/>
            </draw:object>
            <draw:image xlink:href="./ObjectReplacements/Object 1" xlink:type="simple" xlink:show="embed" xlink:actuate="onLoad"/>
          </draw:frame>
        </table:shapes>
        <table:table-column table:style-name="co1" table:default-cell-style-name="ce4"/>
        <table:table-column table:style-name="co2" table:default-cell-style-name="ce6"/>
        <table:table-column table:style-name="co2" table:default-cell-style-name="ce8"/>
        <table:table-column table:style-name="co3" table:default-cell-style-name="ce14"/>
        <table:table-column table:style-name="co2" table:number-columns-repeated="9" table:default-cell-style-name="ce14"/>
        <table:table-column table:style-name="co2" table:number-columns-repeated="2" table:default-cell-style-name="ce53"/>
        <table:table-column table:style-name="co4" table:default-cell-style-name="ce53"/>
        <table:table-column table:style-name="co5" table:default-cell-style-name="ce89"/>
        <table:table-column table:style-name="co5" table:number-columns-repeated="16367"/>
        <table:table-row table:style-name="ro1">
          <table:table-cell table:style-name="ce3" office:value-type="string" calcext:value-type="string">
            <text:p>TIME</text:p>
          </table:table-cell>
          <table:table-cell table:style-name="ce11" office:value-type="string" calcext:value-type="string">
            <text:p>CH1</text:p>
          </table:table-cell>
          <table:table-cell table:style-name="ce19" office:value-type="string" calcext:value-type="string">
            <text:p>CH2</text:p>
          </table:table-cell>
          <table:table-cell table:style-name="ce27" table:number-columns-spanned="1" table:number-rows-spanned="35"/>
          <table:table-cell table:style-name="ce15"/>
          <table:table-cell table:style-name="ce15" office:value-type="string" calcext:value-type="string">
            <text:p>PROBE X</text:p>
          </table:table-cell>
          <table:table-cell table:style-name="ce15" office:value-type="string" calcext:value-type="string">
            <text:p>V/DIV</text:p>
          </table:table-cell>
          <table:table-cell table:style-name="ce15" office:value-type="string" calcext:value-type="string">
            <text:p>T/DIV</text:p>
          </table:table-cell>
          <table:table-cell table:style-name="ce15" office:value-type="string" calcext:value-type="string">
            <text:p>V_MIN</text:p>
          </table:table-cell>
          <table:table-cell table:style-name="ce15" office:value-type="string" calcext:value-type="string">
            <text:p>V_MAX</text:p>
          </table:table-cell>
          <table:table-cell table:style-name="ce15" office:value-type="string" calcext:value-type="string">
            <text:p>V_AVG</text:p>
          </table:table-cell>
          <table:table-cell table:style-name="ce15"/>
          <table:table-cell table:style-name="ce64" office:value-type="string" calcext:value-type="string">
            <text:p>V1.10</text:p>
          </table:table-cell>
          <table:table-cell table:style-name="ce39" table:formula="of:=NOW()" office:value-type="date" office:date-value="2026-05-21T15:20:10.55049" calcext:value-type="date" table:number-columns-spanned="2" table:number-rows-spanned="1">
            <text:p>21.05.2026 15:20</text:p>
          </table:table-cell>
          <table:covered-table-cell table:style-name="ce39"/>
          <table:table-cell table:style-name="ce69" office:value-type="string" calcext:value-type="string">
            <text:p>FNIRSI 1013D</text:p>
          </table:table-cell>
          <table:table-cell table:style-name="ce87"/>
          <table:table-cell table:style-name="ce53" table:number-columns-repeated="16367"/>
        </table:table-row>
        <table:table-row table:style-name="ro2">
          <table:table-cell office:value-type="float" office:value="0" calcext:value-type="float">
            <text:p>0,00E+0</text:p>
          </table:table-cell>
          <table:table-cell office:value-type="float" office:value="-2.79999995231628" calcext:value-type="float">
            <text:p>-2,80E+0</text:p>
          </table:table-cell>
          <table:table-cell office:value-type="float" office:value="-20" calcext:value-type="float">
            <text:p>-2,00E+1</text:p>
          </table:table-cell>
          <table:covered-table-cell table:style-name="ce10"/>
          <table:table-cell table:style-name="ce40" office:value-type="boolean" office:boolean-value="true" calcext:value-type="boolean">
            <text:p>WAHR</text:p>
            <draw:control table:end-cell-address="Tabelle1.E2" table:end-x="2.098cm" table:end-y="0.709cm" draw:z-index="2" draw:style-name="gr2" draw:text-style-name="P2" svg:width="2.098cm" svg:height="0.68cm" svg:x="0cm" svg:y="0.029cm" draw:control="control2"/>
          </table:table-cell>
          <table:table-cell table:style-name="ce24" office:value-type="float" office:value="10" calcext:value-type="float">
            <text:p>10</text:p>
          </table:table-cell>
          <table:table-cell table:style-name="ce31" office:value-type="float" office:value="1" calcext:value-type="float">
            <text:p>1,00E+0</text:p>
          </table:table-cell>
          <table:table-cell table:style-name="ce31" office:value-type="float" office:value="0.0000999999974737875" calcext:value-type="float">
            <text:p>1,00E-4</text:p>
          </table:table-cell>
          <table:table-cell table:style-name="ce31" table:formula="of:=MIN([.B2:.B1501])" office:value-type="float" office:value="-40" calcext:value-type="float">
            <text:p>-4,00E+1</text:p>
          </table:table-cell>
          <table:table-cell table:style-name="ce31" table:formula="of:=MAX([.B2:.B1501])" office:value-type="float" office:value="40.2000007629395" calcext:value-type="float">
            <text:p>4,02E+1</text:p>
          </table:table-cell>
          <table:table-cell table:style-name="ce31" table:formula="of:=AVERAGE([.B2:.B1501])" office:value-type="float" office:value="-0.2563999538819" calcext:value-type="float">
            <text:p>-2,56E-1</text:p>
          </table:table-cell>
          <table:table-cell table:style-name="ce62" office:value-type="string" calcext:value-type="string" table:number-columns-spanned="4" table:number-rows-spanned="2">
            <text:p>D:\Documents\ELEKTRONIK\FNIRSI-1013D\1013d_orig_data\7.wav</text:p>
          </table:table-cell>
          <table:covered-table-cell table:number-columns-repeated="2" table:style-name="ce36"/>
          <table:covered-table-cell table:style-name="ce58"/>
          <table:table-cell table:style-name="ce72" table:number-columns-spanned="1" table:number-rows-spanned="2">
            <draw:control draw:z-index="1" draw:style-name="gr3" draw:text-style-name="P3" svg:width="2.381cm" svg:height="0.661cm" svg:x="0.291cm" svg:y="0.077cm" draw:control="control1"/>
          </table:table-cell>
          <table:table-cell table:style-name="ce51"/>
          <table:table-cell table:style-name="ce53" table:number-columns-repeated="16367"/>
        </table:table-row>
        <table:table-row table:style-name="ro2">
          <table:table-cell office:value-type="float" office:value="0.00000199999994947575" calcext:value-type="float">
            <text:p>2,00E-6</text:p>
          </table:table-cell>
          <table:table-cell office:value-type="float" office:value="-2.79999995231628" calcext:value-type="float">
            <text:p>-2,80E+0</text:p>
          </table:table-cell>
          <table:table-cell office:value-type="float" office:value="-20" calcext:value-type="float">
            <text:p>-2,00E+1</text:p>
          </table:table-cell>
          <table:covered-table-cell table:style-name="ce10"/>
          <table:table-cell table:style-name="ce44" office:value-type="boolean" office:boolean-value="true" calcext:value-type="boolean">
            <text:p>WAHR</text:p>
            <draw:control table:end-cell-address="Tabelle1.E3" table:end-x="2.098cm" table:end-y="0.709cm" draw:z-index="3" draw:style-name="gr4" draw:text-style-name="P2" svg:width="2.098cm" svg:height="0.68cm" svg:x="0cm" svg:y="0.029cm" draw:control="control3"/>
          </table:table-cell>
          <table:table-cell table:style-name="ce25" office:value-type="float" office:value="1" calcext:value-type="float">
            <text:p>1</text:p>
          </table:table-cell>
          <table:table-cell table:style-name="ce32" office:value-type="float" office:value="5" calcext:value-type="float">
            <text:p>5,00E+0</text:p>
          </table:table-cell>
          <table:table-cell table:style-name="ce32" office:value-type="float" office:value="0.0000999999974737875" calcext:value-type="float">
            <text:p>1,00E-4</text:p>
          </table:table-cell>
          <table:table-cell table:style-name="ce32" table:formula="of:=MIN([.C2:.C1501])" office:value-type="float" office:value="-20" calcext:value-type="float">
            <text:p>-2,00E+1</text:p>
          </table:table-cell>
          <table:table-cell table:style-name="ce32" table:formula="of:=MAX([.C2:.C1501])" office:value-type="float" office:value="-20" calcext:value-type="float">
            <text:p>-2,00E+1</text:p>
          </table:table-cell>
          <table:table-cell table:style-name="ce32" table:formula="of:=AVERAGE([.C2:.C1501])" office:value-type="float" office:value="-20" calcext:value-type="float">
            <text:p>-2,00E+1</text:p>
          </table:table-cell>
          <table:covered-table-cell table:style-name="ce34"/>
          <table:covered-table-cell table:number-columns-repeated="2" table:style-name="ce38"/>
          <table:covered-table-cell table:style-name="ce59"/>
          <table:covered-table-cell table:style-name="ce31">
            <draw:control draw:z-index="4" draw:style-name="gr3" draw:text-style-name="P3" svg:width="2.381cm" svg:height="0.661cm" svg:x="0.285cm" svg:y="0.006cm" draw:control="control4"/>
          </table:covered-table-cell>
          <table:table-cell table:style-name="ce88"/>
          <table:table-cell table:style-name="ce53" table:number-columns-repeated="16367"/>
        </table:table-row>
        <table:table-row table:style-name="ro3">
          <table:table-cell office:value-type="float" office:value="0.0000039999998989515" calcext:value-type="float">
            <text:p>4,00E-6</text:p>
          </table:table-cell>
          <table:table-cell office:value-type="float" office:value="-3.20000004768372" calcext:value-type="float">
            <text:p>-3,20E+0</text:p>
          </table:table-cell>
          <table:table-cell office:value-type="float" office:value="-20" calcext:value-type="float">
            <text:p>-2,00E+1</text:p>
          </table:table-cell>
          <table:covered-table-cell table:style-name="ce10"/>
          <table:table-cell table:style-name="ce17"/>
          <table:table-cell table:style-name="ce26" table:number-columns-repeated="8"/>
          <table:table-cell table:style-name="ce41" table:number-columns-repeated="2"/>
          <table:table-cell table:style-name="ce76"/>
          <table:table-cell table:style-name="ce51"/>
          <table:table-cell table:style-name="ce53" table:number-columns-repeated="16367"/>
        </table:table-row>
        <table:table-row table:style-name="ro3">
          <table:table-cell office:value-type="float" office:value="0.00000599999984842725" calcext:value-type="float">
            <text:p>6,00E-6</text:p>
          </table:table-cell>
          <table:table-cell office:value-type="float" office:value="-3.59999990463257" calcext:value-type="float">
            <text:p>-3,6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07999999797903" calcext:value-type="float">
            <text:p>8,00E-6</text:p>
          </table:table-cell>
          <table:table-cell office:value-type="float" office:value="-4" calcext:value-type="float">
            <text:p>-4,0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0999999974737875" calcext:value-type="float">
            <text:p>1,00E-5</text:p>
          </table:table-cell>
          <table:table-cell office:value-type="float" office:value="-4.40000009536743" calcext:value-type="float">
            <text:p>-4,4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119999996968545" calcext:value-type="float">
            <text:p>1,20E-5</text:p>
          </table:table-cell>
          <table:table-cell office:value-type="float" office:value="-4.59999990463257" calcext:value-type="float">
            <text:p>-4,6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139999996463303" calcext:value-type="float">
            <text:p>1,40E-5</text:p>
          </table:table-cell>
          <table:table-cell office:value-type="float" office:value="-5" calcext:value-type="float">
            <text:p>-5,0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15999999595806" calcext:value-type="float">
            <text:p>1,60E-5</text:p>
          </table:table-cell>
          <table:table-cell office:value-type="float" office:value="-5.59999990463257" calcext:value-type="float">
            <text:p>-5,6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179999995452818" calcext:value-type="float">
            <text:p>1,80E-5</text:p>
          </table:table-cell>
          <table:table-cell office:value-type="float" office:value="-5.80000019073486" calcext:value-type="float">
            <text:p>-5,8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199999994947575" calcext:value-type="float">
            <text:p>2,00E-5</text:p>
          </table:table-cell>
          <table:table-cell office:value-type="float" office:value="-6.19999980926514" calcext:value-type="float">
            <text:p>-6,2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219999994442333" calcext:value-type="float">
            <text:p>2,20E-5</text:p>
          </table:table-cell>
          <table:table-cell office:value-type="float" office:value="-6.80000019073486" calcext:value-type="float">
            <text:p>-6,8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23999999393709" calcext:value-type="float">
            <text:p>2,40E-5</text:p>
          </table:table-cell>
          <table:table-cell office:value-type="float" office:value="-6.80000019073486" calcext:value-type="float">
            <text:p>-6,8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259999993431848" calcext:value-type="float">
            <text:p>2,60E-5</text:p>
          </table:table-cell>
          <table:table-cell office:value-type="float" office:value="-7.19999980926514" calcext:value-type="float">
            <text:p>-7,2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279999992926605" calcext:value-type="float">
            <text:p>2,80E-5</text:p>
          </table:table-cell>
          <table:table-cell office:value-type="float" office:value="-7.59999990463257" calcext:value-type="float">
            <text:p>-7,6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299999992421363" calcext:value-type="float">
            <text:p>3,00E-5</text:p>
          </table:table-cell>
          <table:table-cell office:value-type="float" office:value="-7.80000019073486" calcext:value-type="float">
            <text:p>-7,8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31999999191612" calcext:value-type="float">
            <text:p>3,20E-5</text:p>
          </table:table-cell>
          <table:table-cell office:value-type="float" office:value="-8.60000038146973" calcext:value-type="float">
            <text:p>-8,6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339999991410878" calcext:value-type="float">
            <text:p>3,40E-5</text:p>
          </table:table-cell>
          <table:table-cell office:value-type="float" office:value="-8.80000019073486" calcext:value-type="float">
            <text:p>-8,8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359999990905635" calcext:value-type="float">
            <text:p>3,60E-5</text:p>
          </table:table-cell>
          <table:table-cell office:value-type="float" office:value="-9" calcext:value-type="float">
            <text:p>-9,0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379999990400393" calcext:value-type="float">
            <text:p>3,80E-5</text:p>
          </table:table-cell>
          <table:table-cell office:value-type="float" office:value="-9.39999961853027" calcext:value-type="float">
            <text:p>-9,4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39999998989515" calcext:value-type="float">
            <text:p>4,00E-5</text:p>
          </table:table-cell>
          <table:table-cell office:value-type="float" office:value="-9.80000019073486" calcext:value-type="float">
            <text:p>-9,80E+0</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419999989389908" calcext:value-type="float">
            <text:p>4,20E-5</text:p>
          </table:table-cell>
          <table:table-cell office:value-type="float" office:value="-10.1999998092651" calcext:value-type="float">
            <text:p>-1,02E+1</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439999988884665" calcext:value-type="float">
            <text:p>4,40E-5</text:p>
          </table:table-cell>
          <table:table-cell office:value-type="float" office:value="-10.6000003814697" calcext:value-type="float">
            <text:p>-1,06E+1</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459999988379423" calcext:value-type="float">
            <text:p>4,60E-5</text:p>
          </table:table-cell>
          <table:table-cell office:value-type="float" office:value="-11" calcext:value-type="float">
            <text:p>-1,10E+1</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47999998787418" calcext:value-type="float">
            <text:p>4,80E-5</text:p>
          </table:table-cell>
          <table:table-cell office:value-type="float" office:value="-11.3999996185303" calcext:value-type="float">
            <text:p>-1,14E+1</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499999987368938" calcext:value-type="float">
            <text:p>5,00E-5</text:p>
          </table:table-cell>
          <table:table-cell office:value-type="float" office:value="-11.8000001907349" calcext:value-type="float">
            <text:p>-1,18E+1</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519999986863695" calcext:value-type="float">
            <text:p>5,20E-5</text:p>
          </table:table-cell>
          <table:table-cell office:value-type="float" office:value="-12" calcext:value-type="float">
            <text:p>-1,20E+1</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539999986358453" calcext:value-type="float">
            <text:p>5,40E-5</text:p>
          </table:table-cell>
          <table:table-cell office:value-type="float" office:value="-12.3999996185303" calcext:value-type="float">
            <text:p>-1,24E+1</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55999998585321" calcext:value-type="float">
            <text:p>5,60E-5</text:p>
          </table:table-cell>
          <table:table-cell office:value-type="float" office:value="-12.8000001907349" calcext:value-type="float">
            <text:p>-1,28E+1</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579999985347968" calcext:value-type="float">
            <text:p>5,80E-5</text:p>
          </table:table-cell>
          <table:table-cell office:value-type="float" office:value="-13.1999998092651" calcext:value-type="float">
            <text:p>-1,32E+1</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599999984842725" calcext:value-type="float">
            <text:p>6,00E-5</text:p>
          </table:table-cell>
          <table:table-cell office:value-type="float" office:value="-13.6000003814697" calcext:value-type="float">
            <text:p>-1,36E+1</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619999984337483" calcext:value-type="float">
            <text:p>6,20E-5</text:p>
          </table:table-cell>
          <table:table-cell office:value-type="float" office:value="-14" calcext:value-type="float">
            <text:p>-1,40E+1</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63999998383224" calcext:value-type="float">
            <text:p>6,40E-5</text:p>
          </table:table-cell>
          <table:table-cell office:value-type="float" office:value="-14.3999996185303" calcext:value-type="float">
            <text:p>-1,44E+1</text:p>
          </table:table-cell>
          <table:table-cell office:value-type="float" office:value="-20" calcext:value-type="float">
            <text:p>-2,00E+1</text:p>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659999983326998" calcext:value-type="float">
            <text:p>6,60E-5</text:p>
          </table:table-cell>
          <table:table-cell office:value-type="float" office:value="-14.8000001907349" calcext:value-type="float">
            <text:p>-1,48E+1</text:p>
          </table:table-cell>
          <table:table-cell office:value-type="float" office:value="-20" calcext:value-type="float">
            <text:p>-2,00E+1</text:p>
          </table:table-cell>
          <table:covered-table-cell table:style-name="ce10"/>
          <table:table-cell table:style-name="ce21"/>
          <table:table-cell table:style-name="ce29" table:number-columns-repeated="8"/>
          <table:table-cell table:style-name="ce43" table:number-columns-repeated="2"/>
          <table:table-cell table:style-name="ce84"/>
          <table:table-cell table:style-name="ce51"/>
          <table:table-cell table:style-name="ce53" table:number-columns-repeated="16367"/>
        </table:table-row>
        <table:table-row table:style-name="ro4">
          <table:table-cell office:value-type="float" office:value="0.0000679999982821755" calcext:value-type="float">
            <text:p>6,80E-5</text:p>
          </table:table-cell>
          <table:table-cell office:value-type="float" office:value="-15" calcext:value-type="float">
            <text:p>-1,50E+1</text:p>
          </table:table-cell>
          <table:table-cell office:value-type="float" office:value="-20" calcext:value-type="float">
            <text:p>-2,00E+1</text:p>
          </table:table-cell>
          <table:table-cell table:style-name="ce13" table:number-columns-repeated="9"/>
          <table:table-cell table:style-name="ce22"/>
          <table:table-cell table:style-name="ce51" table:number-columns-repeated="4"/>
          <table:table-cell table:style-name="ce53" table:number-columns-repeated="16367"/>
        </table:table-row>
        <table:table-row table:style-name="ro4">
          <table:table-cell office:value-type="float" office:value="0.0000699999982316513" calcext:value-type="float">
            <text:p>7,00E-5</text:p>
          </table:table-cell>
          <table:table-cell office:value-type="float" office:value="-15.3999996185303" calcext:value-type="float">
            <text:p>-1,54E+1</text:p>
          </table:table-cell>
          <table:table-cell office:value-type="float" office:value="-20" calcext:value-type="float">
            <text:p>-2,00E+1</text:p>
          </table:table-cell>
          <table:table-cell table:style-name="ce13"/>
          <table:table-cell table:style-name="ce22" table:number-columns-repeated="9"/>
          <table:table-cell table:style-name="ce51" table:number-columns-repeated="4"/>
          <table:table-cell table:style-name="ce53" table:number-columns-repeated="16367"/>
        </table:table-row>
        <table:table-row table:style-name="ro4">
          <table:table-cell office:value-type="float" office:value="0.000071999998181127" calcext:value-type="float">
            <text:p>7,20E-5</text:p>
          </table:table-cell>
          <table:table-cell office:value-type="float" office:value="-16" calcext:value-type="float">
            <text:p>-1,60E+1</text:p>
          </table:table-cell>
          <table:table-cell office:value-type="float" office:value="-20" calcext:value-type="float">
            <text:p>-2,00E+1</text:p>
          </table:table-cell>
          <table:table-cell table:style-name="ce13"/>
          <table:table-cell table:style-name="ce22" table:number-columns-repeated="9"/>
          <table:table-cell table:style-name="ce51" table:number-columns-repeated="4"/>
          <table:table-cell table:style-name="ce53" table:number-columns-repeated="16367"/>
        </table:table-row>
        <table:table-row table:style-name="ro4">
          <table:table-cell office:value-type="float" office:value="0.0000739999981306028" calcext:value-type="float">
            <text:p>7,40E-5</text:p>
          </table:table-cell>
          <table:table-cell office:value-type="float" office:value="-16" calcext:value-type="float">
            <text:p>-1,60E+1</text:p>
          </table:table-cell>
          <table:table-cell office:value-type="float" office:value="-20" calcext:value-type="float">
            <text:p>-2,00E+1</text:p>
          </table:table-cell>
          <table:table-cell table:style-name="ce13"/>
          <table:table-cell table:style-name="ce23"/>
          <table:table-cell table:style-name="ce22" table:number-columns-repeated="12"/>
          <table:table-cell table:style-name="ce53" table:number-columns-repeated="16367"/>
        </table:table-row>
        <table:table-row table:style-name="ro4">
          <table:table-cell office:value-type="float" office:value="0.0000759999980800785" calcext:value-type="float">
            <text:p>7,60E-5</text:p>
          </table:table-cell>
          <table:table-cell office:value-type="float" office:value="-16.3999996185303" calcext:value-type="float">
            <text:p>-1,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0779999980295543" calcext:value-type="float">
            <text:p>7,80E-5</text:p>
          </table:table-cell>
          <table:table-cell office:value-type="float" office:value="-17" calcext:value-type="float">
            <text:p>-1,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07999999797903" calcext:value-type="float">
            <text:p>8,00E-5</text:p>
          </table:table-cell>
          <table:table-cell office:value-type="float" office:value="-17.3999996185303" calcext:value-type="float">
            <text:p>-1,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0819999979285058" calcext:value-type="float">
            <text:p>8,20E-5</text:p>
          </table:table-cell>
          <table:table-cell office:value-type="float" office:value="-17.7999992370605" calcext:value-type="float">
            <text:p>-1,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0839999978779815" calcext:value-type="float">
            <text:p>8,40E-5</text:p>
          </table:table-cell>
          <table:table-cell office:value-type="float" office:value="-18" calcext:value-type="float">
            <text:p>-1,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0859999978274573" calcext:value-type="float">
            <text:p>8,60E-5</text:p>
          </table:table-cell>
          <table:table-cell office:value-type="float" office:value="-18.3999996185303" calcext:value-type="float">
            <text:p>-1,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087999997776933" calcext:value-type="float">
            <text:p>8,80E-5</text:p>
          </table:table-cell>
          <table:table-cell office:value-type="float" office:value="-18.7999992370605" calcext:value-type="float">
            <text:p>-1,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0899999977264088" calcext:value-type="float">
            <text:p>9,00E-5</text:p>
          </table:table-cell>
          <table:table-cell office:value-type="float" office:value="-19" calcext:value-type="float">
            <text:p>-1,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0919999976758845" calcext:value-type="float">
            <text:p>9,20E-5</text:p>
          </table:table-cell>
          <table:table-cell office:value-type="float" office:value="-19.3999996185303" calcext:value-type="float">
            <text:p>-1,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0939999976253603" calcext:value-type="float">
            <text:p>9,40E-5</text:p>
          </table:table-cell>
          <table:table-cell office:value-type="float" office:value="-19.7999992370605" calcext:value-type="float">
            <text:p>-1,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095999997574836" calcext:value-type="float">
            <text:p>9,60E-5</text:p>
          </table:table-cell>
          <table:table-cell office:value-type="float" office:value="-20.3999996185303" calcext:value-type="float">
            <text:p>-2,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0979999975243118" calcext:value-type="float">
            <text:p>9,80E-5</text:p>
          </table:table-cell>
          <table:table-cell office:value-type="float" office:value="-20.6000003814697" calcext:value-type="float">
            <text:p>-2,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0999999974737875" calcext:value-type="float">
            <text:p>1,00E-4</text:p>
          </table:table-cell>
          <table:table-cell office:value-type="float" office:value="-20.7999992370605" calcext:value-type="float">
            <text:p>-2,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01999997423263" calcext:value-type="float">
            <text:p>1,02E-4</text:p>
          </table:table-cell>
          <table:table-cell office:value-type="float" office:value="-21.2000007629395" calcext:value-type="float">
            <text:p>-2,1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03999997372739" calcext:value-type="float">
            <text:p>1,04E-4</text:p>
          </table:table-cell>
          <table:table-cell office:value-type="float" office:value="-21.6000003814697" calcext:value-type="float">
            <text:p>-2,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05999997322215" calcext:value-type="float">
            <text:p>1,06E-4</text:p>
          </table:table-cell>
          <table:table-cell office:value-type="float" office:value="-22" calcext:value-type="float">
            <text:p>-2,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07999997271691" calcext:value-type="float">
            <text:p>1,08E-4</text:p>
          </table:table-cell>
          <table:table-cell office:value-type="float" office:value="-22.3999996185303" calcext:value-type="float">
            <text:p>-2,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09999997221166" calcext:value-type="float">
            <text:p>1,10E-4</text:p>
          </table:table-cell>
          <table:table-cell office:value-type="float" office:value="-22.7999992370605" calcext:value-type="float">
            <text:p>-2,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11999997170642" calcext:value-type="float">
            <text:p>1,12E-4</text:p>
          </table:table-cell>
          <table:table-cell office:value-type="float" office:value="-23.2000007629395" calcext:value-type="float">
            <text:p>-2,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13999997120118" calcext:value-type="float">
            <text:p>1,14E-4</text:p>
          </table:table-cell>
          <table:table-cell office:value-type="float" office:value="-23.3999996185303" calcext:value-type="float">
            <text:p>-2,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15999997069594" calcext:value-type="float">
            <text:p>1,16E-4</text:p>
          </table:table-cell>
          <table:table-cell office:value-type="float" office:value="-24" calcext:value-type="float">
            <text:p>-2,4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17999997019069" calcext:value-type="float">
            <text:p>1,18E-4</text:p>
          </table:table-cell>
          <table:table-cell office:value-type="float" office:value="-24.3999996185303" calcext:value-type="float">
            <text:p>-2,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19999996968545" calcext:value-type="float">
            <text:p>1,20E-4</text:p>
          </table:table-cell>
          <table:table-cell office:value-type="float" office:value="-24.7999992370605" calcext:value-type="float">
            <text:p>-2,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21999996918021" calcext:value-type="float">
            <text:p>1,22E-4</text:p>
          </table:table-cell>
          <table:table-cell office:value-type="float" office:value="-25.2000007629395" calcext:value-type="float">
            <text:p>-2,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23999996867497" calcext:value-type="float">
            <text:p>1,24E-4</text:p>
          </table:table-cell>
          <table:table-cell office:value-type="float" office:value="-25.3999996185303" calcext:value-type="float">
            <text:p>-2,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25999996816972" calcext:value-type="float">
            <text:p>1,26E-4</text:p>
          </table:table-cell>
          <table:table-cell office:value-type="float" office:value="-25.7999992370605" calcext:value-type="float">
            <text:p>-2,5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27999996766448" calcext:value-type="float">
            <text:p>1,28E-4</text:p>
          </table:table-cell>
          <table:table-cell office:value-type="float" office:value="-26.3999996185303" calcext:value-type="float">
            <text:p>-2,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29999996715924" calcext:value-type="float">
            <text:p>1,30E-4</text:p>
          </table:table-cell>
          <table:table-cell office:value-type="float" office:value="-26.6000003814697" calcext:value-type="float">
            <text:p>-2,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319999966654" calcext:value-type="float">
            <text:p>1,32E-4</text:p>
          </table:table-cell>
          <table:table-cell office:value-type="float" office:value="-26.7999992370605" calcext:value-type="float">
            <text:p>-2,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33999996614875" calcext:value-type="float">
            <text:p>1,34E-4</text:p>
          </table:table-cell>
          <table:table-cell office:value-type="float" office:value="-27.3999996185303" calcext:value-type="float">
            <text:p>-2,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35999996564351" calcext:value-type="float">
            <text:p>1,36E-4</text:p>
          </table:table-cell>
          <table:table-cell office:value-type="float" office:value="-27.6000003814697" calcext:value-type="float">
            <text:p>-2,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37999996513827" calcext:value-type="float">
            <text:p>1,38E-4</text:p>
          </table:table-cell>
          <table:table-cell office:value-type="float" office:value="-28" calcext:value-type="float">
            <text:p>-2,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39999996463303" calcext:value-type="float">
            <text:p>1,40E-4</text:p>
          </table:table-cell>
          <table:table-cell office:value-type="float" office:value="-28.3999996185303" calcext:value-type="float">
            <text:p>-2,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41999996412778" calcext:value-type="float">
            <text:p>1,42E-4</text:p>
          </table:table-cell>
          <table:table-cell office:value-type="float" office:value="-28.7999992370605" calcext:value-type="float">
            <text:p>-2,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43999996362254" calcext:value-type="float">
            <text:p>1,44E-4</text:p>
          </table:table-cell>
          <table:table-cell office:value-type="float" office:value="-29.3999996185303" calcext:value-type="float">
            <text:p>-2,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4599999631173" calcext:value-type="float">
            <text:p>1,46E-4</text:p>
          </table:table-cell>
          <table:table-cell office:value-type="float" office:value="-29.6000003814697" calcext:value-type="float">
            <text:p>-2,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47999996261206" calcext:value-type="float">
            <text:p>1,48E-4</text:p>
          </table:table-cell>
          <table:table-cell office:value-type="float" office:value="-29.6000003814697" calcext:value-type="float">
            <text:p>-2,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49999996210681" calcext:value-type="float">
            <text:p>1,50E-4</text:p>
          </table:table-cell>
          <table:table-cell office:value-type="float" office:value="-30.2000007629395" calcext:value-type="float">
            <text:p>-3,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51999996160157" calcext:value-type="float">
            <text:p>1,52E-4</text:p>
          </table:table-cell>
          <table:table-cell office:value-type="float" office:value="-30.3999996185303" calcext:value-type="float">
            <text:p>-3,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53999996109633" calcext:value-type="float">
            <text:p>1,54E-4</text:p>
          </table:table-cell>
          <table:table-cell office:value-type="float" office:value="-31" calcext:value-type="float">
            <text:p>-3,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55999996059109" calcext:value-type="float">
            <text:p>1,56E-4</text:p>
          </table:table-cell>
          <table:table-cell office:value-type="float" office:value="-31.2000007629395" calcext:value-type="float">
            <text:p>-3,1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57999996008584" calcext:value-type="float">
            <text:p>1,58E-4</text:p>
          </table:table-cell>
          <table:table-cell office:value-type="float" office:value="-31.7999992370605" calcext:value-type="float">
            <text:p>-3,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5999999595806" calcext:value-type="float">
            <text:p>1,60E-4</text:p>
          </table:table-cell>
          <table:table-cell office:value-type="float" office:value="-32.2000007629395" calcext:value-type="float">
            <text:p>-3,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61999995907536" calcext:value-type="float">
            <text:p>1,62E-4</text:p>
          </table:table-cell>
          <table:table-cell office:value-type="float" office:value="-32.4000015258789" calcext:value-type="float">
            <text:p>-3,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63999995857012" calcext:value-type="float">
            <text:p>1,64E-4</text:p>
          </table:table-cell>
          <table:table-cell office:value-type="float" office:value="-32.7999992370606" calcext:value-type="float">
            <text:p>-3,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65999995806487" calcext:value-type="float">
            <text:p>1,66E-4</text:p>
          </table:table-cell>
          <table:table-cell office:value-type="float" office:value="-33.2000007629395" calcext:value-type="float">
            <text:p>-3,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67999995755963" calcext:value-type="float">
            <text:p>1,68E-4</text:p>
          </table:table-cell>
          <table:table-cell office:value-type="float" office:value="-33.5999984741211" calcext:value-type="float">
            <text:p>-3,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69999995705439" calcext:value-type="float">
            <text:p>1,70E-4</text:p>
          </table:table-cell>
          <table:table-cell office:value-type="float" office:value="-34" calcext:value-type="float">
            <text:p>-3,4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71999995654915" calcext:value-type="float">
            <text:p>1,72E-4</text:p>
          </table:table-cell>
          <table:table-cell office:value-type="float" office:value="-34.2000007629395" calcext:value-type="float">
            <text:p>-3,4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7399999560439" calcext:value-type="float">
            <text:p>1,74E-4</text:p>
          </table:table-cell>
          <table:table-cell office:value-type="float" office:value="-34.5999984741211" calcext:value-type="float">
            <text:p>-3,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75999995553866" calcext:value-type="float">
            <text:p>1,76E-4</text:p>
          </table:table-cell>
          <table:table-cell office:value-type="float" office:value="-35.2000007629395" calcext:value-type="float">
            <text:p>-3,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77999995503342" calcext:value-type="float">
            <text:p>1,78E-4</text:p>
          </table:table-cell>
          <table:table-cell office:value-type="float" office:value="-35.4000015258789" calcext:value-type="float">
            <text:p>-3,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79999995452818" calcext:value-type="float">
            <text:p>1,80E-4</text:p>
          </table:table-cell>
          <table:table-cell office:value-type="float" office:value="-35.7999992370606" calcext:value-type="float">
            <text:p>-3,5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81999995402293" calcext:value-type="float">
            <text:p>1,82E-4</text:p>
          </table:table-cell>
          <table:table-cell office:value-type="float" office:value="-36.2000007629395" calcext:value-type="float">
            <text:p>-3,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83999995351769" calcext:value-type="float">
            <text:p>1,84E-4</text:p>
          </table:table-cell>
          <table:table-cell office:value-type="float" office:value="-36.5999984741211" calcext:value-type="float">
            <text:p>-3,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85999995301245" calcext:value-type="float">
            <text:p>1,86E-4</text:p>
          </table:table-cell>
          <table:table-cell office:value-type="float" office:value="-36.7999992370606" calcext:value-type="float">
            <text:p>-3,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87999995250721" calcext:value-type="float">
            <text:p>1,88E-4</text:p>
          </table:table-cell>
          <table:table-cell office:value-type="float" office:value="-37" calcext:value-type="float">
            <text:p>-3,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89999995200196" calcext:value-type="float">
            <text:p>1,90E-4</text:p>
          </table:table-cell>
          <table:table-cell office:value-type="float" office:value="-37.4000015258789" calcext:value-type="float">
            <text:p>-3,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91999995149672" calcext:value-type="float">
            <text:p>1,92E-4</text:p>
          </table:table-cell>
          <table:table-cell office:value-type="float" office:value="-38" calcext:value-type="float">
            <text:p>-3,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93999995099148" calcext:value-type="float">
            <text:p>1,94E-4</text:p>
          </table:table-cell>
          <table:table-cell office:value-type="float" office:value="-38.4000015258789" calcext:value-type="float">
            <text:p>-3,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95999995048624" calcext:value-type="float">
            <text:p>1,96E-4</text:p>
          </table:table-cell>
          <table:table-cell office:value-type="float" office:value="-38.5999984741211" calcext:value-type="float">
            <text:p>-3,8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97999994998099" calcext:value-type="float">
            <text:p>1,98E-4</text:p>
          </table:table-cell>
          <table:table-cell office:value-type="float" office:value="-38.7999992370606" calcext:value-type="float">
            <text:p>-3,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199999994947575" calcext:value-type="float">
            <text:p>2,00E-4</text:p>
          </table:table-cell>
          <table:table-cell office:value-type="float" office:value="-39.2000007629395" calcext:value-type="float">
            <text:p>-3,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01999994897051" calcext:value-type="float">
            <text:p>2,02E-4</text:p>
          </table:table-cell>
          <table:table-cell office:value-type="float" office:value="-39.5999984741211" calcext:value-type="float">
            <text:p>-3,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03999994846527" calcext:value-type="float">
            <text:p>2,04E-4</text:p>
          </table:table-cell>
          <table:table-cell office:value-type="float" office:value="-39.5999984741211" calcext:value-type="float">
            <text:p>-3,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05999994796002" calcext:value-type="float">
            <text:p>2,06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07999994745478" calcext:value-type="float">
            <text:p>2,08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09999994694954" calcext:value-type="float">
            <text:p>2,10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1199999464443" calcext:value-type="float">
            <text:p>2,12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13999994593905" calcext:value-type="float">
            <text:p>2,14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15999994543381" calcext:value-type="float">
            <text:p>2,16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17999994492857" calcext:value-type="float">
            <text:p>2,18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19999994442333" calcext:value-type="float">
            <text:p>2,20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21999994391808" calcext:value-type="float">
            <text:p>2,22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23999994341284" calcext:value-type="float">
            <text:p>2,24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2599999429076" calcext:value-type="float">
            <text:p>2,26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27999994240236" calcext:value-type="float">
            <text:p>2,28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29999994189711" calcext:value-type="float">
            <text:p>2,30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31999994139187" calcext:value-type="float">
            <text:p>2,32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33999994088663" calcext:value-type="float">
            <text:p>2,34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35999994038139" calcext:value-type="float">
            <text:p>2,36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37999993987614" calcext:value-type="float">
            <text:p>2,38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3999999393709" calcext:value-type="float">
            <text:p>2,40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41999993886566" calcext:value-type="float">
            <text:p>2,42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43999993836042" calcext:value-type="float">
            <text:p>2,44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45999993785517" calcext:value-type="float">
            <text:p>2,46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47999993734993" calcext:value-type="float">
            <text:p>2,48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49999993684469" calcext:value-type="float">
            <text:p>2,50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51999993633945" calcext:value-type="float">
            <text:p>2,52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5399999358342" calcext:value-type="float">
            <text:p>2,54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55999993532896" calcext:value-type="float">
            <text:p>2,56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57999993482372" calcext:value-type="float">
            <text:p>2,58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59999993431848" calcext:value-type="float">
            <text:p>2,60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61999993381323" calcext:value-type="float">
            <text:p>2,62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63999993330799" calcext:value-type="float">
            <text:p>2,64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65999993280275" calcext:value-type="float">
            <text:p>2,66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67999993229751" calcext:value-type="float">
            <text:p>2,68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69999993179226" calcext:value-type="float">
            <text:p>2,70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71999993128702" calcext:value-type="float">
            <text:p>2,72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73999993078178" calcext:value-type="float">
            <text:p>2,74E-4</text:p>
          </table:table-cell>
          <table:table-cell office:value-type="float" office:value="-39.7999992370606" calcext:value-type="float">
            <text:p>-3,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75999993027654" calcext:value-type="float">
            <text:p>2,76E-4</text:p>
          </table:table-cell>
          <table:table-cell office:value-type="float" office:value="-39.5999984741211" calcext:value-type="float">
            <text:p>-3,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77999992977129" calcext:value-type="float">
            <text:p>2,78E-4</text:p>
          </table:table-cell>
          <table:table-cell office:value-type="float" office:value="-39.2000007629395" calcext:value-type="float">
            <text:p>-3,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79999992926605" calcext:value-type="float">
            <text:p>2,80E-4</text:p>
          </table:table-cell>
          <table:table-cell office:value-type="float" office:value="-39" calcext:value-type="float">
            <text:p>-3,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81999992876081" calcext:value-type="float">
            <text:p>2,82E-4</text:p>
          </table:table-cell>
          <table:table-cell office:value-type="float" office:value="-38.7999992370606" calcext:value-type="float">
            <text:p>-3,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83999992825557" calcext:value-type="float">
            <text:p>2,84E-4</text:p>
          </table:table-cell>
          <table:table-cell office:value-type="float" office:value="-38.4000015258789" calcext:value-type="float">
            <text:p>-3,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85999992775032" calcext:value-type="float">
            <text:p>2,86E-4</text:p>
          </table:table-cell>
          <table:table-cell office:value-type="float" office:value="-38" calcext:value-type="float">
            <text:p>-3,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87999992724508" calcext:value-type="float">
            <text:p>2,88E-4</text:p>
          </table:table-cell>
          <table:table-cell office:value-type="float" office:value="-38" calcext:value-type="float">
            <text:p>-3,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89999992673984" calcext:value-type="float">
            <text:p>2,90E-4</text:p>
          </table:table-cell>
          <table:table-cell office:value-type="float" office:value="-37.2000007629395" calcext:value-type="float">
            <text:p>-3,7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9199999262346" calcext:value-type="float">
            <text:p>2,92E-4</text:p>
          </table:table-cell>
          <table:table-cell office:value-type="float" office:value="-37" calcext:value-type="float">
            <text:p>-3,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93999992572935" calcext:value-type="float">
            <text:p>2,94E-4</text:p>
          </table:table-cell>
          <table:table-cell office:value-type="float" office:value="-36.5999984741211" calcext:value-type="float">
            <text:p>-3,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95999992522411" calcext:value-type="float">
            <text:p>2,96E-4</text:p>
          </table:table-cell>
          <table:table-cell office:value-type="float" office:value="-36.4000015258789" calcext:value-type="float">
            <text:p>-3,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97999992471887" calcext:value-type="float">
            <text:p>2,98E-4</text:p>
          </table:table-cell>
          <table:table-cell office:value-type="float" office:value="-36" calcext:value-type="float">
            <text:p>-3,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299999992421363" calcext:value-type="float">
            <text:p>3,00E-4</text:p>
          </table:table-cell>
          <table:table-cell office:value-type="float" office:value="-35.4000015258789" calcext:value-type="float">
            <text:p>-3,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01999992370838" calcext:value-type="float">
            <text:p>3,02E-4</text:p>
          </table:table-cell>
          <table:table-cell office:value-type="float" office:value="-35" calcext:value-type="float">
            <text:p>-3,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03999992320314" calcext:value-type="float">
            <text:p>3,04E-4</text:p>
          </table:table-cell>
          <table:table-cell office:value-type="float" office:value="-34.7999992370606" calcext:value-type="float">
            <text:p>-3,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0599999226979" calcext:value-type="float">
            <text:p>3,06E-4</text:p>
          </table:table-cell>
          <table:table-cell office:value-type="float" office:value="-34.4000015258789" calcext:value-type="float">
            <text:p>-3,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07999992219266" calcext:value-type="float">
            <text:p>3,08E-4</text:p>
          </table:table-cell>
          <table:table-cell office:value-type="float" office:value="-34.2000007629395" calcext:value-type="float">
            <text:p>-3,4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09999992168741" calcext:value-type="float">
            <text:p>3,10E-4</text:p>
          </table:table-cell>
          <table:table-cell office:value-type="float" office:value="-33.5999984741211" calcext:value-type="float">
            <text:p>-3,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11999992118217" calcext:value-type="float">
            <text:p>3,12E-4</text:p>
          </table:table-cell>
          <table:table-cell office:value-type="float" office:value="-33.2000007629395" calcext:value-type="float">
            <text:p>-3,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13999992067693" calcext:value-type="float">
            <text:p>3,14E-4</text:p>
          </table:table-cell>
          <table:table-cell office:value-type="float" office:value="-32.7999992370606" calcext:value-type="float">
            <text:p>-3,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15999992017169" calcext:value-type="float">
            <text:p>3,16E-4</text:p>
          </table:table-cell>
          <table:table-cell office:value-type="float" office:value="-32.5999984741211" calcext:value-type="float">
            <text:p>-3,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17999991966644" calcext:value-type="float">
            <text:p>3,18E-4</text:p>
          </table:table-cell>
          <table:table-cell office:value-type="float" office:value="-32.2000007629395" calcext:value-type="float">
            <text:p>-3,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1999999191612" calcext:value-type="float">
            <text:p>3,20E-4</text:p>
          </table:table-cell>
          <table:table-cell office:value-type="float" office:value="-32.2000007629395" calcext:value-type="float">
            <text:p>-3,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21999991865596" calcext:value-type="float">
            <text:p>3,22E-4</text:p>
          </table:table-cell>
          <table:table-cell office:value-type="float" office:value="-31.3999996185303" calcext:value-type="float">
            <text:p>-3,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23999991815072" calcext:value-type="float">
            <text:p>3,24E-4</text:p>
          </table:table-cell>
          <table:table-cell office:value-type="float" office:value="-31.2000007629395" calcext:value-type="float">
            <text:p>-3,1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25999991764547" calcext:value-type="float">
            <text:p>3,26E-4</text:p>
          </table:table-cell>
          <table:table-cell office:value-type="float" office:value="-30.6000003814697" calcext:value-type="float">
            <text:p>-3,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27999991714023" calcext:value-type="float">
            <text:p>3,28E-4</text:p>
          </table:table-cell>
          <table:table-cell office:value-type="float" office:value="-30.3999996185303" calcext:value-type="float">
            <text:p>-3,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29999991663499" calcext:value-type="float">
            <text:p>3,30E-4</text:p>
          </table:table-cell>
          <table:table-cell office:value-type="float" office:value="-29.7999992370605" calcext:value-type="float">
            <text:p>-2,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31999991612975" calcext:value-type="float">
            <text:p>3,32E-4</text:p>
          </table:table-cell>
          <table:table-cell office:value-type="float" office:value="-29.6000003814697" calcext:value-type="float">
            <text:p>-2,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3399999156245" calcext:value-type="float">
            <text:p>3,34E-4</text:p>
          </table:table-cell>
          <table:table-cell office:value-type="float" office:value="-29.6000003814697" calcext:value-type="float">
            <text:p>-2,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35999991511926" calcext:value-type="float">
            <text:p>3,36E-4</text:p>
          </table:table-cell>
          <table:table-cell office:value-type="float" office:value="-29.2000007629395" calcext:value-type="float">
            <text:p>-2,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37999991461402" calcext:value-type="float">
            <text:p>3,38E-4</text:p>
          </table:table-cell>
          <table:table-cell office:value-type="float" office:value="-28.3999996185303" calcext:value-type="float">
            <text:p>-2,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39999991410878" calcext:value-type="float">
            <text:p>3,40E-4</text:p>
          </table:table-cell>
          <table:table-cell office:value-type="float" office:value="-28.2000007629395" calcext:value-type="float">
            <text:p>-2,8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41999991360353" calcext:value-type="float">
            <text:p>3,42E-4</text:p>
          </table:table-cell>
          <table:table-cell office:value-type="float" office:value="-27.6000003814697" calcext:value-type="float">
            <text:p>-2,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43999991309829" calcext:value-type="float">
            <text:p>3,44E-4</text:p>
          </table:table-cell>
          <table:table-cell office:value-type="float" office:value="-27.3999996185303" calcext:value-type="float">
            <text:p>-2,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45999991259305" calcext:value-type="float">
            <text:p>3,46E-4</text:p>
          </table:table-cell>
          <table:table-cell office:value-type="float" office:value="-27" calcext:value-type="float">
            <text:p>-2,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47999991208781" calcext:value-type="float">
            <text:p>3,48E-4</text:p>
          </table:table-cell>
          <table:table-cell office:value-type="float" office:value="-26.6000003814697" calcext:value-type="float">
            <text:p>-2,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49999991158256" calcext:value-type="float">
            <text:p>3,50E-4</text:p>
          </table:table-cell>
          <table:table-cell office:value-type="float" office:value="-26.3999996185303" calcext:value-type="float">
            <text:p>-2,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51999991107732" calcext:value-type="float">
            <text:p>3,52E-4</text:p>
          </table:table-cell>
          <table:table-cell office:value-type="float" office:value="-26.2000007629395" calcext:value-type="float">
            <text:p>-2,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53999991057208" calcext:value-type="float">
            <text:p>3,54E-4</text:p>
          </table:table-cell>
          <table:table-cell office:value-type="float" office:value="-25.2000007629395" calcext:value-type="float">
            <text:p>-2,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55999991006684" calcext:value-type="float">
            <text:p>3,56E-4</text:p>
          </table:table-cell>
          <table:table-cell office:value-type="float" office:value="-25.2000007629395" calcext:value-type="float">
            <text:p>-2,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57999990956159" calcext:value-type="float">
            <text:p>3,58E-4</text:p>
          </table:table-cell>
          <table:table-cell office:value-type="float" office:value="-25" calcext:value-type="float">
            <text:p>-2,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59999990905635" calcext:value-type="float">
            <text:p>3,60E-4</text:p>
          </table:table-cell>
          <table:table-cell office:value-type="float" office:value="-24.7999992370605" calcext:value-type="float">
            <text:p>-2,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61999990855111" calcext:value-type="float">
            <text:p>3,62E-4</text:p>
          </table:table-cell>
          <table:table-cell office:value-type="float" office:value="-24" calcext:value-type="float">
            <text:p>-2,4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63999990804587" calcext:value-type="float">
            <text:p>3,64E-4</text:p>
          </table:table-cell>
          <table:table-cell office:value-type="float" office:value="-23.6000003814697" calcext:value-type="float">
            <text:p>-2,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65999990754062" calcext:value-type="float">
            <text:p>3,66E-4</text:p>
          </table:table-cell>
          <table:table-cell office:value-type="float" office:value="-23.3999996185303" calcext:value-type="float">
            <text:p>-2,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67999990703538" calcext:value-type="float">
            <text:p>3,68E-4</text:p>
          </table:table-cell>
          <table:table-cell office:value-type="float" office:value="-23.2000007629395" calcext:value-type="float">
            <text:p>-2,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69999990653014" calcext:value-type="float">
            <text:p>3,70E-4</text:p>
          </table:table-cell>
          <table:table-cell office:value-type="float" office:value="-22.6000003814697" calcext:value-type="float">
            <text:p>-2,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7199999060249" calcext:value-type="float">
            <text:p>3,72E-4</text:p>
          </table:table-cell>
          <table:table-cell office:value-type="float" office:value="-22.3999996185303" calcext:value-type="float">
            <text:p>-2,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73999990551965" calcext:value-type="float">
            <text:p>3,74E-4</text:p>
          </table:table-cell>
          <table:table-cell office:value-type="float" office:value="-22" calcext:value-type="float">
            <text:p>-2,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75999990501441" calcext:value-type="float">
            <text:p>3,76E-4</text:p>
          </table:table-cell>
          <table:table-cell office:value-type="float" office:value="-21.6000003814697" calcext:value-type="float">
            <text:p>-2,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77999990450917" calcext:value-type="float">
            <text:p>3,78E-4</text:p>
          </table:table-cell>
          <table:table-cell office:value-type="float" office:value="-21" calcext:value-type="float">
            <text:p>-2,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79999990400393" calcext:value-type="float">
            <text:p>3,80E-4</text:p>
          </table:table-cell>
          <table:table-cell office:value-type="float" office:value="-20.7999992370605" calcext:value-type="float">
            <text:p>-2,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81999990349868" calcext:value-type="float">
            <text:p>3,82E-4</text:p>
          </table:table-cell>
          <table:table-cell office:value-type="float" office:value="-20.3999996185303" calcext:value-type="float">
            <text:p>-2,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83999990299344" calcext:value-type="float">
            <text:p>3,84E-4</text:p>
          </table:table-cell>
          <table:table-cell office:value-type="float" office:value="-20.3999996185303" calcext:value-type="float">
            <text:p>-2,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8599999024882" calcext:value-type="float">
            <text:p>3,86E-4</text:p>
          </table:table-cell>
          <table:table-cell office:value-type="float" office:value="-19.6000003814697" calcext:value-type="float">
            <text:p>-1,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87999990198296" calcext:value-type="float">
            <text:p>3,88E-4</text:p>
          </table:table-cell>
          <table:table-cell office:value-type="float" office:value="-19.2000007629395" calcext:value-type="float">
            <text:p>-1,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89999990147771" calcext:value-type="float">
            <text:p>3,90E-4</text:p>
          </table:table-cell>
          <table:table-cell office:value-type="float" office:value="-18.7999992370605" calcext:value-type="float">
            <text:p>-1,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91999990097247" calcext:value-type="float">
            <text:p>3,92E-4</text:p>
          </table:table-cell>
          <table:table-cell office:value-type="float" office:value="-18.6000003814697" calcext:value-type="float">
            <text:p>-1,8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93999990046723" calcext:value-type="float">
            <text:p>3,94E-4</text:p>
          </table:table-cell>
          <table:table-cell office:value-type="float" office:value="-18.2000007629395" calcext:value-type="float">
            <text:p>-1,8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95999989996199" calcext:value-type="float">
            <text:p>3,96E-4</text:p>
          </table:table-cell>
          <table:table-cell office:value-type="float" office:value="-17.7999992370605" calcext:value-type="float">
            <text:p>-1,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97999989945674" calcext:value-type="float">
            <text:p>3,98E-4</text:p>
          </table:table-cell>
          <table:table-cell office:value-type="float" office:value="-17.6000003814697" calcext:value-type="float">
            <text:p>-1,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39999998989515" calcext:value-type="float">
            <text:p>4,00E-4</text:p>
          </table:table-cell>
          <table:table-cell office:value-type="float" office:value="-17" calcext:value-type="float">
            <text:p>-1,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01999989844626" calcext:value-type="float">
            <text:p>4,02E-4</text:p>
          </table:table-cell>
          <table:table-cell office:value-type="float" office:value="-16.6000003814697" calcext:value-type="float">
            <text:p>-1,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03999989794102" calcext:value-type="float">
            <text:p>4,04E-4</text:p>
          </table:table-cell>
          <table:table-cell office:value-type="float" office:value="-16.3999996185303" calcext:value-type="float">
            <text:p>-1,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05999989743577" calcext:value-type="float">
            <text:p>4,06E-4</text:p>
          </table:table-cell>
          <table:table-cell office:value-type="float" office:value="-16" calcext:value-type="float">
            <text:p>-1,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07999989693053" calcext:value-type="float">
            <text:p>4,08E-4</text:p>
          </table:table-cell>
          <table:table-cell office:value-type="float" office:value="-15.6000003814697" calcext:value-type="float">
            <text:p>-1,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09999989642529" calcext:value-type="float">
            <text:p>4,10E-4</text:p>
          </table:table-cell>
          <table:table-cell office:value-type="float" office:value="-15.1999998092651" calcext:value-type="float">
            <text:p>-1,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11999989592005" calcext:value-type="float">
            <text:p>4,12E-4</text:p>
          </table:table-cell>
          <table:table-cell office:value-type="float" office:value="-14.8000001907349" calcext:value-type="float">
            <text:p>-1,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1399998954148" calcext:value-type="float">
            <text:p>4,14E-4</text:p>
          </table:table-cell>
          <table:table-cell office:value-type="float" office:value="-14.6000003814697" calcext:value-type="float">
            <text:p>-1,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15999989490956" calcext:value-type="float">
            <text:p>4,16E-4</text:p>
          </table:table-cell>
          <table:table-cell office:value-type="float" office:value="-14.3999996185303" calcext:value-type="float">
            <text:p>-1,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17999989440432" calcext:value-type="float">
            <text:p>4,18E-4</text:p>
          </table:table-cell>
          <table:table-cell office:value-type="float" office:value="-13.8000001907349" calcext:value-type="float">
            <text:p>-1,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19999989389908" calcext:value-type="float">
            <text:p>4,20E-4</text:p>
          </table:table-cell>
          <table:table-cell office:value-type="float" office:value="-13.3999996185303" calcext:value-type="float">
            <text:p>-1,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21999989339383" calcext:value-type="float">
            <text:p>4,22E-4</text:p>
          </table:table-cell>
          <table:table-cell office:value-type="float" office:value="-13.3999996185303" calcext:value-type="float">
            <text:p>-1,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23999989288859" calcext:value-type="float">
            <text:p>4,24E-4</text:p>
          </table:table-cell>
          <table:table-cell office:value-type="float" office:value="-12.8000001907349" calcext:value-type="float">
            <text:p>-1,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25999989238335" calcext:value-type="float">
            <text:p>4,26E-4</text:p>
          </table:table-cell>
          <table:table-cell office:value-type="float" office:value="-12.1999998092651" calcext:value-type="float">
            <text:p>-1,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27999989187811" calcext:value-type="float">
            <text:p>4,28E-4</text:p>
          </table:table-cell>
          <table:table-cell office:value-type="float" office:value="-11.8000001907349" calcext:value-type="float">
            <text:p>-1,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29999989137286" calcext:value-type="float">
            <text:p>4,30E-4</text:p>
          </table:table-cell>
          <table:table-cell office:value-type="float" office:value="-11.6000003814697" calcext:value-type="float">
            <text:p>-1,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31999989086762" calcext:value-type="float">
            <text:p>4,32E-4</text:p>
          </table:table-cell>
          <table:table-cell office:value-type="float" office:value="-11.3999996185303" calcext:value-type="float">
            <text:p>-1,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33999989036238" calcext:value-type="float">
            <text:p>4,34E-4</text:p>
          </table:table-cell>
          <table:table-cell office:value-type="float" office:value="-10.6000003814697" calcext:value-type="float">
            <text:p>-1,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35999988985714" calcext:value-type="float">
            <text:p>4,36E-4</text:p>
          </table:table-cell>
          <table:table-cell office:value-type="float" office:value="-10.6000003814697" calcext:value-type="float">
            <text:p>-1,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37999988935189" calcext:value-type="float">
            <text:p>4,38E-4</text:p>
          </table:table-cell>
          <table:table-cell office:value-type="float" office:value="-10.1999998092651" calcext:value-type="float">
            <text:p>-1,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39999988884665" calcext:value-type="float">
            <text:p>4,40E-4</text:p>
          </table:table-cell>
          <table:table-cell office:value-type="float" office:value="-9.60000038146973" calcext:value-type="float">
            <text:p>-9,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41999988834141" calcext:value-type="float">
            <text:p>4,42E-4</text:p>
          </table:table-cell>
          <table:table-cell office:value-type="float" office:value="-9.19999980926514" calcext:value-type="float">
            <text:p>-9,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43999988783617" calcext:value-type="float">
            <text:p>4,44E-4</text:p>
          </table:table-cell>
          <table:table-cell office:value-type="float" office:value="-9" calcext:value-type="float">
            <text:p>-9,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45999988733092" calcext:value-type="float">
            <text:p>4,46E-4</text:p>
          </table:table-cell>
          <table:table-cell office:value-type="float" office:value="-8.80000019073486" calcext:value-type="float">
            <text:p>-8,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47999988682568" calcext:value-type="float">
            <text:p>4,48E-4</text:p>
          </table:table-cell>
          <table:table-cell office:value-type="float" office:value="-8.60000038146973" calcext:value-type="float">
            <text:p>-8,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49999988632044" calcext:value-type="float">
            <text:p>4,50E-4</text:p>
          </table:table-cell>
          <table:table-cell office:value-type="float" office:value="-7.80000019073486" calcext:value-type="float">
            <text:p>-7,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5199998858152" calcext:value-type="float">
            <text:p>4,52E-4</text:p>
          </table:table-cell>
          <table:table-cell office:value-type="float" office:value="-7.40000009536743" calcext:value-type="float">
            <text:p>-7,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53999988530995" calcext:value-type="float">
            <text:p>4,54E-4</text:p>
          </table:table-cell>
          <table:table-cell office:value-type="float" office:value="-7" calcext:value-type="float">
            <text:p>-7,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55999988480471" calcext:value-type="float">
            <text:p>4,56E-4</text:p>
          </table:table-cell>
          <table:table-cell office:value-type="float" office:value="-6.80000019073486" calcext:value-type="float">
            <text:p>-6,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57999988429947" calcext:value-type="float">
            <text:p>4,58E-4</text:p>
          </table:table-cell>
          <table:table-cell office:value-type="float" office:value="-6.40000009536743" calcext:value-type="float">
            <text:p>-6,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59999988379423" calcext:value-type="float">
            <text:p>4,60E-4</text:p>
          </table:table-cell>
          <table:table-cell office:value-type="float" office:value="-6" calcext:value-type="float">
            <text:p>-6,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61999988328898" calcext:value-type="float">
            <text:p>4,62E-4</text:p>
          </table:table-cell>
          <table:table-cell office:value-type="float" office:value="-5.59999990463257" calcext:value-type="float">
            <text:p>-5,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63999988278374" calcext:value-type="float">
            <text:p>4,64E-4</text:p>
          </table:table-cell>
          <table:table-cell office:value-type="float" office:value="-5.19999980926514" calcext:value-type="float">
            <text:p>-5,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6599998822785" calcext:value-type="float">
            <text:p>4,66E-4</text:p>
          </table:table-cell>
          <table:table-cell office:value-type="float" office:value="-4.80000019073486" calcext:value-type="float">
            <text:p>-4,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67999988177326" calcext:value-type="float">
            <text:p>4,68E-4</text:p>
          </table:table-cell>
          <table:table-cell office:value-type="float" office:value="-4.59999990463257" calcext:value-type="float">
            <text:p>-4,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69999988126801" calcext:value-type="float">
            <text:p>4,70E-4</text:p>
          </table:table-cell>
          <table:table-cell office:value-type="float" office:value="-4.40000009536743" calcext:value-type="float">
            <text:p>-4,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71999988076277" calcext:value-type="float">
            <text:p>4,72E-4</text:p>
          </table:table-cell>
          <table:table-cell office:value-type="float" office:value="-4" calcext:value-type="float">
            <text:p>-4,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73999988025753" calcext:value-type="float">
            <text:p>4,74E-4</text:p>
          </table:table-cell>
          <table:table-cell office:value-type="float" office:value="-3.40000009536743" calcext:value-type="float">
            <text:p>-3,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75999987975229" calcext:value-type="float">
            <text:p>4,76E-4</text:p>
          </table:table-cell>
          <table:table-cell office:value-type="float" office:value="-3" calcext:value-type="float">
            <text:p>-3,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77999987924704" calcext:value-type="float">
            <text:p>4,78E-4</text:p>
          </table:table-cell>
          <table:table-cell office:value-type="float" office:value="-2.79999995231628" calcext:value-type="float">
            <text:p>-2,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7999998787418" calcext:value-type="float">
            <text:p>4,80E-4</text:p>
          </table:table-cell>
          <table:table-cell office:value-type="float" office:value="-2.59999990463257" calcext:value-type="float">
            <text:p>-2,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81999987823656" calcext:value-type="float">
            <text:p>4,82E-4</text:p>
          </table:table-cell>
          <table:table-cell office:value-type="float" office:value="-2" calcext:value-type="float">
            <text:p>-2,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83999987773132" calcext:value-type="float">
            <text:p>4,84E-4</text:p>
          </table:table-cell>
          <table:table-cell office:value-type="float" office:value="-1.60000002384186" calcext:value-type="float">
            <text:p>-1,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85999987722607" calcext:value-type="float">
            <text:p>4,86E-4</text:p>
          </table:table-cell>
          <table:table-cell office:value-type="float" office:value="-1.39999997615814" calcext:value-type="float">
            <text:p>-1,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87999987672083" calcext:value-type="float">
            <text:p>4,88E-4</text:p>
          </table:table-cell>
          <table:table-cell office:value-type="float" office:value="-0.800000011920929" calcext:value-type="float">
            <text:p>-8,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89999987621559" calcext:value-type="float">
            <text:p>4,90E-4</text:p>
          </table:table-cell>
          <table:table-cell office:value-type="float" office:value="-0.400000005960465"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91999987571035" calcext:value-type="float">
            <text:p>4,92E-4</text:p>
          </table:table-cell>
          <table:table-cell office:value-type="float" office:value="0" calcext:value-type="float">
            <text:p>0,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9399998752051" calcext:value-type="float">
            <text:p>4,94E-4</text:p>
          </table:table-cell>
          <table:table-cell office:value-type="float" office:value="0.200000002980232" calcext:value-type="float">
            <text:p>2,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95999987469986" calcext:value-type="float">
            <text:p>4,96E-4</text:p>
          </table:table-cell>
          <table:table-cell office:value-type="float" office:value="0.400000005960465"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97999987419462" calcext:value-type="float">
            <text:p>4,98E-4</text:p>
          </table:table-cell>
          <table:table-cell office:value-type="float" office:value="1" calcext:value-type="float">
            <text:p>1,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499999987368938" calcext:value-type="float">
            <text:p>5,00E-4</text:p>
          </table:table-cell>
          <table:table-cell office:value-type="float" office:value="1.39999997615814" calcext:value-type="float">
            <text:p>1,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01999987318413" calcext:value-type="float">
            <text:p>5,02E-4</text:p>
          </table:table-cell>
          <table:table-cell office:value-type="float" office:value="1.60000002384186" calcext:value-type="float">
            <text:p>1,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03999987267889" calcext:value-type="float">
            <text:p>5,04E-4</text:p>
          </table:table-cell>
          <table:table-cell office:value-type="float" office:value="2.20000004768372" calcext:value-type="float">
            <text:p>2,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05999987217365" calcext:value-type="float">
            <text:p>5,06E-4</text:p>
          </table:table-cell>
          <table:table-cell office:value-type="float" office:value="2.40000009536743" calcext:value-type="float">
            <text:p>2,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07999987166841" calcext:value-type="float">
            <text:p>5,08E-4</text:p>
          </table:table-cell>
          <table:table-cell office:value-type="float" office:value="2.79999995231628" calcext:value-type="float">
            <text:p>2,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09999987116316" calcext:value-type="float">
            <text:p>5,10E-4</text:p>
          </table:table-cell>
          <table:table-cell office:value-type="float" office:value="3" calcext:value-type="float">
            <text:p>3,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11999987065792" calcext:value-type="float">
            <text:p>5,12E-4</text:p>
          </table:table-cell>
          <table:table-cell office:value-type="float" office:value="3.59999990463257" calcext:value-type="float">
            <text:p>3,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13999987015268" calcext:value-type="float">
            <text:p>5,14E-4</text:p>
          </table:table-cell>
          <table:table-cell office:value-type="float" office:value="4" calcext:value-type="float">
            <text:p>4,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15999986964744" calcext:value-type="float">
            <text:p>5,16E-4</text:p>
          </table:table-cell>
          <table:table-cell office:value-type="float" office:value="4.40000009536743" calcext:value-type="float">
            <text:p>4,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17999986914219" calcext:value-type="float">
            <text:p>5,18E-4</text:p>
          </table:table-cell>
          <table:table-cell office:value-type="float" office:value="4.59999990463257" calcext:value-type="float">
            <text:p>4,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19999986863695" calcext:value-type="float">
            <text:p>5,20E-4</text:p>
          </table:table-cell>
          <table:table-cell office:value-type="float" office:value="5" calcext:value-type="float">
            <text:p>5,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21999986813171" calcext:value-type="float">
            <text:p>5,22E-4</text:p>
          </table:table-cell>
          <table:table-cell office:value-type="float" office:value="5.40000009536743" calcext:value-type="float">
            <text:p>5,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23999986762647" calcext:value-type="float">
            <text:p>5,24E-4</text:p>
          </table:table-cell>
          <table:table-cell office:value-type="float" office:value="5.80000019073486" calcext:value-type="float">
            <text:p>5,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25999986712122" calcext:value-type="float">
            <text:p>5,26E-4</text:p>
          </table:table-cell>
          <table:table-cell office:value-type="float" office:value="6" calcext:value-type="float">
            <text:p>6,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27999986661598" calcext:value-type="float">
            <text:p>5,28E-4</text:p>
          </table:table-cell>
          <table:table-cell office:value-type="float" office:value="6.59999990463257" calcext:value-type="float">
            <text:p>6,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29999986611074" calcext:value-type="float">
            <text:p>5,30E-4</text:p>
          </table:table-cell>
          <table:table-cell office:value-type="float" office:value="7" calcext:value-type="float">
            <text:p>7,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3199998656055" calcext:value-type="float">
            <text:p>5,32E-4</text:p>
          </table:table-cell>
          <table:table-cell office:value-type="float" office:value="7.19999980926514" calcext:value-type="float">
            <text:p>7,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33999986510025" calcext:value-type="float">
            <text:p>5,34E-4</text:p>
          </table:table-cell>
          <table:table-cell office:value-type="float" office:value="7.59999990463257" calcext:value-type="float">
            <text:p>7,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35999986459501" calcext:value-type="float">
            <text:p>5,36E-4</text:p>
          </table:table-cell>
          <table:table-cell office:value-type="float" office:value="8.19999980926514" calcext:value-type="float">
            <text:p>8,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37999986408977" calcext:value-type="float">
            <text:p>5,38E-4</text:p>
          </table:table-cell>
          <table:table-cell office:value-type="float" office:value="8.39999961853027" calcext:value-type="float">
            <text:p>8,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39999986358453" calcext:value-type="float">
            <text:p>5,40E-4</text:p>
          </table:table-cell>
          <table:table-cell office:value-type="float" office:value="8.80000019073486" calcext:value-type="float">
            <text:p>8,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41999986307928" calcext:value-type="float">
            <text:p>5,42E-4</text:p>
          </table:table-cell>
          <table:table-cell office:value-type="float" office:value="9.19999980926514" calcext:value-type="float">
            <text:p>9,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43999986257404" calcext:value-type="float">
            <text:p>5,44E-4</text:p>
          </table:table-cell>
          <table:table-cell office:value-type="float" office:value="9.39999961853027" calcext:value-type="float">
            <text:p>9,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4599998620688" calcext:value-type="float">
            <text:p>5,46E-4</text:p>
          </table:table-cell>
          <table:table-cell office:value-type="float" office:value="9.80000019073486" calcext:value-type="float">
            <text:p>9,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47999986156356" calcext:value-type="float">
            <text:p>5,48E-4</text:p>
          </table:table-cell>
          <table:table-cell office:value-type="float" office:value="10" calcext:value-type="float">
            <text:p>1,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49999986105831" calcext:value-type="float">
            <text:p>5,50E-4</text:p>
          </table:table-cell>
          <table:table-cell office:value-type="float" office:value="10.6000003814697" calcext:value-type="float">
            <text:p>1,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51999986055307" calcext:value-type="float">
            <text:p>5,52E-4</text:p>
          </table:table-cell>
          <table:table-cell office:value-type="float" office:value="11" calcext:value-type="float">
            <text:p>1,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53999986004783" calcext:value-type="float">
            <text:p>5,54E-4</text:p>
          </table:table-cell>
          <table:table-cell office:value-type="float" office:value="11.3999996185303" calcext:value-type="float">
            <text:p>1,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55999985954259" calcext:value-type="float">
            <text:p>5,56E-4</text:p>
          </table:table-cell>
          <table:table-cell office:value-type="float" office:value="11.6000003814697" calcext:value-type="float">
            <text:p>1,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57999985903734" calcext:value-type="float">
            <text:p>5,58E-4</text:p>
          </table:table-cell>
          <table:table-cell office:value-type="float" office:value="12" calcext:value-type="float">
            <text:p>1,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5999998585321" calcext:value-type="float">
            <text:p>5,60E-4</text:p>
          </table:table-cell>
          <table:table-cell office:value-type="float" office:value="12.3999996185303" calcext:value-type="float">
            <text:p>1,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61999985802686" calcext:value-type="float">
            <text:p>5,62E-4</text:p>
          </table:table-cell>
          <table:table-cell office:value-type="float" office:value="12.8000001907349" calcext:value-type="float">
            <text:p>1,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63999985752162" calcext:value-type="float">
            <text:p>5,64E-4</text:p>
          </table:table-cell>
          <table:table-cell office:value-type="float" office:value="13.1999998092651" calcext:value-type="float">
            <text:p>1,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65999985701637" calcext:value-type="float">
            <text:p>5,66E-4</text:p>
          </table:table-cell>
          <table:table-cell office:value-type="float" office:value="13.6000003814697" calcext:value-type="float">
            <text:p>1,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67999985651113" calcext:value-type="float">
            <text:p>5,68E-4</text:p>
          </table:table-cell>
          <table:table-cell office:value-type="float" office:value="13.8000001907349" calcext:value-type="float">
            <text:p>1,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69999985600589" calcext:value-type="float">
            <text:p>5,70E-4</text:p>
          </table:table-cell>
          <table:table-cell office:value-type="float" office:value="14.1999998092651" calcext:value-type="float">
            <text:p>1,4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71999985550065" calcext:value-type="float">
            <text:p>5,72E-4</text:p>
          </table:table-cell>
          <table:table-cell office:value-type="float" office:value="14.6000003814697" calcext:value-type="float">
            <text:p>1,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7399998549954" calcext:value-type="float">
            <text:p>5,74E-4</text:p>
          </table:table-cell>
          <table:table-cell office:value-type="float" office:value="15" calcext:value-type="float">
            <text:p>1,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75999985449016" calcext:value-type="float">
            <text:p>5,76E-4</text:p>
          </table:table-cell>
          <table:table-cell office:value-type="float" office:value="15.3999996185303" calcext:value-type="float">
            <text:p>1,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77999985398492" calcext:value-type="float">
            <text:p>5,78E-4</text:p>
          </table:table-cell>
          <table:table-cell office:value-type="float" office:value="15.8000001907349" calcext:value-type="float">
            <text:p>1,5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79999985347968" calcext:value-type="float">
            <text:p>5,80E-4</text:p>
          </table:table-cell>
          <table:table-cell office:value-type="float" office:value="16.2000007629395" calcext:value-type="float">
            <text:p>1,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81999985297443" calcext:value-type="float">
            <text:p>5,82E-4</text:p>
          </table:table-cell>
          <table:table-cell office:value-type="float" office:value="16.3999996185303" calcext:value-type="float">
            <text:p>1,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83999985246919" calcext:value-type="float">
            <text:p>5,84E-4</text:p>
          </table:table-cell>
          <table:table-cell office:value-type="float" office:value="16.7999992370605" calcext:value-type="float">
            <text:p>1,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85999985196395" calcext:value-type="float">
            <text:p>5,86E-4</text:p>
          </table:table-cell>
          <table:table-cell office:value-type="float" office:value="17.2000007629395" calcext:value-type="float">
            <text:p>1,7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87999985145871" calcext:value-type="float">
            <text:p>5,88E-4</text:p>
          </table:table-cell>
          <table:table-cell office:value-type="float" office:value="17.6000003814697" calcext:value-type="float">
            <text:p>1,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89999985095346" calcext:value-type="float">
            <text:p>5,90E-4</text:p>
          </table:table-cell>
          <table:table-cell office:value-type="float" office:value="18" calcext:value-type="float">
            <text:p>1,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91999985044822" calcext:value-type="float">
            <text:p>5,92E-4</text:p>
          </table:table-cell>
          <table:table-cell office:value-type="float" office:value="18.3999996185303" calcext:value-type="float">
            <text:p>1,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93999984994298" calcext:value-type="float">
            <text:p>5,94E-4</text:p>
          </table:table-cell>
          <table:table-cell office:value-type="float" office:value="18.6000003814697" calcext:value-type="float">
            <text:p>1,8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95999984943774" calcext:value-type="float">
            <text:p>5,96E-4</text:p>
          </table:table-cell>
          <table:table-cell office:value-type="float" office:value="19" calcext:value-type="float">
            <text:p>1,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97999984893249" calcext:value-type="float">
            <text:p>5,98E-4</text:p>
          </table:table-cell>
          <table:table-cell office:value-type="float" office:value="19.3999996185303" calcext:value-type="float">
            <text:p>1,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599999984842725" calcext:value-type="float">
            <text:p>6,00E-4</text:p>
          </table:table-cell>
          <table:table-cell office:value-type="float" office:value="19.7999992370605" calcext:value-type="float">
            <text:p>1,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01999984792201" calcext:value-type="float">
            <text:p>6,02E-4</text:p>
          </table:table-cell>
          <table:table-cell office:value-type="float" office:value="20.3999996185303" calcext:value-type="float">
            <text:p>2,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03999984741677" calcext:value-type="float">
            <text:p>6,04E-4</text:p>
          </table:table-cell>
          <table:table-cell office:value-type="float" office:value="20.6000003814697" calcext:value-type="float">
            <text:p>2,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05999984691152" calcext:value-type="float">
            <text:p>6,06E-4</text:p>
          </table:table-cell>
          <table:table-cell office:value-type="float" office:value="20.7999992370605" calcext:value-type="float">
            <text:p>2,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07999984640628" calcext:value-type="float">
            <text:p>6,08E-4</text:p>
          </table:table-cell>
          <table:table-cell office:value-type="float" office:value="21.2000007629395" calcext:value-type="float">
            <text:p>2,1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09999984590104" calcext:value-type="float">
            <text:p>6,10E-4</text:p>
          </table:table-cell>
          <table:table-cell office:value-type="float" office:value="21.7999992370605" calcext:value-type="float">
            <text:p>2,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1199998453958" calcext:value-type="float">
            <text:p>6,12E-4</text:p>
          </table:table-cell>
          <table:table-cell office:value-type="float" office:value="22" calcext:value-type="float">
            <text:p>2,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13999984489055" calcext:value-type="float">
            <text:p>6,14E-4</text:p>
          </table:table-cell>
          <table:table-cell office:value-type="float" office:value="22.3999996185303" calcext:value-type="float">
            <text:p>2,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15999984438531" calcext:value-type="float">
            <text:p>6,16E-4</text:p>
          </table:table-cell>
          <table:table-cell office:value-type="float" office:value="22.7999992370605" calcext:value-type="float">
            <text:p>2,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17999984388007" calcext:value-type="float">
            <text:p>6,18E-4</text:p>
          </table:table-cell>
          <table:table-cell office:value-type="float" office:value="23" calcext:value-type="float">
            <text:p>2,3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19999984337483" calcext:value-type="float">
            <text:p>6,20E-4</text:p>
          </table:table-cell>
          <table:table-cell office:value-type="float" office:value="23.3999996185303" calcext:value-type="float">
            <text:p>2,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21999984286958" calcext:value-type="float">
            <text:p>6,22E-4</text:p>
          </table:table-cell>
          <table:table-cell office:value-type="float" office:value="23.6000003814697" calcext:value-type="float">
            <text:p>2,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23999984236434" calcext:value-type="float">
            <text:p>6,24E-4</text:p>
          </table:table-cell>
          <table:table-cell office:value-type="float" office:value="24.2000007629395" calcext:value-type="float">
            <text:p>2,4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2599998418591" calcext:value-type="float">
            <text:p>6,26E-4</text:p>
          </table:table-cell>
          <table:table-cell office:value-type="float" office:value="24.6000003814697" calcext:value-type="float">
            <text:p>2,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27999984135386" calcext:value-type="float">
            <text:p>6,28E-4</text:p>
          </table:table-cell>
          <table:table-cell office:value-type="float" office:value="25" calcext:value-type="float">
            <text:p>2,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29999984084861" calcext:value-type="float">
            <text:p>6,30E-4</text:p>
          </table:table-cell>
          <table:table-cell office:value-type="float" office:value="25.6000003814697" calcext:value-type="float">
            <text:p>2,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31999984034337" calcext:value-type="float">
            <text:p>6,32E-4</text:p>
          </table:table-cell>
          <table:table-cell office:value-type="float" office:value="25.7999992370605" calcext:value-type="float">
            <text:p>2,5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33999983983813" calcext:value-type="float">
            <text:p>6,34E-4</text:p>
          </table:table-cell>
          <table:table-cell office:value-type="float" office:value="26.2000007629395" calcext:value-type="float">
            <text:p>2,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35999983933289" calcext:value-type="float">
            <text:p>6,36E-4</text:p>
          </table:table-cell>
          <table:table-cell office:value-type="float" office:value="26.3999996185303" calcext:value-type="float">
            <text:p>2,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37999983882764" calcext:value-type="float">
            <text:p>6,38E-4</text:p>
          </table:table-cell>
          <table:table-cell office:value-type="float" office:value="26.7999992370605" calcext:value-type="float">
            <text:p>2,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3999998383224" calcext:value-type="float">
            <text:p>6,40E-4</text:p>
          </table:table-cell>
          <table:table-cell office:value-type="float" office:value="27.2000007629395" calcext:value-type="float">
            <text:p>2,7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41999983781716" calcext:value-type="float">
            <text:p>6,42E-4</text:p>
          </table:table-cell>
          <table:table-cell office:value-type="float" office:value="27.7999992370605" calcext:value-type="float">
            <text:p>2,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43999983731192" calcext:value-type="float">
            <text:p>6,44E-4</text:p>
          </table:table-cell>
          <table:table-cell office:value-type="float" office:value="27.7999992370605" calcext:value-type="float">
            <text:p>2,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45999983680667" calcext:value-type="float">
            <text:p>6,46E-4</text:p>
          </table:table-cell>
          <table:table-cell office:value-type="float" office:value="28.3999996185303" calcext:value-type="float">
            <text:p>2,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47999983630143" calcext:value-type="float">
            <text:p>6,48E-4</text:p>
          </table:table-cell>
          <table:table-cell office:value-type="float" office:value="28.7999992370605" calcext:value-type="float">
            <text:p>2,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49999983579619" calcext:value-type="float">
            <text:p>6,50E-4</text:p>
          </table:table-cell>
          <table:table-cell office:value-type="float" office:value="29.2000007629395" calcext:value-type="float">
            <text:p>2,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51999983529095" calcext:value-type="float">
            <text:p>6,52E-4</text:p>
          </table:table-cell>
          <table:table-cell office:value-type="float" office:value="29.3999996185303" calcext:value-type="float">
            <text:p>2,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5399998347857" calcext:value-type="float">
            <text:p>6,54E-4</text:p>
          </table:table-cell>
          <table:table-cell office:value-type="float" office:value="29.7999992370605" calcext:value-type="float">
            <text:p>2,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55999983428046" calcext:value-type="float">
            <text:p>6,56E-4</text:p>
          </table:table-cell>
          <table:table-cell office:value-type="float" office:value="30" calcext:value-type="float">
            <text:p>3,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57999983377522" calcext:value-type="float">
            <text:p>6,58E-4</text:p>
          </table:table-cell>
          <table:table-cell office:value-type="float" office:value="30.6000003814697" calcext:value-type="float">
            <text:p>3,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59999983326998" calcext:value-type="float">
            <text:p>6,60E-4</text:p>
          </table:table-cell>
          <table:table-cell office:value-type="float" office:value="31" calcext:value-type="float">
            <text:p>3,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61999983276473" calcext:value-type="float">
            <text:p>6,62E-4</text:p>
          </table:table-cell>
          <table:table-cell office:value-type="float" office:value="31.3999996185303" calcext:value-type="float">
            <text:p>3,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63999983225949" calcext:value-type="float">
            <text:p>6,64E-4</text:p>
          </table:table-cell>
          <table:table-cell office:value-type="float" office:value="32" calcext:value-type="float">
            <text:p>3,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65999983175425" calcext:value-type="float">
            <text:p>6,66E-4</text:p>
          </table:table-cell>
          <table:table-cell office:value-type="float" office:value="32.2000007629395" calcext:value-type="float">
            <text:p>3,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67999983124901" calcext:value-type="float">
            <text:p>6,68E-4</text:p>
          </table:table-cell>
          <table:table-cell office:value-type="float" office:value="32.2000007629395" calcext:value-type="float">
            <text:p>3,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69999983074376" calcext:value-type="float">
            <text:p>6,70E-4</text:p>
          </table:table-cell>
          <table:table-cell office:value-type="float" office:value="32.5999984741211" calcext:value-type="float">
            <text:p>3,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71999983023852" calcext:value-type="float">
            <text:p>6,72E-4</text:p>
          </table:table-cell>
          <table:table-cell office:value-type="float" office:value="33" calcext:value-type="float">
            <text:p>3,3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73999982973328" calcext:value-type="float">
            <text:p>6,74E-4</text:p>
          </table:table-cell>
          <table:table-cell office:value-type="float" office:value="33.5999984741211" calcext:value-type="float">
            <text:p>3,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75999982922804" calcext:value-type="float">
            <text:p>6,76E-4</text:p>
          </table:table-cell>
          <table:table-cell office:value-type="float" office:value="33.7999992370606" calcext:value-type="float">
            <text:p>3,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77999982872279" calcext:value-type="float">
            <text:p>6,78E-4</text:p>
          </table:table-cell>
          <table:table-cell office:value-type="float" office:value="34.4000015258789" calcext:value-type="float">
            <text:p>3,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79999982821755" calcext:value-type="float">
            <text:p>6,80E-4</text:p>
          </table:table-cell>
          <table:table-cell office:value-type="float" office:value="34.7999992370606" calcext:value-type="float">
            <text:p>3,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81999982771231" calcext:value-type="float">
            <text:p>6,82E-4</text:p>
          </table:table-cell>
          <table:table-cell office:value-type="float" office:value="35" calcext:value-type="float">
            <text:p>3,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83999982720707" calcext:value-type="float">
            <text:p>6,84E-4</text:p>
          </table:table-cell>
          <table:table-cell office:value-type="float" office:value="35.2000007629395" calcext:value-type="float">
            <text:p>3,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85999982670182" calcext:value-type="float">
            <text:p>6,86E-4</text:p>
          </table:table-cell>
          <table:table-cell office:value-type="float" office:value="35.5999984741211" calcext:value-type="float">
            <text:p>3,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87999982619658" calcext:value-type="float">
            <text:p>6,88E-4</text:p>
          </table:table-cell>
          <table:table-cell office:value-type="float" office:value="36.4000015258789" calcext:value-type="float">
            <text:p>3,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89999982569134" calcext:value-type="float">
            <text:p>6,90E-4</text:p>
          </table:table-cell>
          <table:table-cell office:value-type="float" office:value="36.5999984741211" calcext:value-type="float">
            <text:p>3,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9199998251861" calcext:value-type="float">
            <text:p>6,92E-4</text:p>
          </table:table-cell>
          <table:table-cell office:value-type="float" office:value="36.7999992370606" calcext:value-type="float">
            <text:p>3,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93999982468085" calcext:value-type="float">
            <text:p>6,94E-4</text:p>
          </table:table-cell>
          <table:table-cell office:value-type="float" office:value="37" calcext:value-type="float">
            <text:p>3,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95999982417561" calcext:value-type="float">
            <text:p>6,96E-4</text:p>
          </table:table-cell>
          <table:table-cell office:value-type="float" office:value="37.5999984741211" calcext:value-type="float">
            <text:p>3,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97999982367037" calcext:value-type="float">
            <text:p>6,98E-4</text:p>
          </table:table-cell>
          <table:table-cell office:value-type="float" office:value="38" calcext:value-type="float">
            <text:p>3,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699999982316513" calcext:value-type="float">
            <text:p>7,00E-4</text:p>
          </table:table-cell>
          <table:table-cell office:value-type="float" office:value="38.4000015258789" calcext:value-type="float">
            <text:p>3,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01999982265988" calcext:value-type="float">
            <text:p>7,02E-4</text:p>
          </table:table-cell>
          <table:table-cell office:value-type="float" office:value="38.5999984741211" calcext:value-type="float">
            <text:p>3,8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03999982215464" calcext:value-type="float">
            <text:p>7,04E-4</text:p>
          </table:table-cell>
          <table:table-cell office:value-type="float" office:value="39" calcext:value-type="float">
            <text:p>3,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0599998216494" calcext:value-type="float">
            <text:p>7,06E-4</text:p>
          </table:table-cell>
          <table:table-cell office:value-type="float" office:value="39.4000015258789" calcext:value-type="float">
            <text:p>3,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07999982114416" calcext:value-type="float">
            <text:p>7,08E-4</text:p>
          </table:table-cell>
          <table:table-cell office:value-type="float" office:value="39.5999984741211" calcext:value-type="float">
            <text:p>3,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09999982063891" calcext:value-type="float">
            <text:p>7,10E-4</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11999982013367" calcext:value-type="float">
            <text:p>7,12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13999981962843" calcext:value-type="float">
            <text:p>7,14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15999981912319" calcext:value-type="float">
            <text:p>7,16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17999981861794" calcext:value-type="float">
            <text:p>7,18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1999998181127" calcext:value-type="float">
            <text:p>7,20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21999981760746" calcext:value-type="float">
            <text:p>7,22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23999981710222" calcext:value-type="float">
            <text:p>7,24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25999981659697" calcext:value-type="float">
            <text:p>7,26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27999981609173" calcext:value-type="float">
            <text:p>7,28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29999981558649" calcext:value-type="float">
            <text:p>7,30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31999981508125" calcext:value-type="float">
            <text:p>7,32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339999814576" calcext:value-type="float">
            <text:p>7,34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35999981407076" calcext:value-type="float">
            <text:p>7,36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37999981356552" calcext:value-type="float">
            <text:p>7,38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39999981306028" calcext:value-type="float">
            <text:p>7,40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41999981255503" calcext:value-type="float">
            <text:p>7,42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43999981204979" calcext:value-type="float">
            <text:p>7,44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45999981154455" calcext:value-type="float">
            <text:p>7,46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47999981103931" calcext:value-type="float">
            <text:p>7,48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49999981053406" calcext:value-type="float">
            <text:p>7,50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51999981002882" calcext:value-type="float">
            <text:p>7,52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53999980952358" calcext:value-type="float">
            <text:p>7,54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55999980901834" calcext:value-type="float">
            <text:p>7,56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57999980851309" calcext:value-type="float">
            <text:p>7,58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59999980800785" calcext:value-type="float">
            <text:p>7,60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61999980750261" calcext:value-type="float">
            <text:p>7,62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63999980699737" calcext:value-type="float">
            <text:p>7,64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65999980649212" calcext:value-type="float">
            <text:p>7,66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67999980598688" calcext:value-type="float">
            <text:p>7,68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69999980548164" calcext:value-type="float">
            <text:p>7,70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7199998049764" calcext:value-type="float">
            <text:p>7,72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73999980447115" calcext:value-type="float">
            <text:p>7,74E-4</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75999980396591" calcext:value-type="float">
            <text:p>7,76E-4</text:p>
          </table:table-cell>
          <table:table-cell office:value-type="float" office:value="39.7999992370606" calcext:value-type="float">
            <text:p>3,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77999980346067" calcext:value-type="float">
            <text:p>7,78E-4</text:p>
          </table:table-cell>
          <table:table-cell office:value-type="float" office:value="39.2000007629395" calcext:value-type="float">
            <text:p>3,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79999980295543" calcext:value-type="float">
            <text:p>7,80E-4</text:p>
          </table:table-cell>
          <table:table-cell office:value-type="float" office:value="39.2000007629395" calcext:value-type="float">
            <text:p>3,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81999980245018" calcext:value-type="float">
            <text:p>7,82E-4</text:p>
          </table:table-cell>
          <table:table-cell office:value-type="float" office:value="38.5999984741211" calcext:value-type="float">
            <text:p>3,8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83999980194494" calcext:value-type="float">
            <text:p>7,84E-4</text:p>
          </table:table-cell>
          <table:table-cell office:value-type="float" office:value="38.4000015258789" calcext:value-type="float">
            <text:p>3,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8599998014397" calcext:value-type="float">
            <text:p>7,86E-4</text:p>
          </table:table-cell>
          <table:table-cell office:value-type="float" office:value="38" calcext:value-type="float">
            <text:p>3,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87999980093446" calcext:value-type="float">
            <text:p>7,88E-4</text:p>
          </table:table-cell>
          <table:table-cell office:value-type="float" office:value="37.5999984741211" calcext:value-type="float">
            <text:p>3,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89999980042921" calcext:value-type="float">
            <text:p>7,90E-4</text:p>
          </table:table-cell>
          <table:table-cell office:value-type="float" office:value="37.2000007629395" calcext:value-type="float">
            <text:p>3,7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91999979992397" calcext:value-type="float">
            <text:p>7,92E-4</text:p>
          </table:table-cell>
          <table:table-cell office:value-type="float" office:value="36.7999992370606" calcext:value-type="float">
            <text:p>3,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93999979941873" calcext:value-type="float">
            <text:p>7,94E-4</text:p>
          </table:table-cell>
          <table:table-cell office:value-type="float" office:value="36.5999984741211" calcext:value-type="float">
            <text:p>3,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95999979891349" calcext:value-type="float">
            <text:p>7,96E-4</text:p>
          </table:table-cell>
          <table:table-cell office:value-type="float" office:value="36.4000015258789" calcext:value-type="float">
            <text:p>3,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97999979840824" calcext:value-type="float">
            <text:p>7,98E-4</text:p>
          </table:table-cell>
          <table:table-cell office:value-type="float" office:value="35.4000015258789" calcext:value-type="float">
            <text:p>3,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7999999797903" calcext:value-type="float">
            <text:p>8,00E-4</text:p>
          </table:table-cell>
          <table:table-cell office:value-type="float" office:value="35.2000007629395" calcext:value-type="float">
            <text:p>3,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01999979739776" calcext:value-type="float">
            <text:p>8,02E-4</text:p>
          </table:table-cell>
          <table:table-cell office:value-type="float" office:value="35" calcext:value-type="float">
            <text:p>3,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03999979689252" calcext:value-type="float">
            <text:p>8,04E-4</text:p>
          </table:table-cell>
          <table:table-cell office:value-type="float" office:value="34.5999984741211" calcext:value-type="float">
            <text:p>3,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05999979638727" calcext:value-type="float">
            <text:p>8,06E-4</text:p>
          </table:table-cell>
          <table:table-cell office:value-type="float" office:value="34.4000015258789" calcext:value-type="float">
            <text:p>3,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07999979588203" calcext:value-type="float">
            <text:p>8,08E-4</text:p>
          </table:table-cell>
          <table:table-cell office:value-type="float" office:value="34.2000007629395" calcext:value-type="float">
            <text:p>3,4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09999979537679" calcext:value-type="float">
            <text:p>8,10E-4</text:p>
          </table:table-cell>
          <table:table-cell office:value-type="float" office:value="33.4000015258789" calcext:value-type="float">
            <text:p>3,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11999979487155" calcext:value-type="float">
            <text:p>8,12E-4</text:p>
          </table:table-cell>
          <table:table-cell office:value-type="float" office:value="33.4000015258789" calcext:value-type="float">
            <text:p>3,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1399997943663" calcext:value-type="float">
            <text:p>8,14E-4</text:p>
          </table:table-cell>
          <table:table-cell office:value-type="float" office:value="32.5999984741211" calcext:value-type="float">
            <text:p>3,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15999979386106" calcext:value-type="float">
            <text:p>8,16E-4</text:p>
          </table:table-cell>
          <table:table-cell office:value-type="float" office:value="32.4000015258789" calcext:value-type="float">
            <text:p>3,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17999979335582" calcext:value-type="float">
            <text:p>8,18E-4</text:p>
          </table:table-cell>
          <table:table-cell office:value-type="float" office:value="32.2000007629395" calcext:value-type="float">
            <text:p>3,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19999979285058" calcext:value-type="float">
            <text:p>8,20E-4</text:p>
          </table:table-cell>
          <table:table-cell office:value-type="float" office:value="32" calcext:value-type="float">
            <text:p>3,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21999979234533" calcext:value-type="float">
            <text:p>8,22E-4</text:p>
          </table:table-cell>
          <table:table-cell office:value-type="float" office:value="31.3999996185303" calcext:value-type="float">
            <text:p>3,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23999979184009" calcext:value-type="float">
            <text:p>8,24E-4</text:p>
          </table:table-cell>
          <table:table-cell office:value-type="float" office:value="31" calcext:value-type="float">
            <text:p>3,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25999979133485" calcext:value-type="float">
            <text:p>8,26E-4</text:p>
          </table:table-cell>
          <table:table-cell office:value-type="float" office:value="30.3999996185303" calcext:value-type="float">
            <text:p>3,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27999979082961" calcext:value-type="float">
            <text:p>8,28E-4</text:p>
          </table:table-cell>
          <table:table-cell office:value-type="float" office:value="30.2000007629395" calcext:value-type="float">
            <text:p>3,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29999979032436" calcext:value-type="float">
            <text:p>8,30E-4</text:p>
          </table:table-cell>
          <table:table-cell office:value-type="float" office:value="29.7999992370605" calcext:value-type="float">
            <text:p>2,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31999978981912" calcext:value-type="float">
            <text:p>8,32E-4</text:p>
          </table:table-cell>
          <table:table-cell office:value-type="float" office:value="29.3999996185303" calcext:value-type="float">
            <text:p>2,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33999978931388" calcext:value-type="float">
            <text:p>8,34E-4</text:p>
          </table:table-cell>
          <table:table-cell office:value-type="float" office:value="29.2000007629395" calcext:value-type="float">
            <text:p>2,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35999978880864" calcext:value-type="float">
            <text:p>8,36E-4</text:p>
          </table:table-cell>
          <table:table-cell office:value-type="float" office:value="29" calcext:value-type="float">
            <text:p>2,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37999978830339" calcext:value-type="float">
            <text:p>8,38E-4</text:p>
          </table:table-cell>
          <table:table-cell office:value-type="float" office:value="28.3999996185303" calcext:value-type="float">
            <text:p>2,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39999978779815" calcext:value-type="float">
            <text:p>8,40E-4</text:p>
          </table:table-cell>
          <table:table-cell office:value-type="float" office:value="28.2000007629395" calcext:value-type="float">
            <text:p>2,8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41999978729291" calcext:value-type="float">
            <text:p>8,42E-4</text:p>
          </table:table-cell>
          <table:table-cell office:value-type="float" office:value="27.7999992370605" calcext:value-type="float">
            <text:p>2,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43999978678767" calcext:value-type="float">
            <text:p>8,44E-4</text:p>
          </table:table-cell>
          <table:table-cell office:value-type="float" office:value="27.2000007629395" calcext:value-type="float">
            <text:p>2,7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45999978628242" calcext:value-type="float">
            <text:p>8,46E-4</text:p>
          </table:table-cell>
          <table:table-cell office:value-type="float" office:value="26.7999992370605" calcext:value-type="float">
            <text:p>2,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47999978577718" calcext:value-type="float">
            <text:p>8,48E-4</text:p>
          </table:table-cell>
          <table:table-cell office:value-type="float" office:value="26.6000003814697" calcext:value-type="float">
            <text:p>2,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49999978527194" calcext:value-type="float">
            <text:p>8,50E-4</text:p>
          </table:table-cell>
          <table:table-cell office:value-type="float" office:value="26" calcext:value-type="float">
            <text:p>2,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5199997847667" calcext:value-type="float">
            <text:p>8,52E-4</text:p>
          </table:table-cell>
          <table:table-cell office:value-type="float" office:value="26" calcext:value-type="float">
            <text:p>2,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53999978426145" calcext:value-type="float">
            <text:p>8,54E-4</text:p>
          </table:table-cell>
          <table:table-cell office:value-type="float" office:value="25.6000003814697" calcext:value-type="float">
            <text:p>2,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55999978375621" calcext:value-type="float">
            <text:p>8,56E-4</text:p>
          </table:table-cell>
          <table:table-cell office:value-type="float" office:value="25.2000007629395" calcext:value-type="float">
            <text:p>2,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57999978325097" calcext:value-type="float">
            <text:p>8,58E-4</text:p>
          </table:table-cell>
          <table:table-cell office:value-type="float" office:value="24.7999992370605" calcext:value-type="float">
            <text:p>2,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59999978274573" calcext:value-type="float">
            <text:p>8,60E-4</text:p>
          </table:table-cell>
          <table:table-cell office:value-type="float" office:value="24.3999996185303" calcext:value-type="float">
            <text:p>2,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61999978224048" calcext:value-type="float">
            <text:p>8,62E-4</text:p>
          </table:table-cell>
          <table:table-cell office:value-type="float" office:value="23.7999992370605" calcext:value-type="float">
            <text:p>2,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63999978173524" calcext:value-type="float">
            <text:p>8,64E-4</text:p>
          </table:table-cell>
          <table:table-cell office:value-type="float" office:value="23.3999996185303" calcext:value-type="float">
            <text:p>2,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65999978123" calcext:value-type="float">
            <text:p>8,66E-4</text:p>
          </table:table-cell>
          <table:table-cell office:value-type="float" office:value="23.2000007629395" calcext:value-type="float">
            <text:p>2,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67999978072476" calcext:value-type="float">
            <text:p>8,68E-4</text:p>
          </table:table-cell>
          <table:table-cell office:value-type="float" office:value="22.7999992370605" calcext:value-type="float">
            <text:p>2,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69999978021951" calcext:value-type="float">
            <text:p>8,70E-4</text:p>
          </table:table-cell>
          <table:table-cell office:value-type="float" office:value="22.3999996185303" calcext:value-type="float">
            <text:p>2,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71999977971427" calcext:value-type="float">
            <text:p>8,72E-4</text:p>
          </table:table-cell>
          <table:table-cell office:value-type="float" office:value="22" calcext:value-type="float">
            <text:p>2,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73999977920903" calcext:value-type="float">
            <text:p>8,74E-4</text:p>
          </table:table-cell>
          <table:table-cell office:value-type="float" office:value="21.7999992370605" calcext:value-type="float">
            <text:p>2,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75999977870379" calcext:value-type="float">
            <text:p>8,76E-4</text:p>
          </table:table-cell>
          <table:table-cell office:value-type="float" office:value="21.6000003814697" calcext:value-type="float">
            <text:p>2,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77999977819854" calcext:value-type="float">
            <text:p>8,78E-4</text:p>
          </table:table-cell>
          <table:table-cell office:value-type="float" office:value="20.7999992370605" calcext:value-type="float">
            <text:p>2,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7999997776933" calcext:value-type="float">
            <text:p>8,80E-4</text:p>
          </table:table-cell>
          <table:table-cell office:value-type="float" office:value="20.6000003814697" calcext:value-type="float">
            <text:p>2,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81999977718806" calcext:value-type="float">
            <text:p>8,82E-4</text:p>
          </table:table-cell>
          <table:table-cell office:value-type="float" office:value="20.2000007629395" calcext:value-type="float">
            <text:p>2,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83999977668282" calcext:value-type="float">
            <text:p>8,84E-4</text:p>
          </table:table-cell>
          <table:table-cell office:value-type="float" office:value="19.7999992370605" calcext:value-type="float">
            <text:p>1,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85999977617757" calcext:value-type="float">
            <text:p>8,86E-4</text:p>
          </table:table-cell>
          <table:table-cell office:value-type="float" office:value="19.3999996185303" calcext:value-type="float">
            <text:p>1,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87999977567233" calcext:value-type="float">
            <text:p>8,88E-4</text:p>
          </table:table-cell>
          <table:table-cell office:value-type="float" office:value="19" calcext:value-type="float">
            <text:p>1,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89999977516709" calcext:value-type="float">
            <text:p>8,90E-4</text:p>
          </table:table-cell>
          <table:table-cell office:value-type="float" office:value="18.7999992370605" calcext:value-type="float">
            <text:p>1,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91999977466185" calcext:value-type="float">
            <text:p>8,92E-4</text:p>
          </table:table-cell>
          <table:table-cell office:value-type="float" office:value="18.3999996185303" calcext:value-type="float">
            <text:p>1,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9399997741566" calcext:value-type="float">
            <text:p>8,94E-4</text:p>
          </table:table-cell>
          <table:table-cell office:value-type="float" office:value="18" calcext:value-type="float">
            <text:p>1,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95999977365136" calcext:value-type="float">
            <text:p>8,96E-4</text:p>
          </table:table-cell>
          <table:table-cell office:value-type="float" office:value="17.7999992370605" calcext:value-type="float">
            <text:p>1,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97999977314612" calcext:value-type="float">
            <text:p>8,98E-4</text:p>
          </table:table-cell>
          <table:table-cell office:value-type="float" office:value="17.2000007629395" calcext:value-type="float">
            <text:p>1,7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899999977264088" calcext:value-type="float">
            <text:p>9,00E-4</text:p>
          </table:table-cell>
          <table:table-cell office:value-type="float" office:value="16.7999992370605" calcext:value-type="float">
            <text:p>1,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01999977213563" calcext:value-type="float">
            <text:p>9,02E-4</text:p>
          </table:table-cell>
          <table:table-cell office:value-type="float" office:value="16.3999996185303" calcext:value-type="float">
            <text:p>1,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03999977163039" calcext:value-type="float">
            <text:p>9,04E-4</text:p>
          </table:table-cell>
          <table:table-cell office:value-type="float" office:value="16.2000007629395" calcext:value-type="float">
            <text:p>1,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05999977112515" calcext:value-type="float">
            <text:p>9,06E-4</text:p>
          </table:table-cell>
          <table:table-cell office:value-type="float" office:value="16" calcext:value-type="float">
            <text:p>1,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07999977061991" calcext:value-type="float">
            <text:p>9,08E-4</text:p>
          </table:table-cell>
          <table:table-cell office:value-type="float" office:value="15.8000001907349" calcext:value-type="float">
            <text:p>1,5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09999977011466" calcext:value-type="float">
            <text:p>9,10E-4</text:p>
          </table:table-cell>
          <table:table-cell office:value-type="float" office:value="15" calcext:value-type="float">
            <text:p>1,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11999976960942" calcext:value-type="float">
            <text:p>9,12E-4</text:p>
          </table:table-cell>
          <table:table-cell office:value-type="float" office:value="14.8000001907349" calcext:value-type="float">
            <text:p>1,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13999976910418" calcext:value-type="float">
            <text:p>9,14E-4</text:p>
          </table:table-cell>
          <table:table-cell office:value-type="float" office:value="14.3999996185303" calcext:value-type="float">
            <text:p>1,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15999976859894" calcext:value-type="float">
            <text:p>9,16E-4</text:p>
          </table:table-cell>
          <table:table-cell office:value-type="float" office:value="13.8000001907349" calcext:value-type="float">
            <text:p>1,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17999976809369" calcext:value-type="float">
            <text:p>9,18E-4</text:p>
          </table:table-cell>
          <table:table-cell office:value-type="float" office:value="13.8000001907349" calcext:value-type="float">
            <text:p>1,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19999976758845" calcext:value-type="float">
            <text:p>9,20E-4</text:p>
          </table:table-cell>
          <table:table-cell office:value-type="float" office:value="13.1999998092651" calcext:value-type="float">
            <text:p>1,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21999976708321" calcext:value-type="float">
            <text:p>9,22E-4</text:p>
          </table:table-cell>
          <table:table-cell office:value-type="float" office:value="12.8000001907349" calcext:value-type="float">
            <text:p>1,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23999976657797" calcext:value-type="float">
            <text:p>9,24E-4</text:p>
          </table:table-cell>
          <table:table-cell office:value-type="float" office:value="12.3999996185303" calcext:value-type="float">
            <text:p>1,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25999976607272" calcext:value-type="float">
            <text:p>9,26E-4</text:p>
          </table:table-cell>
          <table:table-cell office:value-type="float" office:value="11.8000001907349" calcext:value-type="float">
            <text:p>1,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27999976556748" calcext:value-type="float">
            <text:p>9,28E-4</text:p>
          </table:table-cell>
          <table:table-cell office:value-type="float" office:value="11.6000003814697" calcext:value-type="float">
            <text:p>1,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29999976506224" calcext:value-type="float">
            <text:p>9,30E-4</text:p>
          </table:table-cell>
          <table:table-cell office:value-type="float" office:value="11.6000003814697" calcext:value-type="float">
            <text:p>1,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319999764557" calcext:value-type="float">
            <text:p>9,32E-4</text:p>
          </table:table-cell>
          <table:table-cell office:value-type="float" office:value="11" calcext:value-type="float">
            <text:p>1,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33999976405175" calcext:value-type="float">
            <text:p>9,34E-4</text:p>
          </table:table-cell>
          <table:table-cell office:value-type="float" office:value="10.6000003814697" calcext:value-type="float">
            <text:p>1,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35999976354651" calcext:value-type="float">
            <text:p>9,36E-4</text:p>
          </table:table-cell>
          <table:table-cell office:value-type="float" office:value="10.1999998092651" calcext:value-type="float">
            <text:p>1,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37999976304127" calcext:value-type="float">
            <text:p>9,38E-4</text:p>
          </table:table-cell>
          <table:table-cell office:value-type="float" office:value="10" calcext:value-type="float">
            <text:p>1,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39999976253603" calcext:value-type="float">
            <text:p>9,40E-4</text:p>
          </table:table-cell>
          <table:table-cell office:value-type="float" office:value="9.39999961853027" calcext:value-type="float">
            <text:p>9,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41999976203078" calcext:value-type="float">
            <text:p>9,42E-4</text:p>
          </table:table-cell>
          <table:table-cell office:value-type="float" office:value="9.19999980926514" calcext:value-type="float">
            <text:p>9,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43999976152554" calcext:value-type="float">
            <text:p>9,44E-4</text:p>
          </table:table-cell>
          <table:table-cell office:value-type="float" office:value="8.80000019073486" calcext:value-type="float">
            <text:p>8,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4599997610203" calcext:value-type="float">
            <text:p>9,46E-4</text:p>
          </table:table-cell>
          <table:table-cell office:value-type="float" office:value="8.39999961853027" calcext:value-type="float">
            <text:p>8,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47999976051506" calcext:value-type="float">
            <text:p>9,48E-4</text:p>
          </table:table-cell>
          <table:table-cell office:value-type="float" office:value="8.19999980926514" calcext:value-type="float">
            <text:p>8,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49999976000981" calcext:value-type="float">
            <text:p>9,50E-4</text:p>
          </table:table-cell>
          <table:table-cell office:value-type="float" office:value="7.59999990463257" calcext:value-type="float">
            <text:p>7,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51999975950457" calcext:value-type="float">
            <text:p>9,52E-4</text:p>
          </table:table-cell>
          <table:table-cell office:value-type="float" office:value="7.19999980926514" calcext:value-type="float">
            <text:p>7,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53999975899933" calcext:value-type="float">
            <text:p>9,54E-4</text:p>
          </table:table-cell>
          <table:table-cell office:value-type="float" office:value="7" calcext:value-type="float">
            <text:p>7,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55999975849409" calcext:value-type="float">
            <text:p>9,56E-4</text:p>
          </table:table-cell>
          <table:table-cell office:value-type="float" office:value="6.59999990463257" calcext:value-type="float">
            <text:p>6,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57999975798884" calcext:value-type="float">
            <text:p>9,58E-4</text:p>
          </table:table-cell>
          <table:table-cell office:value-type="float" office:value="6" calcext:value-type="float">
            <text:p>6,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5999997574836" calcext:value-type="float">
            <text:p>9,60E-4</text:p>
          </table:table-cell>
          <table:table-cell office:value-type="float" office:value="5.80000019073486" calcext:value-type="float">
            <text:p>5,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61999975697836" calcext:value-type="float">
            <text:p>9,62E-4</text:p>
          </table:table-cell>
          <table:table-cell office:value-type="float" office:value="5.59999990463257" calcext:value-type="float">
            <text:p>5,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63999975647312" calcext:value-type="float">
            <text:p>9,64E-4</text:p>
          </table:table-cell>
          <table:table-cell office:value-type="float" office:value="5" calcext:value-type="float">
            <text:p>5,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65999975596787" calcext:value-type="float">
            <text:p>9,66E-4</text:p>
          </table:table-cell>
          <table:table-cell office:value-type="float" office:value="4.80000019073486" calcext:value-type="float">
            <text:p>4,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67999975546263" calcext:value-type="float">
            <text:p>9,68E-4</text:p>
          </table:table-cell>
          <table:table-cell office:value-type="float" office:value="4.59999990463257" calcext:value-type="float">
            <text:p>4,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69999975495739" calcext:value-type="float">
            <text:p>9,70E-4</text:p>
          </table:table-cell>
          <table:table-cell office:value-type="float" office:value="4.19999980926514" calcext:value-type="float">
            <text:p>4,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71999975445215" calcext:value-type="float">
            <text:p>9,72E-4</text:p>
          </table:table-cell>
          <table:table-cell office:value-type="float" office:value="3.59999990463257" calcext:value-type="float">
            <text:p>3,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7399997539469" calcext:value-type="float">
            <text:p>9,74E-4</text:p>
          </table:table-cell>
          <table:table-cell office:value-type="float" office:value="3.20000004768372" calcext:value-type="float">
            <text:p>3,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75999975344166" calcext:value-type="float">
            <text:p>9,76E-4</text:p>
          </table:table-cell>
          <table:table-cell office:value-type="float" office:value="3" calcext:value-type="float">
            <text:p>3,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77999975293642" calcext:value-type="float">
            <text:p>9,78E-4</text:p>
          </table:table-cell>
          <table:table-cell office:value-type="float" office:value="2.59999990463257" calcext:value-type="float">
            <text:p>2,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79999975243118" calcext:value-type="float">
            <text:p>9,80E-4</text:p>
          </table:table-cell>
          <table:table-cell office:value-type="float" office:value="2.20000004768372" calcext:value-type="float">
            <text:p>2,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81999975192594" calcext:value-type="float">
            <text:p>9,82E-4</text:p>
          </table:table-cell>
          <table:table-cell office:value-type="float" office:value="1.79999995231628" calcext:value-type="float">
            <text:p>1,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83999975142069" calcext:value-type="float">
            <text:p>9,84E-4</text:p>
          </table:table-cell>
          <table:table-cell office:value-type="float" office:value="1.39999997615814" calcext:value-type="float">
            <text:p>1,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85999975091545" calcext:value-type="float">
            <text:p>9,86E-4</text:p>
          </table:table-cell>
          <table:table-cell office:value-type="float" office:value="1.20000004768372" calcext:value-type="float">
            <text:p>1,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87999975041021" calcext:value-type="float">
            <text:p>9,88E-4</text:p>
          </table:table-cell>
          <table:table-cell office:value-type="float" office:value="0.600000023841858" calcext:value-type="float">
            <text:p>6,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89999974990496" calcext:value-type="float">
            <text:p>9,90E-4</text:p>
          </table:table-cell>
          <table:table-cell office:value-type="float" office:value="0.200000002980232" calcext:value-type="float">
            <text:p>2,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91999974939972" calcext:value-type="float">
            <text:p>9,92E-4</text:p>
          </table:table-cell>
          <table:table-cell office:value-type="float" office:value="0" calcext:value-type="float">
            <text:p>0,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93999974889448" calcext:value-type="float">
            <text:p>9,94E-4</text:p>
          </table:table-cell>
          <table:table-cell office:value-type="float" office:value="-0.400000005960465"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95999974838924" calcext:value-type="float">
            <text:p>9,96E-4</text:p>
          </table:table-cell>
          <table:table-cell office:value-type="float" office:value="-0.800000011920929" calcext:value-type="float">
            <text:p>-8,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97999974788399" calcext:value-type="float">
            <text:p>9,98E-4</text:p>
          </table:table-cell>
          <table:table-cell office:value-type="float" office:value="-1.20000004768372" calcext:value-type="float">
            <text:p>-1,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0999999974737875" calcext:value-type="float">
            <text:p>1,00E-3</text:p>
          </table:table-cell>
          <table:table-cell office:value-type="float" office:value="-1.79999995231628" calcext:value-type="float">
            <text:p>-1,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0199997468735" calcext:value-type="float">
            <text:p>1,00E-3</text:p>
          </table:table-cell>
          <table:table-cell office:value-type="float" office:value="-2" calcext:value-type="float">
            <text:p>-2,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0399997463683" calcext:value-type="float">
            <text:p>1,00E-3</text:p>
          </table:table-cell>
          <table:table-cell office:value-type="float" office:value="-2.20000004768372" calcext:value-type="float">
            <text:p>-2,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059999745863" calcext:value-type="float">
            <text:p>1,01E-3</text:p>
          </table:table-cell>
          <table:table-cell office:value-type="float" office:value="-2.79999995231628" calcext:value-type="float">
            <text:p>-2,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0799997453578" calcext:value-type="float">
            <text:p>1,01E-3</text:p>
          </table:table-cell>
          <table:table-cell office:value-type="float" office:value="-3" calcext:value-type="float">
            <text:p>-3,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0999997448525" calcext:value-type="float">
            <text:p>1,01E-3</text:p>
          </table:table-cell>
          <table:table-cell office:value-type="float" office:value="-3.40000009536743" calcext:value-type="float">
            <text:p>-3,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1199997443473" calcext:value-type="float">
            <text:p>1,01E-3</text:p>
          </table:table-cell>
          <table:table-cell office:value-type="float" office:value="-3.79999995231628" calcext:value-type="float">
            <text:p>-3,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1399997438421" calcext:value-type="float">
            <text:p>1,01E-3</text:p>
          </table:table-cell>
          <table:table-cell office:value-type="float" office:value="-4.19999980926514" calcext:value-type="float">
            <text:p>-4,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1599997433368" calcext:value-type="float">
            <text:p>1,02E-3</text:p>
          </table:table-cell>
          <table:table-cell office:value-type="float" office:value="-4.59999990463257" calcext:value-type="float">
            <text:p>-4,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1799997428316" calcext:value-type="float">
            <text:p>1,02E-3</text:p>
          </table:table-cell>
          <table:table-cell office:value-type="float" office:value="-4.80000019073486" calcext:value-type="float">
            <text:p>-4,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1999997423263" calcext:value-type="float">
            <text:p>1,02E-3</text:p>
          </table:table-cell>
          <table:table-cell office:value-type="float" office:value="-5.19999980926514" calcext:value-type="float">
            <text:p>-5,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2199997418211" calcext:value-type="float">
            <text:p>1,02E-3</text:p>
          </table:table-cell>
          <table:table-cell office:value-type="float" office:value="-5.80000019073486" calcext:value-type="float">
            <text:p>-5,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2399997413158" calcext:value-type="float">
            <text:p>1,02E-3</text:p>
          </table:table-cell>
          <table:table-cell office:value-type="float" office:value="-6" calcext:value-type="float">
            <text:p>-6,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2599997408106" calcext:value-type="float">
            <text:p>1,03E-3</text:p>
          </table:table-cell>
          <table:table-cell office:value-type="float" office:value="-6.40000009536743" calcext:value-type="float">
            <text:p>-6,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2799997403054" calcext:value-type="float">
            <text:p>1,03E-3</text:p>
          </table:table-cell>
          <table:table-cell office:value-type="float" office:value="-6.80000019073486" calcext:value-type="float">
            <text:p>-6,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2999997398001" calcext:value-type="float">
            <text:p>1,03E-3</text:p>
          </table:table-cell>
          <table:table-cell office:value-type="float" office:value="-7" calcext:value-type="float">
            <text:p>-7,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3199997392949" calcext:value-type="float">
            <text:p>1,03E-3</text:p>
          </table:table-cell>
          <table:table-cell office:value-type="float" office:value="-7.40000009536743" calcext:value-type="float">
            <text:p>-7,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3399997387896" calcext:value-type="float">
            <text:p>1,03E-3</text:p>
          </table:table-cell>
          <table:table-cell office:value-type="float" office:value="-7.80000019073486" calcext:value-type="float">
            <text:p>-7,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3599997382844" calcext:value-type="float">
            <text:p>1,04E-3</text:p>
          </table:table-cell>
          <table:table-cell office:value-type="float" office:value="-8.39999961853027" calcext:value-type="float">
            <text:p>-8,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3799997377791" calcext:value-type="float">
            <text:p>1,04E-3</text:p>
          </table:table-cell>
          <table:table-cell office:value-type="float" office:value="-8.60000038146973" calcext:value-type="float">
            <text:p>-8,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3999997372739" calcext:value-type="float">
            <text:p>1,04E-3</text:p>
          </table:table-cell>
          <table:table-cell office:value-type="float" office:value="-9" calcext:value-type="float">
            <text:p>-9,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4199997367687" calcext:value-type="float">
            <text:p>1,04E-3</text:p>
          </table:table-cell>
          <table:table-cell office:value-type="float" office:value="-9.19999980926514" calcext:value-type="float">
            <text:p>-9,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4399997362634" calcext:value-type="float">
            <text:p>1,04E-3</text:p>
          </table:table-cell>
          <table:table-cell office:value-type="float" office:value="-9.60000038146973" calcext:value-type="float">
            <text:p>-9,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4599997357582" calcext:value-type="float">
            <text:p>1,05E-3</text:p>
          </table:table-cell>
          <table:table-cell office:value-type="float" office:value="-10" calcext:value-type="float">
            <text:p>-1,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4799997352529" calcext:value-type="float">
            <text:p>1,05E-3</text:p>
          </table:table-cell>
          <table:table-cell office:value-type="float" office:value="-10.3999996185303" calcext:value-type="float">
            <text:p>-1,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4999997347477" calcext:value-type="float">
            <text:p>1,05E-3</text:p>
          </table:table-cell>
          <table:table-cell office:value-type="float" office:value="-10.8000001907349" calcext:value-type="float">
            <text:p>-1,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5199997342424" calcext:value-type="float">
            <text:p>1,05E-3</text:p>
          </table:table-cell>
          <table:table-cell office:value-type="float" office:value="-11.1999998092651" calcext:value-type="float">
            <text:p>-1,1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5399997337372" calcext:value-type="float">
            <text:p>1,05E-3</text:p>
          </table:table-cell>
          <table:table-cell office:value-type="float" office:value="-11.6000003814697" calcext:value-type="float">
            <text:p>-1,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559999733232" calcext:value-type="float">
            <text:p>1,06E-3</text:p>
          </table:table-cell>
          <table:table-cell office:value-type="float" office:value="-11.8000001907349" calcext:value-type="float">
            <text:p>-1,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5799997327267" calcext:value-type="float">
            <text:p>1,06E-3</text:p>
          </table:table-cell>
          <table:table-cell office:value-type="float" office:value="-12.1999998092651" calcext:value-type="float">
            <text:p>-1,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5999997322215" calcext:value-type="float">
            <text:p>1,06E-3</text:p>
          </table:table-cell>
          <table:table-cell office:value-type="float" office:value="-12.8000001907349" calcext:value-type="float">
            <text:p>-1,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6199997317162" calcext:value-type="float">
            <text:p>1,06E-3</text:p>
          </table:table-cell>
          <table:table-cell office:value-type="float" office:value="-13" calcext:value-type="float">
            <text:p>-1,3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639999731211" calcext:value-type="float">
            <text:p>1,06E-3</text:p>
          </table:table-cell>
          <table:table-cell office:value-type="float" office:value="-13.6000003814697" calcext:value-type="float">
            <text:p>-1,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6599997307057" calcext:value-type="float">
            <text:p>1,07E-3</text:p>
          </table:table-cell>
          <table:table-cell office:value-type="float" office:value="-13.8000001907349" calcext:value-type="float">
            <text:p>-1,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6799997302005" calcext:value-type="float">
            <text:p>1,07E-3</text:p>
          </table:table-cell>
          <table:table-cell office:value-type="float" office:value="-14" calcext:value-type="float">
            <text:p>-1,4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6999997296953" calcext:value-type="float">
            <text:p>1,07E-3</text:p>
          </table:table-cell>
          <table:table-cell office:value-type="float" office:value="-14.6000003814697" calcext:value-type="float">
            <text:p>-1,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71999972919" calcext:value-type="float">
            <text:p>1,07E-3</text:p>
          </table:table-cell>
          <table:table-cell office:value-type="float" office:value="-14.8000001907349" calcext:value-type="float">
            <text:p>-1,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7399997286848" calcext:value-type="float">
            <text:p>1,07E-3</text:p>
          </table:table-cell>
          <table:table-cell office:value-type="float" office:value="-15.1999998092651" calcext:value-type="float">
            <text:p>-1,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7599997281795" calcext:value-type="float">
            <text:p>1,08E-3</text:p>
          </table:table-cell>
          <table:table-cell office:value-type="float" office:value="-15.6000003814697" calcext:value-type="float">
            <text:p>-1,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7799997276743" calcext:value-type="float">
            <text:p>1,08E-3</text:p>
          </table:table-cell>
          <table:table-cell office:value-type="float" office:value="-16" calcext:value-type="float">
            <text:p>-1,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7999997271691" calcext:value-type="float">
            <text:p>1,08E-3</text:p>
          </table:table-cell>
          <table:table-cell office:value-type="float" office:value="-16.2000007629395" calcext:value-type="float">
            <text:p>-1,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8199997266638" calcext:value-type="float">
            <text:p>1,08E-3</text:p>
          </table:table-cell>
          <table:table-cell office:value-type="float" office:value="-16.6000003814697" calcext:value-type="float">
            <text:p>-1,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8399997261586" calcext:value-type="float">
            <text:p>1,08E-3</text:p>
          </table:table-cell>
          <table:table-cell office:value-type="float" office:value="-17.2000007629395" calcext:value-type="float">
            <text:p>-1,7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8599997256533" calcext:value-type="float">
            <text:p>1,09E-3</text:p>
          </table:table-cell>
          <table:table-cell office:value-type="float" office:value="-17.7999992370605" calcext:value-type="float">
            <text:p>-1,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8799997251481" calcext:value-type="float">
            <text:p>1,09E-3</text:p>
          </table:table-cell>
          <table:table-cell office:value-type="float" office:value="-18" calcext:value-type="float">
            <text:p>-1,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8999997246428" calcext:value-type="float">
            <text:p>1,09E-3</text:p>
          </table:table-cell>
          <table:table-cell office:value-type="float" office:value="-18.3999996185303" calcext:value-type="float">
            <text:p>-1,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9199997241376" calcext:value-type="float">
            <text:p>1,09E-3</text:p>
          </table:table-cell>
          <table:table-cell office:value-type="float" office:value="-18.3999996185303" calcext:value-type="float">
            <text:p>-1,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9399997236324" calcext:value-type="float">
            <text:p>1,09E-3</text:p>
          </table:table-cell>
          <table:table-cell office:value-type="float" office:value="-18.7999992370605" calcext:value-type="float">
            <text:p>-1,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9599997231271" calcext:value-type="float">
            <text:p>1,10E-3</text:p>
          </table:table-cell>
          <table:table-cell office:value-type="float" office:value="-19.2000007629395" calcext:value-type="float">
            <text:p>-1,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9799997226219" calcext:value-type="float">
            <text:p>1,10E-3</text:p>
          </table:table-cell>
          <table:table-cell office:value-type="float" office:value="-19.6000003814697" calcext:value-type="float">
            <text:p>-1,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09999997221166" calcext:value-type="float">
            <text:p>1,10E-3</text:p>
          </table:table-cell>
          <table:table-cell office:value-type="float" office:value="-20.2000007629395" calcext:value-type="float">
            <text:p>-2,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0199997216114" calcext:value-type="float">
            <text:p>1,10E-3</text:p>
          </table:table-cell>
          <table:table-cell office:value-type="float" office:value="-20.3999996185303" calcext:value-type="float">
            <text:p>-2,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0399997211061" calcext:value-type="float">
            <text:p>1,10E-3</text:p>
          </table:table-cell>
          <table:table-cell office:value-type="float" office:value="-20.6000003814697" calcext:value-type="float">
            <text:p>-2,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0599997206009" calcext:value-type="float">
            <text:p>1,11E-3</text:p>
          </table:table-cell>
          <table:table-cell office:value-type="float" office:value="-21" calcext:value-type="float">
            <text:p>-2,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0799997200957" calcext:value-type="float">
            <text:p>1,11E-3</text:p>
          </table:table-cell>
          <table:table-cell office:value-type="float" office:value="-21.6000003814697" calcext:value-type="float">
            <text:p>-2,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0999997195904" calcext:value-type="float">
            <text:p>1,11E-3</text:p>
          </table:table-cell>
          <table:table-cell office:value-type="float" office:value="-22" calcext:value-type="float">
            <text:p>-2,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1199997190852" calcext:value-type="float">
            <text:p>1,11E-3</text:p>
          </table:table-cell>
          <table:table-cell office:value-type="float" office:value="-22.2000007629395" calcext:value-type="float">
            <text:p>-2,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1399997185799" calcext:value-type="float">
            <text:p>1,11E-3</text:p>
          </table:table-cell>
          <table:table-cell office:value-type="float" office:value="-22.6000003814697" calcext:value-type="float">
            <text:p>-2,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1599997180747" calcext:value-type="float">
            <text:p>1,12E-3</text:p>
          </table:table-cell>
          <table:table-cell office:value-type="float" office:value="-23" calcext:value-type="float">
            <text:p>-2,3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1799997175694" calcext:value-type="float">
            <text:p>1,12E-3</text:p>
          </table:table-cell>
          <table:table-cell office:value-type="float" office:value="-23.3999996185303" calcext:value-type="float">
            <text:p>-2,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1999997170642" calcext:value-type="float">
            <text:p>1,12E-3</text:p>
          </table:table-cell>
          <table:table-cell office:value-type="float" office:value="-23.6000003814697" calcext:value-type="float">
            <text:p>-2,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219999716559" calcext:value-type="float">
            <text:p>1,12E-3</text:p>
          </table:table-cell>
          <table:table-cell office:value-type="float" office:value="-24" calcext:value-type="float">
            <text:p>-2,4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2399997160537" calcext:value-type="float">
            <text:p>1,12E-3</text:p>
          </table:table-cell>
          <table:table-cell office:value-type="float" office:value="-24.6000003814697" calcext:value-type="float">
            <text:p>-2,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2599997155485" calcext:value-type="float">
            <text:p>1,13E-3</text:p>
          </table:table-cell>
          <table:table-cell office:value-type="float" office:value="-25" calcext:value-type="float">
            <text:p>-2,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2799997150432" calcext:value-type="float">
            <text:p>1,13E-3</text:p>
          </table:table-cell>
          <table:table-cell office:value-type="float" office:value="-25.2000007629395" calcext:value-type="float">
            <text:p>-2,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299999714538" calcext:value-type="float">
            <text:p>1,13E-3</text:p>
          </table:table-cell>
          <table:table-cell office:value-type="float" office:value="-25.3999996185303" calcext:value-type="float">
            <text:p>-2,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3199997140327" calcext:value-type="float">
            <text:p>1,13E-3</text:p>
          </table:table-cell>
          <table:table-cell office:value-type="float" office:value="-26" calcext:value-type="float">
            <text:p>-2,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3399997135275" calcext:value-type="float">
            <text:p>1,13E-3</text:p>
          </table:table-cell>
          <table:table-cell office:value-type="float" office:value="-26.3999996185303" calcext:value-type="float">
            <text:p>-2,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3599997130223" calcext:value-type="float">
            <text:p>1,14E-3</text:p>
          </table:table-cell>
          <table:table-cell office:value-type="float" office:value="-26.6000003814697" calcext:value-type="float">
            <text:p>-2,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379999712517" calcext:value-type="float">
            <text:p>1,14E-3</text:p>
          </table:table-cell>
          <table:table-cell office:value-type="float" office:value="-27" calcext:value-type="float">
            <text:p>-2,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3999997120118" calcext:value-type="float">
            <text:p>1,14E-3</text:p>
          </table:table-cell>
          <table:table-cell office:value-type="float" office:value="-27.3999996185303" calcext:value-type="float">
            <text:p>-2,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4199997115065" calcext:value-type="float">
            <text:p>1,14E-3</text:p>
          </table:table-cell>
          <table:table-cell office:value-type="float" office:value="-28" calcext:value-type="float">
            <text:p>-2,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4399997110013" calcext:value-type="float">
            <text:p>1,14E-3</text:p>
          </table:table-cell>
          <table:table-cell office:value-type="float" office:value="-28.2000007629395" calcext:value-type="float">
            <text:p>-2,8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459999710496" calcext:value-type="float">
            <text:p>1,15E-3</text:p>
          </table:table-cell>
          <table:table-cell office:value-type="float" office:value="-28.3999996185303" calcext:value-type="float">
            <text:p>-2,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4799997099908" calcext:value-type="float">
            <text:p>1,15E-3</text:p>
          </table:table-cell>
          <table:table-cell office:value-type="float" office:value="-29.2000007629395" calcext:value-type="float">
            <text:p>-2,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4999997094856" calcext:value-type="float">
            <text:p>1,15E-3</text:p>
          </table:table-cell>
          <table:table-cell office:value-type="float" office:value="-29.3999996185303" calcext:value-type="float">
            <text:p>-2,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5199997089803" calcext:value-type="float">
            <text:p>1,15E-3</text:p>
          </table:table-cell>
          <table:table-cell office:value-type="float" office:value="-29.6000003814697" calcext:value-type="float">
            <text:p>-2,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5399997084751" calcext:value-type="float">
            <text:p>1,15E-3</text:p>
          </table:table-cell>
          <table:table-cell office:value-type="float" office:value="-30" calcext:value-type="float">
            <text:p>-3,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5599997079698" calcext:value-type="float">
            <text:p>1,16E-3</text:p>
          </table:table-cell>
          <table:table-cell office:value-type="float" office:value="-30.3999996185303" calcext:value-type="float">
            <text:p>-3,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5799997074646" calcext:value-type="float">
            <text:p>1,16E-3</text:p>
          </table:table-cell>
          <table:table-cell office:value-type="float" office:value="-30.7999992370605" calcext:value-type="float">
            <text:p>-3,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5999997069594" calcext:value-type="float">
            <text:p>1,16E-3</text:p>
          </table:table-cell>
          <table:table-cell office:value-type="float" office:value="-31.2000007629395" calcext:value-type="float">
            <text:p>-3,1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6199997064541" calcext:value-type="float">
            <text:p>1,16E-3</text:p>
          </table:table-cell>
          <table:table-cell office:value-type="float" office:value="-31.6000003814697" calcext:value-type="float">
            <text:p>-3,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6399997059489" calcext:value-type="float">
            <text:p>1,16E-3</text:p>
          </table:table-cell>
          <table:table-cell office:value-type="float" office:value="-32" calcext:value-type="float">
            <text:p>-3,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6599997054436" calcext:value-type="float">
            <text:p>1,17E-3</text:p>
          </table:table-cell>
          <table:table-cell office:value-type="float" office:value="-32.2000007629395" calcext:value-type="float">
            <text:p>-3,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6799997049384" calcext:value-type="float">
            <text:p>1,17E-3</text:p>
          </table:table-cell>
          <table:table-cell office:value-type="float" office:value="-32.5999984741211" calcext:value-type="float">
            <text:p>-3,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6999997044331" calcext:value-type="float">
            <text:p>1,17E-3</text:p>
          </table:table-cell>
          <table:table-cell office:value-type="float" office:value="-32.7999992370606" calcext:value-type="float">
            <text:p>-3,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7199997039279" calcext:value-type="float">
            <text:p>1,17E-3</text:p>
          </table:table-cell>
          <table:table-cell office:value-type="float" office:value="-33.5999984741211" calcext:value-type="float">
            <text:p>-3,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7399997034227" calcext:value-type="float">
            <text:p>1,17E-3</text:p>
          </table:table-cell>
          <table:table-cell office:value-type="float" office:value="-33.5999984741211" calcext:value-type="float">
            <text:p>-3,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7599997029174" calcext:value-type="float">
            <text:p>1,18E-3</text:p>
          </table:table-cell>
          <table:table-cell office:value-type="float" office:value="-34.2000007629395" calcext:value-type="float">
            <text:p>-3,4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7799997024122" calcext:value-type="float">
            <text:p>1,18E-3</text:p>
          </table:table-cell>
          <table:table-cell office:value-type="float" office:value="-34.4000015258789" calcext:value-type="float">
            <text:p>-3,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7999997019069" calcext:value-type="float">
            <text:p>1,18E-3</text:p>
          </table:table-cell>
          <table:table-cell office:value-type="float" office:value="-34.7999992370606" calcext:value-type="float">
            <text:p>-3,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8199997014017" calcext:value-type="float">
            <text:p>1,18E-3</text:p>
          </table:table-cell>
          <table:table-cell office:value-type="float" office:value="-35.2000007629395" calcext:value-type="float">
            <text:p>-3,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8399997008964" calcext:value-type="float">
            <text:p>1,18E-3</text:p>
          </table:table-cell>
          <table:table-cell office:value-type="float" office:value="-35.4000015258789" calcext:value-type="float">
            <text:p>-3,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8599997003912" calcext:value-type="float">
            <text:p>1,19E-3</text:p>
          </table:table-cell>
          <table:table-cell office:value-type="float" office:value="-35.7999992370606" calcext:value-type="float">
            <text:p>-3,5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879999699886" calcext:value-type="float">
            <text:p>1,19E-3</text:p>
          </table:table-cell>
          <table:table-cell office:value-type="float" office:value="-36.4000015258789" calcext:value-type="float">
            <text:p>-3,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8999996993807" calcext:value-type="float">
            <text:p>1,19E-3</text:p>
          </table:table-cell>
          <table:table-cell office:value-type="float" office:value="-36.5999984741211" calcext:value-type="float">
            <text:p>-3,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9199996988755" calcext:value-type="float">
            <text:p>1,19E-3</text:p>
          </table:table-cell>
          <table:table-cell office:value-type="float" office:value="-37" calcext:value-type="float">
            <text:p>-3,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9399996983702" calcext:value-type="float">
            <text:p>1,19E-3</text:p>
          </table:table-cell>
          <table:table-cell office:value-type="float" office:value="-37" calcext:value-type="float">
            <text:p>-3,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959999697865" calcext:value-type="float">
            <text:p>1,20E-3</text:p>
          </table:table-cell>
          <table:table-cell office:value-type="float" office:value="-37.7999992370606" calcext:value-type="float">
            <text:p>-3,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9799996973597" calcext:value-type="float">
            <text:p>1,20E-3</text:p>
          </table:table-cell>
          <table:table-cell office:value-type="float" office:value="-38.2000007629395" calcext:value-type="float">
            <text:p>-3,8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19999996968545" calcext:value-type="float">
            <text:p>1,20E-3</text:p>
          </table:table-cell>
          <table:table-cell office:value-type="float" office:value="-38.4000015258789" calcext:value-type="float">
            <text:p>-3,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0199996963493" calcext:value-type="float">
            <text:p>1,20E-3</text:p>
          </table:table-cell>
          <table:table-cell office:value-type="float" office:value="-38.7999992370606" calcext:value-type="float">
            <text:p>-3,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039999695844" calcext:value-type="float">
            <text:p>1,20E-3</text:p>
          </table:table-cell>
          <table:table-cell office:value-type="float" office:value="-39" calcext:value-type="float">
            <text:p>-3,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0599996953388" calcext:value-type="float">
            <text:p>1,21E-3</text:p>
          </table:table-cell>
          <table:table-cell office:value-type="float" office:value="-39.4000015258789" calcext:value-type="float">
            <text:p>-3,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0799996948335" calcext:value-type="float">
            <text:p>1,21E-3</text:p>
          </table:table-cell>
          <table:table-cell office:value-type="float" office:value="-39.5999984741211" calcext:value-type="float">
            <text:p>-3,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0999996943283" calcext:value-type="float">
            <text:p>1,21E-3</text:p>
          </table:table-cell>
          <table:table-cell office:value-type="float" office:value="-39.7999992370606" calcext:value-type="float">
            <text:p>-3,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119999693823" calcext:value-type="float">
            <text:p>1,21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1399996933178" calcext:value-type="float">
            <text:p>1,21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1599996928126" calcext:value-type="float">
            <text:p>1,22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1799996923073" calcext:value-type="float">
            <text:p>1,22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1999996918021" calcext:value-type="float">
            <text:p>1,22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2199996912968" calcext:value-type="float">
            <text:p>1,22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2399996907916" calcext:value-type="float">
            <text:p>1,22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2599996902863" calcext:value-type="float">
            <text:p>1,23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2799996897811" calcext:value-type="float">
            <text:p>1,23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2999996892759" calcext:value-type="float">
            <text:p>1,23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3199996887706" calcext:value-type="float">
            <text:p>1,23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3399996882654" calcext:value-type="float">
            <text:p>1,23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3599996877601" calcext:value-type="float">
            <text:p>1,24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3799996872549" calcext:value-type="float">
            <text:p>1,24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3999996867497" calcext:value-type="float">
            <text:p>1,24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4199996862444" calcext:value-type="float">
            <text:p>1,24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4399996857392" calcext:value-type="float">
            <text:p>1,24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4599996852339" calcext:value-type="float">
            <text:p>1,25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4799996847287" calcext:value-type="float">
            <text:p>1,25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4999996842234" calcext:value-type="float">
            <text:p>1,25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5199996837182" calcext:value-type="float">
            <text:p>1,25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539999683213" calcext:value-type="float">
            <text:p>1,25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5599996827077" calcext:value-type="float">
            <text:p>1,26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5799996822025" calcext:value-type="float">
            <text:p>1,26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5999996816972" calcext:value-type="float">
            <text:p>1,26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619999681192" calcext:value-type="float">
            <text:p>1,26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6399996806867" calcext:value-type="float">
            <text:p>1,26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6599996801815" calcext:value-type="float">
            <text:p>1,27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6799996796763" calcext:value-type="float">
            <text:p>1,27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699999679171" calcext:value-type="float">
            <text:p>1,27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7199996786658" calcext:value-type="float">
            <text:p>1,27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7399996781605" calcext:value-type="float">
            <text:p>1,27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7599996776553" calcext:value-type="float">
            <text:p>1,28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77999967715" calcext:value-type="float">
            <text:p>1,28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7999996766448" calcext:value-type="float">
            <text:p>1,28E-3</text:p>
          </table:table-cell>
          <table:table-cell office:value-type="float" office:value="-39.7999992370606" calcext:value-type="float">
            <text:p>-3,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8199996761396" calcext:value-type="float">
            <text:p>1,28E-3</text:p>
          </table:table-cell>
          <table:table-cell office:value-type="float" office:value="-39.4000015258789" calcext:value-type="float">
            <text:p>-3,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8399996756343" calcext:value-type="float">
            <text:p>1,28E-3</text:p>
          </table:table-cell>
          <table:table-cell office:value-type="float" office:value="-39.2000007629395" calcext:value-type="float">
            <text:p>-3,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8599996751291" calcext:value-type="float">
            <text:p>1,29E-3</text:p>
          </table:table-cell>
          <table:table-cell office:value-type="float" office:value="-38.7999992370606" calcext:value-type="float">
            <text:p>-3,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8799996746238" calcext:value-type="float">
            <text:p>1,29E-3</text:p>
          </table:table-cell>
          <table:table-cell office:value-type="float" office:value="-38.5999984741211" calcext:value-type="float">
            <text:p>-3,8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8999996741186" calcext:value-type="float">
            <text:p>1,29E-3</text:p>
          </table:table-cell>
          <table:table-cell office:value-type="float" office:value="-38.2000007629395" calcext:value-type="float">
            <text:p>-3,8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9199996736133" calcext:value-type="float">
            <text:p>1,29E-3</text:p>
          </table:table-cell>
          <table:table-cell office:value-type="float" office:value="-37.7999992370606" calcext:value-type="float">
            <text:p>-3,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9399996731081" calcext:value-type="float">
            <text:p>1,29E-3</text:p>
          </table:table-cell>
          <table:table-cell office:value-type="float" office:value="-37.4000015258789" calcext:value-type="float">
            <text:p>-3,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9599996726029" calcext:value-type="float">
            <text:p>1,30E-3</text:p>
          </table:table-cell>
          <table:table-cell office:value-type="float" office:value="-37" calcext:value-type="float">
            <text:p>-3,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9799996720976" calcext:value-type="float">
            <text:p>1,30E-3</text:p>
          </table:table-cell>
          <table:table-cell office:value-type="float" office:value="-36.7999992370606" calcext:value-type="float">
            <text:p>-3,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29999996715924" calcext:value-type="float">
            <text:p>1,30E-3</text:p>
          </table:table-cell>
          <table:table-cell office:value-type="float" office:value="-36.4000015258789" calcext:value-type="float">
            <text:p>-3,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0199996710871" calcext:value-type="float">
            <text:p>1,30E-3</text:p>
          </table:table-cell>
          <table:table-cell office:value-type="float" office:value="-36" calcext:value-type="float">
            <text:p>-3,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0399996705819" calcext:value-type="float">
            <text:p>1,30E-3</text:p>
          </table:table-cell>
          <table:table-cell office:value-type="float" office:value="-35.5999984741211" calcext:value-type="float">
            <text:p>-3,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0599996700766" calcext:value-type="float">
            <text:p>1,31E-3</text:p>
          </table:table-cell>
          <table:table-cell office:value-type="float" office:value="-35.2000007629395" calcext:value-type="float">
            <text:p>-3,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0799996695714" calcext:value-type="float">
            <text:p>1,31E-3</text:p>
          </table:table-cell>
          <table:table-cell office:value-type="float" office:value="-34.7999992370606" calcext:value-type="float">
            <text:p>-3,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0999996690662" calcext:value-type="float">
            <text:p>1,31E-3</text:p>
          </table:table-cell>
          <table:table-cell office:value-type="float" office:value="-34.4000015258789" calcext:value-type="float">
            <text:p>-3,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1199996685609" calcext:value-type="float">
            <text:p>1,31E-3</text:p>
          </table:table-cell>
          <table:table-cell office:value-type="float" office:value="-34.4000015258789" calcext:value-type="float">
            <text:p>-3,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1399996680557" calcext:value-type="float">
            <text:p>1,31E-3</text:p>
          </table:table-cell>
          <table:table-cell office:value-type="float" office:value="-33.7999992370606" calcext:value-type="float">
            <text:p>-3,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1599996675504" calcext:value-type="float">
            <text:p>1,32E-3</text:p>
          </table:table-cell>
          <table:table-cell office:value-type="float" office:value="-33.4000015258789" calcext:value-type="float">
            <text:p>-3,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1799996670452" calcext:value-type="float">
            <text:p>1,32E-3</text:p>
          </table:table-cell>
          <table:table-cell office:value-type="float" office:value="-33.2000007629395" calcext:value-type="float">
            <text:p>-3,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19999966654" calcext:value-type="float">
            <text:p>1,32E-3</text:p>
          </table:table-cell>
          <table:table-cell office:value-type="float" office:value="-32.5999984741211" calcext:value-type="float">
            <text:p>-3,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2199996660347" calcext:value-type="float">
            <text:p>1,32E-3</text:p>
          </table:table-cell>
          <table:table-cell office:value-type="float" office:value="-32.2000007629395" calcext:value-type="float">
            <text:p>-3,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2399996655295" calcext:value-type="float">
            <text:p>1,32E-3</text:p>
          </table:table-cell>
          <table:table-cell office:value-type="float" office:value="-32.2000007629395" calcext:value-type="float">
            <text:p>-3,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2599996650242" calcext:value-type="float">
            <text:p>1,33E-3</text:p>
          </table:table-cell>
          <table:table-cell office:value-type="float" office:value="-31.6000003814697" calcext:value-type="float">
            <text:p>-3,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279999664519" calcext:value-type="float">
            <text:p>1,33E-3</text:p>
          </table:table-cell>
          <table:table-cell office:value-type="float" office:value="-31.3999996185303" calcext:value-type="float">
            <text:p>-3,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2999996640137" calcext:value-type="float">
            <text:p>1,33E-3</text:p>
          </table:table-cell>
          <table:table-cell office:value-type="float" office:value="-31" calcext:value-type="float">
            <text:p>-3,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3199996635085" calcext:value-type="float">
            <text:p>1,33E-3</text:p>
          </table:table-cell>
          <table:table-cell office:value-type="float" office:value="-30.3999996185303" calcext:value-type="float">
            <text:p>-3,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3399996630033" calcext:value-type="float">
            <text:p>1,33E-3</text:p>
          </table:table-cell>
          <table:table-cell office:value-type="float" office:value="-30.2000007629395" calcext:value-type="float">
            <text:p>-3,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359999662498" calcext:value-type="float">
            <text:p>1,34E-3</text:p>
          </table:table-cell>
          <table:table-cell office:value-type="float" office:value="-29.7999992370605" calcext:value-type="float">
            <text:p>-2,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3799996619928" calcext:value-type="float">
            <text:p>1,34E-3</text:p>
          </table:table-cell>
          <table:table-cell office:value-type="float" office:value="-29.6000003814697" calcext:value-type="float">
            <text:p>-2,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3999996614875" calcext:value-type="float">
            <text:p>1,34E-3</text:p>
          </table:table-cell>
          <table:table-cell office:value-type="float" office:value="-29.3999996185303" calcext:value-type="float">
            <text:p>-2,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4199996609823" calcext:value-type="float">
            <text:p>1,34E-3</text:p>
          </table:table-cell>
          <table:table-cell office:value-type="float" office:value="-28.3999996185303" calcext:value-type="float">
            <text:p>-2,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439999660477" calcext:value-type="float">
            <text:p>1,34E-3</text:p>
          </table:table-cell>
          <table:table-cell office:value-type="float" office:value="-28.2000007629395" calcext:value-type="float">
            <text:p>-2,8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4599996599718" calcext:value-type="float">
            <text:p>1,35E-3</text:p>
          </table:table-cell>
          <table:table-cell office:value-type="float" office:value="-28" calcext:value-type="float">
            <text:p>-2,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4799996594666" calcext:value-type="float">
            <text:p>1,35E-3</text:p>
          </table:table-cell>
          <table:table-cell office:value-type="float" office:value="-27.6000003814697" calcext:value-type="float">
            <text:p>-2,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4999996589613" calcext:value-type="float">
            <text:p>1,35E-3</text:p>
          </table:table-cell>
          <table:table-cell office:value-type="float" office:value="-27.3999996185303" calcext:value-type="float">
            <text:p>-2,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5199996584561" calcext:value-type="float">
            <text:p>1,35E-3</text:p>
          </table:table-cell>
          <table:table-cell office:value-type="float" office:value="-26.7999992370605" calcext:value-type="float">
            <text:p>-2,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5399996579508" calcext:value-type="float">
            <text:p>1,35E-3</text:p>
          </table:table-cell>
          <table:table-cell office:value-type="float" office:value="-26.3999996185303" calcext:value-type="float">
            <text:p>-2,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5599996574456" calcext:value-type="float">
            <text:p>1,36E-3</text:p>
          </table:table-cell>
          <table:table-cell office:value-type="float" office:value="-26.3999996185303" calcext:value-type="float">
            <text:p>-2,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5799996569403" calcext:value-type="float">
            <text:p>1,36E-3</text:p>
          </table:table-cell>
          <table:table-cell office:value-type="float" office:value="-25.6000003814697" calcext:value-type="float">
            <text:p>-2,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5999996564351" calcext:value-type="float">
            <text:p>1,36E-3</text:p>
          </table:table-cell>
          <table:table-cell office:value-type="float" office:value="-25.2000007629395" calcext:value-type="float">
            <text:p>-2,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6199996559299" calcext:value-type="float">
            <text:p>1,36E-3</text:p>
          </table:table-cell>
          <table:table-cell office:value-type="float" office:value="-25.2000007629395" calcext:value-type="float">
            <text:p>-2,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6399996554246" calcext:value-type="float">
            <text:p>1,36E-3</text:p>
          </table:table-cell>
          <table:table-cell office:value-type="float" office:value="-24.7999992370605" calcext:value-type="float">
            <text:p>-2,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6599996549194" calcext:value-type="float">
            <text:p>1,37E-3</text:p>
          </table:table-cell>
          <table:table-cell office:value-type="float" office:value="-24.2000007629395" calcext:value-type="float">
            <text:p>-2,4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6799996544141" calcext:value-type="float">
            <text:p>1,37E-3</text:p>
          </table:table-cell>
          <table:table-cell office:value-type="float" office:value="-23.7999992370605" calcext:value-type="float">
            <text:p>-2,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6999996539089" calcext:value-type="float">
            <text:p>1,37E-3</text:p>
          </table:table-cell>
          <table:table-cell office:value-type="float" office:value="-23.6000003814697" calcext:value-type="float">
            <text:p>-2,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7199996534036" calcext:value-type="float">
            <text:p>1,37E-3</text:p>
          </table:table-cell>
          <table:table-cell office:value-type="float" office:value="-23.2000007629395" calcext:value-type="float">
            <text:p>-2,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7399996528984" calcext:value-type="float">
            <text:p>1,37E-3</text:p>
          </table:table-cell>
          <table:table-cell office:value-type="float" office:value="-22.7999992370605" calcext:value-type="float">
            <text:p>-2,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7599996523932" calcext:value-type="float">
            <text:p>1,38E-3</text:p>
          </table:table-cell>
          <table:table-cell office:value-type="float" office:value="-22.3999996185303" calcext:value-type="float">
            <text:p>-2,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7799996518879" calcext:value-type="float">
            <text:p>1,38E-3</text:p>
          </table:table-cell>
          <table:table-cell office:value-type="float" office:value="-22" calcext:value-type="float">
            <text:p>-2,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7999996513827" calcext:value-type="float">
            <text:p>1,38E-3</text:p>
          </table:table-cell>
          <table:table-cell office:value-type="float" office:value="-21.6000003814697" calcext:value-type="float">
            <text:p>-2,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8199996508774" calcext:value-type="float">
            <text:p>1,38E-3</text:p>
          </table:table-cell>
          <table:table-cell office:value-type="float" office:value="-21.2000007629395" calcext:value-type="float">
            <text:p>-2,1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8399996503722" calcext:value-type="float">
            <text:p>1,38E-3</text:p>
          </table:table-cell>
          <table:table-cell office:value-type="float" office:value="-20.7999992370605" calcext:value-type="float">
            <text:p>-2,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8599996498669" calcext:value-type="float">
            <text:p>1,39E-3</text:p>
          </table:table-cell>
          <table:table-cell office:value-type="float" office:value="-20.6000003814697" calcext:value-type="float">
            <text:p>-2,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8799996493617" calcext:value-type="float">
            <text:p>1,39E-3</text:p>
          </table:table-cell>
          <table:table-cell office:value-type="float" office:value="-20.3999996185303" calcext:value-type="float">
            <text:p>-2,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8999996488565" calcext:value-type="float">
            <text:p>1,39E-3</text:p>
          </table:table-cell>
          <table:table-cell office:value-type="float" office:value="-19.7999992370605" calcext:value-type="float">
            <text:p>-1,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9199996483512" calcext:value-type="float">
            <text:p>1,39E-3</text:p>
          </table:table-cell>
          <table:table-cell office:value-type="float" office:value="-19.6000003814697" calcext:value-type="float">
            <text:p>-1,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939999647846" calcext:value-type="float">
            <text:p>1,39E-3</text:p>
          </table:table-cell>
          <table:table-cell office:value-type="float" office:value="-19.2000007629395" calcext:value-type="float">
            <text:p>-1,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9599996473407" calcext:value-type="float">
            <text:p>1,40E-3</text:p>
          </table:table-cell>
          <table:table-cell office:value-type="float" office:value="-18.7999992370605" calcext:value-type="float">
            <text:p>-1,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9799996468355" calcext:value-type="float">
            <text:p>1,40E-3</text:p>
          </table:table-cell>
          <table:table-cell office:value-type="float" office:value="-18.3999996185303" calcext:value-type="float">
            <text:p>-1,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39999996463303" calcext:value-type="float">
            <text:p>1,40E-3</text:p>
          </table:table-cell>
          <table:table-cell office:value-type="float" office:value="-18" calcext:value-type="float">
            <text:p>-1,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019999645825" calcext:value-type="float">
            <text:p>1,40E-3</text:p>
          </table:table-cell>
          <table:table-cell office:value-type="float" office:value="-17.7999992370605" calcext:value-type="float">
            <text:p>-1,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0399996453198" calcext:value-type="float">
            <text:p>1,40E-3</text:p>
          </table:table-cell>
          <table:table-cell office:value-type="float" office:value="-17.3999996185303" calcext:value-type="float">
            <text:p>-1,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0599996448145" calcext:value-type="float">
            <text:p>1,41E-3</text:p>
          </table:table-cell>
          <table:table-cell office:value-type="float" office:value="-17" calcext:value-type="float">
            <text:p>-1,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0799996443093" calcext:value-type="float">
            <text:p>1,41E-3</text:p>
          </table:table-cell>
          <table:table-cell office:value-type="float" office:value="-16.3999996185303" calcext:value-type="float">
            <text:p>-1,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099999643804" calcext:value-type="float">
            <text:p>1,41E-3</text:p>
          </table:table-cell>
          <table:table-cell office:value-type="float" office:value="-16.2000007629395" calcext:value-type="float">
            <text:p>-1,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1199996432988" calcext:value-type="float">
            <text:p>1,41E-3</text:p>
          </table:table-cell>
          <table:table-cell office:value-type="float" office:value="-16" calcext:value-type="float">
            <text:p>-1,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1399996427936" calcext:value-type="float">
            <text:p>1,41E-3</text:p>
          </table:table-cell>
          <table:table-cell office:value-type="float" office:value="-15.6000003814697" calcext:value-type="float">
            <text:p>-1,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1599996422883" calcext:value-type="float">
            <text:p>1,42E-3</text:p>
          </table:table-cell>
          <table:table-cell office:value-type="float" office:value="-15" calcext:value-type="float">
            <text:p>-1,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1799996417831" calcext:value-type="float">
            <text:p>1,42E-3</text:p>
          </table:table-cell>
          <table:table-cell office:value-type="float" office:value="-14.6000003814697" calcext:value-type="float">
            <text:p>-1,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1999996412778" calcext:value-type="float">
            <text:p>1,42E-3</text:p>
          </table:table-cell>
          <table:table-cell office:value-type="float" office:value="-14.3999996185303" calcext:value-type="float">
            <text:p>-1,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2199996407726" calcext:value-type="float">
            <text:p>1,42E-3</text:p>
          </table:table-cell>
          <table:table-cell office:value-type="float" office:value="-13.8000001907349" calcext:value-type="float">
            <text:p>-1,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2399996402673" calcext:value-type="float">
            <text:p>1,42E-3</text:p>
          </table:table-cell>
          <table:table-cell office:value-type="float" office:value="-13.6000003814697" calcext:value-type="float">
            <text:p>-1,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2599996397621" calcext:value-type="float">
            <text:p>1,43E-3</text:p>
          </table:table-cell>
          <table:table-cell office:value-type="float" office:value="-13.3999996185303" calcext:value-type="float">
            <text:p>-1,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2799996392569" calcext:value-type="float">
            <text:p>1,43E-3</text:p>
          </table:table-cell>
          <table:table-cell office:value-type="float" office:value="-12.8000001907349" calcext:value-type="float">
            <text:p>-1,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2999996387516" calcext:value-type="float">
            <text:p>1,43E-3</text:p>
          </table:table-cell>
          <table:table-cell office:value-type="float" office:value="-12.6000003814697" calcext:value-type="float">
            <text:p>-1,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3199996382464" calcext:value-type="float">
            <text:p>1,43E-3</text:p>
          </table:table-cell>
          <table:table-cell office:value-type="float" office:value="-12" calcext:value-type="float">
            <text:p>-1,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3399996377411" calcext:value-type="float">
            <text:p>1,43E-3</text:p>
          </table:table-cell>
          <table:table-cell office:value-type="float" office:value="-11.8000001907349" calcext:value-type="float">
            <text:p>-1,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3599996372359" calcext:value-type="float">
            <text:p>1,44E-3</text:p>
          </table:table-cell>
          <table:table-cell office:value-type="float" office:value="-11.3999996185303" calcext:value-type="float">
            <text:p>-1,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3799996367306" calcext:value-type="float">
            <text:p>1,44E-3</text:p>
          </table:table-cell>
          <table:table-cell office:value-type="float" office:value="-11" calcext:value-type="float">
            <text:p>-1,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3999996362254" calcext:value-type="float">
            <text:p>1,44E-3</text:p>
          </table:table-cell>
          <table:table-cell office:value-type="float" office:value="-10.6000003814697" calcext:value-type="float">
            <text:p>-1,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4199996357202" calcext:value-type="float">
            <text:p>1,44E-3</text:p>
          </table:table-cell>
          <table:table-cell office:value-type="float" office:value="-10.3999996185303" calcext:value-type="float">
            <text:p>-1,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4399996352149" calcext:value-type="float">
            <text:p>1,44E-3</text:p>
          </table:table-cell>
          <table:table-cell office:value-type="float" office:value="-9.80000019073486" calcext:value-type="float">
            <text:p>-9,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4599996347097" calcext:value-type="float">
            <text:p>1,45E-3</text:p>
          </table:table-cell>
          <table:table-cell office:value-type="float" office:value="-9.19999980926514" calcext:value-type="float">
            <text:p>-9,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4799996342044" calcext:value-type="float">
            <text:p>1,45E-3</text:p>
          </table:table-cell>
          <table:table-cell office:value-type="float" office:value="-9" calcext:value-type="float">
            <text:p>-9,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4999996336992" calcext:value-type="float">
            <text:p>1,45E-3</text:p>
          </table:table-cell>
          <table:table-cell office:value-type="float" office:value="-8.80000019073486" calcext:value-type="float">
            <text:p>-8,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5199996331939" calcext:value-type="float">
            <text:p>1,45E-3</text:p>
          </table:table-cell>
          <table:table-cell office:value-type="float" office:value="-8.60000038146973" calcext:value-type="float">
            <text:p>-8,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5399996326887" calcext:value-type="float">
            <text:p>1,45E-3</text:p>
          </table:table-cell>
          <table:table-cell office:value-type="float" office:value="-8.19999980926514" calcext:value-type="float">
            <text:p>-8,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5599996321835" calcext:value-type="float">
            <text:p>1,46E-3</text:p>
          </table:table-cell>
          <table:table-cell office:value-type="float" office:value="-7.59999990463257" calcext:value-type="float">
            <text:p>-7,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5799996316782" calcext:value-type="float">
            <text:p>1,46E-3</text:p>
          </table:table-cell>
          <table:table-cell office:value-type="float" office:value="-7.40000009536743" calcext:value-type="float">
            <text:p>-7,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599999631173" calcext:value-type="float">
            <text:p>1,46E-3</text:p>
          </table:table-cell>
          <table:table-cell office:value-type="float" office:value="-7" calcext:value-type="float">
            <text:p>-7,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6199996306677" calcext:value-type="float">
            <text:p>1,46E-3</text:p>
          </table:table-cell>
          <table:table-cell office:value-type="float" office:value="-6.80000019073486" calcext:value-type="float">
            <text:p>-6,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6399996301625" calcext:value-type="float">
            <text:p>1,46E-3</text:p>
          </table:table-cell>
          <table:table-cell office:value-type="float" office:value="-6.19999980926514" calcext:value-type="float">
            <text:p>-6,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6599996296573" calcext:value-type="float">
            <text:p>1,47E-3</text:p>
          </table:table-cell>
          <table:table-cell office:value-type="float" office:value="-5.80000019073486" calcext:value-type="float">
            <text:p>-5,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679999629152" calcext:value-type="float">
            <text:p>1,47E-3</text:p>
          </table:table-cell>
          <table:table-cell office:value-type="float" office:value="-5.59999990463257" calcext:value-type="float">
            <text:p>-5,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6999996286468" calcext:value-type="float">
            <text:p>1,47E-3</text:p>
          </table:table-cell>
          <table:table-cell office:value-type="float" office:value="-5" calcext:value-type="float">
            <text:p>-5,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7199996281415" calcext:value-type="float">
            <text:p>1,47E-3</text:p>
          </table:table-cell>
          <table:table-cell office:value-type="float" office:value="-4.59999990463257" calcext:value-type="float">
            <text:p>-4,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7399996276363" calcext:value-type="float">
            <text:p>1,47E-3</text:p>
          </table:table-cell>
          <table:table-cell office:value-type="float" office:value="-4.40000009536743" calcext:value-type="float">
            <text:p>-4,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759999627131" calcext:value-type="float">
            <text:p>1,48E-3</text:p>
          </table:table-cell>
          <table:table-cell office:value-type="float" office:value="-4" calcext:value-type="float">
            <text:p>-4,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7799996266258" calcext:value-type="float">
            <text:p>1,48E-3</text:p>
          </table:table-cell>
          <table:table-cell office:value-type="float" office:value="-3.40000009536743" calcext:value-type="float">
            <text:p>-3,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7999996261206" calcext:value-type="float">
            <text:p>1,48E-3</text:p>
          </table:table-cell>
          <table:table-cell office:value-type="float" office:value="-3.20000004768372" calcext:value-type="float">
            <text:p>-3,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8199996256153" calcext:value-type="float">
            <text:p>1,48E-3</text:p>
          </table:table-cell>
          <table:table-cell office:value-type="float" office:value="-2.79999995231628" calcext:value-type="float">
            <text:p>-2,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8399996251101" calcext:value-type="float">
            <text:p>1,48E-3</text:p>
          </table:table-cell>
          <table:table-cell office:value-type="float" office:value="-2.59999990463257" calcext:value-type="float">
            <text:p>-2,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8599996246048" calcext:value-type="float">
            <text:p>1,49E-3</text:p>
          </table:table-cell>
          <table:table-cell office:value-type="float" office:value="-2" calcext:value-type="float">
            <text:p>-2,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8799996240996" calcext:value-type="float">
            <text:p>1,49E-3</text:p>
          </table:table-cell>
          <table:table-cell office:value-type="float" office:value="-1.79999995231628" calcext:value-type="float">
            <text:p>-1,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8999996235943" calcext:value-type="float">
            <text:p>1,49E-3</text:p>
          </table:table-cell>
          <table:table-cell office:value-type="float" office:value="-1.60000002384186" calcext:value-type="float">
            <text:p>-1,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9199996230891" calcext:value-type="float">
            <text:p>1,49E-3</text:p>
          </table:table-cell>
          <table:table-cell office:value-type="float" office:value="-1" calcext:value-type="float">
            <text:p>-1,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9399996225839" calcext:value-type="float">
            <text:p>1,49E-3</text:p>
          </table:table-cell>
          <table:table-cell office:value-type="float" office:value="-0.800000011920929" calcext:value-type="float">
            <text:p>-8,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9599996220786" calcext:value-type="float">
            <text:p>1,50E-3</text:p>
          </table:table-cell>
          <table:table-cell office:value-type="float" office:value="-0.200000002980232" calcext:value-type="float">
            <text:p>-2,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9799996215734" calcext:value-type="float">
            <text:p>1,50E-3</text:p>
          </table:table-cell>
          <table:table-cell office:value-type="float" office:value="0.200000002980232" calcext:value-type="float">
            <text:p>2,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49999996210681" calcext:value-type="float">
            <text:p>1,50E-3</text:p>
          </table:table-cell>
          <table:table-cell office:value-type="float" office:value="0.200000002980232" calcext:value-type="float">
            <text:p>2,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0199996205629" calcext:value-type="float">
            <text:p>1,50E-3</text:p>
          </table:table-cell>
          <table:table-cell office:value-type="float" office:value="1" calcext:value-type="float">
            <text:p>1,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0399996200576" calcext:value-type="float">
            <text:p>1,50E-3</text:p>
          </table:table-cell>
          <table:table-cell office:value-type="float" office:value="1.39999997615814" calcext:value-type="float">
            <text:p>1,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0599996195524" calcext:value-type="float">
            <text:p>1,51E-3</text:p>
          </table:table-cell>
          <table:table-cell office:value-type="float" office:value="1.60000002384186" calcext:value-type="float">
            <text:p>1,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0799996190472" calcext:value-type="float">
            <text:p>1,51E-3</text:p>
          </table:table-cell>
          <table:table-cell office:value-type="float" office:value="2" calcext:value-type="float">
            <text:p>2,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0999996185419" calcext:value-type="float">
            <text:p>1,51E-3</text:p>
          </table:table-cell>
          <table:table-cell office:value-type="float" office:value="2.40000009536743" calcext:value-type="float">
            <text:p>2,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1199996180367" calcext:value-type="float">
            <text:p>1,51E-3</text:p>
          </table:table-cell>
          <table:table-cell office:value-type="float" office:value="2.59999990463257" calcext:value-type="float">
            <text:p>2,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1399996175314" calcext:value-type="float">
            <text:p>1,51E-3</text:p>
          </table:table-cell>
          <table:table-cell office:value-type="float" office:value="3" calcext:value-type="float">
            <text:p>3,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1599996170262" calcext:value-type="float">
            <text:p>1,52E-3</text:p>
          </table:table-cell>
          <table:table-cell office:value-type="float" office:value="3.20000004768372" calcext:value-type="float">
            <text:p>3,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1799996165209" calcext:value-type="float">
            <text:p>1,52E-3</text:p>
          </table:table-cell>
          <table:table-cell office:value-type="float" office:value="3.59999990463257" calcext:value-type="float">
            <text:p>3,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1999996160157" calcext:value-type="float">
            <text:p>1,52E-3</text:p>
          </table:table-cell>
          <table:table-cell office:value-type="float" office:value="4.40000009536743" calcext:value-type="float">
            <text:p>4,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2199996155105" calcext:value-type="float">
            <text:p>1,52E-3</text:p>
          </table:table-cell>
          <table:table-cell office:value-type="float" office:value="4.59999990463257" calcext:value-type="float">
            <text:p>4,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2399996150052" calcext:value-type="float">
            <text:p>1,52E-3</text:p>
          </table:table-cell>
          <table:table-cell office:value-type="float" office:value="4.80000019073486" calcext:value-type="float">
            <text:p>4,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2599996145" calcext:value-type="float">
            <text:p>1,53E-3</text:p>
          </table:table-cell>
          <table:table-cell office:value-type="float" office:value="5.40000009536743" calcext:value-type="float">
            <text:p>5,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2799996139947" calcext:value-type="float">
            <text:p>1,53E-3</text:p>
          </table:table-cell>
          <table:table-cell office:value-type="float" office:value="5.59999990463257" calcext:value-type="float">
            <text:p>5,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2999996134895" calcext:value-type="float">
            <text:p>1,53E-3</text:p>
          </table:table-cell>
          <table:table-cell office:value-type="float" office:value="6" calcext:value-type="float">
            <text:p>6,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3199996129842" calcext:value-type="float">
            <text:p>1,53E-3</text:p>
          </table:table-cell>
          <table:table-cell office:value-type="float" office:value="6.19999980926514" calcext:value-type="float">
            <text:p>6,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339999612479" calcext:value-type="float">
            <text:p>1,53E-3</text:p>
          </table:table-cell>
          <table:table-cell office:value-type="float" office:value="7" calcext:value-type="float">
            <text:p>7,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3599996119738" calcext:value-type="float">
            <text:p>1,54E-3</text:p>
          </table:table-cell>
          <table:table-cell office:value-type="float" office:value="7.19999980926514" calcext:value-type="float">
            <text:p>7,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3799996114685" calcext:value-type="float">
            <text:p>1,54E-3</text:p>
          </table:table-cell>
          <table:table-cell office:value-type="float" office:value="7.19999980926514" calcext:value-type="float">
            <text:p>7,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3999996109633" calcext:value-type="float">
            <text:p>1,54E-3</text:p>
          </table:table-cell>
          <table:table-cell office:value-type="float" office:value="7.80000019073486" calcext:value-type="float">
            <text:p>7,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419999610458" calcext:value-type="float">
            <text:p>1,54E-3</text:p>
          </table:table-cell>
          <table:table-cell office:value-type="float" office:value="8.39999961853027" calcext:value-type="float">
            <text:p>8,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4399996099528" calcext:value-type="float">
            <text:p>1,54E-3</text:p>
          </table:table-cell>
          <table:table-cell office:value-type="float" office:value="8.60000038146973" calcext:value-type="float">
            <text:p>8,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4599996094476" calcext:value-type="float">
            <text:p>1,55E-3</text:p>
          </table:table-cell>
          <table:table-cell office:value-type="float" office:value="9" calcext:value-type="float">
            <text:p>9,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4799996089423" calcext:value-type="float">
            <text:p>1,55E-3</text:p>
          </table:table-cell>
          <table:table-cell office:value-type="float" office:value="9.19999980926514" calcext:value-type="float">
            <text:p>9,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4999996084371" calcext:value-type="float">
            <text:p>1,55E-3</text:p>
          </table:table-cell>
          <table:table-cell office:value-type="float" office:value="9.60000038146973" calcext:value-type="float">
            <text:p>9,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5199996079318" calcext:value-type="float">
            <text:p>1,55E-3</text:p>
          </table:table-cell>
          <table:table-cell office:value-type="float" office:value="10" calcext:value-type="float">
            <text:p>1,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5399996074266" calcext:value-type="float">
            <text:p>1,55E-3</text:p>
          </table:table-cell>
          <table:table-cell office:value-type="float" office:value="10.3999996185303" calcext:value-type="float">
            <text:p>1,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5599996069213" calcext:value-type="float">
            <text:p>1,56E-3</text:p>
          </table:table-cell>
          <table:table-cell office:value-type="float" office:value="10.8000001907349" calcext:value-type="float">
            <text:p>1,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5799996064161" calcext:value-type="float">
            <text:p>1,56E-3</text:p>
          </table:table-cell>
          <table:table-cell office:value-type="float" office:value="11.3999996185303" calcext:value-type="float">
            <text:p>1,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5999996059109" calcext:value-type="float">
            <text:p>1,56E-3</text:p>
          </table:table-cell>
          <table:table-cell office:value-type="float" office:value="11.6000003814697" calcext:value-type="float">
            <text:p>1,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6199996054056" calcext:value-type="float">
            <text:p>1,56E-3</text:p>
          </table:table-cell>
          <table:table-cell office:value-type="float" office:value="11.8000001907349" calcext:value-type="float">
            <text:p>1,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6399996049004" calcext:value-type="float">
            <text:p>1,56E-3</text:p>
          </table:table-cell>
          <table:table-cell office:value-type="float" office:value="12" calcext:value-type="float">
            <text:p>1,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6599996043951" calcext:value-type="float">
            <text:p>1,57E-3</text:p>
          </table:table-cell>
          <table:table-cell office:value-type="float" office:value="12.8000001907349" calcext:value-type="float">
            <text:p>1,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6799996038899" calcext:value-type="float">
            <text:p>1,57E-3</text:p>
          </table:table-cell>
          <table:table-cell office:value-type="float" office:value="13" calcext:value-type="float">
            <text:p>1,3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6999996033846" calcext:value-type="float">
            <text:p>1,57E-3</text:p>
          </table:table-cell>
          <table:table-cell office:value-type="float" office:value="13.3999996185303" calcext:value-type="float">
            <text:p>1,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7199996028794" calcext:value-type="float">
            <text:p>1,57E-3</text:p>
          </table:table-cell>
          <table:table-cell office:value-type="float" office:value="13.8000001907349" calcext:value-type="float">
            <text:p>1,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7399996023742" calcext:value-type="float">
            <text:p>1,57E-3</text:p>
          </table:table-cell>
          <table:table-cell office:value-type="float" office:value="14" calcext:value-type="float">
            <text:p>1,4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7599996018689" calcext:value-type="float">
            <text:p>1,58E-3</text:p>
          </table:table-cell>
          <table:table-cell office:value-type="float" office:value="14.3999996185303" calcext:value-type="float">
            <text:p>1,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7799996013637" calcext:value-type="float">
            <text:p>1,58E-3</text:p>
          </table:table-cell>
          <table:table-cell office:value-type="float" office:value="14.8000001907349" calcext:value-type="float">
            <text:p>1,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7999996008584" calcext:value-type="float">
            <text:p>1,58E-3</text:p>
          </table:table-cell>
          <table:table-cell office:value-type="float" office:value="15" calcext:value-type="float">
            <text:p>1,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8199996003532" calcext:value-type="float">
            <text:p>1,58E-3</text:p>
          </table:table-cell>
          <table:table-cell office:value-type="float" office:value="15.8000001907349" calcext:value-type="float">
            <text:p>1,5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8399995998479" calcext:value-type="float">
            <text:p>1,58E-3</text:p>
          </table:table-cell>
          <table:table-cell office:value-type="float" office:value="16" calcext:value-type="float">
            <text:p>1,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8599995993427" calcext:value-type="float">
            <text:p>1,59E-3</text:p>
          </table:table-cell>
          <table:table-cell office:value-type="float" office:value="16.2000007629395" calcext:value-type="float">
            <text:p>1,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8799995988375" calcext:value-type="float">
            <text:p>1,59E-3</text:p>
          </table:table-cell>
          <table:table-cell office:value-type="float" office:value="16.3999996185303" calcext:value-type="float">
            <text:p>1,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8999995983322" calcext:value-type="float">
            <text:p>1,59E-3</text:p>
          </table:table-cell>
          <table:table-cell office:value-type="float" office:value="17.2000007629395" calcext:value-type="float">
            <text:p>1,7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919999597827" calcext:value-type="float">
            <text:p>1,59E-3</text:p>
          </table:table-cell>
          <table:table-cell office:value-type="float" office:value="17.3999996185303" calcext:value-type="float">
            <text:p>1,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9399995973217" calcext:value-type="float">
            <text:p>1,59E-3</text:p>
          </table:table-cell>
          <table:table-cell office:value-type="float" office:value="17.7999992370605" calcext:value-type="float">
            <text:p>1,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9599995968165" calcext:value-type="float">
            <text:p>1,60E-3</text:p>
          </table:table-cell>
          <table:table-cell office:value-type="float" office:value="18.2000007629395" calcext:value-type="float">
            <text:p>1,8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9799995963112" calcext:value-type="float">
            <text:p>1,60E-3</text:p>
          </table:table-cell>
          <table:table-cell office:value-type="float" office:value="18.3999996185303" calcext:value-type="float">
            <text:p>1,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5999999595806" calcext:value-type="float">
            <text:p>1,60E-3</text:p>
          </table:table-cell>
          <table:table-cell office:value-type="float" office:value="18.7999992370605" calcext:value-type="float">
            <text:p>1,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0199995953008" calcext:value-type="float">
            <text:p>1,60E-3</text:p>
          </table:table-cell>
          <table:table-cell office:value-type="float" office:value="19.2000007629395" calcext:value-type="float">
            <text:p>1,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0399995947955" calcext:value-type="float">
            <text:p>1,60E-3</text:p>
          </table:table-cell>
          <table:table-cell office:value-type="float" office:value="19.3999996185303" calcext:value-type="float">
            <text:p>1,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0599995942903" calcext:value-type="float">
            <text:p>1,61E-3</text:p>
          </table:table-cell>
          <table:table-cell office:value-type="float" office:value="20.2000007629395" calcext:value-type="float">
            <text:p>2,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079999593785" calcext:value-type="float">
            <text:p>1,61E-3</text:p>
          </table:table-cell>
          <table:table-cell office:value-type="float" office:value="20.3999996185303" calcext:value-type="float">
            <text:p>2,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0999995932798" calcext:value-type="float">
            <text:p>1,61E-3</text:p>
          </table:table-cell>
          <table:table-cell office:value-type="float" office:value="20.7999992370605" calcext:value-type="float">
            <text:p>2,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1199995927745" calcext:value-type="float">
            <text:p>1,61E-3</text:p>
          </table:table-cell>
          <table:table-cell office:value-type="float" office:value="20.7999992370605" calcext:value-type="float">
            <text:p>2,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1399995922693" calcext:value-type="float">
            <text:p>1,61E-3</text:p>
          </table:table-cell>
          <table:table-cell office:value-type="float" office:value="21.3999996185303" calcext:value-type="float">
            <text:p>2,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1599995917641" calcext:value-type="float">
            <text:p>1,62E-3</text:p>
          </table:table-cell>
          <table:table-cell office:value-type="float" office:value="22" calcext:value-type="float">
            <text:p>2,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1799995912588" calcext:value-type="float">
            <text:p>1,62E-3</text:p>
          </table:table-cell>
          <table:table-cell office:value-type="float" office:value="22.2000007629395" calcext:value-type="float">
            <text:p>2,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1999995907536" calcext:value-type="float">
            <text:p>1,62E-3</text:p>
          </table:table-cell>
          <table:table-cell office:value-type="float" office:value="22.6000003814697" calcext:value-type="float">
            <text:p>2,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2199995902483" calcext:value-type="float">
            <text:p>1,62E-3</text:p>
          </table:table-cell>
          <table:table-cell office:value-type="float" office:value="23" calcext:value-type="float">
            <text:p>2,3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2399995897431" calcext:value-type="float">
            <text:p>1,62E-3</text:p>
          </table:table-cell>
          <table:table-cell office:value-type="float" office:value="23.2000007629395" calcext:value-type="float">
            <text:p>2,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2599995892379" calcext:value-type="float">
            <text:p>1,63E-3</text:p>
          </table:table-cell>
          <table:table-cell office:value-type="float" office:value="23.7999992370605" calcext:value-type="float">
            <text:p>2,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2799995887326" calcext:value-type="float">
            <text:p>1,63E-3</text:p>
          </table:table-cell>
          <table:table-cell office:value-type="float" office:value="23.7999992370605" calcext:value-type="float">
            <text:p>2,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2999995882274" calcext:value-type="float">
            <text:p>1,63E-3</text:p>
          </table:table-cell>
          <table:table-cell office:value-type="float" office:value="24.6000003814697" calcext:value-type="float">
            <text:p>2,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3199995877221" calcext:value-type="float">
            <text:p>1,63E-3</text:p>
          </table:table-cell>
          <table:table-cell office:value-type="float" office:value="24.7999992370605" calcext:value-type="float">
            <text:p>2,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3399995872169" calcext:value-type="float">
            <text:p>1,63E-3</text:p>
          </table:table-cell>
          <table:table-cell office:value-type="float" office:value="25.3999996185303" calcext:value-type="float">
            <text:p>2,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3599995867116" calcext:value-type="float">
            <text:p>1,64E-3</text:p>
          </table:table-cell>
          <table:table-cell office:value-type="float" office:value="25.6000003814697" calcext:value-type="float">
            <text:p>2,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3799995862064" calcext:value-type="float">
            <text:p>1,64E-3</text:p>
          </table:table-cell>
          <table:table-cell office:value-type="float" office:value="26.2000007629395" calcext:value-type="float">
            <text:p>2,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3999995857012" calcext:value-type="float">
            <text:p>1,64E-3</text:p>
          </table:table-cell>
          <table:table-cell office:value-type="float" office:value="26.2000007629395" calcext:value-type="float">
            <text:p>2,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4199995851959" calcext:value-type="float">
            <text:p>1,64E-3</text:p>
          </table:table-cell>
          <table:table-cell office:value-type="float" office:value="26.6000003814697" calcext:value-type="float">
            <text:p>2,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4399995846907" calcext:value-type="float">
            <text:p>1,64E-3</text:p>
          </table:table-cell>
          <table:table-cell office:value-type="float" office:value="27" calcext:value-type="float">
            <text:p>2,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4599995841854" calcext:value-type="float">
            <text:p>1,65E-3</text:p>
          </table:table-cell>
          <table:table-cell office:value-type="float" office:value="27.6000003814697" calcext:value-type="float">
            <text:p>2,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4799995836802" calcext:value-type="float">
            <text:p>1,65E-3</text:p>
          </table:table-cell>
          <table:table-cell office:value-type="float" office:value="27.7999992370605" calcext:value-type="float">
            <text:p>2,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4999995831749" calcext:value-type="float">
            <text:p>1,65E-3</text:p>
          </table:table-cell>
          <table:table-cell office:value-type="float" office:value="28.2000007629395" calcext:value-type="float">
            <text:p>2,8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5199995826697" calcext:value-type="float">
            <text:p>1,65E-3</text:p>
          </table:table-cell>
          <table:table-cell office:value-type="float" office:value="28.6000003814697" calcext:value-type="float">
            <text:p>2,8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5399995821645" calcext:value-type="float">
            <text:p>1,65E-3</text:p>
          </table:table-cell>
          <table:table-cell office:value-type="float" office:value="29" calcext:value-type="float">
            <text:p>2,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5599995816592" calcext:value-type="float">
            <text:p>1,66E-3</text:p>
          </table:table-cell>
          <table:table-cell office:value-type="float" office:value="29.3999996185303" calcext:value-type="float">
            <text:p>2,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579999581154" calcext:value-type="float">
            <text:p>1,66E-3</text:p>
          </table:table-cell>
          <table:table-cell office:value-type="float" office:value="29.6000003814697" calcext:value-type="float">
            <text:p>2,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5999995806487" calcext:value-type="float">
            <text:p>1,66E-3</text:p>
          </table:table-cell>
          <table:table-cell office:value-type="float" office:value="30" calcext:value-type="float">
            <text:p>3,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6199995801435" calcext:value-type="float">
            <text:p>1,66E-3</text:p>
          </table:table-cell>
          <table:table-cell office:value-type="float" office:value="30.3999996185303" calcext:value-type="float">
            <text:p>3,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6399995796382" calcext:value-type="float">
            <text:p>1,66E-3</text:p>
          </table:table-cell>
          <table:table-cell office:value-type="float" office:value="31" calcext:value-type="float">
            <text:p>3,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659999579133" calcext:value-type="float">
            <text:p>1,67E-3</text:p>
          </table:table-cell>
          <table:table-cell office:value-type="float" office:value="31.2000007629395" calcext:value-type="float">
            <text:p>3,1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6799995786278" calcext:value-type="float">
            <text:p>1,67E-3</text:p>
          </table:table-cell>
          <table:table-cell office:value-type="float" office:value="31.6000003814697" calcext:value-type="float">
            <text:p>3,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6999995781225" calcext:value-type="float">
            <text:p>1,67E-3</text:p>
          </table:table-cell>
          <table:table-cell office:value-type="float" office:value="32" calcext:value-type="float">
            <text:p>3,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7199995776173" calcext:value-type="float">
            <text:p>1,67E-3</text:p>
          </table:table-cell>
          <table:table-cell office:value-type="float" office:value="32.2000007629395" calcext:value-type="float">
            <text:p>3,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739999577112" calcext:value-type="float">
            <text:p>1,67E-3</text:p>
          </table:table-cell>
          <table:table-cell office:value-type="float" office:value="32.4000015258789" calcext:value-type="float">
            <text:p>3,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7599995766068" calcext:value-type="float">
            <text:p>1,68E-3</text:p>
          </table:table-cell>
          <table:table-cell office:value-type="float" office:value="33" calcext:value-type="float">
            <text:p>3,3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7799995761015" calcext:value-type="float">
            <text:p>1,68E-3</text:p>
          </table:table-cell>
          <table:table-cell office:value-type="float" office:value="33.4000015258789" calcext:value-type="float">
            <text:p>3,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7999995755963" calcext:value-type="float">
            <text:p>1,68E-3</text:p>
          </table:table-cell>
          <table:table-cell office:value-type="float" office:value="33.7999992370606" calcext:value-type="float">
            <text:p>3,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8199995750911" calcext:value-type="float">
            <text:p>1,68E-3</text:p>
          </table:table-cell>
          <table:table-cell office:value-type="float" office:value="34.4000015258789" calcext:value-type="float">
            <text:p>3,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8399995745858" calcext:value-type="float">
            <text:p>1,68E-3</text:p>
          </table:table-cell>
          <table:table-cell office:value-type="float" office:value="34.5999984741211" calcext:value-type="float">
            <text:p>3,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8599995740806" calcext:value-type="float">
            <text:p>1,69E-3</text:p>
          </table:table-cell>
          <table:table-cell office:value-type="float" office:value="34.7999992370606" calcext:value-type="float">
            <text:p>3,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8799995735753" calcext:value-type="float">
            <text:p>1,69E-3</text:p>
          </table:table-cell>
          <table:table-cell office:value-type="float" office:value="35.2000007629395" calcext:value-type="float">
            <text:p>3,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8999995730701" calcext:value-type="float">
            <text:p>1,69E-3</text:p>
          </table:table-cell>
          <table:table-cell office:value-type="float" office:value="35.5999984741211" calcext:value-type="float">
            <text:p>3,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9199995725648" calcext:value-type="float">
            <text:p>1,69E-3</text:p>
          </table:table-cell>
          <table:table-cell office:value-type="float" office:value="36" calcext:value-type="float">
            <text:p>3,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9399995720596" calcext:value-type="float">
            <text:p>1,69E-3</text:p>
          </table:table-cell>
          <table:table-cell office:value-type="float" office:value="36.5999984741211" calcext:value-type="float">
            <text:p>3,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9599995715544" calcext:value-type="float">
            <text:p>1,70E-3</text:p>
          </table:table-cell>
          <table:table-cell office:value-type="float" office:value="36.7999992370606" calcext:value-type="float">
            <text:p>3,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9799995710491" calcext:value-type="float">
            <text:p>1,70E-3</text:p>
          </table:table-cell>
          <table:table-cell office:value-type="float" office:value="37" calcext:value-type="float">
            <text:p>3,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69999995705439" calcext:value-type="float">
            <text:p>1,70E-3</text:p>
          </table:table-cell>
          <table:table-cell office:value-type="float" office:value="37.4000015258789" calcext:value-type="float">
            <text:p>3,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0199995700386" calcext:value-type="float">
            <text:p>1,70E-3</text:p>
          </table:table-cell>
          <table:table-cell office:value-type="float" office:value="37.7999992370606" calcext:value-type="float">
            <text:p>3,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0399995695334" calcext:value-type="float">
            <text:p>1,70E-3</text:p>
          </table:table-cell>
          <table:table-cell office:value-type="float" office:value="38.2000007629395" calcext:value-type="float">
            <text:p>3,8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0599995690282" calcext:value-type="float">
            <text:p>1,71E-3</text:p>
          </table:table-cell>
          <table:table-cell office:value-type="float" office:value="38.4000015258789" calcext:value-type="float">
            <text:p>3,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0799995685229" calcext:value-type="float">
            <text:p>1,71E-3</text:p>
          </table:table-cell>
          <table:table-cell office:value-type="float" office:value="39" calcext:value-type="float">
            <text:p>3,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0999995680177" calcext:value-type="float">
            <text:p>1,71E-3</text:p>
          </table:table-cell>
          <table:table-cell office:value-type="float" office:value="39.2000007629395" calcext:value-type="float">
            <text:p>3,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1199995675124" calcext:value-type="float">
            <text:p>1,71E-3</text:p>
          </table:table-cell>
          <table:table-cell office:value-type="float" office:value="39.5999984741211" calcext:value-type="float">
            <text:p>3,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1399995670072" calcext:value-type="float">
            <text:p>1,71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1599995665019" calcext:value-type="float">
            <text:p>1,72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1799995659967" calcext:value-type="float">
            <text:p>1,72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1999995654915" calcext:value-type="float">
            <text:p>1,72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2199995649862" calcext:value-type="float">
            <text:p>1,72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239999564481" calcext:value-type="float">
            <text:p>1,72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2599995639757" calcext:value-type="float">
            <text:p>1,73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2799995634705" calcext:value-type="float">
            <text:p>1,73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2999995629652" calcext:value-type="float">
            <text:p>1,73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31999956246" calcext:value-type="float">
            <text:p>1,73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3399995619548" calcext:value-type="float">
            <text:p>1,73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3599995614495" calcext:value-type="float">
            <text:p>1,74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3799995609443" calcext:value-type="float">
            <text:p>1,74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399999560439" calcext:value-type="float">
            <text:p>1,74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4199995599338" calcext:value-type="float">
            <text:p>1,74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4399995594285" calcext:value-type="float">
            <text:p>1,74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4599995589233" calcext:value-type="float">
            <text:p>1,75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4799995584181" calcext:value-type="float">
            <text:p>1,75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4999995579128" calcext:value-type="float">
            <text:p>1,75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5199995574076" calcext:value-type="float">
            <text:p>1,75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5399995569023" calcext:value-type="float">
            <text:p>1,75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5599995563971" calcext:value-type="float">
            <text:p>1,76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5799995558918" calcext:value-type="float">
            <text:p>1,76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5999995553866" calcext:value-type="float">
            <text:p>1,76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6199995548814" calcext:value-type="float">
            <text:p>1,76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6399995543761" calcext:value-type="float">
            <text:p>1,76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6599995538709" calcext:value-type="float">
            <text:p>1,77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6799995533656" calcext:value-type="float">
            <text:p>1,77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6999995528604" calcext:value-type="float">
            <text:p>1,77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7199995523551" calcext:value-type="float">
            <text:p>1,77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7399995518499" calcext:value-type="float">
            <text:p>1,77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7599995513447" calcext:value-type="float">
            <text:p>1,78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7799995508394" calcext:value-type="float">
            <text:p>1,78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7999995503342" calcext:value-type="float">
            <text:p>1,78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8199995498289" calcext:value-type="float">
            <text:p>1,78E-3</text:p>
          </table:table-cell>
          <table:table-cell office:value-type="float" office:value="39.5999984741211" calcext:value-type="float">
            <text:p>3,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8399995493237" calcext:value-type="float">
            <text:p>1,78E-3</text:p>
          </table:table-cell>
          <table:table-cell office:value-type="float" office:value="39.4000015258789" calcext:value-type="float">
            <text:p>3,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8599995488185" calcext:value-type="float">
            <text:p>1,79E-3</text:p>
          </table:table-cell>
          <table:table-cell office:value-type="float" office:value="39" calcext:value-type="float">
            <text:p>3,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8799995483132" calcext:value-type="float">
            <text:p>1,79E-3</text:p>
          </table:table-cell>
          <table:table-cell office:value-type="float" office:value="38.4000015258789" calcext:value-type="float">
            <text:p>3,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899999547808" calcext:value-type="float">
            <text:p>1,79E-3</text:p>
          </table:table-cell>
          <table:table-cell office:value-type="float" office:value="38.2000007629395" calcext:value-type="float">
            <text:p>3,8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9199995473027" calcext:value-type="float">
            <text:p>1,79E-3</text:p>
          </table:table-cell>
          <table:table-cell office:value-type="float" office:value="37.7999992370606" calcext:value-type="float">
            <text:p>3,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9399995467975" calcext:value-type="float">
            <text:p>1,79E-3</text:p>
          </table:table-cell>
          <table:table-cell office:value-type="float" office:value="37.4000015258789" calcext:value-type="float">
            <text:p>3,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9599995462922" calcext:value-type="float">
            <text:p>1,80E-3</text:p>
          </table:table-cell>
          <table:table-cell office:value-type="float" office:value="37" calcext:value-type="float">
            <text:p>3,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979999545787" calcext:value-type="float">
            <text:p>1,80E-3</text:p>
          </table:table-cell>
          <table:table-cell office:value-type="float" office:value="36.5999984741211" calcext:value-type="float">
            <text:p>3,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79999995452818" calcext:value-type="float">
            <text:p>1,80E-3</text:p>
          </table:table-cell>
          <table:table-cell office:value-type="float" office:value="36.4000015258789" calcext:value-type="float">
            <text:p>3,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0199995447765" calcext:value-type="float">
            <text:p>1,80E-3</text:p>
          </table:table-cell>
          <table:table-cell office:value-type="float" office:value="36" calcext:value-type="float">
            <text:p>3,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0399995442713" calcext:value-type="float">
            <text:p>1,80E-3</text:p>
          </table:table-cell>
          <table:table-cell office:value-type="float" office:value="35.4000015258789" calcext:value-type="float">
            <text:p>3,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059999543766" calcext:value-type="float">
            <text:p>1,81E-3</text:p>
          </table:table-cell>
          <table:table-cell office:value-type="float" office:value="35" calcext:value-type="float">
            <text:p>3,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0799995432608" calcext:value-type="float">
            <text:p>1,81E-3</text:p>
          </table:table-cell>
          <table:table-cell office:value-type="float" office:value="34.7999992370606" calcext:value-type="float">
            <text:p>3,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0999995427555" calcext:value-type="float">
            <text:p>1,81E-3</text:p>
          </table:table-cell>
          <table:table-cell office:value-type="float" office:value="34.5999984741211" calcext:value-type="float">
            <text:p>3,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1199995422503" calcext:value-type="float">
            <text:p>1,81E-3</text:p>
          </table:table-cell>
          <table:table-cell office:value-type="float" office:value="34.2000007629395" calcext:value-type="float">
            <text:p>3,4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1399995417451" calcext:value-type="float">
            <text:p>1,81E-3</text:p>
          </table:table-cell>
          <table:table-cell office:value-type="float" office:value="33.5999984741211" calcext:value-type="float">
            <text:p>3,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1599995412398" calcext:value-type="float">
            <text:p>1,82E-3</text:p>
          </table:table-cell>
          <table:table-cell office:value-type="float" office:value="33.4000015258789" calcext:value-type="float">
            <text:p>3,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1799995407346" calcext:value-type="float">
            <text:p>1,82E-3</text:p>
          </table:table-cell>
          <table:table-cell office:value-type="float" office:value="33" calcext:value-type="float">
            <text:p>3,3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1999995402293" calcext:value-type="float">
            <text:p>1,82E-3</text:p>
          </table:table-cell>
          <table:table-cell office:value-type="float" office:value="32.4000015258789" calcext:value-type="float">
            <text:p>3,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2199995397241" calcext:value-type="float">
            <text:p>1,82E-3</text:p>
          </table:table-cell>
          <table:table-cell office:value-type="float" office:value="32.2000007629395" calcext:value-type="float">
            <text:p>3,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2399995392188" calcext:value-type="float">
            <text:p>1,82E-3</text:p>
          </table:table-cell>
          <table:table-cell office:value-type="float" office:value="32" calcext:value-type="float">
            <text:p>3,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2599995387136" calcext:value-type="float">
            <text:p>1,83E-3</text:p>
          </table:table-cell>
          <table:table-cell office:value-type="float" office:value="31.6000003814697" calcext:value-type="float">
            <text:p>3,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2799995382084" calcext:value-type="float">
            <text:p>1,83E-3</text:p>
          </table:table-cell>
          <table:table-cell office:value-type="float" office:value="31.2000007629395" calcext:value-type="float">
            <text:p>3,1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2999995377031" calcext:value-type="float">
            <text:p>1,83E-3</text:p>
          </table:table-cell>
          <table:table-cell office:value-type="float" office:value="30.7999992370605" calcext:value-type="float">
            <text:p>3,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3199995371979" calcext:value-type="float">
            <text:p>1,83E-3</text:p>
          </table:table-cell>
          <table:table-cell office:value-type="float" office:value="30.3999996185303" calcext:value-type="float">
            <text:p>3,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3399995366926" calcext:value-type="float">
            <text:p>1,83E-3</text:p>
          </table:table-cell>
          <table:table-cell office:value-type="float" office:value="30" calcext:value-type="float">
            <text:p>3,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3599995361874" calcext:value-type="float">
            <text:p>1,84E-3</text:p>
          </table:table-cell>
          <table:table-cell office:value-type="float" office:value="29.7999992370605" calcext:value-type="float">
            <text:p>2,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3799995356821" calcext:value-type="float">
            <text:p>1,84E-3</text:p>
          </table:table-cell>
          <table:table-cell office:value-type="float" office:value="29.3999996185303" calcext:value-type="float">
            <text:p>2,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3999995351769" calcext:value-type="float">
            <text:p>1,84E-3</text:p>
          </table:table-cell>
          <table:table-cell office:value-type="float" office:value="29" calcext:value-type="float">
            <text:p>2,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4199995346717" calcext:value-type="float">
            <text:p>1,84E-3</text:p>
          </table:table-cell>
          <table:table-cell office:value-type="float" office:value="28.6000003814697" calcext:value-type="float">
            <text:p>2,8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4399995341664" calcext:value-type="float">
            <text:p>1,84E-3</text:p>
          </table:table-cell>
          <table:table-cell office:value-type="float" office:value="28.2000007629395" calcext:value-type="float">
            <text:p>2,8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4599995336612" calcext:value-type="float">
            <text:p>1,85E-3</text:p>
          </table:table-cell>
          <table:table-cell office:value-type="float" office:value="27.7999992370605" calcext:value-type="float">
            <text:p>2,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4799995331559" calcext:value-type="float">
            <text:p>1,85E-3</text:p>
          </table:table-cell>
          <table:table-cell office:value-type="float" office:value="27.6000003814697" calcext:value-type="float">
            <text:p>2,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4999995326507" calcext:value-type="float">
            <text:p>1,85E-3</text:p>
          </table:table-cell>
          <table:table-cell office:value-type="float" office:value="27" calcext:value-type="float">
            <text:p>2,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5199995321454" calcext:value-type="float">
            <text:p>1,85E-3</text:p>
          </table:table-cell>
          <table:table-cell office:value-type="float" office:value="26.6000003814697" calcext:value-type="float">
            <text:p>2,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5399995316402" calcext:value-type="float">
            <text:p>1,85E-3</text:p>
          </table:table-cell>
          <table:table-cell office:value-type="float" office:value="26.3999996185303" calcext:value-type="float">
            <text:p>2,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559999531135" calcext:value-type="float">
            <text:p>1,86E-3</text:p>
          </table:table-cell>
          <table:table-cell office:value-type="float" office:value="26.2000007629395" calcext:value-type="float">
            <text:p>2,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5799995306297" calcext:value-type="float">
            <text:p>1,86E-3</text:p>
          </table:table-cell>
          <table:table-cell office:value-type="float" office:value="25.6000003814697" calcext:value-type="float">
            <text:p>2,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5999995301245" calcext:value-type="float">
            <text:p>1,86E-3</text:p>
          </table:table-cell>
          <table:table-cell office:value-type="float" office:value="25.3999996185303" calcext:value-type="float">
            <text:p>2,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6199995296192" calcext:value-type="float">
            <text:p>1,86E-3</text:p>
          </table:table-cell>
          <table:table-cell office:value-type="float" office:value="25" calcext:value-type="float">
            <text:p>2,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639999529114" calcext:value-type="float">
            <text:p>1,86E-3</text:p>
          </table:table-cell>
          <table:table-cell office:value-type="float" office:value="24.6000003814697" calcext:value-type="float">
            <text:p>2,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6599995286088" calcext:value-type="float">
            <text:p>1,87E-3</text:p>
          </table:table-cell>
          <table:table-cell office:value-type="float" office:value="24.2000007629395" calcext:value-type="float">
            <text:p>2,4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6799995281035" calcext:value-type="float">
            <text:p>1,87E-3</text:p>
          </table:table-cell>
          <table:table-cell office:value-type="float" office:value="23.6000003814697" calcext:value-type="float">
            <text:p>2,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6999995275983" calcext:value-type="float">
            <text:p>1,87E-3</text:p>
          </table:table-cell>
          <table:table-cell office:value-type="float" office:value="23.2000007629395" calcext:value-type="float">
            <text:p>2,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719999527093" calcext:value-type="float">
            <text:p>1,87E-3</text:p>
          </table:table-cell>
          <table:table-cell office:value-type="float" office:value="23" calcext:value-type="float">
            <text:p>2,3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7399995265878" calcext:value-type="float">
            <text:p>1,87E-3</text:p>
          </table:table-cell>
          <table:table-cell office:value-type="float" office:value="22.6000003814697" calcext:value-type="float">
            <text:p>2,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7599995260825" calcext:value-type="float">
            <text:p>1,88E-3</text:p>
          </table:table-cell>
          <table:table-cell office:value-type="float" office:value="22.3999996185303" calcext:value-type="float">
            <text:p>2,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7799995255773" calcext:value-type="float">
            <text:p>1,88E-3</text:p>
          </table:table-cell>
          <table:table-cell office:value-type="float" office:value="21.7999992370605" calcext:value-type="float">
            <text:p>2,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7999995250721" calcext:value-type="float">
            <text:p>1,88E-3</text:p>
          </table:table-cell>
          <table:table-cell office:value-type="float" office:value="21.6000003814697" calcext:value-type="float">
            <text:p>2,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8199995245668" calcext:value-type="float">
            <text:p>1,88E-3</text:p>
          </table:table-cell>
          <table:table-cell office:value-type="float" office:value="21.2000007629395" calcext:value-type="float">
            <text:p>2,1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8399995240616" calcext:value-type="float">
            <text:p>1,88E-3</text:p>
          </table:table-cell>
          <table:table-cell office:value-type="float" office:value="20.7999992370605" calcext:value-type="float">
            <text:p>2,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8599995235563" calcext:value-type="float">
            <text:p>1,89E-3</text:p>
          </table:table-cell>
          <table:table-cell office:value-type="float" office:value="20.3999996185303" calcext:value-type="float">
            <text:p>2,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8799995230511" calcext:value-type="float">
            <text:p>1,89E-3</text:p>
          </table:table-cell>
          <table:table-cell office:value-type="float" office:value="20" calcext:value-type="float">
            <text:p>2,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8999995225458" calcext:value-type="float">
            <text:p>1,89E-3</text:p>
          </table:table-cell>
          <table:table-cell office:value-type="float" office:value="19.6000003814697" calcext:value-type="float">
            <text:p>1,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9199995220406" calcext:value-type="float">
            <text:p>1,89E-3</text:p>
          </table:table-cell>
          <table:table-cell office:value-type="float" office:value="19.2000007629395" calcext:value-type="float">
            <text:p>1,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9399995215354" calcext:value-type="float">
            <text:p>1,89E-3</text:p>
          </table:table-cell>
          <table:table-cell office:value-type="float" office:value="18.7999992370605" calcext:value-type="float">
            <text:p>1,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9599995210301" calcext:value-type="float">
            <text:p>1,90E-3</text:p>
          </table:table-cell>
          <table:table-cell office:value-type="float" office:value="18.6000003814697" calcext:value-type="float">
            <text:p>1,8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9799995205249" calcext:value-type="float">
            <text:p>1,90E-3</text:p>
          </table:table-cell>
          <table:table-cell office:value-type="float" office:value="18.3999996185303" calcext:value-type="float">
            <text:p>1,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89999995200196" calcext:value-type="float">
            <text:p>1,90E-3</text:p>
          </table:table-cell>
          <table:table-cell office:value-type="float" office:value="17.7999992370605" calcext:value-type="float">
            <text:p>1,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0199995195144" calcext:value-type="float">
            <text:p>1,90E-3</text:p>
          </table:table-cell>
          <table:table-cell office:value-type="float" office:value="17.3999996185303" calcext:value-type="float">
            <text:p>1,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0399995190091" calcext:value-type="float">
            <text:p>1,90E-3</text:p>
          </table:table-cell>
          <table:table-cell office:value-type="float" office:value="17.2000007629395" calcext:value-type="float">
            <text:p>1,7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0599995185039" calcext:value-type="float">
            <text:p>1,91E-3</text:p>
          </table:table-cell>
          <table:table-cell office:value-type="float" office:value="16.6000003814697" calcext:value-type="float">
            <text:p>1,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0799995179987" calcext:value-type="float">
            <text:p>1,91E-3</text:p>
          </table:table-cell>
          <table:table-cell office:value-type="float" office:value="16.3999996185303" calcext:value-type="float">
            <text:p>1,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0999995174934" calcext:value-type="float">
            <text:p>1,91E-3</text:p>
          </table:table-cell>
          <table:table-cell office:value-type="float" office:value="16.2000007629395" calcext:value-type="float">
            <text:p>1,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1199995169882" calcext:value-type="float">
            <text:p>1,91E-3</text:p>
          </table:table-cell>
          <table:table-cell office:value-type="float" office:value="15.8000001907349" calcext:value-type="float">
            <text:p>1,5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1399995164829" calcext:value-type="float">
            <text:p>1,91E-3</text:p>
          </table:table-cell>
          <table:table-cell office:value-type="float" office:value="15.1999998092651" calcext:value-type="float">
            <text:p>1,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1599995159777" calcext:value-type="float">
            <text:p>1,92E-3</text:p>
          </table:table-cell>
          <table:table-cell office:value-type="float" office:value="14.8000001907349" calcext:value-type="float">
            <text:p>1,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1799995154724" calcext:value-type="float">
            <text:p>1,92E-3</text:p>
          </table:table-cell>
          <table:table-cell office:value-type="float" office:value="14.6000003814697" calcext:value-type="float">
            <text:p>1,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1999995149672" calcext:value-type="float">
            <text:p>1,92E-3</text:p>
          </table:table-cell>
          <table:table-cell office:value-type="float" office:value="14.1999998092651" calcext:value-type="float">
            <text:p>1,4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219999514462" calcext:value-type="float">
            <text:p>1,92E-3</text:p>
          </table:table-cell>
          <table:table-cell office:value-type="float" office:value="13.8000001907349" calcext:value-type="float">
            <text:p>1,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2399995139567" calcext:value-type="float">
            <text:p>1,92E-3</text:p>
          </table:table-cell>
          <table:table-cell office:value-type="float" office:value="13.6000003814697" calcext:value-type="float">
            <text:p>1,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2599995134515" calcext:value-type="float">
            <text:p>1,93E-3</text:p>
          </table:table-cell>
          <table:table-cell office:value-type="float" office:value="13.1999998092651" calcext:value-type="float">
            <text:p>1,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2799995129462" calcext:value-type="float">
            <text:p>1,93E-3</text:p>
          </table:table-cell>
          <table:table-cell office:value-type="float" office:value="12.8000001907349" calcext:value-type="float">
            <text:p>1,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299999512441" calcext:value-type="float">
            <text:p>1,93E-3</text:p>
          </table:table-cell>
          <table:table-cell office:value-type="float" office:value="12.1999998092651" calcext:value-type="float">
            <text:p>1,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3199995119357" calcext:value-type="float">
            <text:p>1,93E-3</text:p>
          </table:table-cell>
          <table:table-cell office:value-type="float" office:value="11.8000001907349" calcext:value-type="float">
            <text:p>1,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3399995114305" calcext:value-type="float">
            <text:p>1,93E-3</text:p>
          </table:table-cell>
          <table:table-cell office:value-type="float" office:value="11.6000003814697" calcext:value-type="float">
            <text:p>1,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3599995109253" calcext:value-type="float">
            <text:p>1,94E-3</text:p>
          </table:table-cell>
          <table:table-cell office:value-type="float" office:value="11.3999996185303" calcext:value-type="float">
            <text:p>1,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37999951042" calcext:value-type="float">
            <text:p>1,94E-3</text:p>
          </table:table-cell>
          <table:table-cell office:value-type="float" office:value="10.8000001907349" calcext:value-type="float">
            <text:p>1,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3999995099148" calcext:value-type="float">
            <text:p>1,94E-3</text:p>
          </table:table-cell>
          <table:table-cell office:value-type="float" office:value="10.3999996185303" calcext:value-type="float">
            <text:p>1,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4199995094095" calcext:value-type="float">
            <text:p>1,94E-3</text:p>
          </table:table-cell>
          <table:table-cell office:value-type="float" office:value="10" calcext:value-type="float">
            <text:p>1,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4399995089043" calcext:value-type="float">
            <text:p>1,94E-3</text:p>
          </table:table-cell>
          <table:table-cell office:value-type="float" office:value="9.80000019073486" calcext:value-type="float">
            <text:p>9,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4599995083991" calcext:value-type="float">
            <text:p>1,95E-3</text:p>
          </table:table-cell>
          <table:table-cell office:value-type="float" office:value="9.39999961853027" calcext:value-type="float">
            <text:p>9,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4799995078938" calcext:value-type="float">
            <text:p>1,95E-3</text:p>
          </table:table-cell>
          <table:table-cell office:value-type="float" office:value="9" calcext:value-type="float">
            <text:p>9,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4999995073886" calcext:value-type="float">
            <text:p>1,95E-3</text:p>
          </table:table-cell>
          <table:table-cell office:value-type="float" office:value="8.80000019073486" calcext:value-type="float">
            <text:p>8,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5199995068833" calcext:value-type="float">
            <text:p>1,95E-3</text:p>
          </table:table-cell>
          <table:table-cell office:value-type="float" office:value="8.39999961853027" calcext:value-type="float">
            <text:p>8,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5399995063781" calcext:value-type="float">
            <text:p>1,95E-3</text:p>
          </table:table-cell>
          <table:table-cell office:value-type="float" office:value="7.80000019073486" calcext:value-type="float">
            <text:p>7,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5599995058728" calcext:value-type="float">
            <text:p>1,96E-3</text:p>
          </table:table-cell>
          <table:table-cell office:value-type="float" office:value="7.40000009536743" calcext:value-type="float">
            <text:p>7,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5799995053676" calcext:value-type="float">
            <text:p>1,96E-3</text:p>
          </table:table-cell>
          <table:table-cell office:value-type="float" office:value="7.19999980926514" calcext:value-type="float">
            <text:p>7,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5999995048624" calcext:value-type="float">
            <text:p>1,96E-3</text:p>
          </table:table-cell>
          <table:table-cell office:value-type="float" office:value="6.80000019073486" calcext:value-type="float">
            <text:p>6,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6199995043571" calcext:value-type="float">
            <text:p>1,96E-3</text:p>
          </table:table-cell>
          <table:table-cell office:value-type="float" office:value="6.19999980926514" calcext:value-type="float">
            <text:p>6,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6399995038519" calcext:value-type="float">
            <text:p>1,96E-3</text:p>
          </table:table-cell>
          <table:table-cell office:value-type="float" office:value="6" calcext:value-type="float">
            <text:p>6,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6599995033466" calcext:value-type="float">
            <text:p>1,97E-3</text:p>
          </table:table-cell>
          <table:table-cell office:value-type="float" office:value="5.59999990463257" calcext:value-type="float">
            <text:p>5,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6799995028414" calcext:value-type="float">
            <text:p>1,97E-3</text:p>
          </table:table-cell>
          <table:table-cell office:value-type="float" office:value="5.19999980926514" calcext:value-type="float">
            <text:p>5,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6999995023361" calcext:value-type="float">
            <text:p>1,97E-3</text:p>
          </table:table-cell>
          <table:table-cell office:value-type="float" office:value="5" calcext:value-type="float">
            <text:p>5,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7199995018309" calcext:value-type="float">
            <text:p>1,97E-3</text:p>
          </table:table-cell>
          <table:table-cell office:value-type="float" office:value="4.59999990463257" calcext:value-type="float">
            <text:p>4,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7399995013257" calcext:value-type="float">
            <text:p>1,97E-3</text:p>
          </table:table-cell>
          <table:table-cell office:value-type="float" office:value="4.40000009536743" calcext:value-type="float">
            <text:p>4,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7599995008204" calcext:value-type="float">
            <text:p>1,98E-3</text:p>
          </table:table-cell>
          <table:table-cell office:value-type="float" office:value="4" calcext:value-type="float">
            <text:p>4,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7799995003152" calcext:value-type="float">
            <text:p>1,98E-3</text:p>
          </table:table-cell>
          <table:table-cell office:value-type="float" office:value="3.40000009536743" calcext:value-type="float">
            <text:p>3,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7999994998099" calcext:value-type="float">
            <text:p>1,98E-3</text:p>
          </table:table-cell>
          <table:table-cell office:value-type="float" office:value="3" calcext:value-type="float">
            <text:p>3,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8199994993047" calcext:value-type="float">
            <text:p>1,98E-3</text:p>
          </table:table-cell>
          <table:table-cell office:value-type="float" office:value="2.59999990463257" calcext:value-type="float">
            <text:p>2,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8399994987994" calcext:value-type="float">
            <text:p>1,98E-3</text:p>
          </table:table-cell>
          <table:table-cell office:value-type="float" office:value="2.40000009536743" calcext:value-type="float">
            <text:p>2,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8599994982942" calcext:value-type="float">
            <text:p>1,99E-3</text:p>
          </table:table-cell>
          <table:table-cell office:value-type="float" office:value="2" calcext:value-type="float">
            <text:p>2,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879999497789" calcext:value-type="float">
            <text:p>1,99E-3</text:p>
          </table:table-cell>
          <table:table-cell office:value-type="float" office:value="1.79999995231628" calcext:value-type="float">
            <text:p>1,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8999994972837" calcext:value-type="float">
            <text:p>1,99E-3</text:p>
          </table:table-cell>
          <table:table-cell office:value-type="float" office:value="1.20000004768372" calcext:value-type="float">
            <text:p>1,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9199994967785" calcext:value-type="float">
            <text:p>1,99E-3</text:p>
          </table:table-cell>
          <table:table-cell office:value-type="float" office:value="1" calcext:value-type="float">
            <text:p>1,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9399994962732" calcext:value-type="float">
            <text:p>1,99E-3</text:p>
          </table:table-cell>
          <table:table-cell office:value-type="float" office:value="0.200000002980232" calcext:value-type="float">
            <text:p>2,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959999495768" calcext:value-type="float">
            <text:p>2,00E-3</text:p>
          </table:table-cell>
          <table:table-cell office:value-type="float" office:value="0.200000002980232" calcext:value-type="float">
            <text:p>2,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9799994952627" calcext:value-type="float">
            <text:p>2,00E-3</text:p>
          </table:table-cell>
          <table:table-cell office:value-type="float" office:value="0" calcext:value-type="float">
            <text:p>0,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199999994947575" calcext:value-type="float">
            <text:p>2,00E-3</text:p>
          </table:table-cell>
          <table:table-cell office:value-type="float" office:value="-0.400000005960465"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0199994942523" calcext:value-type="float">
            <text:p>2,00E-3</text:p>
          </table:table-cell>
          <table:table-cell office:value-type="float" office:value="-1" calcext:value-type="float">
            <text:p>-1,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039999493747" calcext:value-type="float">
            <text:p>2,00E-3</text:p>
          </table:table-cell>
          <table:table-cell office:value-type="float" office:value="-1.39999997615814" calcext:value-type="float">
            <text:p>-1,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0599994932418" calcext:value-type="float">
            <text:p>2,01E-3</text:p>
          </table:table-cell>
          <table:table-cell office:value-type="float" office:value="-1.60000002384186" calcext:value-type="float">
            <text:p>-1,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0799994927365" calcext:value-type="float">
            <text:p>2,01E-3</text:p>
          </table:table-cell>
          <table:table-cell office:value-type="float" office:value="-2" calcext:value-type="float">
            <text:p>-2,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0999994922313" calcext:value-type="float">
            <text:p>2,01E-3</text:p>
          </table:table-cell>
          <table:table-cell office:value-type="float" office:value="-2.59999990463257" calcext:value-type="float">
            <text:p>-2,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119999491726" calcext:value-type="float">
            <text:p>2,01E-3</text:p>
          </table:table-cell>
          <table:table-cell office:value-type="float" office:value="-2.79999995231628" calcext:value-type="float">
            <text:p>-2,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1399994912208" calcext:value-type="float">
            <text:p>2,01E-3</text:p>
          </table:table-cell>
          <table:table-cell office:value-type="float" office:value="-3.20000004768372" calcext:value-type="float">
            <text:p>-3,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1599994907156" calcext:value-type="float">
            <text:p>2,02E-3</text:p>
          </table:table-cell>
          <table:table-cell office:value-type="float" office:value="-3.59999990463257" calcext:value-type="float">
            <text:p>-3,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1799994902103" calcext:value-type="float">
            <text:p>2,02E-3</text:p>
          </table:table-cell>
          <table:table-cell office:value-type="float" office:value="-4" calcext:value-type="float">
            <text:p>-4,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1999994897051" calcext:value-type="float">
            <text:p>2,02E-3</text:p>
          </table:table-cell>
          <table:table-cell office:value-type="float" office:value="-4.59999990463257" calcext:value-type="float">
            <text:p>-4,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2199994891998" calcext:value-type="float">
            <text:p>2,02E-3</text:p>
          </table:table-cell>
          <table:table-cell office:value-type="float" office:value="-4.59999990463257" calcext:value-type="float">
            <text:p>-4,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2399994886946" calcext:value-type="float">
            <text:p>2,02E-3</text:p>
          </table:table-cell>
          <table:table-cell office:value-type="float" office:value="-5" calcext:value-type="float">
            <text:p>-5,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2599994881894" calcext:value-type="float">
            <text:p>2,03E-3</text:p>
          </table:table-cell>
          <table:table-cell office:value-type="float" office:value="-5.59999990463257" calcext:value-type="float">
            <text:p>-5,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2799994876841" calcext:value-type="float">
            <text:p>2,03E-3</text:p>
          </table:table-cell>
          <table:table-cell office:value-type="float" office:value="-5.80000019073486" calcext:value-type="float">
            <text:p>-5,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2999994871789" calcext:value-type="float">
            <text:p>2,03E-3</text:p>
          </table:table-cell>
          <table:table-cell office:value-type="float" office:value="-6.19999980926514" calcext:value-type="float">
            <text:p>-6,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3199994866736" calcext:value-type="float">
            <text:p>2,03E-3</text:p>
          </table:table-cell>
          <table:table-cell office:value-type="float" office:value="-6.40000009536743" calcext:value-type="float">
            <text:p>-6,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3399994861684" calcext:value-type="float">
            <text:p>2,03E-3</text:p>
          </table:table-cell>
          <table:table-cell office:value-type="float" office:value="-6.80000019073486" calcext:value-type="float">
            <text:p>-6,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3599994856631" calcext:value-type="float">
            <text:p>2,04E-3</text:p>
          </table:table-cell>
          <table:table-cell office:value-type="float" office:value="-7" calcext:value-type="float">
            <text:p>-7,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3799994851579" calcext:value-type="float">
            <text:p>2,04E-3</text:p>
          </table:table-cell>
          <table:table-cell office:value-type="float" office:value="-7.59999990463257" calcext:value-type="float">
            <text:p>-7,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3999994846527" calcext:value-type="float">
            <text:p>2,04E-3</text:p>
          </table:table-cell>
          <table:table-cell office:value-type="float" office:value="-7.80000019073486" calcext:value-type="float">
            <text:p>-7,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4199994841474" calcext:value-type="float">
            <text:p>2,04E-3</text:p>
          </table:table-cell>
          <table:table-cell office:value-type="float" office:value="-8.60000038146973" calcext:value-type="float">
            <text:p>-8,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4399994836422" calcext:value-type="float">
            <text:p>2,04E-3</text:p>
          </table:table-cell>
          <table:table-cell office:value-type="float" office:value="-8.80000019073486" calcext:value-type="float">
            <text:p>-8,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4599994831369" calcext:value-type="float">
            <text:p>2,05E-3</text:p>
          </table:table-cell>
          <table:table-cell office:value-type="float" office:value="-9.19999980926514" calcext:value-type="float">
            <text:p>-9,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4799994826317" calcext:value-type="float">
            <text:p>2,05E-3</text:p>
          </table:table-cell>
          <table:table-cell office:value-type="float" office:value="-9.19999980926514" calcext:value-type="float">
            <text:p>-9,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4999994821264" calcext:value-type="float">
            <text:p>2,05E-3</text:p>
          </table:table-cell>
          <table:table-cell office:value-type="float" office:value="-9.80000019073486" calcext:value-type="float">
            <text:p>-9,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5199994816212" calcext:value-type="float">
            <text:p>2,05E-3</text:p>
          </table:table-cell>
          <table:table-cell office:value-type="float" office:value="-10.3999996185303" calcext:value-type="float">
            <text:p>-1,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539999481116" calcext:value-type="float">
            <text:p>2,05E-3</text:p>
          </table:table-cell>
          <table:table-cell office:value-type="float" office:value="-10.6000003814697" calcext:value-type="float">
            <text:p>-1,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5599994806107" calcext:value-type="float">
            <text:p>2,06E-3</text:p>
          </table:table-cell>
          <table:table-cell office:value-type="float" office:value="-11" calcext:value-type="float">
            <text:p>-1,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5799994801055" calcext:value-type="float">
            <text:p>2,06E-3</text:p>
          </table:table-cell>
          <table:table-cell office:value-type="float" office:value="-11.1999998092651" calcext:value-type="float">
            <text:p>-1,1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5999994796002" calcext:value-type="float">
            <text:p>2,06E-3</text:p>
          </table:table-cell>
          <table:table-cell office:value-type="float" office:value="-11.8000001907349" calcext:value-type="float">
            <text:p>-1,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619999479095" calcext:value-type="float">
            <text:p>2,06E-3</text:p>
          </table:table-cell>
          <table:table-cell office:value-type="float" office:value="-12" calcext:value-type="float">
            <text:p>-1,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6399994785897" calcext:value-type="float">
            <text:p>2,06E-3</text:p>
          </table:table-cell>
          <table:table-cell office:value-type="float" office:value="-12.6000003814697" calcext:value-type="float">
            <text:p>-1,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6599994780845" calcext:value-type="float">
            <text:p>2,07E-3</text:p>
          </table:table-cell>
          <table:table-cell office:value-type="float" office:value="-12.8000001907349" calcext:value-type="float">
            <text:p>-1,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6799994775793" calcext:value-type="float">
            <text:p>2,07E-3</text:p>
          </table:table-cell>
          <table:table-cell office:value-type="float" office:value="-13.3999996185303" calcext:value-type="float">
            <text:p>-1,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699999477074" calcext:value-type="float">
            <text:p>2,07E-3</text:p>
          </table:table-cell>
          <table:table-cell office:value-type="float" office:value="-13.6000003814697" calcext:value-type="float">
            <text:p>-1,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7199994765688" calcext:value-type="float">
            <text:p>2,07E-3</text:p>
          </table:table-cell>
          <table:table-cell office:value-type="float" office:value="-14" calcext:value-type="float">
            <text:p>-1,4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7399994760635" calcext:value-type="float">
            <text:p>2,07E-3</text:p>
          </table:table-cell>
          <table:table-cell office:value-type="float" office:value="-14.6000003814697" calcext:value-type="float">
            <text:p>-1,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7599994755583" calcext:value-type="float">
            <text:p>2,08E-3</text:p>
          </table:table-cell>
          <table:table-cell office:value-type="float" office:value="-14.6000003814697" calcext:value-type="float">
            <text:p>-1,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779999475053" calcext:value-type="float">
            <text:p>2,08E-3</text:p>
          </table:table-cell>
          <table:table-cell office:value-type="float" office:value="-15" calcext:value-type="float">
            <text:p>-1,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7999994745478" calcext:value-type="float">
            <text:p>2,08E-3</text:p>
          </table:table-cell>
          <table:table-cell office:value-type="float" office:value="-15.3999996185303" calcext:value-type="float">
            <text:p>-1,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8199994740426" calcext:value-type="float">
            <text:p>2,08E-3</text:p>
          </table:table-cell>
          <table:table-cell office:value-type="float" office:value="-16" calcext:value-type="float">
            <text:p>-1,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8399994735373" calcext:value-type="float">
            <text:p>2,08E-3</text:p>
          </table:table-cell>
          <table:table-cell office:value-type="float" office:value="-16.2000007629395" calcext:value-type="float">
            <text:p>-1,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8599994730321" calcext:value-type="float">
            <text:p>2,09E-3</text:p>
          </table:table-cell>
          <table:table-cell office:value-type="float" office:value="-16.3999996185303" calcext:value-type="float">
            <text:p>-1,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8799994725268" calcext:value-type="float">
            <text:p>2,09E-3</text:p>
          </table:table-cell>
          <table:table-cell office:value-type="float" office:value="-17" calcext:value-type="float">
            <text:p>-1,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8999994720216" calcext:value-type="float">
            <text:p>2,09E-3</text:p>
          </table:table-cell>
          <table:table-cell office:value-type="float" office:value="-17.6000003814697" calcext:value-type="float">
            <text:p>-1,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9199994715163" calcext:value-type="float">
            <text:p>2,09E-3</text:p>
          </table:table-cell>
          <table:table-cell office:value-type="float" office:value="-17.6000003814697" calcext:value-type="float">
            <text:p>-1,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9399994710111" calcext:value-type="float">
            <text:p>2,09E-3</text:p>
          </table:table-cell>
          <table:table-cell office:value-type="float" office:value="-18" calcext:value-type="float">
            <text:p>-1,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9599994705059" calcext:value-type="float">
            <text:p>2,10E-3</text:p>
          </table:table-cell>
          <table:table-cell office:value-type="float" office:value="-18.3999996185303" calcext:value-type="float">
            <text:p>-1,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9799994700006" calcext:value-type="float">
            <text:p>2,10E-3</text:p>
          </table:table-cell>
          <table:table-cell office:value-type="float" office:value="-18.6000003814697" calcext:value-type="float">
            <text:p>-1,8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09999994694954" calcext:value-type="float">
            <text:p>2,10E-3</text:p>
          </table:table-cell>
          <table:table-cell office:value-type="float" office:value="-19.2000007629395" calcext:value-type="float">
            <text:p>-1,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0199994689901" calcext:value-type="float">
            <text:p>2,10E-3</text:p>
          </table:table-cell>
          <table:table-cell office:value-type="float" office:value="-19.3999996185303" calcext:value-type="float">
            <text:p>-1,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0399994684849" calcext:value-type="float">
            <text:p>2,10E-3</text:p>
          </table:table-cell>
          <table:table-cell table:number-columns-repeated="2"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0599994679797" calcext:value-type="float">
            <text:p>2,11E-3</text:p>
          </table:table-cell>
          <table:table-cell office:value-type="float" office:value="-20.3999996185303" calcext:value-type="float">
            <text:p>-2,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0799994674744" calcext:value-type="float">
            <text:p>2,11E-3</text:p>
          </table:table-cell>
          <table:table-cell office:value-type="float" office:value="-20.6000003814697" calcext:value-type="float">
            <text:p>-2,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0999994669692" calcext:value-type="float">
            <text:p>2,11E-3</text:p>
          </table:table-cell>
          <table:table-cell office:value-type="float" office:value="-20.7999992370605" calcext:value-type="float">
            <text:p>-2,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1199994664639" calcext:value-type="float">
            <text:p>2,11E-3</text:p>
          </table:table-cell>
          <table:table-cell office:value-type="float" office:value="-21.3999996185303" calcext:value-type="float">
            <text:p>-2,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1399994659587" calcext:value-type="float">
            <text:p>2,11E-3</text:p>
          </table:table-cell>
          <table:table-cell office:value-type="float" office:value="-21.7999992370605" calcext:value-type="float">
            <text:p>-2,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1599994654534" calcext:value-type="float">
            <text:p>2,12E-3</text:p>
          </table:table-cell>
          <table:table-cell office:value-type="float" office:value="-22.2000007629395" calcext:value-type="float">
            <text:p>-2,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1799994649482" calcext:value-type="float">
            <text:p>2,12E-3</text:p>
          </table:table-cell>
          <table:table-cell office:value-type="float" office:value="-22.3999996185303" calcext:value-type="float">
            <text:p>-2,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199999464443" calcext:value-type="float">
            <text:p>2,12E-3</text:p>
          </table:table-cell>
          <table:table-cell office:value-type="float" office:value="-23" calcext:value-type="float">
            <text:p>-2,3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2199994639377" calcext:value-type="float">
            <text:p>2,12E-3</text:p>
          </table:table-cell>
          <table:table-cell office:value-type="float" office:value="-23.2000007629395" calcext:value-type="float">
            <text:p>-2,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2399994634325" calcext:value-type="float">
            <text:p>2,12E-3</text:p>
          </table:table-cell>
          <table:table-cell office:value-type="float" office:value="-23.6000003814697" calcext:value-type="float">
            <text:p>-2,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2599994629272" calcext:value-type="float">
            <text:p>2,13E-3</text:p>
          </table:table-cell>
          <table:table-cell office:value-type="float" office:value="-24" calcext:value-type="float">
            <text:p>-2,4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279999462422" calcext:value-type="float">
            <text:p>2,13E-3</text:p>
          </table:table-cell>
          <table:table-cell office:value-type="float" office:value="-24.3999996185303" calcext:value-type="float">
            <text:p>-2,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2999994619167" calcext:value-type="float">
            <text:p>2,13E-3</text:p>
          </table:table-cell>
          <table:table-cell office:value-type="float" office:value="-24.7999992370605" calcext:value-type="float">
            <text:p>-2,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3199994614115" calcext:value-type="float">
            <text:p>2,13E-3</text:p>
          </table:table-cell>
          <table:table-cell office:value-type="float" office:value="-25.2000007629395" calcext:value-type="float">
            <text:p>-2,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3399994609063" calcext:value-type="float">
            <text:p>2,13E-3</text:p>
          </table:table-cell>
          <table:table-cell office:value-type="float" office:value="-25.3999996185303" calcext:value-type="float">
            <text:p>-2,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359999460401" calcext:value-type="float">
            <text:p>2,14E-3</text:p>
          </table:table-cell>
          <table:table-cell office:value-type="float" office:value="-25.7999992370605" calcext:value-type="float">
            <text:p>-2,5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3799994598958" calcext:value-type="float">
            <text:p>2,14E-3</text:p>
          </table:table-cell>
          <table:table-cell office:value-type="float" office:value="-26.2000007629395" calcext:value-type="float">
            <text:p>-2,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3999994593905" calcext:value-type="float">
            <text:p>2,14E-3</text:p>
          </table:table-cell>
          <table:table-cell office:value-type="float" office:value="-26.6000003814697" calcext:value-type="float">
            <text:p>-2,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4199994588853" calcext:value-type="float">
            <text:p>2,14E-3</text:p>
          </table:table-cell>
          <table:table-cell office:value-type="float" office:value="-26.7999992370605" calcext:value-type="float">
            <text:p>-2,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43999945838" calcext:value-type="float">
            <text:p>2,14E-3</text:p>
          </table:table-cell>
          <table:table-cell office:value-type="float" office:value="-27.3999996185303" calcext:value-type="float">
            <text:p>-2,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4599994578748" calcext:value-type="float">
            <text:p>2,15E-3</text:p>
          </table:table-cell>
          <table:table-cell office:value-type="float" office:value="-27.3999996185303" calcext:value-type="float">
            <text:p>-2,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4799994573696" calcext:value-type="float">
            <text:p>2,15E-3</text:p>
          </table:table-cell>
          <table:table-cell office:value-type="float" office:value="-28" calcext:value-type="float">
            <text:p>-2,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4999994568643" calcext:value-type="float">
            <text:p>2,15E-3</text:p>
          </table:table-cell>
          <table:table-cell office:value-type="float" office:value="-28.3999996185303" calcext:value-type="float">
            <text:p>-2,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5199994563591" calcext:value-type="float">
            <text:p>2,15E-3</text:p>
          </table:table-cell>
          <table:table-cell office:value-type="float" office:value="-28.7999992370605" calcext:value-type="float">
            <text:p>-2,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5399994558538" calcext:value-type="float">
            <text:p>2,15E-3</text:p>
          </table:table-cell>
          <table:table-cell office:value-type="float" office:value="-29.3999996185303" calcext:value-type="float">
            <text:p>-2,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5599994553486" calcext:value-type="float">
            <text:p>2,16E-3</text:p>
          </table:table-cell>
          <table:table-cell office:value-type="float" office:value="-29.6000003814697" calcext:value-type="float">
            <text:p>-2,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5799994548433" calcext:value-type="float">
            <text:p>2,16E-3</text:p>
          </table:table-cell>
          <table:table-cell office:value-type="float" office:value="-29.6000003814697" calcext:value-type="float">
            <text:p>-2,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5999994543381" calcext:value-type="float">
            <text:p>2,16E-3</text:p>
          </table:table-cell>
          <table:table-cell office:value-type="float" office:value="-30.2000007629395" calcext:value-type="float">
            <text:p>-3,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6199994538329" calcext:value-type="float">
            <text:p>2,16E-3</text:p>
          </table:table-cell>
          <table:table-cell office:value-type="float" office:value="-30.6000003814697" calcext:value-type="float">
            <text:p>-3,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6399994533276" calcext:value-type="float">
            <text:p>2,16E-3</text:p>
          </table:table-cell>
          <table:table-cell office:value-type="float" office:value="-31" calcext:value-type="float">
            <text:p>-3,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6599994528224" calcext:value-type="float">
            <text:p>2,17E-3</text:p>
          </table:table-cell>
          <table:table-cell office:value-type="float" office:value="-31.2000007629395" calcext:value-type="float">
            <text:p>-3,1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6799994523171" calcext:value-type="float">
            <text:p>2,17E-3</text:p>
          </table:table-cell>
          <table:table-cell office:value-type="float" office:value="-31.7999992370605" calcext:value-type="float">
            <text:p>-3,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6999994518119" calcext:value-type="float">
            <text:p>2,17E-3</text:p>
          </table:table-cell>
          <table:table-cell office:value-type="float" office:value="-32.2000007629395" calcext:value-type="float">
            <text:p>-3,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7199994513066" calcext:value-type="float">
            <text:p>2,17E-3</text:p>
          </table:table-cell>
          <table:table-cell office:value-type="float" office:value="-32.4000015258789" calcext:value-type="float">
            <text:p>-3,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7399994508014" calcext:value-type="float">
            <text:p>2,17E-3</text:p>
          </table:table-cell>
          <table:table-cell office:value-type="float" office:value="-32.7999992370606" calcext:value-type="float">
            <text:p>-3,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7599994502962" calcext:value-type="float">
            <text:p>2,18E-3</text:p>
          </table:table-cell>
          <table:table-cell office:value-type="float" office:value="-33.2000007629395" calcext:value-type="float">
            <text:p>-3,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7799994497909" calcext:value-type="float">
            <text:p>2,18E-3</text:p>
          </table:table-cell>
          <table:table-cell office:value-type="float" office:value="-33.5999984741211" calcext:value-type="float">
            <text:p>-3,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7999994492857" calcext:value-type="float">
            <text:p>2,18E-3</text:p>
          </table:table-cell>
          <table:table-cell office:value-type="float" office:value="-34.2000007629395" calcext:value-type="float">
            <text:p>-3,4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8199994487804" calcext:value-type="float">
            <text:p>2,18E-3</text:p>
          </table:table-cell>
          <table:table-cell office:value-type="float" office:value="-34.4000015258789" calcext:value-type="float">
            <text:p>-3,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8399994482752" calcext:value-type="float">
            <text:p>2,18E-3</text:p>
          </table:table-cell>
          <table:table-cell office:value-type="float" office:value="-34.5999984741211" calcext:value-type="float">
            <text:p>-3,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85999944777" calcext:value-type="float">
            <text:p>2,19E-3</text:p>
          </table:table-cell>
          <table:table-cell office:value-type="float" office:value="-35.2000007629395" calcext:value-type="float">
            <text:p>-3,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8799994472647" calcext:value-type="float">
            <text:p>2,19E-3</text:p>
          </table:table-cell>
          <table:table-cell office:value-type="float" office:value="-35.4000015258789" calcext:value-type="float">
            <text:p>-3,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8999994467595" calcext:value-type="float">
            <text:p>2,19E-3</text:p>
          </table:table-cell>
          <table:table-cell office:value-type="float" office:value="-35.5999984741211" calcext:value-type="float">
            <text:p>-3,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9199994462542" calcext:value-type="float">
            <text:p>2,19E-3</text:p>
          </table:table-cell>
          <table:table-cell office:value-type="float" office:value="-36" calcext:value-type="float">
            <text:p>-3,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939999445749" calcext:value-type="float">
            <text:p>2,19E-3</text:p>
          </table:table-cell>
          <table:table-cell office:value-type="float" office:value="-36.4000015258789" calcext:value-type="float">
            <text:p>-3,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9599994452437" calcext:value-type="float">
            <text:p>2,20E-3</text:p>
          </table:table-cell>
          <table:table-cell office:value-type="float" office:value="-36.7999992370606" calcext:value-type="float">
            <text:p>-3,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9799994447385" calcext:value-type="float">
            <text:p>2,20E-3</text:p>
          </table:table-cell>
          <table:table-cell office:value-type="float" office:value="-37" calcext:value-type="float">
            <text:p>-3,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19999994442333" calcext:value-type="float">
            <text:p>2,20E-3</text:p>
          </table:table-cell>
          <table:table-cell office:value-type="float" office:value="-37.5999984741211" calcext:value-type="float">
            <text:p>-3,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019999443728" calcext:value-type="float">
            <text:p>2,20E-3</text:p>
          </table:table-cell>
          <table:table-cell office:value-type="float" office:value="-38" calcext:value-type="float">
            <text:p>-3,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0399994432228" calcext:value-type="float">
            <text:p>2,20E-3</text:p>
          </table:table-cell>
          <table:table-cell office:value-type="float" office:value="-38.4000015258789" calcext:value-type="float">
            <text:p>-3,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0599994427175" calcext:value-type="float">
            <text:p>2,21E-3</text:p>
          </table:table-cell>
          <table:table-cell office:value-type="float" office:value="-38.5999984741211" calcext:value-type="float">
            <text:p>-3,8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0799994422123" calcext:value-type="float">
            <text:p>2,21E-3</text:p>
          </table:table-cell>
          <table:table-cell office:value-type="float" office:value="-39" calcext:value-type="float">
            <text:p>-3,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099999441707" calcext:value-type="float">
            <text:p>2,21E-3</text:p>
          </table:table-cell>
          <table:table-cell office:value-type="float" office:value="-39.2000007629395" calcext:value-type="float">
            <text:p>-3,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1199994412018" calcext:value-type="float">
            <text:p>2,21E-3</text:p>
          </table:table-cell>
          <table:table-cell office:value-type="float" office:value="-39.4000015258789" calcext:value-type="float">
            <text:p>-3,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1399994406966" calcext:value-type="float">
            <text:p>2,21E-3</text:p>
          </table:table-cell>
          <table:table-cell office:value-type="float" office:value="-39.7999992370606" calcext:value-type="float">
            <text:p>-3,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1599994401913" calcext:value-type="float">
            <text:p>2,22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1799994396861" calcext:value-type="float">
            <text:p>2,22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1999994391808" calcext:value-type="float">
            <text:p>2,22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2199994386756" calcext:value-type="float">
            <text:p>2,22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2399994381703" calcext:value-type="float">
            <text:p>2,22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2599994376651" calcext:value-type="float">
            <text:p>2,23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2799994371599" calcext:value-type="float">
            <text:p>2,23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2999994366546" calcext:value-type="float">
            <text:p>2,23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3199994361494" calcext:value-type="float">
            <text:p>2,23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3399994356441" calcext:value-type="float">
            <text:p>2,23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3599994351389" calcext:value-type="float">
            <text:p>2,24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3799994346337" calcext:value-type="float">
            <text:p>2,24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3999994341284" calcext:value-type="float">
            <text:p>2,24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4199994336232" calcext:value-type="float">
            <text:p>2,24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4399994331179" calcext:value-type="float">
            <text:p>2,24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4599994326127" calcext:value-type="float">
            <text:p>2,25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4799994321074" calcext:value-type="float">
            <text:p>2,25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4999994316022" calcext:value-type="float">
            <text:p>2,25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5199994310969" calcext:value-type="float">
            <text:p>2,25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5399994305917" calcext:value-type="float">
            <text:p>2,25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5599994300865" calcext:value-type="float">
            <text:p>2,26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5799994295812" calcext:value-type="float">
            <text:p>2,26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599999429076" calcext:value-type="float">
            <text:p>2,26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6199994285707" calcext:value-type="float">
            <text:p>2,26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6399994280655" calcext:value-type="float">
            <text:p>2,26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6599994275603" calcext:value-type="float">
            <text:p>2,27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679999427055" calcext:value-type="float">
            <text:p>2,27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6999994265498" calcext:value-type="float">
            <text:p>2,27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7199994260445" calcext:value-type="float">
            <text:p>2,27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7399994255393" calcext:value-type="float">
            <text:p>2,27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759999425034" calcext:value-type="float">
            <text:p>2,28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7799994245288" calcext:value-type="float">
            <text:p>2,28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7999994240236" calcext:value-type="float">
            <text:p>2,28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8199994235183" calcext:value-type="float">
            <text:p>2,28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8399994230131" calcext:value-type="float">
            <text:p>2,28E-3</text:p>
          </table:table-cell>
          <table:table-cell office:value-type="float" office:value="-39.7999992370606" calcext:value-type="float">
            <text:p>-3,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8599994225078" calcext:value-type="float">
            <text:p>2,29E-3</text:p>
          </table:table-cell>
          <table:table-cell office:value-type="float" office:value="-39.5999984741211" calcext:value-type="float">
            <text:p>-3,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8799994220026" calcext:value-type="float">
            <text:p>2,29E-3</text:p>
          </table:table-cell>
          <table:table-cell office:value-type="float" office:value="-39.2000007629395" calcext:value-type="float">
            <text:p>-3,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8999994214973" calcext:value-type="float">
            <text:p>2,29E-3</text:p>
          </table:table-cell>
          <table:table-cell office:value-type="float" office:value="-39" calcext:value-type="float">
            <text:p>-3,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9199994209921" calcext:value-type="float">
            <text:p>2,29E-3</text:p>
          </table:table-cell>
          <table:table-cell office:value-type="float" office:value="-38.7999992370606" calcext:value-type="float">
            <text:p>-3,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9399994204869" calcext:value-type="float">
            <text:p>2,29E-3</text:p>
          </table:table-cell>
          <table:table-cell office:value-type="float" office:value="-38.2000007629395" calcext:value-type="float">
            <text:p>-3,8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9599994199816" calcext:value-type="float">
            <text:p>2,30E-3</text:p>
          </table:table-cell>
          <table:table-cell office:value-type="float" office:value="-38.2000007629395" calcext:value-type="float">
            <text:p>-3,8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9799994194764" calcext:value-type="float">
            <text:p>2,30E-3</text:p>
          </table:table-cell>
          <table:table-cell office:value-type="float" office:value="-37.5999984741211" calcext:value-type="float">
            <text:p>-3,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29999994189711" calcext:value-type="float">
            <text:p>2,30E-3</text:p>
          </table:table-cell>
          <table:table-cell office:value-type="float" office:value="-37.2000007629395" calcext:value-type="float">
            <text:p>-3,7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0199994184659" calcext:value-type="float">
            <text:p>2,30E-3</text:p>
          </table:table-cell>
          <table:table-cell office:value-type="float" office:value="-36.7999992370606" calcext:value-type="float">
            <text:p>-3,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0399994179606" calcext:value-type="float">
            <text:p>2,30E-3</text:p>
          </table:table-cell>
          <table:table-cell office:value-type="float" office:value="-36.5999984741211" calcext:value-type="float">
            <text:p>-3,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0599994174554" calcext:value-type="float">
            <text:p>2,31E-3</text:p>
          </table:table-cell>
          <table:table-cell office:value-type="float" office:value="-36.2000007629395" calcext:value-type="float">
            <text:p>-3,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0799994169502" calcext:value-type="float">
            <text:p>2,31E-3</text:p>
          </table:table-cell>
          <table:table-cell office:value-type="float" office:value="-35.5999984741211" calcext:value-type="float">
            <text:p>-3,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0999994164449" calcext:value-type="float">
            <text:p>2,31E-3</text:p>
          </table:table-cell>
          <table:table-cell office:value-type="float" office:value="-35.4000015258789" calcext:value-type="float">
            <text:p>-3,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1199994159397" calcext:value-type="float">
            <text:p>2,31E-3</text:p>
          </table:table-cell>
          <table:table-cell office:value-type="float" office:value="-35.2000007629395" calcext:value-type="float">
            <text:p>-3,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1399994154344" calcext:value-type="float">
            <text:p>2,31E-3</text:p>
          </table:table-cell>
          <table:table-cell office:value-type="float" office:value="-34.5999984741211" calcext:value-type="float">
            <text:p>-3,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1599994149292" calcext:value-type="float">
            <text:p>2,32E-3</text:p>
          </table:table-cell>
          <table:table-cell office:value-type="float" office:value="-34.4000015258789" calcext:value-type="float">
            <text:p>-3,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179999414424" calcext:value-type="float">
            <text:p>2,32E-3</text:p>
          </table:table-cell>
          <table:table-cell office:value-type="float" office:value="-34" calcext:value-type="float">
            <text:p>-3,4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1999994139187" calcext:value-type="float">
            <text:p>2,32E-3</text:p>
          </table:table-cell>
          <table:table-cell office:value-type="float" office:value="-33.5999984741211" calcext:value-type="float">
            <text:p>-3,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2199994134135" calcext:value-type="float">
            <text:p>2,32E-3</text:p>
          </table:table-cell>
          <table:table-cell office:value-type="float" office:value="-33.2000007629395" calcext:value-type="float">
            <text:p>-3,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2399994129082" calcext:value-type="float">
            <text:p>2,32E-3</text:p>
          </table:table-cell>
          <table:table-cell office:value-type="float" office:value="-32.7999992370606" calcext:value-type="float">
            <text:p>-3,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259999412403" calcext:value-type="float">
            <text:p>2,33E-3</text:p>
          </table:table-cell>
          <table:table-cell office:value-type="float" office:value="-32.5999984741211" calcext:value-type="float">
            <text:p>-3,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2799994118977" calcext:value-type="float">
            <text:p>2,33E-3</text:p>
          </table:table-cell>
          <table:table-cell office:value-type="float" office:value="-32.2000007629395" calcext:value-type="float">
            <text:p>-3,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2999994113925" calcext:value-type="float">
            <text:p>2,33E-3</text:p>
          </table:table-cell>
          <table:table-cell office:value-type="float" office:value="-32" calcext:value-type="float">
            <text:p>-3,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3199994108872" calcext:value-type="float">
            <text:p>2,33E-3</text:p>
          </table:table-cell>
          <table:table-cell office:value-type="float" office:value="-31.3999996185303" calcext:value-type="float">
            <text:p>-3,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339999410382" calcext:value-type="float">
            <text:p>2,33E-3</text:p>
          </table:table-cell>
          <table:table-cell office:value-type="float" office:value="-31" calcext:value-type="float">
            <text:p>-3,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3599994098768" calcext:value-type="float">
            <text:p>2,34E-3</text:p>
          </table:table-cell>
          <table:table-cell office:value-type="float" office:value="-30.7999992370605" calcext:value-type="float">
            <text:p>-3,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3799994093715" calcext:value-type="float">
            <text:p>2,34E-3</text:p>
          </table:table-cell>
          <table:table-cell office:value-type="float" office:value="-30.3999996185303" calcext:value-type="float">
            <text:p>-3,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3999994088663" calcext:value-type="float">
            <text:p>2,34E-3</text:p>
          </table:table-cell>
          <table:table-cell office:value-type="float" office:value="-29.7999992370605" calcext:value-type="float">
            <text:p>-2,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419999408361" calcext:value-type="float">
            <text:p>2,34E-3</text:p>
          </table:table-cell>
          <table:table-cell office:value-type="float" office:value="-29.6000003814697" calcext:value-type="float">
            <text:p>-2,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4399994078558" calcext:value-type="float">
            <text:p>2,34E-3</text:p>
          </table:table-cell>
          <table:table-cell office:value-type="float" office:value="-29.3999996185303" calcext:value-type="float">
            <text:p>-2,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4599994073506" calcext:value-type="float">
            <text:p>2,35E-3</text:p>
          </table:table-cell>
          <table:table-cell office:value-type="float" office:value="-29" calcext:value-type="float">
            <text:p>-2,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4799994068453" calcext:value-type="float">
            <text:p>2,35E-3</text:p>
          </table:table-cell>
          <table:table-cell office:value-type="float" office:value="-28.3999996185303" calcext:value-type="float">
            <text:p>-2,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4999994063401" calcext:value-type="float">
            <text:p>2,35E-3</text:p>
          </table:table-cell>
          <table:table-cell office:value-type="float" office:value="-28" calcext:value-type="float">
            <text:p>-2,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5199994058348" calcext:value-type="float">
            <text:p>2,35E-3</text:p>
          </table:table-cell>
          <table:table-cell office:value-type="float" office:value="-27.7999992370605" calcext:value-type="float">
            <text:p>-2,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5399994053296" calcext:value-type="float">
            <text:p>2,35E-3</text:p>
          </table:table-cell>
          <table:table-cell office:value-type="float" office:value="-27.3999996185303" calcext:value-type="float">
            <text:p>-2,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5599994048243" calcext:value-type="float">
            <text:p>2,36E-3</text:p>
          </table:table-cell>
          <table:table-cell office:value-type="float" office:value="-27" calcext:value-type="float">
            <text:p>-2,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5799994043191" calcext:value-type="float">
            <text:p>2,36E-3</text:p>
          </table:table-cell>
          <table:table-cell office:value-type="float" office:value="-26.6000003814697" calcext:value-type="float">
            <text:p>-2,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5999994038139" calcext:value-type="float">
            <text:p>2,36E-3</text:p>
          </table:table-cell>
          <table:table-cell office:value-type="float" office:value="-26.3999996185303" calcext:value-type="float">
            <text:p>-2,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6199994033086" calcext:value-type="float">
            <text:p>2,36E-3</text:p>
          </table:table-cell>
          <table:table-cell office:value-type="float" office:value="-26" calcext:value-type="float">
            <text:p>-2,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6399994028034" calcext:value-type="float">
            <text:p>2,36E-3</text:p>
          </table:table-cell>
          <table:table-cell office:value-type="float" office:value="-25.3999996185303" calcext:value-type="float">
            <text:p>-2,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6599994022981" calcext:value-type="float">
            <text:p>2,37E-3</text:p>
          </table:table-cell>
          <table:table-cell office:value-type="float" office:value="-25.2000007629395" calcext:value-type="float">
            <text:p>-2,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6799994017929" calcext:value-type="float">
            <text:p>2,37E-3</text:p>
          </table:table-cell>
          <table:table-cell office:value-type="float" office:value="-25" calcext:value-type="float">
            <text:p>-2,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6999994012876" calcext:value-type="float">
            <text:p>2,37E-3</text:p>
          </table:table-cell>
          <table:table-cell office:value-type="float" office:value="-24.6000003814697" calcext:value-type="float">
            <text:p>-2,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7199994007824" calcext:value-type="float">
            <text:p>2,37E-3</text:p>
          </table:table-cell>
          <table:table-cell office:value-type="float" office:value="-24" calcext:value-type="float">
            <text:p>-2,4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7399994002772" calcext:value-type="float">
            <text:p>2,37E-3</text:p>
          </table:table-cell>
          <table:table-cell office:value-type="float" office:value="-23.6000003814697" calcext:value-type="float">
            <text:p>-2,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7599993997719" calcext:value-type="float">
            <text:p>2,38E-3</text:p>
          </table:table-cell>
          <table:table-cell office:value-type="float" office:value="-23.3999996185303" calcext:value-type="float">
            <text:p>-2,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7799993992667" calcext:value-type="float">
            <text:p>2,38E-3</text:p>
          </table:table-cell>
          <table:table-cell office:value-type="float" office:value="-23" calcext:value-type="float">
            <text:p>-2,3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7999993987614" calcext:value-type="float">
            <text:p>2,38E-3</text:p>
          </table:table-cell>
          <table:table-cell office:value-type="float" office:value="-22.6000003814697" calcext:value-type="float">
            <text:p>-2,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8199993982562" calcext:value-type="float">
            <text:p>2,38E-3</text:p>
          </table:table-cell>
          <table:table-cell office:value-type="float" office:value="-22.2000007629395" calcext:value-type="float">
            <text:p>-2,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8399993977509" calcext:value-type="float">
            <text:p>2,38E-3</text:p>
          </table:table-cell>
          <table:table-cell office:value-type="float" office:value="-22" calcext:value-type="float">
            <text:p>-2,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8599993972457" calcext:value-type="float">
            <text:p>2,39E-3</text:p>
          </table:table-cell>
          <table:table-cell office:value-type="float" office:value="-21.7999992370605" calcext:value-type="float">
            <text:p>-2,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8799993967405" calcext:value-type="float">
            <text:p>2,39E-3</text:p>
          </table:table-cell>
          <table:table-cell office:value-type="float" office:value="-21.2000007629395" calcext:value-type="float">
            <text:p>-2,1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8999993962352" calcext:value-type="float">
            <text:p>2,39E-3</text:p>
          </table:table-cell>
          <table:table-cell office:value-type="float" office:value="-20.6000003814697" calcext:value-type="float">
            <text:p>-2,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91999939573" calcext:value-type="float">
            <text:p>2,39E-3</text:p>
          </table:table-cell>
          <table:table-cell office:value-type="float" office:value="-20.3999996185303" calcext:value-type="float">
            <text:p>-2,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9399993952247" calcext:value-type="float">
            <text:p>2,39E-3</text:p>
          </table:table-cell>
          <table:table-cell office:value-type="float" office:value="-20.2000007629395" calcext:value-type="float">
            <text:p>-2,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9599993947195" calcext:value-type="float">
            <text:p>2,40E-3</text:p>
          </table:table-cell>
          <table:table-cell office:value-type="float" office:value="-19.3999996185303" calcext:value-type="float">
            <text:p>-1,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9799993942143" calcext:value-type="float">
            <text:p>2,40E-3</text:p>
          </table:table-cell>
          <table:table-cell office:value-type="float" office:value="-19.3999996185303" calcext:value-type="float">
            <text:p>-1,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3999999393709" calcext:value-type="float">
            <text:p>2,40E-3</text:p>
          </table:table-cell>
          <table:table-cell office:value-type="float" office:value="-19" calcext:value-type="float">
            <text:p>-1,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0199993932038" calcext:value-type="float">
            <text:p>2,40E-3</text:p>
          </table:table-cell>
          <table:table-cell office:value-type="float" office:value="-18.3999996185303" calcext:value-type="float">
            <text:p>-1,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0399993926985" calcext:value-type="float">
            <text:p>2,40E-3</text:p>
          </table:table-cell>
          <table:table-cell office:value-type="float" office:value="-18.2000007629395" calcext:value-type="float">
            <text:p>-1,8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0599993921933" calcext:value-type="float">
            <text:p>2,41E-3</text:p>
          </table:table-cell>
          <table:table-cell office:value-type="float" office:value="-18" calcext:value-type="float">
            <text:p>-1,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079999391688" calcext:value-type="float">
            <text:p>2,41E-3</text:p>
          </table:table-cell>
          <table:table-cell office:value-type="float" office:value="-17.6000003814697" calcext:value-type="float">
            <text:p>-1,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0999993911828" calcext:value-type="float">
            <text:p>2,41E-3</text:p>
          </table:table-cell>
          <table:table-cell office:value-type="float" office:value="-17.2000007629395" calcext:value-type="float">
            <text:p>-1,7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1199993906775" calcext:value-type="float">
            <text:p>2,41E-3</text:p>
          </table:table-cell>
          <table:table-cell office:value-type="float" office:value="-16.6000003814697" calcext:value-type="float">
            <text:p>-1,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1399993901723" calcext:value-type="float">
            <text:p>2,41E-3</text:p>
          </table:table-cell>
          <table:table-cell office:value-type="float" office:value="-16.2000007629395" calcext:value-type="float">
            <text:p>-1,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1599993896671" calcext:value-type="float">
            <text:p>2,42E-3</text:p>
          </table:table-cell>
          <table:table-cell office:value-type="float" office:value="-16" calcext:value-type="float">
            <text:p>-1,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1799993891618" calcext:value-type="float">
            <text:p>2,42E-3</text:p>
          </table:table-cell>
          <table:table-cell office:value-type="float" office:value="-15.6000003814697" calcext:value-type="float">
            <text:p>-1,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1999993886566" calcext:value-type="float">
            <text:p>2,42E-3</text:p>
          </table:table-cell>
          <table:table-cell office:value-type="float" office:value="-15.1999998092651" calcext:value-type="float">
            <text:p>-1,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2199993881513" calcext:value-type="float">
            <text:p>2,42E-3</text:p>
          </table:table-cell>
          <table:table-cell office:value-type="float" office:value="-15" calcext:value-type="float">
            <text:p>-1,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2399993876461" calcext:value-type="float">
            <text:p>2,42E-3</text:p>
          </table:table-cell>
          <table:table-cell office:value-type="float" office:value="-14.6000003814697" calcext:value-type="float">
            <text:p>-1,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2599993871409" calcext:value-type="float">
            <text:p>2,43E-3</text:p>
          </table:table-cell>
          <table:table-cell office:value-type="float" office:value="-14.3999996185303" calcext:value-type="float">
            <text:p>-1,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2799993866356" calcext:value-type="float">
            <text:p>2,43E-3</text:p>
          </table:table-cell>
          <table:table-cell office:value-type="float" office:value="-13.8000001907349" calcext:value-type="float">
            <text:p>-1,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2999993861304" calcext:value-type="float">
            <text:p>2,43E-3</text:p>
          </table:table-cell>
          <table:table-cell office:value-type="float" office:value="-13.6000003814697" calcext:value-type="float">
            <text:p>-1,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3199993856251" calcext:value-type="float">
            <text:p>2,43E-3</text:p>
          </table:table-cell>
          <table:table-cell office:value-type="float" office:value="-13.1999998092651" calcext:value-type="float">
            <text:p>-1,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3399993851199" calcext:value-type="float">
            <text:p>2,43E-3</text:p>
          </table:table-cell>
          <table:table-cell office:value-type="float" office:value="-12.8000001907349" calcext:value-type="float">
            <text:p>-1,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3599993846146" calcext:value-type="float">
            <text:p>2,44E-3</text:p>
          </table:table-cell>
          <table:table-cell office:value-type="float" office:value="-12.3999996185303" calcext:value-type="float">
            <text:p>-1,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3799993841094" calcext:value-type="float">
            <text:p>2,44E-3</text:p>
          </table:table-cell>
          <table:table-cell office:value-type="float" office:value="-11.8000001907349" calcext:value-type="float">
            <text:p>-1,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3999993836042" calcext:value-type="float">
            <text:p>2,44E-3</text:p>
          </table:table-cell>
          <table:table-cell office:value-type="float" office:value="-11.6000003814697" calcext:value-type="float">
            <text:p>-1,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4199993830989" calcext:value-type="float">
            <text:p>2,44E-3</text:p>
          </table:table-cell>
          <table:table-cell office:value-type="float" office:value="-11.3999996185303" calcext:value-type="float">
            <text:p>-1,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4399993825937" calcext:value-type="float">
            <text:p>2,44E-3</text:p>
          </table:table-cell>
          <table:table-cell office:value-type="float" office:value="-10.8000001907349" calcext:value-type="float">
            <text:p>-1,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4599993820884" calcext:value-type="float">
            <text:p>2,45E-3</text:p>
          </table:table-cell>
          <table:table-cell office:value-type="float" office:value="-10.3999996185303" calcext:value-type="float">
            <text:p>-1,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4799993815832" calcext:value-type="float">
            <text:p>2,45E-3</text:p>
          </table:table-cell>
          <table:table-cell office:value-type="float" office:value="-10" calcext:value-type="float">
            <text:p>-1,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4999993810779" calcext:value-type="float">
            <text:p>2,45E-3</text:p>
          </table:table-cell>
          <table:table-cell office:value-type="float" office:value="-9.60000038146973" calcext:value-type="float">
            <text:p>-9,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5199993805727" calcext:value-type="float">
            <text:p>2,45E-3</text:p>
          </table:table-cell>
          <table:table-cell office:value-type="float" office:value="-9" calcext:value-type="float">
            <text:p>-9,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5399993800675" calcext:value-type="float">
            <text:p>2,45E-3</text:p>
          </table:table-cell>
          <table:table-cell office:value-type="float" office:value="-9" calcext:value-type="float">
            <text:p>-9,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5599993795622" calcext:value-type="float">
            <text:p>2,46E-3</text:p>
          </table:table-cell>
          <table:table-cell office:value-type="float" office:value="-8.80000019073486" calcext:value-type="float">
            <text:p>-8,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579999379057" calcext:value-type="float">
            <text:p>2,46E-3</text:p>
          </table:table-cell>
          <table:table-cell office:value-type="float" office:value="-8.60000038146973" calcext:value-type="float">
            <text:p>-8,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5999993785517" calcext:value-type="float">
            <text:p>2,46E-3</text:p>
          </table:table-cell>
          <table:table-cell office:value-type="float" office:value="-7.80000019073486" calcext:value-type="float">
            <text:p>-7,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6199993780465" calcext:value-type="float">
            <text:p>2,46E-3</text:p>
          </table:table-cell>
          <table:table-cell office:value-type="float" office:value="-7.40000009536743" calcext:value-type="float">
            <text:p>-7,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6399993775412" calcext:value-type="float">
            <text:p>2,46E-3</text:p>
          </table:table-cell>
          <table:table-cell office:value-type="float" office:value="-7" calcext:value-type="float">
            <text:p>-7,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659999377036" calcext:value-type="float">
            <text:p>2,47E-3</text:p>
          </table:table-cell>
          <table:table-cell office:value-type="float" office:value="-6.80000019073486" calcext:value-type="float">
            <text:p>-6,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6799993765308" calcext:value-type="float">
            <text:p>2,47E-3</text:p>
          </table:table-cell>
          <table:table-cell office:value-type="float" office:value="-6.40000009536743" calcext:value-type="float">
            <text:p>-6,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6999993760255" calcext:value-type="float">
            <text:p>2,47E-3</text:p>
          </table:table-cell>
          <table:table-cell office:value-type="float" office:value="-6.19999980926514" calcext:value-type="float">
            <text:p>-6,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7199993755203" calcext:value-type="float">
            <text:p>2,47E-3</text:p>
          </table:table-cell>
          <table:table-cell office:value-type="float" office:value="-5.80000019073486" calcext:value-type="float">
            <text:p>-5,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739999375015" calcext:value-type="float">
            <text:p>2,47E-3</text:p>
          </table:table-cell>
          <table:table-cell office:value-type="float" office:value="-5.19999980926514" calcext:value-type="float">
            <text:p>-5,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7599993745098" calcext:value-type="float">
            <text:p>2,48E-3</text:p>
          </table:table-cell>
          <table:table-cell office:value-type="float" office:value="-4.80000019073486" calcext:value-type="float">
            <text:p>-4,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7799993740046" calcext:value-type="float">
            <text:p>2,48E-3</text:p>
          </table:table-cell>
          <table:table-cell office:value-type="float" office:value="-4.59999990463257" calcext:value-type="float">
            <text:p>-4,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7999993734993" calcext:value-type="float">
            <text:p>2,48E-3</text:p>
          </table:table-cell>
          <table:table-cell office:value-type="float" office:value="-4.19999980926514" calcext:value-type="float">
            <text:p>-4,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8199993729941" calcext:value-type="float">
            <text:p>2,48E-3</text:p>
          </table:table-cell>
          <table:table-cell office:value-type="float" office:value="-4" calcext:value-type="float">
            <text:p>-4,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8399993724888" calcext:value-type="float">
            <text:p>2,48E-3</text:p>
          </table:table-cell>
          <table:table-cell office:value-type="float" office:value="-3.40000009536743" calcext:value-type="float">
            <text:p>-3,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8599993719836" calcext:value-type="float">
            <text:p>2,49E-3</text:p>
          </table:table-cell>
          <table:table-cell office:value-type="float" office:value="-3.20000004768372" calcext:value-type="float">
            <text:p>-3,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8799993714783" calcext:value-type="float">
            <text:p>2,49E-3</text:p>
          </table:table-cell>
          <table:table-cell office:value-type="float" office:value="-2.79999995231628" calcext:value-type="float">
            <text:p>-2,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8999993709731" calcext:value-type="float">
            <text:p>2,49E-3</text:p>
          </table:table-cell>
          <table:table-cell office:value-type="float" office:value="-2.40000009536743" calcext:value-type="float">
            <text:p>-2,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9199993704678" calcext:value-type="float">
            <text:p>2,49E-3</text:p>
          </table:table-cell>
          <table:table-cell office:value-type="float" office:value="-2" calcext:value-type="float">
            <text:p>-2,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9399993699626" calcext:value-type="float">
            <text:p>2,49E-3</text:p>
          </table:table-cell>
          <table:table-cell office:value-type="float" office:value="-1.79999995231628" calcext:value-type="float">
            <text:p>-1,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9599993694574" calcext:value-type="float">
            <text:p>2,50E-3</text:p>
          </table:table-cell>
          <table:table-cell office:value-type="float" office:value="-1.39999997615814" calcext:value-type="float">
            <text:p>-1,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9799993689521" calcext:value-type="float">
            <text:p>2,50E-3</text:p>
          </table:table-cell>
          <table:table-cell office:value-type="float" office:value="-0.800000011920929" calcext:value-type="float">
            <text:p>-8,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49999993684469" calcext:value-type="float">
            <text:p>2,50E-3</text:p>
          </table:table-cell>
          <table:table-cell office:value-type="float" office:value="-0.400000005960465"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0199993679416" calcext:value-type="float">
            <text:p>2,50E-3</text:p>
          </table:table-cell>
          <table:table-cell office:value-type="float" office:value="0" calcext:value-type="float">
            <text:p>0,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0399993674364" calcext:value-type="float">
            <text:p>2,50E-3</text:p>
          </table:table-cell>
          <table:table-cell office:value-type="float" office:value="0.200000002980232" calcext:value-type="float">
            <text:p>2,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0599993669312" calcext:value-type="float">
            <text:p>2,51E-3</text:p>
          </table:table-cell>
          <table:table-cell office:value-type="float" office:value="0.600000023841858" calcext:value-type="float">
            <text:p>6,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0799993664259" calcext:value-type="float">
            <text:p>2,51E-3</text:p>
          </table:table-cell>
          <table:table-cell office:value-type="float" office:value="1" calcext:value-type="float">
            <text:p>1,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0999993659207" calcext:value-type="float">
            <text:p>2,51E-3</text:p>
          </table:table-cell>
          <table:table-cell office:value-type="float" office:value="1.20000004768372" calcext:value-type="float">
            <text:p>1,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1199993654154" calcext:value-type="float">
            <text:p>2,51E-3</text:p>
          </table:table-cell>
          <table:table-cell office:value-type="float" office:value="1.60000002384186" calcext:value-type="float">
            <text:p>1,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1399993649102" calcext:value-type="float">
            <text:p>2,51E-3</text:p>
          </table:table-cell>
          <table:table-cell office:value-type="float" office:value="2.20000004768372" calcext:value-type="float">
            <text:p>2,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1599993644049" calcext:value-type="float">
            <text:p>2,52E-3</text:p>
          </table:table-cell>
          <table:table-cell office:value-type="float" office:value="2.40000009536743" calcext:value-type="float">
            <text:p>2,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1799993638997" calcext:value-type="float">
            <text:p>2,52E-3</text:p>
          </table:table-cell>
          <table:table-cell office:value-type="float" office:value="2.59999990463257" calcext:value-type="float">
            <text:p>2,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1999993633945" calcext:value-type="float">
            <text:p>2,52E-3</text:p>
          </table:table-cell>
          <table:table-cell office:value-type="float" office:value="3" calcext:value-type="float">
            <text:p>3,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2199993628892" calcext:value-type="float">
            <text:p>2,52E-3</text:p>
          </table:table-cell>
          <table:table-cell office:value-type="float" office:value="3.40000009536743" calcext:value-type="float">
            <text:p>3,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239999362384" calcext:value-type="float">
            <text:p>2,52E-3</text:p>
          </table:table-cell>
          <table:table-cell office:value-type="float" office:value="4" calcext:value-type="float">
            <text:p>4,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2599993618787" calcext:value-type="float">
            <text:p>2,53E-3</text:p>
          </table:table-cell>
          <table:table-cell office:value-type="float" office:value="4.19999980926514" calcext:value-type="float">
            <text:p>4,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2799993613735" calcext:value-type="float">
            <text:p>2,53E-3</text:p>
          </table:table-cell>
          <table:table-cell office:value-type="float" office:value="4.59999990463257" calcext:value-type="float">
            <text:p>4,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2999993608682" calcext:value-type="float">
            <text:p>2,53E-3</text:p>
          </table:table-cell>
          <table:table-cell office:value-type="float" office:value="5" calcext:value-type="float">
            <text:p>5,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319999360363" calcext:value-type="float">
            <text:p>2,53E-3</text:p>
          </table:table-cell>
          <table:table-cell office:value-type="float" office:value="5.40000009536743" calcext:value-type="float">
            <text:p>5,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3399993598578" calcext:value-type="float">
            <text:p>2,53E-3</text:p>
          </table:table-cell>
          <table:table-cell office:value-type="float" office:value="5.80000019073486" calcext:value-type="float">
            <text:p>5,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3599993593525" calcext:value-type="float">
            <text:p>2,54E-3</text:p>
          </table:table-cell>
          <table:table-cell office:value-type="float" office:value="6" calcext:value-type="float">
            <text:p>6,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3799993588473" calcext:value-type="float">
            <text:p>2,54E-3</text:p>
          </table:table-cell>
          <table:table-cell office:value-type="float" office:value="6.59999990463257" calcext:value-type="float">
            <text:p>6,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399999358342" calcext:value-type="float">
            <text:p>2,54E-3</text:p>
          </table:table-cell>
          <table:table-cell office:value-type="float" office:value="7.19999980926514" calcext:value-type="float">
            <text:p>7,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4199993578368" calcext:value-type="float">
            <text:p>2,54E-3</text:p>
          </table:table-cell>
          <table:table-cell office:value-type="float" office:value="7.19999980926514" calcext:value-type="float">
            <text:p>7,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4399993573315" calcext:value-type="float">
            <text:p>2,54E-3</text:p>
          </table:table-cell>
          <table:table-cell office:value-type="float" office:value="7.59999990463257" calcext:value-type="float">
            <text:p>7,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4599993568263" calcext:value-type="float">
            <text:p>2,55E-3</text:p>
          </table:table-cell>
          <table:table-cell office:value-type="float" office:value="8" calcext:value-type="float">
            <text:p>8,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4799993563211" calcext:value-type="float">
            <text:p>2,55E-3</text:p>
          </table:table-cell>
          <table:table-cell office:value-type="float" office:value="8.60000038146973" calcext:value-type="float">
            <text:p>8,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4999993558158" calcext:value-type="float">
            <text:p>2,55E-3</text:p>
          </table:table-cell>
          <table:table-cell office:value-type="float" office:value="8.80000019073486" calcext:value-type="float">
            <text:p>8,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5199993553106" calcext:value-type="float">
            <text:p>2,55E-3</text:p>
          </table:table-cell>
          <table:table-cell office:value-type="float" office:value="9" calcext:value-type="float">
            <text:p>9,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5399993548053" calcext:value-type="float">
            <text:p>2,55E-3</text:p>
          </table:table-cell>
          <table:table-cell office:value-type="float" office:value="9.39999961853027" calcext:value-type="float">
            <text:p>9,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5599993543001" calcext:value-type="float">
            <text:p>2,56E-3</text:p>
          </table:table-cell>
          <table:table-cell office:value-type="float" office:value="9.80000019073486" calcext:value-type="float">
            <text:p>9,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5799993537949" calcext:value-type="float">
            <text:p>2,56E-3</text:p>
          </table:table-cell>
          <table:table-cell office:value-type="float" office:value="10.1999998092651" calcext:value-type="float">
            <text:p>1,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5999993532896" calcext:value-type="float">
            <text:p>2,56E-3</text:p>
          </table:table-cell>
          <table:table-cell office:value-type="float" office:value="10.6000003814697" calcext:value-type="float">
            <text:p>1,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6199993527844" calcext:value-type="float">
            <text:p>2,56E-3</text:p>
          </table:table-cell>
          <table:table-cell office:value-type="float" office:value="10.8000001907349" calcext:value-type="float">
            <text:p>1,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6399993522791" calcext:value-type="float">
            <text:p>2,56E-3</text:p>
          </table:table-cell>
          <table:table-cell office:value-type="float" office:value="11.3999996185303" calcext:value-type="float">
            <text:p>1,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6599993517739" calcext:value-type="float">
            <text:p>2,57E-3</text:p>
          </table:table-cell>
          <table:table-cell office:value-type="float" office:value="11.6000003814697" calcext:value-type="float">
            <text:p>1,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6799993512686" calcext:value-type="float">
            <text:p>2,57E-3</text:p>
          </table:table-cell>
          <table:table-cell office:value-type="float" office:value="12" calcext:value-type="float">
            <text:p>1,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6999993507634" calcext:value-type="float">
            <text:p>2,57E-3</text:p>
          </table:table-cell>
          <table:table-cell office:value-type="float" office:value="12.3999996185303" calcext:value-type="float">
            <text:p>1,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7199993502581" calcext:value-type="float">
            <text:p>2,57E-3</text:p>
          </table:table-cell>
          <table:table-cell office:value-type="float" office:value="13" calcext:value-type="float">
            <text:p>1,3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7399993497529" calcext:value-type="float">
            <text:p>2,57E-3</text:p>
          </table:table-cell>
          <table:table-cell office:value-type="float" office:value="13.3999996185303" calcext:value-type="float">
            <text:p>1,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7599993492477" calcext:value-type="float">
            <text:p>2,58E-3</text:p>
          </table:table-cell>
          <table:table-cell office:value-type="float" office:value="13.6000003814697" calcext:value-type="float">
            <text:p>1,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7799993487424" calcext:value-type="float">
            <text:p>2,58E-3</text:p>
          </table:table-cell>
          <table:table-cell office:value-type="float" office:value="13.8000001907349" calcext:value-type="float">
            <text:p>1,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7999993482372" calcext:value-type="float">
            <text:p>2,58E-3</text:p>
          </table:table-cell>
          <table:table-cell office:value-type="float" office:value="14.3999996185303" calcext:value-type="float">
            <text:p>1,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8199993477319" calcext:value-type="float">
            <text:p>2,58E-3</text:p>
          </table:table-cell>
          <table:table-cell office:value-type="float" office:value="14.6000003814697" calcext:value-type="float">
            <text:p>1,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8399993472267" calcext:value-type="float">
            <text:p>2,58E-3</text:p>
          </table:table-cell>
          <table:table-cell office:value-type="float" office:value="14.8000001907349" calcext:value-type="float">
            <text:p>1,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8599993467215" calcext:value-type="float">
            <text:p>2,59E-3</text:p>
          </table:table-cell>
          <table:table-cell office:value-type="float" office:value="15.3999996185303" calcext:value-type="float">
            <text:p>1,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8799993462162" calcext:value-type="float">
            <text:p>2,59E-3</text:p>
          </table:table-cell>
          <table:table-cell office:value-type="float" office:value="15.8000001907349" calcext:value-type="float">
            <text:p>1,5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899999345711" calcext:value-type="float">
            <text:p>2,59E-3</text:p>
          </table:table-cell>
          <table:table-cell office:value-type="float" office:value="16.2000007629395" calcext:value-type="float">
            <text:p>1,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9199993452057" calcext:value-type="float">
            <text:p>2,59E-3</text:p>
          </table:table-cell>
          <table:table-cell office:value-type="float" office:value="16.3999996185303" calcext:value-type="float">
            <text:p>1,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9399993447005" calcext:value-type="float">
            <text:p>2,59E-3</text:p>
          </table:table-cell>
          <table:table-cell office:value-type="float" office:value="16.7999992370605" calcext:value-type="float">
            <text:p>1,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9599993441952" calcext:value-type="float">
            <text:p>2,60E-3</text:p>
          </table:table-cell>
          <table:table-cell office:value-type="float" office:value="17.2000007629395" calcext:value-type="float">
            <text:p>1,7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97999934369" calcext:value-type="float">
            <text:p>2,60E-3</text:p>
          </table:table-cell>
          <table:table-cell office:value-type="float" office:value="17.6000003814697" calcext:value-type="float">
            <text:p>1,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59999993431848" calcext:value-type="float">
            <text:p>2,60E-3</text:p>
          </table:table-cell>
          <table:table-cell office:value-type="float" office:value="17.7999992370605" calcext:value-type="float">
            <text:p>1,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0199993426795" calcext:value-type="float">
            <text:p>2,60E-3</text:p>
          </table:table-cell>
          <table:table-cell office:value-type="float" office:value="18.3999996185303" calcext:value-type="float">
            <text:p>1,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0399993421743" calcext:value-type="float">
            <text:p>2,60E-3</text:p>
          </table:table-cell>
          <table:table-cell office:value-type="float" office:value="18.6000003814697" calcext:value-type="float">
            <text:p>1,8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059999341669" calcext:value-type="float">
            <text:p>2,61E-3</text:p>
          </table:table-cell>
          <table:table-cell office:value-type="float" office:value="19" calcext:value-type="float">
            <text:p>1,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0799993411638" calcext:value-type="float">
            <text:p>2,61E-3</text:p>
          </table:table-cell>
          <table:table-cell office:value-type="float" office:value="19.3999996185303" calcext:value-type="float">
            <text:p>1,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0999993406585" calcext:value-type="float">
            <text:p>2,61E-3</text:p>
          </table:table-cell>
          <table:table-cell office:value-type="float" office:value="19.7999992370605" calcext:value-type="float">
            <text:p>1,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1199993401533" calcext:value-type="float">
            <text:p>2,61E-3</text:p>
          </table:table-cell>
          <table:table-cell office:value-type="float" office:value="20.3999996185303" calcext:value-type="float">
            <text:p>2,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1399993396481" calcext:value-type="float">
            <text:p>2,61E-3</text:p>
          </table:table-cell>
          <table:table-cell office:value-type="float" office:value="20.6000003814697" calcext:value-type="float">
            <text:p>2,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1599993391428" calcext:value-type="float">
            <text:p>2,62E-3</text:p>
          </table:table-cell>
          <table:table-cell office:value-type="float" office:value="20.7999992370605" calcext:value-type="float">
            <text:p>2,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1799993386376" calcext:value-type="float">
            <text:p>2,62E-3</text:p>
          </table:table-cell>
          <table:table-cell office:value-type="float" office:value="21.2000007629395" calcext:value-type="float">
            <text:p>2,1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1999993381323" calcext:value-type="float">
            <text:p>2,62E-3</text:p>
          </table:table-cell>
          <table:table-cell office:value-type="float" office:value="21.7999992370605" calcext:value-type="float">
            <text:p>2,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2199993376271" calcext:value-type="float">
            <text:p>2,62E-3</text:p>
          </table:table-cell>
          <table:table-cell office:value-type="float" office:value="22" calcext:value-type="float">
            <text:p>2,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2399993371218" calcext:value-type="float">
            <text:p>2,62E-3</text:p>
          </table:table-cell>
          <table:table-cell office:value-type="float" office:value="22.3999996185303" calcext:value-type="float">
            <text:p>2,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2599993366166" calcext:value-type="float">
            <text:p>2,63E-3</text:p>
          </table:table-cell>
          <table:table-cell office:value-type="float" office:value="23" calcext:value-type="float">
            <text:p>2,3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2799993361114" calcext:value-type="float">
            <text:p>2,63E-3</text:p>
          </table:table-cell>
          <table:table-cell office:value-type="float" office:value="23.2000007629395" calcext:value-type="float">
            <text:p>2,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2999993356061" calcext:value-type="float">
            <text:p>2,63E-3</text:p>
          </table:table-cell>
          <table:table-cell office:value-type="float" office:value="23.3999996185303" calcext:value-type="float">
            <text:p>2,3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3199993351009" calcext:value-type="float">
            <text:p>2,63E-3</text:p>
          </table:table-cell>
          <table:table-cell office:value-type="float" office:value="23.7999992370605" calcext:value-type="float">
            <text:p>2,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3399993345956" calcext:value-type="float">
            <text:p>2,63E-3</text:p>
          </table:table-cell>
          <table:table-cell office:value-type="float" office:value="24.2000007629395" calcext:value-type="float">
            <text:p>2,4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3599993340904" calcext:value-type="float">
            <text:p>2,64E-3</text:p>
          </table:table-cell>
          <table:table-cell office:value-type="float" office:value="24.7999992370605" calcext:value-type="float">
            <text:p>2,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3799993335852" calcext:value-type="float">
            <text:p>2,64E-3</text:p>
          </table:table-cell>
          <table:table-cell office:value-type="float" office:value="25" calcext:value-type="float">
            <text:p>2,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3999993330799" calcext:value-type="float">
            <text:p>2,64E-3</text:p>
          </table:table-cell>
          <table:table-cell office:value-type="float" office:value="25.6000003814697" calcext:value-type="float">
            <text:p>2,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4199993325747" calcext:value-type="float">
            <text:p>2,64E-3</text:p>
          </table:table-cell>
          <table:table-cell office:value-type="float" office:value="25.6000003814697" calcext:value-type="float">
            <text:p>2,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4399993320694" calcext:value-type="float">
            <text:p>2,64E-3</text:p>
          </table:table-cell>
          <table:table-cell office:value-type="float" office:value="26.2000007629395" calcext:value-type="float">
            <text:p>2,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4599993315642" calcext:value-type="float">
            <text:p>2,65E-3</text:p>
          </table:table-cell>
          <table:table-cell office:value-type="float" office:value="26.6000003814697" calcext:value-type="float">
            <text:p>2,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4799993310589" calcext:value-type="float">
            <text:p>2,65E-3</text:p>
          </table:table-cell>
          <table:table-cell office:value-type="float" office:value="26.7999992370605" calcext:value-type="float">
            <text:p>2,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4999993305537" calcext:value-type="float">
            <text:p>2,65E-3</text:p>
          </table:table-cell>
          <table:table-cell office:value-type="float" office:value="27.2000007629395" calcext:value-type="float">
            <text:p>2,7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5199993300484" calcext:value-type="float">
            <text:p>2,65E-3</text:p>
          </table:table-cell>
          <table:table-cell office:value-type="float" office:value="27.6000003814697" calcext:value-type="float">
            <text:p>2,7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5399993295432" calcext:value-type="float">
            <text:p>2,65E-3</text:p>
          </table:table-cell>
          <table:table-cell office:value-type="float" office:value="28" calcext:value-type="float">
            <text:p>2,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559999329038" calcext:value-type="float">
            <text:p>2,66E-3</text:p>
          </table:table-cell>
          <table:table-cell office:value-type="float" office:value="28.3999996185303" calcext:value-type="float">
            <text:p>2,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5799993285327" calcext:value-type="float">
            <text:p>2,66E-3</text:p>
          </table:table-cell>
          <table:table-cell office:value-type="float" office:value="29" calcext:value-type="float">
            <text:p>2,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5999993280275" calcext:value-type="float">
            <text:p>2,66E-3</text:p>
          </table:table-cell>
          <table:table-cell office:value-type="float" office:value="29.2000007629395" calcext:value-type="float">
            <text:p>2,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6199993275222" calcext:value-type="float">
            <text:p>2,66E-3</text:p>
          </table:table-cell>
          <table:table-cell office:value-type="float" office:value="29.6000003814697" calcext:value-type="float">
            <text:p>2,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639999327017" calcext:value-type="float">
            <text:p>2,66E-3</text:p>
          </table:table-cell>
          <table:table-cell office:value-type="float" office:value="29.7999992370605" calcext:value-type="float">
            <text:p>2,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6599993265118" calcext:value-type="float">
            <text:p>2,67E-3</text:p>
          </table:table-cell>
          <table:table-cell office:value-type="float" office:value="30.2000007629395" calcext:value-type="float">
            <text:p>3,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6799993260065" calcext:value-type="float">
            <text:p>2,67E-3</text:p>
          </table:table-cell>
          <table:table-cell office:value-type="float" office:value="30.6000003814697" calcext:value-type="float">
            <text:p>3,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6999993255013" calcext:value-type="float">
            <text:p>2,67E-3</text:p>
          </table:table-cell>
          <table:table-cell office:value-type="float" office:value="31" calcext:value-type="float">
            <text:p>3,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719999324996" calcext:value-type="float">
            <text:p>2,67E-3</text:p>
          </table:table-cell>
          <table:table-cell office:value-type="float" office:value="31.3999996185303" calcext:value-type="float">
            <text:p>3,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7399993244908" calcext:value-type="float">
            <text:p>2,67E-3</text:p>
          </table:table-cell>
          <table:table-cell office:value-type="float" office:value="32" calcext:value-type="float">
            <text:p>3,2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7599993239855" calcext:value-type="float">
            <text:p>2,68E-3</text:p>
          </table:table-cell>
          <table:table-cell office:value-type="float" office:value="32.2000007629395" calcext:value-type="float">
            <text:p>3,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7799993234803" calcext:value-type="float">
            <text:p>2,68E-3</text:p>
          </table:table-cell>
          <table:table-cell office:value-type="float" office:value="32.4000015258789" calcext:value-type="float">
            <text:p>3,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7999993229751" calcext:value-type="float">
            <text:p>2,68E-3</text:p>
          </table:table-cell>
          <table:table-cell office:value-type="float" office:value="32.5999984741211" calcext:value-type="float">
            <text:p>3,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8199993224698" calcext:value-type="float">
            <text:p>2,68E-3</text:p>
          </table:table-cell>
          <table:table-cell office:value-type="float" office:value="33" calcext:value-type="float">
            <text:p>3,3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8399993219646" calcext:value-type="float">
            <text:p>2,68E-3</text:p>
          </table:table-cell>
          <table:table-cell office:value-type="float" office:value="33.5999984741211" calcext:value-type="float">
            <text:p>3,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8599993214593" calcext:value-type="float">
            <text:p>2,69E-3</text:p>
          </table:table-cell>
          <table:table-cell office:value-type="float" office:value="34" calcext:value-type="float">
            <text:p>3,4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8799993209541" calcext:value-type="float">
            <text:p>2,69E-3</text:p>
          </table:table-cell>
          <table:table-cell office:value-type="float" office:value="34.4000015258789" calcext:value-type="float">
            <text:p>3,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8999993204488" calcext:value-type="float">
            <text:p>2,69E-3</text:p>
          </table:table-cell>
          <table:table-cell office:value-type="float" office:value="34.7999992370606" calcext:value-type="float">
            <text:p>3,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9199993199436" calcext:value-type="float">
            <text:p>2,69E-3</text:p>
          </table:table-cell>
          <table:table-cell office:value-type="float" office:value="35" calcext:value-type="float">
            <text:p>3,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9399993194384" calcext:value-type="float">
            <text:p>2,69E-3</text:p>
          </table:table-cell>
          <table:table-cell office:value-type="float" office:value="35.4000015258789" calcext:value-type="float">
            <text:p>3,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9599993189331" calcext:value-type="float">
            <text:p>2,70E-3</text:p>
          </table:table-cell>
          <table:table-cell office:value-type="float" office:value="35.7999992370606" calcext:value-type="float">
            <text:p>3,5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9799993184279" calcext:value-type="float">
            <text:p>2,70E-3</text:p>
          </table:table-cell>
          <table:table-cell office:value-type="float" office:value="36.2000007629395" calcext:value-type="float">
            <text:p>3,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69999993179226" calcext:value-type="float">
            <text:p>2,70E-3</text:p>
          </table:table-cell>
          <table:table-cell office:value-type="float" office:value="36.5999984741211" calcext:value-type="float">
            <text:p>3,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0199993174174" calcext:value-type="float">
            <text:p>2,70E-3</text:p>
          </table:table-cell>
          <table:table-cell office:value-type="float" office:value="37" calcext:value-type="float">
            <text:p>3,7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0399993169121" calcext:value-type="float">
            <text:p>2,70E-3</text:p>
          </table:table-cell>
          <table:table-cell office:value-type="float" office:value="37.2000007629395" calcext:value-type="float">
            <text:p>3,7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0599993164069" calcext:value-type="float">
            <text:p>2,71E-3</text:p>
          </table:table-cell>
          <table:table-cell office:value-type="float" office:value="37.4000015258789" calcext:value-type="float">
            <text:p>3,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0799993159017" calcext:value-type="float">
            <text:p>2,71E-3</text:p>
          </table:table-cell>
          <table:table-cell office:value-type="float" office:value="38" calcext:value-type="float">
            <text:p>3,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0999993153964" calcext:value-type="float">
            <text:p>2,71E-3</text:p>
          </table:table-cell>
          <table:table-cell office:value-type="float" office:value="38.4000015258789" calcext:value-type="float">
            <text:p>3,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1199993148912" calcext:value-type="float">
            <text:p>2,71E-3</text:p>
          </table:table-cell>
          <table:table-cell office:value-type="float" office:value="38.5999984741211" calcext:value-type="float">
            <text:p>3,8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1399993143859" calcext:value-type="float">
            <text:p>2,71E-3</text:p>
          </table:table-cell>
          <table:table-cell office:value-type="float" office:value="39" calcext:value-type="float">
            <text:p>3,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1599993138807" calcext:value-type="float">
            <text:p>2,72E-3</text:p>
          </table:table-cell>
          <table:table-cell office:value-type="float" office:value="39.4000015258789" calcext:value-type="float">
            <text:p>3,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1799993133755" calcext:value-type="float">
            <text:p>2,72E-3</text:p>
          </table:table-cell>
          <table:table-cell office:value-type="float" office:value="39.7999992370606" calcext:value-type="float">
            <text:p>3,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1999993128702" calcext:value-type="float">
            <text:p>2,72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219999312365" calcext:value-type="float">
            <text:p>2,72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2399993118597" calcext:value-type="float">
            <text:p>2,72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2599993113545" calcext:value-type="float">
            <text:p>2,73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2799993108492" calcext:value-type="float">
            <text:p>2,73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299999310344" calcext:value-type="float">
            <text:p>2,73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3199993098387" calcext:value-type="float">
            <text:p>2,73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3399993093335" calcext:value-type="float">
            <text:p>2,73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3599993088283" calcext:value-type="float">
            <text:p>2,74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379999308323" calcext:value-type="float">
            <text:p>2,74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3999993078178" calcext:value-type="float">
            <text:p>2,74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4199993073125" calcext:value-type="float">
            <text:p>2,74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4399993068073" calcext:value-type="float">
            <text:p>2,74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4599993063021" calcext:value-type="float">
            <text:p>2,75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4799993057968" calcext:value-type="float">
            <text:p>2,75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4999993052916" calcext:value-type="float">
            <text:p>2,75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5199993047863" calcext:value-type="float">
            <text:p>2,75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5399993042811" calcext:value-type="float">
            <text:p>2,75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5599993037758" calcext:value-type="float">
            <text:p>2,76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5799993032706" calcext:value-type="float">
            <text:p>2,76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5999993027654" calcext:value-type="float">
            <text:p>2,76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6199993022601" calcext:value-type="float">
            <text:p>2,76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6399993017549" calcext:value-type="float">
            <text:p>2,76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6599993012496" calcext:value-type="float">
            <text:p>2,77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6799993007444" calcext:value-type="float">
            <text:p>2,77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6999993002391" calcext:value-type="float">
            <text:p>2,77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7199992997339" calcext:value-type="float">
            <text:p>2,77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7399992992287" calcext:value-type="float">
            <text:p>2,77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7599992987234" calcext:value-type="float">
            <text:p>2,78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7799992982182" calcext:value-type="float">
            <text:p>2,78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7999992977129" calcext:value-type="float">
            <text:p>2,78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8199992972077" calcext:value-type="float">
            <text:p>2,78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8399992967024" calcext:value-type="float">
            <text:p>2,78E-3</text:p>
          </table:table-cell>
          <table:table-cell office:value-type="float" office:value="40.2000007629395" calcext:value-type="float">
            <text:p>4,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8599992961972" calcext:value-type="float">
            <text:p>2,79E-3</text:p>
          </table:table-cell>
          <table:table-cell office:value-type="float" office:value="40" calcext:value-type="float">
            <text:p>4,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879999295692" calcext:value-type="float">
            <text:p>2,79E-3</text:p>
          </table:table-cell>
          <table:table-cell office:value-type="float" office:value="39.4000015258789" calcext:value-type="float">
            <text:p>3,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8999992951867" calcext:value-type="float">
            <text:p>2,79E-3</text:p>
          </table:table-cell>
          <table:table-cell office:value-type="float" office:value="39.2000007629395" calcext:value-type="float">
            <text:p>3,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9199992946815" calcext:value-type="float">
            <text:p>2,79E-3</text:p>
          </table:table-cell>
          <table:table-cell office:value-type="float" office:value="38.7999992370606" calcext:value-type="float">
            <text:p>3,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9399992941762" calcext:value-type="float">
            <text:p>2,79E-3</text:p>
          </table:table-cell>
          <table:table-cell office:value-type="float" office:value="38.4000015258789" calcext:value-type="float">
            <text:p>3,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959999293671" calcext:value-type="float">
            <text:p>2,80E-3</text:p>
          </table:table-cell>
          <table:table-cell office:value-type="float" office:value="37.7999992370606" calcext:value-type="float">
            <text:p>3,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9799992931658" calcext:value-type="float">
            <text:p>2,80E-3</text:p>
          </table:table-cell>
          <table:table-cell office:value-type="float" office:value="37.4000015258789" calcext:value-type="float">
            <text:p>3,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79999992926605" calcext:value-type="float">
            <text:p>2,80E-3</text:p>
          </table:table-cell>
          <table:table-cell office:value-type="float" office:value="37.2000007629395" calcext:value-type="float">
            <text:p>3,7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0199992921553" calcext:value-type="float">
            <text:p>2,80E-3</text:p>
          </table:table-cell>
          <table:table-cell office:value-type="float" office:value="36.7999992370606" calcext:value-type="float">
            <text:p>3,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03999929165" calcext:value-type="float">
            <text:p>2,80E-3</text:p>
          </table:table-cell>
          <table:table-cell office:value-type="float" office:value="36.5999984741211" calcext:value-type="float">
            <text:p>3,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0599992911448" calcext:value-type="float">
            <text:p>2,81E-3</text:p>
          </table:table-cell>
          <table:table-cell office:value-type="float" office:value="36.4000015258789" calcext:value-type="float">
            <text:p>3,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0799992906395" calcext:value-type="float">
            <text:p>2,81E-3</text:p>
          </table:table-cell>
          <table:table-cell office:value-type="float" office:value="35.5999984741211" calcext:value-type="float">
            <text:p>3,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0999992901343" calcext:value-type="float">
            <text:p>2,81E-3</text:p>
          </table:table-cell>
          <table:table-cell office:value-type="float" office:value="35.4000015258789" calcext:value-type="float">
            <text:p>3,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1199992896291" calcext:value-type="float">
            <text:p>2,81E-3</text:p>
          </table:table-cell>
          <table:table-cell office:value-type="float" office:value="35" calcext:value-type="float">
            <text:p>3,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1399992891238" calcext:value-type="float">
            <text:p>2,81E-3</text:p>
          </table:table-cell>
          <table:table-cell office:value-type="float" office:value="34.5999984741211" calcext:value-type="float">
            <text:p>3,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1599992886186" calcext:value-type="float">
            <text:p>2,82E-3</text:p>
          </table:table-cell>
          <table:table-cell office:value-type="float" office:value="34.4000015258789" calcext:value-type="float">
            <text:p>3,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1799992881133" calcext:value-type="float">
            <text:p>2,82E-3</text:p>
          </table:table-cell>
          <table:table-cell office:value-type="float" office:value="34" calcext:value-type="float">
            <text:p>3,4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1999992876081" calcext:value-type="float">
            <text:p>2,82E-3</text:p>
          </table:table-cell>
          <table:table-cell office:value-type="float" office:value="33.5999984741211" calcext:value-type="float">
            <text:p>3,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2199992871028" calcext:value-type="float">
            <text:p>2,82E-3</text:p>
          </table:table-cell>
          <table:table-cell office:value-type="float" office:value="33" calcext:value-type="float">
            <text:p>3,3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2399992865976" calcext:value-type="float">
            <text:p>2,82E-3</text:p>
          </table:table-cell>
          <table:table-cell office:value-type="float" office:value="32.5999984741211" calcext:value-type="float">
            <text:p>3,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2599992860924" calcext:value-type="float">
            <text:p>2,83E-3</text:p>
          </table:table-cell>
          <table:table-cell office:value-type="float" office:value="32.4000015258789" calcext:value-type="float">
            <text:p>3,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2799992855871" calcext:value-type="float">
            <text:p>2,83E-3</text:p>
          </table:table-cell>
          <table:table-cell office:value-type="float" office:value="32.2000007629395" calcext:value-type="float">
            <text:p>3,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2999992850819" calcext:value-type="float">
            <text:p>2,83E-3</text:p>
          </table:table-cell>
          <table:table-cell office:value-type="float" office:value="31.6000003814697" calcext:value-type="float">
            <text:p>3,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3199992845766" calcext:value-type="float">
            <text:p>2,83E-3</text:p>
          </table:table-cell>
          <table:table-cell office:value-type="float" office:value="31.3999996185303" calcext:value-type="float">
            <text:p>3,1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3399992840714" calcext:value-type="float">
            <text:p>2,83E-3</text:p>
          </table:table-cell>
          <table:table-cell office:value-type="float" office:value="31" calcext:value-type="float">
            <text:p>3,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3599992835661" calcext:value-type="float">
            <text:p>2,84E-3</text:p>
          </table:table-cell>
          <table:table-cell office:value-type="float" office:value="30.6000003814697" calcext:value-type="float">
            <text:p>3,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3799992830609" calcext:value-type="float">
            <text:p>2,84E-3</text:p>
          </table:table-cell>
          <table:table-cell office:value-type="float" office:value="30.3999996185303" calcext:value-type="float">
            <text:p>3,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3999992825557" calcext:value-type="float">
            <text:p>2,84E-3</text:p>
          </table:table-cell>
          <table:table-cell office:value-type="float" office:value="29.7999992370605" calcext:value-type="float">
            <text:p>2,9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4199992820504" calcext:value-type="float">
            <text:p>2,84E-3</text:p>
          </table:table-cell>
          <table:table-cell office:value-type="float" office:value="29.6000003814697" calcext:value-type="float">
            <text:p>2,9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4399992815452" calcext:value-type="float">
            <text:p>2,84E-3</text:p>
          </table:table-cell>
          <table:table-cell office:value-type="float" office:value="29.2000007629395" calcext:value-type="float">
            <text:p>2,9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4599992810399" calcext:value-type="float">
            <text:p>2,85E-3</text:p>
          </table:table-cell>
          <table:table-cell office:value-type="float" office:value="28.7999992370605" calcext:value-type="float">
            <text:p>2,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4799992805347" calcext:value-type="float">
            <text:p>2,85E-3</text:p>
          </table:table-cell>
          <table:table-cell office:value-type="float" office:value="28.3999996185303" calcext:value-type="float">
            <text:p>2,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4999992800294" calcext:value-type="float">
            <text:p>2,85E-3</text:p>
          </table:table-cell>
          <table:table-cell office:value-type="float" office:value="28" calcext:value-type="float">
            <text:p>2,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5199992795242" calcext:value-type="float">
            <text:p>2,85E-3</text:p>
          </table:table-cell>
          <table:table-cell office:value-type="float" office:value="27.7999992370605" calcext:value-type="float">
            <text:p>2,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539999279019" calcext:value-type="float">
            <text:p>2,85E-3</text:p>
          </table:table-cell>
          <table:table-cell office:value-type="float" office:value="27.3999996185303" calcext:value-type="float">
            <text:p>2,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5599992785137" calcext:value-type="float">
            <text:p>2,86E-3</text:p>
          </table:table-cell>
          <table:table-cell office:value-type="float" office:value="26.7999992370605" calcext:value-type="float">
            <text:p>2,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5799992780085" calcext:value-type="float">
            <text:p>2,86E-3</text:p>
          </table:table-cell>
          <table:table-cell office:value-type="float" office:value="26.6000003814697" calcext:value-type="float">
            <text:p>2,6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5999992775032" calcext:value-type="float">
            <text:p>2,86E-3</text:p>
          </table:table-cell>
          <table:table-cell office:value-type="float" office:value="26.2000007629395" calcext:value-type="float">
            <text:p>2,6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619999276998" calcext:value-type="float">
            <text:p>2,86E-3</text:p>
          </table:table-cell>
          <table:table-cell office:value-type="float" office:value="25.6000003814697" calcext:value-type="float">
            <text:p>2,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6399992764927" calcext:value-type="float">
            <text:p>2,86E-3</text:p>
          </table:table-cell>
          <table:table-cell office:value-type="float" office:value="25.6000003814697" calcext:value-type="float">
            <text:p>2,5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6599992759875" calcext:value-type="float">
            <text:p>2,87E-3</text:p>
          </table:table-cell>
          <table:table-cell office:value-type="float" office:value="25.2000007629395" calcext:value-type="float">
            <text:p>2,5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6799992754823" calcext:value-type="float">
            <text:p>2,87E-3</text:p>
          </table:table-cell>
          <table:table-cell office:value-type="float" office:value="24.7999992370605" calcext:value-type="float">
            <text:p>2,4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699999274977" calcext:value-type="float">
            <text:p>2,87E-3</text:p>
          </table:table-cell>
          <table:table-cell office:value-type="float" office:value="24.2000007629395" calcext:value-type="float">
            <text:p>2,4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7199992744718" calcext:value-type="float">
            <text:p>2,87E-3</text:p>
          </table:table-cell>
          <table:table-cell office:value-type="float" office:value="23.7999992370605" calcext:value-type="float">
            <text:p>2,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7399992739665" calcext:value-type="float">
            <text:p>2,87E-3</text:p>
          </table:table-cell>
          <table:table-cell office:value-type="float" office:value="23.6000003814697" calcext:value-type="float">
            <text:p>2,3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7599992734613" calcext:value-type="float">
            <text:p>2,88E-3</text:p>
          </table:table-cell>
          <table:table-cell office:value-type="float" office:value="23.2000007629395" calcext:value-type="float">
            <text:p>2,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7799992729561" calcext:value-type="float">
            <text:p>2,88E-3</text:p>
          </table:table-cell>
          <table:table-cell office:value-type="float" office:value="22.7999992370605" calcext:value-type="float">
            <text:p>2,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7999992724508" calcext:value-type="float">
            <text:p>2,88E-3</text:p>
          </table:table-cell>
          <table:table-cell office:value-type="float" office:value="22.6000003814697" calcext:value-type="float">
            <text:p>2,2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8199992719456" calcext:value-type="float">
            <text:p>2,88E-3</text:p>
          </table:table-cell>
          <table:table-cell office:value-type="float" office:value="22.2000007629395" calcext:value-type="float">
            <text:p>2,2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8399992714403" calcext:value-type="float">
            <text:p>2,88E-3</text:p>
          </table:table-cell>
          <table:table-cell office:value-type="float" office:value="21.7999992370605" calcext:value-type="float">
            <text:p>2,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8599992709351" calcext:value-type="float">
            <text:p>2,89E-3</text:p>
          </table:table-cell>
          <table:table-cell office:value-type="float" office:value="21.2000007629395" calcext:value-type="float">
            <text:p>2,1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8799992704298" calcext:value-type="float">
            <text:p>2,89E-3</text:p>
          </table:table-cell>
          <table:table-cell office:value-type="float" office:value="20.7999992370605" calcext:value-type="float">
            <text:p>2,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8999992699246" calcext:value-type="float">
            <text:p>2,89E-3</text:p>
          </table:table-cell>
          <table:table-cell office:value-type="float" office:value="20.7999992370605" calcext:value-type="float">
            <text:p>2,0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9199992694194" calcext:value-type="float">
            <text:p>2,89E-3</text:p>
          </table:table-cell>
          <table:table-cell office:value-type="float" office:value="20.3999996185303" calcext:value-type="float">
            <text:p>2,0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9399992689141" calcext:value-type="float">
            <text:p>2,89E-3</text:p>
          </table:table-cell>
          <table:table-cell office:value-type="float" office:value="20" calcext:value-type="float">
            <text:p>2,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9599992684089" calcext:value-type="float">
            <text:p>2,90E-3</text:p>
          </table:table-cell>
          <table:table-cell office:value-type="float" office:value="19.3999996185303" calcext:value-type="float">
            <text:p>1,9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9799992679036" calcext:value-type="float">
            <text:p>2,90E-3</text:p>
          </table:table-cell>
          <table:table-cell office:value-type="float" office:value="19" calcext:value-type="float">
            <text:p>1,9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89999992673984" calcext:value-type="float">
            <text:p>2,90E-3</text:p>
          </table:table-cell>
          <table:table-cell office:value-type="float" office:value="18.7999992370605" calcext:value-type="float">
            <text:p>1,8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0199992668931" calcext:value-type="float">
            <text:p>2,90E-3</text:p>
          </table:table-cell>
          <table:table-cell office:value-type="float" office:value="18.3999996185303" calcext:value-type="float">
            <text:p>1,8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0399992663879" calcext:value-type="float">
            <text:p>2,90E-3</text:p>
          </table:table-cell>
          <table:table-cell office:value-type="float" office:value="18" calcext:value-type="float">
            <text:p>1,8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0599992658827" calcext:value-type="float">
            <text:p>2,91E-3</text:p>
          </table:table-cell>
          <table:table-cell office:value-type="float" office:value="17.7999992370605" calcext:value-type="float">
            <text:p>1,7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0799992653774" calcext:value-type="float">
            <text:p>2,91E-3</text:p>
          </table:table-cell>
          <table:table-cell office:value-type="float" office:value="17.3999996185303" calcext:value-type="float">
            <text:p>1,7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0999992648722" calcext:value-type="float">
            <text:p>2,91E-3</text:p>
          </table:table-cell>
          <table:table-cell office:value-type="float" office:value="16.7999992370605" calcext:value-type="float">
            <text:p>1,6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1199992643669" calcext:value-type="float">
            <text:p>2,91E-3</text:p>
          </table:table-cell>
          <table:table-cell office:value-type="float" office:value="16.3999996185303" calcext:value-type="float">
            <text:p>1,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1399992638617" calcext:value-type="float">
            <text:p>2,91E-3</text:p>
          </table:table-cell>
          <table:table-cell office:value-type="float" office:value="16.3999996185303" calcext:value-type="float">
            <text:p>1,6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1599992633564" calcext:value-type="float">
            <text:p>2,92E-3</text:p>
          </table:table-cell>
          <table:table-cell office:value-type="float" office:value="16" calcext:value-type="float">
            <text:p>1,6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1799992628512" calcext:value-type="float">
            <text:p>2,92E-3</text:p>
          </table:table-cell>
          <table:table-cell office:value-type="float" office:value="15.3999996185303" calcext:value-type="float">
            <text:p>1,5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199999262346" calcext:value-type="float">
            <text:p>2,92E-3</text:p>
          </table:table-cell>
          <table:table-cell office:value-type="float" office:value="15" calcext:value-type="float">
            <text:p>1,5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2199992618407" calcext:value-type="float">
            <text:p>2,92E-3</text:p>
          </table:table-cell>
          <table:table-cell office:value-type="float" office:value="14.6000003814697" calcext:value-type="float">
            <text:p>1,4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2399992613355" calcext:value-type="float">
            <text:p>2,92E-3</text:p>
          </table:table-cell>
          <table:table-cell office:value-type="float" office:value="14.3999996185303" calcext:value-type="float">
            <text:p>1,4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2599992608302" calcext:value-type="float">
            <text:p>2,93E-3</text:p>
          </table:table-cell>
          <table:table-cell office:value-type="float" office:value="14.1999998092651" calcext:value-type="float">
            <text:p>1,4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279999260325" calcext:value-type="float">
            <text:p>2,93E-3</text:p>
          </table:table-cell>
          <table:table-cell office:value-type="float" office:value="13.8000001907349" calcext:value-type="float">
            <text:p>1,3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2999992598197" calcext:value-type="float">
            <text:p>2,93E-3</text:p>
          </table:table-cell>
          <table:table-cell office:value-type="float" office:value="13.1999998092651" calcext:value-type="float">
            <text:p>1,3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3199992593145" calcext:value-type="float">
            <text:p>2,93E-3</text:p>
          </table:table-cell>
          <table:table-cell office:value-type="float" office:value="12.8000001907349" calcext:value-type="float">
            <text:p>1,2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3399992588093" calcext:value-type="float">
            <text:p>2,93E-3</text:p>
          </table:table-cell>
          <table:table-cell office:value-type="float" office:value="12.3999996185303" calcext:value-type="float">
            <text:p>1,24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359999258304" calcext:value-type="float">
            <text:p>2,94E-3</text:p>
          </table:table-cell>
          <table:table-cell office:value-type="float" office:value="11.8000001907349" calcext:value-type="float">
            <text:p>1,18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3799992577988" calcext:value-type="float">
            <text:p>2,94E-3</text:p>
          </table:table-cell>
          <table:table-cell office:value-type="float" office:value="11.6000003814697" calcext:value-type="float">
            <text:p>1,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3999992572935" calcext:value-type="float">
            <text:p>2,94E-3</text:p>
          </table:table-cell>
          <table:table-cell office:value-type="float" office:value="11.6000003814697" calcext:value-type="float">
            <text:p>1,1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4199992567883" calcext:value-type="float">
            <text:p>2,94E-3</text:p>
          </table:table-cell>
          <table:table-cell office:value-type="float" office:value="11" calcext:value-type="float">
            <text:p>1,1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439999256283" calcext:value-type="float">
            <text:p>2,94E-3</text:p>
          </table:table-cell>
          <table:table-cell office:value-type="float" office:value="10.6000003814697" calcext:value-type="float">
            <text:p>1,06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4599992557778" calcext:value-type="float">
            <text:p>2,95E-3</text:p>
          </table:table-cell>
          <table:table-cell office:value-type="float" office:value="10.1999998092651" calcext:value-type="float">
            <text:p>1,02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4799992552726" calcext:value-type="float">
            <text:p>2,95E-3</text:p>
          </table:table-cell>
          <table:table-cell office:value-type="float" office:value="10" calcext:value-type="float">
            <text:p>1,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4999992547673" calcext:value-type="float">
            <text:p>2,95E-3</text:p>
          </table:table-cell>
          <table:table-cell office:value-type="float" office:value="9.60000038146973" calcext:value-type="float">
            <text:p>9,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5199992542621" calcext:value-type="float">
            <text:p>2,95E-3</text:p>
          </table:table-cell>
          <table:table-cell office:value-type="float" office:value="9.19999980926514" calcext:value-type="float">
            <text:p>9,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5399992537568" calcext:value-type="float">
            <text:p>2,95E-3</text:p>
          </table:table-cell>
          <table:table-cell office:value-type="float" office:value="8.80000019073486" calcext:value-type="float">
            <text:p>8,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5599992532516" calcext:value-type="float">
            <text:p>2,96E-3</text:p>
          </table:table-cell>
          <table:table-cell office:value-type="float" office:value="8.60000038146973" calcext:value-type="float">
            <text:p>8,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5799992527464" calcext:value-type="float">
            <text:p>2,96E-3</text:p>
          </table:table-cell>
          <table:table-cell office:value-type="float" office:value="8" calcext:value-type="float">
            <text:p>8,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5999992522411" calcext:value-type="float">
            <text:p>2,96E-3</text:p>
          </table:table-cell>
          <table:table-cell office:value-type="float" office:value="7.59999990463257" calcext:value-type="float">
            <text:p>7,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6199992517359" calcext:value-type="float">
            <text:p>2,96E-3</text:p>
          </table:table-cell>
          <table:table-cell office:value-type="float" office:value="7.19999980926514" calcext:value-type="float">
            <text:p>7,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6399992512306" calcext:value-type="float">
            <text:p>2,96E-3</text:p>
          </table:table-cell>
          <table:table-cell office:value-type="float" office:value="7.19999980926514" calcext:value-type="float">
            <text:p>7,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6599992507254" calcext:value-type="float">
            <text:p>2,97E-3</text:p>
          </table:table-cell>
          <table:table-cell office:value-type="float" office:value="6.40000009536743" calcext:value-type="float">
            <text:p>6,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6799992502201" calcext:value-type="float">
            <text:p>2,97E-3</text:p>
          </table:table-cell>
          <table:table-cell office:value-type="float" office:value="6.19999980926514" calcext:value-type="float">
            <text:p>6,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6999992497149" calcext:value-type="float">
            <text:p>2,97E-3</text:p>
          </table:table-cell>
          <table:table-cell office:value-type="float" office:value="5.80000019073486" calcext:value-type="float">
            <text:p>5,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7199992492097" calcext:value-type="float">
            <text:p>2,97E-3</text:p>
          </table:table-cell>
          <table:table-cell office:value-type="float" office:value="5.59999990463257" calcext:value-type="float">
            <text:p>5,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7399992487044" calcext:value-type="float">
            <text:p>2,97E-3</text:p>
          </table:table-cell>
          <table:table-cell office:value-type="float" office:value="5" calcext:value-type="float">
            <text:p>5,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7599992481992" calcext:value-type="float">
            <text:p>2,98E-3</text:p>
          </table:table-cell>
          <table:table-cell office:value-type="float" office:value="4.59999990463257" calcext:value-type="float">
            <text:p>4,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7799992476939" calcext:value-type="float">
            <text:p>2,98E-3</text:p>
          </table:table-cell>
          <table:table-cell office:value-type="float" office:value="4.59999990463257" calcext:value-type="float">
            <text:p>4,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7999992471887" calcext:value-type="float">
            <text:p>2,98E-3</text:p>
          </table:table-cell>
          <table:table-cell office:value-type="float" office:value="4.19999980926514" calcext:value-type="float">
            <text:p>4,2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8199992466834" calcext:value-type="float">
            <text:p>2,98E-3</text:p>
          </table:table-cell>
          <table:table-cell office:value-type="float" office:value="3.59999990463257" calcext:value-type="float">
            <text:p>3,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8399992461782" calcext:value-type="float">
            <text:p>2,98E-3</text:p>
          </table:table-cell>
          <table:table-cell office:value-type="float" office:value="3" calcext:value-type="float">
            <text:p>3,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859999245673" calcext:value-type="float">
            <text:p>2,99E-3</text:p>
          </table:table-cell>
          <table:table-cell office:value-type="float" office:value="2.79999995231628" calcext:value-type="float">
            <text:p>2,8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8799992451677" calcext:value-type="float">
            <text:p>2,99E-3</text:p>
          </table:table-cell>
          <table:table-cell office:value-type="float" office:value="2.59999990463257" calcext:value-type="float">
            <text:p>2,6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8999992446625" calcext:value-type="float">
            <text:p>2,99E-3</text:p>
          </table:table-cell>
          <table:table-cell office:value-type="float" office:value="2.40000009536743" calcext:value-type="float">
            <text:p>2,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9199992441572" calcext:value-type="float">
            <text:p>2,99E-3</text:p>
          </table:table-cell>
          <table:table-cell office:value-type="float" office:value="2" calcext:value-type="float">
            <text:p>2,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939999243652" calcext:value-type="float">
            <text:p>2,99E-3</text:p>
          </table:table-cell>
          <table:table-cell office:value-type="float" office:value="1.39999997615814" calcext:value-type="float">
            <text:p>1,4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9599992431467" calcext:value-type="float">
            <text:p>3,00E-3</text:p>
          </table:table-cell>
          <table:table-cell office:value-type="float" office:value="1" calcext:value-type="float">
            <text:p>1,00E+0</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table-cell office:value-type="float" office:value="0.00299799992426415" calcext:value-type="float">
            <text:p>3,00E-3</text:p>
          </table:table-cell>
          <table:table-cell office:value-type="float" office:value="0.800000011920929" calcext:value-type="float">
            <text:p>8,00E-1</text:p>
          </table:table-cell>
          <table:table-cell office:value-type="float" office:value="-20" calcext:value-type="float">
            <text:p>-2,00E+1</text:p>
          </table:table-cell>
          <table:table-cell table:number-columns-repeated="14"/>
          <table:table-cell table:style-name="ce53" table:number-columns-repeated="16367"/>
        </table:table-row>
        <table:table-row table:style-name="ro4" table:number-rows-repeated="1047074">
          <table:table-cell table:number-columns-repeated="17"/>
          <table:table-cell table:style-name="ce53" table:number-columns-repeated="16367"/>
        </table:table-row>
        <table:table-row table:style-name="ro4">
          <table:table-cell table:number-columns-repeated="17"/>
          <table:table-cell table:style-name="ce53" table:number-columns-repeated="16367"/>
        </table:table-row>
      </table:table>
      <table:named-expressions>
        <table:named-range table:name="Ch1Vals" table:base-cell-address="$Tabelle1.$A$1" table:cell-range-address="$Tabelle1.$B$1"/>
        <table:named-range table:name="Ch2Vals" table:base-cell-address="$Tabelle1.$A$1" table:cell-range-address="$Tabelle1.$C$1"/>
        <table:named-range table:name="ChkChan1" table:base-cell-address="$Tabelle1.$A$1" table:cell-range-address="$Tabelle1.$E$2"/>
        <table:named-range table:name="ChkChan2" table:base-cell-address="$Tabelle1.$A$1" table:cell-range-address="$Tabelle1.$E$3"/>
        <table:named-range table:name="FileName" table:base-cell-address="$Tabelle1.$A$1" table:cell-range-address="$Tabelle1.$L$2"/>
        <table:named-range table:name="ProbeCh1" table:base-cell-address="$Tabelle1.$A$1" table:cell-range-address="$Tabelle1.$F$2"/>
        <table:named-range table:name="TDivCh1" table:base-cell-address="$Tabelle1.$A$1" table:cell-range-address="$Tabelle1.$H$2"/>
        <table:named-range table:name="TimeVals" table:base-cell-address="$Tabelle1.$A$1" table:cell-range-address="$Tabelle1.$A$1"/>
        <table:named-range table:name="VDivCh1" table:base-cell-address="$Tabelle1.$A$1" table:cell-range-address="$Tabelle1.$G$2"/>
        <table:named-range table:name="Version" table:base-cell-address="$Tabelle1.$M$1" table:cell-range-address="$Tabelle1.$M$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 €</number:text>
      <style:map style:condition="value()&gt;=0" style:apply-style-name="N118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 €</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 €</number:text>
      <style:map style:condition="value()&gt;=0" style:apply-style-name="N121P0"/>
    </number:number-style>
    <number:date-style style:name="N122">
      <number:day number:style="long"/>
      <number:text>. </number:text>
      <number:month number:textual="true"/>
      <number:text> </number:text>
      <number:year/>
    </number:date-style>
    <number:date-style style:name="N123">
      <number:day number:style="long"/>
      <number:text>. </number:text>
      <number:month number:textual="true"/>
    </number:date-style>
    <number:date-style style:name="N124">
      <number:month number:textual="true"/>
      <number:text> </number:text>
      <number:year/>
    </number:date-style>
    <number:time-style style:name="N125">
      <number:hours/>
      <number:text>:</number:text>
      <number:minutes number:style="long"/>
      <number:text> </number:text>
      <number:am-pm/>
    </number:time-style>
    <number:time-style style:name="N126">
      <number:hours/>
      <number:text>:</number:text>
      <number:minutes number:style="long"/>
      <number:text>:</number:text>
      <number:seconds number:style="long"/>
      <number:text> </number:text>
      <number:am-pm/>
    </number:time-style>
    <number:number-style style:name="N128P0" style:volatile="true">
      <number:number number:decimal-places="0" number:min-decimal-places="0" number:min-integer-digits="1" number:grouping="true"/>
      <number:text loext:blank-width-char="€1">   </number:text>
    </number:number-style>
    <number:number-style style:name="N128">
      <number:text>-</number:text>
      <number:number number:decimal-places="0" number:min-decimal-places="0" number:min-integer-digits="1" number:grouping="true"/>
      <number:text loext:blank-width-char="€1">   </number:text>
      <style:map style:condition="value()&gt;=0" style:apply-style-name="N128P0"/>
    </number:number-style>
    <number:number-style style:name="N129P0" style:volatile="true">
      <number:number number:decimal-places="0" number:min-decimal-places="0" number:min-integer-digits="1" number:grouping="true"/>
      <number:text loext:blank-width-char="€1">   </number:text>
    </number:number-style>
    <number:number-style style:name="N129">
      <style:text-properties fo:color="#ff0000"/>
      <number:text>-</number:text>
      <number:number number:decimal-places="0" number:min-decimal-places="0" number:min-integer-digits="1" number:grouping="true"/>
      <number:text loext:blank-width-char="€1">   </number:text>
      <style:map style:condition="value()&gt;=0" style:apply-style-name="N129P0"/>
    </number:number-style>
    <number:number-style style:name="N131P0" style:volatile="true">
      <number:number number:decimal-places="2" number:min-decimal-places="2" number:min-integer-digits="1" number:grouping="true"/>
      <number:text loext:blank-width-char="€1">   </number:text>
    </number:number-style>
    <number:number-style style:name="N131">
      <number:text>-</number:text>
      <number:number number:decimal-places="2" number:min-decimal-places="2" number:min-integer-digits="1" number:grouping="true"/>
      <number:text loext:blank-width-char="€1">   </number:text>
      <style:map style:condition="value()&gt;=0" style:apply-style-name="N131P0"/>
    </number:number-style>
    <number:number-style style:name="N132P0" style:volatile="true">
      <number:number number:decimal-places="2" number:min-decimal-places="2" number:min-integer-digits="1" number:grouping="true"/>
      <number:text loext:blank-width-char="€1">   </number:text>
    </number:number-style>
    <number:number-style style:name="N132">
      <style:text-properties fo:color="#ff0000"/>
      <number:text>-</number:text>
      <number:number number:decimal-places="2" number:min-decimal-places="2" number:min-integer-digits="1" number:grouping="true"/>
      <number:text loext:blank-width-char="€1">   </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6P1" style:volatile="true">
      <number:text>-</number:text>
      <number:fill-character> </number:fill-character>
      <number:number number:decimal-places="0" number:min-decimal-places="0" number:min-integer-digits="1" number:grouping="true"/>
      <number:text loext:blank-width-char="€1_-3">    </number:text>
    </number:number-style>
    <number:number-style style:name="N136P2" style:volatile="true">
      <number:text loext:blank-width-char="-"> </number:text>
      <number:fill-character> </number:fill-character>
      <number:text loext:blank-width-char="€2_-4">-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0P1" style:volatile="true">
      <number:text>-</number:text>
      <number:fill-character> </number:fill-character>
      <number:number number:decimal-places="0" number:min-decimal-places="0" number:min-integer-digits="1" number:grouping="true"/>
      <number:text loext:blank-width-char="-2"> € </number:text>
    </number:number-style>
    <number:number-style style:name="N140P2" style:volatile="true">
      <number:text loext:blank-width-char="-"> </number:text>
      <number:fill-character> </number:fill-character>
      <number:text loext:blank-width-char="-3">- €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4P1" style:volatile="true">
      <number:text>-</number:text>
      <number:fill-character> </number:fill-character>
      <number:number number:decimal-places="2" number:min-decimal-places="2" number:min-integer-digits="1" number:grouping="true"/>
      <number:text loext:blank-width-char="€1_-3">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8P1" style:volatile="true">
      <number:text>-</number:text>
      <number:fill-character> </number:fill-character>
      <number:number number:decimal-places="2" number:min-decimal-places="2" number:min-integer-digits="1" number:grouping="true"/>
      <number:text loext:blank-width-char="-2"> € </number:text>
    </number:number-style>
    <number:number-style style:name="N148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scientific-number number:decimal-places="2" number:min-decimal-places="2" number:min-integer-digits="1" number:min-exponent-digits="1" number:exponent-interval="1" number:forced-exponent-sign="true"/>
    </number:number-style>
    <number:number-style style:name="N154">
      <number:scientific-number number:decimal-places="0" number:min-decimal-places="0" number:min-integer-digits="3" number:grouping="true" number:min-exponent-digits="1" number:exponent-interval="4" number:forced-exponent-sign="true"/>
    </number:number-style>
    <style:style style:name="Default" style:family="table-cell">
      <style:table-cell-properties style:rotation-align="none" style:vertical-align="bottom"/>
      <style:text-properties fo:color="#000000" style:font-name="Calibri1" fo:font-family="Calibri" style:font-family-generic="swiss" fo:font-size="11pt" style:font-size-asian="11pt" style:font-name-complex="Calibri1"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Larissa">
      <loext:theme-colors loext:name="Larissa">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1">00.00.0000</text:date>, <text:time style:data-style-name="N2" text:time-value="15:20:04.3249786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Tabelle1" style:display-name="PageStyle_Tabelle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Walter</meta:initial-creator>
    <meta:creation-date>2021-03-05T16:37:21</meta:creation-date>
    <dc:date>2026-05-21T15:34:24.855993200</dc:date>
    <meta:editing-duration>PT7H37M16S</meta:editing-duration>
    <meta:generator>LibreOffice/26.2.3.2$Windows_X86_64 LibreOffice_project/70e089b17412e4cb7773e41413306b17a2328c34</meta:generator>
    <meta:editing-cycles>102</meta:editing-cycles>
    <meta:document-statistic meta:table-count="1" meta:cell-count="4527" meta:object-count="5"/>
    <meta:user-defined meta:name="AppVersion">14.0300</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DieseArbeitsmappe.xml><?xml version="1.0" encoding="utf-8"?>
<!DOCTYPE module  PUBLIC '-//OpenOffice.org//DTD OfficeDocument 1.0//EN'  'module.dtd'>
<script:module xmlns:script="http://openoffice.org/2000/script" script:name="DieseArbeitsmappe" script:language="StarBasic" script:moduleType="document">Rem Attribute VBA_ModuleType=VBADocumentModule
Option VBASupport 1
Private Sub Workbook_Open()
    ThisComponent.CurrentController.ActiveSheet.unprotect("")
'    With Worksheets("Tabelle1")
'        .Protect UserInterfaceOnly:=True
'    End With
     FileIsOpen = false
End Sub

</script:module>
</file>

<file path=Basic/VBAProject/Modul1.xml><?xml version="1.0" encoding="utf-8"?>
<!DOCTYPE module  PUBLIC '-//OpenOffice.org//DTD OfficeDocument 1.0//EN'  'module.dtd'>
<script:module xmlns:script="http://openoffice.org/2000/script" script:name="Modul1" script:language="StarBasic" script:moduleType="normal">' FNIRSI-1013D WAV Viewer for LibreOffice
' From 1013D_DisplayData.xlsm (Microsoft Excel)
' Translated to LibreOffice Basic 20.05.2026 /Vo
' Data Format: original Firmware .wav Format

Rem Attribute VBA_ModuleType=VBAModule
Option VBASupport 1
Option Explicit

Public Const Version = "V1.10"

Dim Bytes     'The whole file in a Bytes Array
Dim VScaleArr
Dim TScaleArr
Dim ChRow0 As Long
Dim Ch1Col As Long
Dim Ch2Col As Long
Dim TimCol As Long

Dim FileName As String
Dim FileIsOpen As Boolean


Sub LoadData()
   
    VScaleArr = Array(5, 2.5, 1, 0.5, 0.2, 0.1, 0.05)
    TScaleArr = Array(50, 20, 10, 5, 2, 1, 0.5, 0.2, 0.1, 0.05, 0.02, 0.01, 0.005, 0.002, 0.001, 0.0005, 0.0002, 0.0001, 0.00005, 0.00002, 0.00001, 0.000005, 0.000002, 0.000001, 0.0000005, 0.0000002, 0.0000001, 0.00000005, 0.00000002, 0.00000001)
    On Error GoTo ErrHandler
    With CreateObject("ADODB.Stream")  ' load file
        .Open
        .Type = 1  ' adTypeBinary
        .LoadFromFile FileName
        Bytes = .Read
        .Close
    End With
    TimCol = Range("TimeVals").Column
    Ch1Col = Range("Ch1Vals").Column
    Ch2Col = Range("Ch2Vals").Column
    ChRow0 = Range("Ch1Vals").Row
    Range("Version") = Version
    Range(Cells(ChRow0 + 1, Ch1Col), Cells(ChRow0 + 1500, Ch2Col)).ClearContents
    Cells(ChRow0 + 1, Ch1Col) = " "
    Cells(ChRow0 + 1, Ch2Col) = " "
    '' Application.Calculation = xlCalculationManual ' Excel VBA
    If (Range("ChkChan2") = False) Then Range("ChkChan1") = True
	If (Range("ChkChan1") = True) Then PlotData 1, 1000, 3000  ' plot Channel
    If (Range("ChkChan2") = True) Then PlotData 2, 4000, 3000
    ' Application.Calculation = xlCalculationAutomatic ' Excel VBA
	ThisComponent.enableAutomaticCalculation(True)	
	ThisComponent.removeActionLock()
	ThisComponent.CurrentController.Frame.ContainerWindow.invalidate(1) ' redraw
    FileIsOpen = True
Exit Sub
ErrHandler:
    Call MsgBox("can't open file", vbCritical Or vbOKOnly, Error)
End Sub


Sub PlotData(ch, dataStart, dataSize)
    
    Dim index As Integer
    Dim vVal As Single
    Dim vMult As Single
    Dim tMult As Single
    Dim probe As Single
    Dim rowcnt As Integer
    Dim dataEnd As Integer
    
    probe = 10 ^ Bytes(10 + (ch - 1) * 10) ' Probe X
    Range("ProbeCh1").Offset(ch - 1) = probe
    vMult = VScaleArr(Bytes(4 + (ch - 1) * 10)) * probe ' Vertical scale
    Range("VDivCh1").Offset(ch - 1) = vMult
    tMult = TScaleArr(Bytes(22))           ' Time scale
    Range("TDivCh1").Offset(ch - 1) = tMult

    Dim Byte1 As Integer
    Dim Byte2 As Integer   
	Dim hval(1499) As Variant
	Dim data(1499) As Variant   
	rowcnt =0
    dataEnd = dataStart + dataSize - 2
    For index = dataStart To dataEnd Step 2
 	    Byte1 =  Bytes(index)
 	    Byte2 =  Bytes(index+1)
 	    If Byte1 &lt; 0 Then Byte1 = Byte1 + 256  ' LO interprets all Bytes as integer     
 	    If Byte2 &lt; 0 Then Byte2 = Byte2 + 256  ' convert to (unsigned) "Bytes"     
        vVal = ((Byte2 * 256 + Byte1) - 200) * vMult / 50 * probe ' Vertical
        hval(rowcnt) = Array(rowcnt * tMult / 50)     ' Horizontal (Time)
    	data(rowcnt) = Array(vVal )							' Vertical (Values)
        rowcnt = rowcnt + 1       
    Next
 	
	Dim oRange As Object ' push all values to table	
	oRange = ThisComponent.CurrentController.ActiveSheet.getCellRangeByPosition(TimCol-1, ChRow0, TimCol-1, ChRow0+1499)
	oRange.setDataArray(hval())      
	oRange = ThisComponent.CurrentController.ActiveSheet.getCellRangeByPosition(Ch1Col+ch-2, ChRow0,  Ch1Col+ch-2, ChRow0+1499)
	oRange.setDataArray(data())      

  	''OLD (incredibly slow):
    ' Dim Byte1 As Integer
    ' Dim Byte2 As Integer   
    ' rowcnt = ChRow0
    ' dataEnd = dataStart + dataSize - 2
    ' For index = dataStart To dataEnd Step 2
 	  '   Byte1 =  Bytes(index)
 	  '   Byte2 =  Bytes(index+1)
 	  '   If Byte1 &lt; 0 Then Byte1 = Byte1 + 256  ' LO interprets all Bytes as integer     
 	  '   If Byte2 &lt; 0 Then Byte2 = Byte2 + 256  ' convert to (unsigned) Bytes     
    '     vVal = (Byte2 * 256 + Byte1) - 200
    '     rowcnt = rowcnt + 1
    '     Cells(rowcnt, TimCol) = rowcnt * tMult / 50      ' Horizontal
    '     Cells(rowcnt, Ch1Col + ch - 1) = vVal * vMult / 50 * probe ' Vertical
    '     If SaveCSV Then Print #f, CStr(Cells(rowcnt, TimCol)) &amp; ";" &amp; CStr(Cells(rowcnt, Ch1Col + ch - 1)) &amp; vbCrLf;
    ' Next
End Sub



Sub Export_CSV
    On Error GoTo ErrHandler
     If Not FileIsOpen Then
        Call MsgBox("Please open file first", vbCritical Or vbOKOnly, Error)
        Exit Sub
    End If
   Dim rowcnt As Integer
	Dim f As Long
	f = FreeFile()
    FileName = Range("FileName")
   	Open  FileName  &amp; ".csv" For Output As #f
    For rowcnt = ChRow0 + 1 To ChRow0 + 1500 
        Print #f, CStr(Cells(rowcnt, TimCol)) &amp; ";" &amp; CStr(Cells(rowcnt, Ch1Col)) &amp; ";" &amp; CStr(Cells(rowcnt, Ch2Col))
    Next
    Close #f	
Exit Sub
ErrHandler:
    Call MsgBox("Error saving csv file", vbCritical Or vbOKOnly, Error)
End Sub



Sub Chan_Select()
    FileName = Range("FileName")
    If FileName &lt;&gt; "" Then LoadData
End Sub


Sub Open_File()
    FileName = Range("FileName")
    FileName = Get_FileName
    If FileName &lt;&gt; "" Then
        LoadData
        Range("FileName") = FileName
    End If
End Sub


Public Function Get_FileName() As String  ' LibreOffice Basic
    Dim oFilePicker As Object
    Dim sDisplayPath As String
    oFilePicker = CreateUnoService("com.sun.star.ui.dialogs.FilePicker")
    With oFilePicker
        .initialize(Array(com.sun.star.ui.dialogs.TemplateDescription.FILEOPEN_SIMPLE))
        .setTitle("Open File")
        .appendFilter("FNIRSI 1013D (*.wav)", "*.wav")
        .setCurrentFilter("FNIRSI 1013D (*.wav)")
        If .execute() = 1 Then
            sDisplayPath = .getFiles()(0)
            Get_FileName = ConvertFromURL(sDisplayPath)
        Else
            Get_FileName = ""
        End If
    End With
End Function


' Public Function Get_FileName() As String  ' Excel VBA
    ' Dim f As Office.FileDialog
'     Set f = Application.FileDialog(msoFileDialogFilePicker)
'     With f
'         .Title = "Open File"                      'Fenstertitel
'         .AllowMultiSelect = False                 'Nur eine Datei auswählbar
'         .ButtonName = "Open"                      'Button Beschriftung
'         .Filters.Clear                            'erst alle Filter löschen
'         .Filters.Add "FNIRSI 1013D", "*.wav"      'dann eigene anlegen
'         '.FilterIndex = 1                          'einen Filter vorselektieren
'         .InitialFileName = FileName               'Startverzeichnis
'         .Show
'     End With
'     If f.SelectedItems.Count &gt; 0 Then
'         Get_FileName = f.SelectedItems(1)
'     End If
' End Function



</script:module>
</file>

<file path=Basic/VBAProject/Tabelle1.xml><?xml version="1.0" encoding="utf-8"?>
<!DOCTYPE module  PUBLIC '-//OpenOffice.org//DTD OfficeDocument 1.0//EN'  'module.dtd'>
<script:module xmlns:script="http://openoffice.org/2000/script" script:name="Tabelle1"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DieseArbeitsmappe"/>
  <library:element library:name="Modul1"/>
  <library:element library:name="Tabel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153">
      <number:scientific-number number:decimal-places="2" number:min-decimal-places="2" number:min-integer-digits="1" number:min-exponent-digits="1" number:exponent-interval="1" number:forced-exponent-sign="true"/>
    </number:number-style>
    <number:number-style style:name="N154">
      <number:scientific-number number:decimal-places="0" number:min-decimal-places="0" number:min-integer-digits="3" number:grouping="true" number:min-exponent-digits="1" number:exponent-interval="4" number:forced-exponent-sign="true"/>
    </number:number-style>
    <style:style style:name="ch1" style:family="chart">
      <style:graphic-properties draw:stroke="solid" svg:stroke-width="0.026cm" svg:stroke-color="#d9d9d9" draw:fill-color="#bfbfbf"/>
    </style:style>
    <style:style style:name="ch2" style:family="chart">
      <style:chart-properties chart:include-hidden-cells="false" chart:auto-position="true" chart:auto-size="true" chart:treat-empty-cells="leave-gap"/>
    </style:style>
    <style:style style:name="ch3" style:family="chart" style:data-style-name="N153">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878787"/>
      <style:text-properties fo:color="#4f6228" style:text-position="0% 100%" fo:font-family="Calibri" fo:font-size="10pt" fo:font-weight="bold" style:font-size-asian="10pt" style:font-weight-asian="bold" style:font-size-complex="10pt" style:font-weight-complex="bold"/>
    </style:style>
    <style:style style:name="ch4" style:family="chart">
      <style:graphic-properties svg:stroke-width="0.026cm" svg:stroke-color="#878787"/>
    </style:style>
    <style:style style:name="ch5" style:family="chart">
      <style:graphic-properties draw:stroke="dash" draw:stroke-dash="msLineDash_20_1" svg:stroke-width="0.009cm" svg:stroke-color="#d9d9d9"/>
    </style:style>
    <style:style style:name="ch6" style:family="chart" style:data-style-name="N153">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153">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953735" style:text-position="0% 100%" fo:font-family="Calibri" fo:font-size="10pt" fo:font-weight="bold" style:font-size-asian="10pt" style:font-weight-asian="bold" style:font-size-complex="10pt" style:font-weight-complex="bold"/>
    </style:style>
    <style:style style:name="ch8" style:family="chart">
      <style:graphic-properties draw:stroke="dash" draw:stroke-dash="msLineDash_20_2" svg:stroke-width="0.009cm" svg:stroke-color="#d9d9d9"/>
    </style:style>
    <style:style style:name="ch9" style:family="chart" style:data-style-name="N153">
      <style:chart-properties chart:display-label="true" chart:tick-marks-major-inner="false" chart:tick-marks-major-outer="false" chart:logarithmic="false" chart:interval-minor-divisor="5" chart:reverse-direction="false" text:line-break="false" loext:try-staggering-first="false" chart:link-data-style-to-source="false" chart:axis-position="end" chart:tick-mark-position="at-axis"/>
      <style:graphic-properties svg:stroke-width="0.026cm" svg:stroke-color="#878787"/>
      <style:text-properties fo:color="#376092" style:text-position="0% 100%" fo:font-family="Calibri" fo:font-size="10pt" fo:font-weight="bold" style:font-size-asian="10pt" style:font-weight-asian="bold" style:font-size-complex="10pt" style:font-weight-complex="bold"/>
    </style:style>
    <style:style style:name="ch10" style:family="chart" style:data-style-name="N154">
      <style:chart-properties chart:symbol-type="none" chart:link-data-style-to-source="true" chart:label-position="right">
        <chart:label-separator>
          <text:p>; </text:p>
        </chart:label-separator>
      </style:chart-properties>
      <style:graphic-properties svg:stroke-width="0.071cm" svg:stroke-color="#c0504d" draw:fill-color="#c0504d" fo:wrap-option="wrap"/>
      <style:text-properties fo:color="#000000" style:text-position="0% 100%" fo:font-family="Calibri" fo:font-size="10pt" style:font-size-asian="10pt" style:font-size-complex="10pt"/>
    </style:style>
    <style:style style:name="ch11" style:family="chart" style:data-style-name="N154">
      <style:chart-properties chart:symbol-type="none" chart:link-data-style-to-source="true" chart:label-position="right">
        <chart:label-separator>
          <text:p>; </text:p>
        </chart:label-separator>
      </style:chart-properties>
      <style:graphic-properties svg:stroke-width="0.071cm" svg:stroke-color="#4f81bd" draw:fill-color="#4f81bd" fo:wrap-option="wrap"/>
      <style:text-properties fo:color="#000000" style:text-position="0% 100%" fo:font-family="Calibri"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5.856cm" svg:height="16.351cm" xlink:href=".." xlink:type="simple" chart:class="chart:scatter" chart:style-name="ch1">
        <chart:plot-area chart:style-name="ch2" svg:x="0.517cm" svg:y="0.327cm" svg:width="24.822cm" svg:height="15.697cm">
          <chart:coordinate-region svg:x="1.998cm" svg:y="0.923cm" svg:width="22.009cm" svg:height="14.929cm"/>
          <chart:axis chart:dimension="x" chart:name="primary-x" chart:style-name="ch3">
            <chart:grid chart:style-name="ch4" chart:class="major"/>
            <chart:grid chart:style-name="ch5" chart:class="minor"/>
          </chart:axis>
          <chart:axis chart:dimension="x" chart:name="secondary-x" chart:style-name="ch6"/>
          <chart:axis chart:dimension="y" chart:name="primary-y" chart:style-name="ch7">
            <chart:grid chart:style-name="ch4" chart:class="major"/>
            <chart:grid chart:style-name="ch8" chart:class="minor"/>
          </chart:axis>
          <chart:axis chart:dimension="y" chart:name="secondary-y" chart:style-name="ch9"/>
          <chart:series chart:attached-axis="primary-y" chart:style-name="ch10" chart:values-cell-range-address="Tabelle1.B2:Tabelle1.B1501" chart:label-cell-address="Tabelle1.B1:Tabelle1.B1" chart:class="chart:scatter">
            <chart:domain table:cell-range-address="Tabelle1.A2:Tabelle1.A1501"/>
            <chart:data-point chart:repeated="1500"/>
          </chart:series>
          <chart:series chart:attached-axis="secondary-y" chart:style-name="ch11" chart:values-cell-range-address="Tabelle1.C2:Tabelle1.C1501" chart:label-cell-address="Tabelle1.C1:Tabelle1.C1" chart:class="chart:scatter">
            <chart:data-point chart:repeated="15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A</text:p>
              </table:table-cell>
              <table:table-cell office:value-type="string">
                <text:p>CH1</text:p>
                <draw:g>
                  <svg:desc>Tabelle1.B1:Tabelle1.B1</svg:desc>
                </draw:g>
              </table:table-cell>
              <table:table-cell office:value-type="string">
                <text:p>CH2</text:p>
                <draw:g>
                  <svg:desc>Tabelle1.C1:Tabelle1.C1</svg:desc>
                </draw:g>
              </table:table-cell>
            </table:table-row>
          </table:table-header-rows>
          <table:table-rows>
            <table:table-row>
              <table:table-cell office:value-type="string">
                <text:p>1</text:p>
              </table:table-cell>
              <table:table-cell office:value-type="float" office:value="0">
                <text:p>0</text:p>
                <draw:g>
                  <svg:desc>Tabelle1.A2:Tabelle1.A1501</svg:desc>
                </draw:g>
              </table:table-cell>
              <table:table-cell office:value-type="float" office:value="-2.79999995231628">
                <text:p>-2.79999995231628</text:p>
                <draw:g>
                  <svg:desc>Tabelle1.B2:Tabelle1.B1501</svg:desc>
                </draw:g>
              </table:table-cell>
              <table:table-cell office:value-type="float" office:value="-20">
                <text:p>-20</text:p>
                <draw:g>
                  <svg:desc>Tabelle1.C2:Tabelle1.C1501</svg:desc>
                </draw:g>
              </table:table-cell>
            </table:table-row>
            <table:table-row>
              <table:table-cell office:value-type="string">
                <text:p>2</text:p>
              </table:table-cell>
              <table:table-cell office:value-type="float" office:value="0.00000199999994947575">
                <text:p>0.00000199999994947575</text:p>
              </table:table-cell>
              <table:table-cell office:value-type="float" office:value="-2.79999995231628">
                <text:p>-2.79999995231628</text:p>
              </table:table-cell>
              <table:table-cell office:value-type="float" office:value="-20">
                <text:p>-20</text:p>
              </table:table-cell>
            </table:table-row>
            <table:table-row>
              <table:table-cell office:value-type="string">
                <text:p>3</text:p>
              </table:table-cell>
              <table:table-cell office:value-type="float" office:value="0.0000039999998989515">
                <text:p>0.0000039999998989515</text:p>
              </table:table-cell>
              <table:table-cell office:value-type="float" office:value="-3.20000004768372">
                <text:p>-3.20000004768372</text:p>
              </table:table-cell>
              <table:table-cell office:value-type="float" office:value="-20">
                <text:p>-20</text:p>
              </table:table-cell>
            </table:table-row>
            <table:table-row>
              <table:table-cell office:value-type="string">
                <text:p>4</text:p>
              </table:table-cell>
              <table:table-cell office:value-type="float" office:value="0.00000599999984842725">
                <text:p>0.00000599999984842725</text:p>
              </table:table-cell>
              <table:table-cell office:value-type="float" office:value="-3.59999990463257">
                <text:p>-3.59999990463257</text:p>
              </table:table-cell>
              <table:table-cell office:value-type="float" office:value="-20">
                <text:p>-20</text:p>
              </table:table-cell>
            </table:table-row>
            <table:table-row>
              <table:table-cell office:value-type="string">
                <text:p>5</text:p>
              </table:table-cell>
              <table:table-cell office:value-type="float" office:value="0.000007999999797903">
                <text:p>0.000007999999797903</text:p>
              </table:table-cell>
              <table:table-cell office:value-type="float" office:value="-4">
                <text:p>-4</text:p>
              </table:table-cell>
              <table:table-cell office:value-type="float" office:value="-20">
                <text:p>-20</text:p>
              </table:table-cell>
            </table:table-row>
            <table:table-row>
              <table:table-cell office:value-type="string">
                <text:p>6</text:p>
              </table:table-cell>
              <table:table-cell office:value-type="float" office:value="0.00000999999974737875">
                <text:p>0.00000999999974737875</text:p>
              </table:table-cell>
              <table:table-cell office:value-type="float" office:value="-4.40000009536743">
                <text:p>-4.40000009536743</text:p>
              </table:table-cell>
              <table:table-cell office:value-type="float" office:value="-20">
                <text:p>-20</text:p>
              </table:table-cell>
            </table:table-row>
            <table:table-row>
              <table:table-cell office:value-type="string">
                <text:p>7</text:p>
              </table:table-cell>
              <table:table-cell office:value-type="float" office:value="0.0000119999996968545">
                <text:p>0.0000119999996968545</text:p>
              </table:table-cell>
              <table:table-cell office:value-type="float" office:value="-4.59999990463257">
                <text:p>-4.59999990463257</text:p>
              </table:table-cell>
              <table:table-cell office:value-type="float" office:value="-20">
                <text:p>-20</text:p>
              </table:table-cell>
            </table:table-row>
            <table:table-row>
              <table:table-cell office:value-type="string">
                <text:p>8</text:p>
              </table:table-cell>
              <table:table-cell office:value-type="float" office:value="0.0000139999996463303">
                <text:p>0.0000139999996463303</text:p>
              </table:table-cell>
              <table:table-cell office:value-type="float" office:value="-5">
                <text:p>-5</text:p>
              </table:table-cell>
              <table:table-cell office:value-type="float" office:value="-20">
                <text:p>-20</text:p>
              </table:table-cell>
            </table:table-row>
            <table:table-row>
              <table:table-cell office:value-type="string">
                <text:p>9</text:p>
              </table:table-cell>
              <table:table-cell office:value-type="float" office:value="0.000015999999595806">
                <text:p>0.000015999999595806</text:p>
              </table:table-cell>
              <table:table-cell office:value-type="float" office:value="-5.59999990463257">
                <text:p>-5.59999990463257</text:p>
              </table:table-cell>
              <table:table-cell office:value-type="float" office:value="-20">
                <text:p>-20</text:p>
              </table:table-cell>
            </table:table-row>
            <table:table-row>
              <table:table-cell office:value-type="string">
                <text:p>10</text:p>
              </table:table-cell>
              <table:table-cell office:value-type="float" office:value="0.0000179999995452818">
                <text:p>0.0000179999995452818</text:p>
              </table:table-cell>
              <table:table-cell office:value-type="float" office:value="-5.80000019073486">
                <text:p>-5.80000019073486</text:p>
              </table:table-cell>
              <table:table-cell office:value-type="float" office:value="-20">
                <text:p>-20</text:p>
              </table:table-cell>
            </table:table-row>
            <table:table-row>
              <table:table-cell office:value-type="string">
                <text:p>11</text:p>
              </table:table-cell>
              <table:table-cell office:value-type="float" office:value="0.0000199999994947575">
                <text:p>0.0000199999994947575</text:p>
              </table:table-cell>
              <table:table-cell office:value-type="float" office:value="-6.19999980926514">
                <text:p>-6.19999980926514</text:p>
              </table:table-cell>
              <table:table-cell office:value-type="float" office:value="-20">
                <text:p>-20</text:p>
              </table:table-cell>
            </table:table-row>
            <table:table-row>
              <table:table-cell office:value-type="string">
                <text:p>12</text:p>
              </table:table-cell>
              <table:table-cell office:value-type="float" office:value="0.0000219999994442333">
                <text:p>0.0000219999994442333</text:p>
              </table:table-cell>
              <table:table-cell office:value-type="float" office:value="-6.80000019073486">
                <text:p>-6.80000019073486</text:p>
              </table:table-cell>
              <table:table-cell office:value-type="float" office:value="-20">
                <text:p>-20</text:p>
              </table:table-cell>
            </table:table-row>
            <table:table-row>
              <table:table-cell office:value-type="string">
                <text:p>13</text:p>
              </table:table-cell>
              <table:table-cell office:value-type="float" office:value="0.000023999999393709">
                <text:p>0.000023999999393709</text:p>
              </table:table-cell>
              <table:table-cell office:value-type="float" office:value="-6.80000019073486">
                <text:p>-6.80000019073486</text:p>
              </table:table-cell>
              <table:table-cell office:value-type="float" office:value="-20">
                <text:p>-20</text:p>
              </table:table-cell>
            </table:table-row>
            <table:table-row>
              <table:table-cell office:value-type="string">
                <text:p>14</text:p>
              </table:table-cell>
              <table:table-cell office:value-type="float" office:value="0.0000259999993431848">
                <text:p>0.0000259999993431848</text:p>
              </table:table-cell>
              <table:table-cell office:value-type="float" office:value="-7.19999980926514">
                <text:p>-7.19999980926514</text:p>
              </table:table-cell>
              <table:table-cell office:value-type="float" office:value="-20">
                <text:p>-20</text:p>
              </table:table-cell>
            </table:table-row>
            <table:table-row>
              <table:table-cell office:value-type="string">
                <text:p>15</text:p>
              </table:table-cell>
              <table:table-cell office:value-type="float" office:value="0.0000279999992926605">
                <text:p>0.0000279999992926605</text:p>
              </table:table-cell>
              <table:table-cell office:value-type="float" office:value="-7.59999990463257">
                <text:p>-7.59999990463257</text:p>
              </table:table-cell>
              <table:table-cell office:value-type="float" office:value="-20">
                <text:p>-20</text:p>
              </table:table-cell>
            </table:table-row>
            <table:table-row>
              <table:table-cell office:value-type="string">
                <text:p>16</text:p>
              </table:table-cell>
              <table:table-cell office:value-type="float" office:value="0.0000299999992421363">
                <text:p>0.0000299999992421363</text:p>
              </table:table-cell>
              <table:table-cell office:value-type="float" office:value="-7.80000019073486">
                <text:p>-7.80000019073486</text:p>
              </table:table-cell>
              <table:table-cell office:value-type="float" office:value="-20">
                <text:p>-20</text:p>
              </table:table-cell>
            </table:table-row>
            <table:table-row>
              <table:table-cell office:value-type="string">
                <text:p>17</text:p>
              </table:table-cell>
              <table:table-cell office:value-type="float" office:value="0.000031999999191612">
                <text:p>0.000031999999191612</text:p>
              </table:table-cell>
              <table:table-cell office:value-type="float" office:value="-8.60000038146973">
                <text:p>-8.60000038146973</text:p>
              </table:table-cell>
              <table:table-cell office:value-type="float" office:value="-20">
                <text:p>-20</text:p>
              </table:table-cell>
            </table:table-row>
            <table:table-row>
              <table:table-cell office:value-type="string">
                <text:p>18</text:p>
              </table:table-cell>
              <table:table-cell office:value-type="float" office:value="0.0000339999991410878">
                <text:p>0.0000339999991410878</text:p>
              </table:table-cell>
              <table:table-cell office:value-type="float" office:value="-8.80000019073486">
                <text:p>-8.80000019073486</text:p>
              </table:table-cell>
              <table:table-cell office:value-type="float" office:value="-20">
                <text:p>-20</text:p>
              </table:table-cell>
            </table:table-row>
            <table:table-row>
              <table:table-cell office:value-type="string">
                <text:p>19</text:p>
              </table:table-cell>
              <table:table-cell office:value-type="float" office:value="0.0000359999990905635">
                <text:p>0.0000359999990905635</text:p>
              </table:table-cell>
              <table:table-cell office:value-type="float" office:value="-9">
                <text:p>-9</text:p>
              </table:table-cell>
              <table:table-cell office:value-type="float" office:value="-20">
                <text:p>-20</text:p>
              </table:table-cell>
            </table:table-row>
            <table:table-row>
              <table:table-cell office:value-type="string">
                <text:p>20</text:p>
              </table:table-cell>
              <table:table-cell office:value-type="float" office:value="0.0000379999990400393">
                <text:p>0.0000379999990400393</text:p>
              </table:table-cell>
              <table:table-cell office:value-type="float" office:value="-9.39999961853027">
                <text:p>-9.39999961853027</text:p>
              </table:table-cell>
              <table:table-cell office:value-type="float" office:value="-20">
                <text:p>-20</text:p>
              </table:table-cell>
            </table:table-row>
            <table:table-row>
              <table:table-cell office:value-type="string">
                <text:p>21</text:p>
              </table:table-cell>
              <table:table-cell office:value-type="float" office:value="0.000039999998989515">
                <text:p>0.000039999998989515</text:p>
              </table:table-cell>
              <table:table-cell office:value-type="float" office:value="-9.80000019073486">
                <text:p>-9.80000019073486</text:p>
              </table:table-cell>
              <table:table-cell office:value-type="float" office:value="-20">
                <text:p>-20</text:p>
              </table:table-cell>
            </table:table-row>
            <table:table-row>
              <table:table-cell office:value-type="string">
                <text:p>22</text:p>
              </table:table-cell>
              <table:table-cell office:value-type="float" office:value="0.0000419999989389908">
                <text:p>0.0000419999989389908</text:p>
              </table:table-cell>
              <table:table-cell office:value-type="float" office:value="-10.1999998092651">
                <text:p>-10.1999998092651</text:p>
              </table:table-cell>
              <table:table-cell office:value-type="float" office:value="-20">
                <text:p>-20</text:p>
              </table:table-cell>
            </table:table-row>
            <table:table-row>
              <table:table-cell office:value-type="string">
                <text:p>23</text:p>
              </table:table-cell>
              <table:table-cell office:value-type="float" office:value="0.0000439999988884665">
                <text:p>0.0000439999988884665</text:p>
              </table:table-cell>
              <table:table-cell office:value-type="float" office:value="-10.6000003814697">
                <text:p>-10.6000003814697</text:p>
              </table:table-cell>
              <table:table-cell office:value-type="float" office:value="-20">
                <text:p>-20</text:p>
              </table:table-cell>
            </table:table-row>
            <table:table-row>
              <table:table-cell office:value-type="string">
                <text:p>24</text:p>
              </table:table-cell>
              <table:table-cell office:value-type="float" office:value="0.0000459999988379423">
                <text:p>0.0000459999988379423</text:p>
              </table:table-cell>
              <table:table-cell office:value-type="float" office:value="-11">
                <text:p>-11</text:p>
              </table:table-cell>
              <table:table-cell office:value-type="float" office:value="-20">
                <text:p>-20</text:p>
              </table:table-cell>
            </table:table-row>
            <table:table-row>
              <table:table-cell office:value-type="string">
                <text:p>25</text:p>
              </table:table-cell>
              <table:table-cell office:value-type="float" office:value="0.000047999998787418">
                <text:p>0.000047999998787418</text:p>
              </table:table-cell>
              <table:table-cell office:value-type="float" office:value="-11.3999996185303">
                <text:p>-11.3999996185303</text:p>
              </table:table-cell>
              <table:table-cell office:value-type="float" office:value="-20">
                <text:p>-20</text:p>
              </table:table-cell>
            </table:table-row>
            <table:table-row>
              <table:table-cell office:value-type="string">
                <text:p>26</text:p>
              </table:table-cell>
              <table:table-cell office:value-type="float" office:value="0.0000499999987368938">
                <text:p>0.0000499999987368938</text:p>
              </table:table-cell>
              <table:table-cell office:value-type="float" office:value="-11.8000001907349">
                <text:p>-11.8000001907349</text:p>
              </table:table-cell>
              <table:table-cell office:value-type="float" office:value="-20">
                <text:p>-20</text:p>
              </table:table-cell>
            </table:table-row>
            <table:table-row>
              <table:table-cell office:value-type="string">
                <text:p>27</text:p>
              </table:table-cell>
              <table:table-cell office:value-type="float" office:value="0.0000519999986863695">
                <text:p>0.0000519999986863695</text:p>
              </table:table-cell>
              <table:table-cell office:value-type="float" office:value="-12">
                <text:p>-12</text:p>
              </table:table-cell>
              <table:table-cell office:value-type="float" office:value="-20">
                <text:p>-20</text:p>
              </table:table-cell>
            </table:table-row>
            <table:table-row>
              <table:table-cell office:value-type="string">
                <text:p>28</text:p>
              </table:table-cell>
              <table:table-cell office:value-type="float" office:value="0.0000539999986358453">
                <text:p>0.0000539999986358453</text:p>
              </table:table-cell>
              <table:table-cell office:value-type="float" office:value="-12.3999996185303">
                <text:p>-12.3999996185303</text:p>
              </table:table-cell>
              <table:table-cell office:value-type="float" office:value="-20">
                <text:p>-20</text:p>
              </table:table-cell>
            </table:table-row>
            <table:table-row>
              <table:table-cell office:value-type="string">
                <text:p>29</text:p>
              </table:table-cell>
              <table:table-cell office:value-type="float" office:value="0.000055999998585321">
                <text:p>0.000055999998585321</text:p>
              </table:table-cell>
              <table:table-cell office:value-type="float" office:value="-12.8000001907349">
                <text:p>-12.8000001907349</text:p>
              </table:table-cell>
              <table:table-cell office:value-type="float" office:value="-20">
                <text:p>-20</text:p>
              </table:table-cell>
            </table:table-row>
            <table:table-row>
              <table:table-cell office:value-type="string">
                <text:p>30</text:p>
              </table:table-cell>
              <table:table-cell office:value-type="float" office:value="0.0000579999985347968">
                <text:p>0.0000579999985347968</text:p>
              </table:table-cell>
              <table:table-cell office:value-type="float" office:value="-13.1999998092651">
                <text:p>-13.1999998092651</text:p>
              </table:table-cell>
              <table:table-cell office:value-type="float" office:value="-20">
                <text:p>-20</text:p>
              </table:table-cell>
            </table:table-row>
            <table:table-row>
              <table:table-cell office:value-type="string">
                <text:p>31</text:p>
              </table:table-cell>
              <table:table-cell office:value-type="float" office:value="0.0000599999984842725">
                <text:p>0.0000599999984842725</text:p>
              </table:table-cell>
              <table:table-cell office:value-type="float" office:value="-13.6000003814697">
                <text:p>-13.6000003814697</text:p>
              </table:table-cell>
              <table:table-cell office:value-type="float" office:value="-20">
                <text:p>-20</text:p>
              </table:table-cell>
            </table:table-row>
            <table:table-row>
              <table:table-cell office:value-type="string">
                <text:p>32</text:p>
              </table:table-cell>
              <table:table-cell office:value-type="float" office:value="0.0000619999984337483">
                <text:p>0.0000619999984337483</text:p>
              </table:table-cell>
              <table:table-cell office:value-type="float" office:value="-14">
                <text:p>-14</text:p>
              </table:table-cell>
              <table:table-cell office:value-type="float" office:value="-20">
                <text:p>-20</text:p>
              </table:table-cell>
            </table:table-row>
            <table:table-row>
              <table:table-cell office:value-type="string">
                <text:p>33</text:p>
              </table:table-cell>
              <table:table-cell office:value-type="float" office:value="0.000063999998383224">
                <text:p>0.000063999998383224</text:p>
              </table:table-cell>
              <table:table-cell office:value-type="float" office:value="-14.3999996185303">
                <text:p>-14.3999996185303</text:p>
              </table:table-cell>
              <table:table-cell office:value-type="float" office:value="-20">
                <text:p>-20</text:p>
              </table:table-cell>
            </table:table-row>
            <table:table-row>
              <table:table-cell office:value-type="string">
                <text:p>34</text:p>
              </table:table-cell>
              <table:table-cell office:value-type="float" office:value="0.0000659999983326998">
                <text:p>0.0000659999983326998</text:p>
              </table:table-cell>
              <table:table-cell office:value-type="float" office:value="-14.8000001907349">
                <text:p>-14.8000001907349</text:p>
              </table:table-cell>
              <table:table-cell office:value-type="float" office:value="-20">
                <text:p>-20</text:p>
              </table:table-cell>
            </table:table-row>
            <table:table-row>
              <table:table-cell office:value-type="string">
                <text:p>35</text:p>
              </table:table-cell>
              <table:table-cell office:value-type="float" office:value="0.0000679999982821755">
                <text:p>0.0000679999982821755</text:p>
              </table:table-cell>
              <table:table-cell office:value-type="float" office:value="-15">
                <text:p>-15</text:p>
              </table:table-cell>
              <table:table-cell office:value-type="float" office:value="-20">
                <text:p>-20</text:p>
              </table:table-cell>
            </table:table-row>
            <table:table-row>
              <table:table-cell office:value-type="string">
                <text:p>36</text:p>
              </table:table-cell>
              <table:table-cell office:value-type="float" office:value="0.0000699999982316513">
                <text:p>0.0000699999982316513</text:p>
              </table:table-cell>
              <table:table-cell office:value-type="float" office:value="-15.3999996185303">
                <text:p>-15.3999996185303</text:p>
              </table:table-cell>
              <table:table-cell office:value-type="float" office:value="-20">
                <text:p>-20</text:p>
              </table:table-cell>
            </table:table-row>
            <table:table-row>
              <table:table-cell office:value-type="string">
                <text:p>37</text:p>
              </table:table-cell>
              <table:table-cell office:value-type="float" office:value="0.000071999998181127">
                <text:p>0.000071999998181127</text:p>
              </table:table-cell>
              <table:table-cell office:value-type="float" office:value="-16">
                <text:p>-16</text:p>
              </table:table-cell>
              <table:table-cell office:value-type="float" office:value="-20">
                <text:p>-20</text:p>
              </table:table-cell>
            </table:table-row>
            <table:table-row>
              <table:table-cell office:value-type="string">
                <text:p>38</text:p>
              </table:table-cell>
              <table:table-cell office:value-type="float" office:value="0.0000739999981306028">
                <text:p>0.0000739999981306028</text:p>
              </table:table-cell>
              <table:table-cell office:value-type="float" office:value="-16">
                <text:p>-16</text:p>
              </table:table-cell>
              <table:table-cell office:value-type="float" office:value="-20">
                <text:p>-20</text:p>
              </table:table-cell>
            </table:table-row>
            <table:table-row>
              <table:table-cell office:value-type="string">
                <text:p>39</text:p>
              </table:table-cell>
              <table:table-cell office:value-type="float" office:value="0.0000759999980800785">
                <text:p>0.0000759999980800785</text:p>
              </table:table-cell>
              <table:table-cell office:value-type="float" office:value="-16.3999996185303">
                <text:p>-16.3999996185303</text:p>
              </table:table-cell>
              <table:table-cell office:value-type="float" office:value="-20">
                <text:p>-20</text:p>
              </table:table-cell>
            </table:table-row>
            <table:table-row>
              <table:table-cell office:value-type="string">
                <text:p>40</text:p>
              </table:table-cell>
              <table:table-cell office:value-type="float" office:value="0.0000779999980295543">
                <text:p>0.0000779999980295543</text:p>
              </table:table-cell>
              <table:table-cell office:value-type="float" office:value="-17">
                <text:p>-17</text:p>
              </table:table-cell>
              <table:table-cell office:value-type="float" office:value="-20">
                <text:p>-20</text:p>
              </table:table-cell>
            </table:table-row>
            <table:table-row>
              <table:table-cell office:value-type="string">
                <text:p>41</text:p>
              </table:table-cell>
              <table:table-cell office:value-type="float" office:value="0.00007999999797903">
                <text:p>0.00007999999797903</text:p>
              </table:table-cell>
              <table:table-cell office:value-type="float" office:value="-17.3999996185303">
                <text:p>-17.3999996185303</text:p>
              </table:table-cell>
              <table:table-cell office:value-type="float" office:value="-20">
                <text:p>-20</text:p>
              </table:table-cell>
            </table:table-row>
            <table:table-row>
              <table:table-cell office:value-type="string">
                <text:p>42</text:p>
              </table:table-cell>
              <table:table-cell office:value-type="float" office:value="0.0000819999979285058">
                <text:p>0.0000819999979285058</text:p>
              </table:table-cell>
              <table:table-cell office:value-type="float" office:value="-17.7999992370605">
                <text:p>-17.7999992370605</text:p>
              </table:table-cell>
              <table:table-cell office:value-type="float" office:value="-20">
                <text:p>-20</text:p>
              </table:table-cell>
            </table:table-row>
            <table:table-row>
              <table:table-cell office:value-type="string">
                <text:p>43</text:p>
              </table:table-cell>
              <table:table-cell office:value-type="float" office:value="0.0000839999978779815">
                <text:p>0.0000839999978779815</text:p>
              </table:table-cell>
              <table:table-cell office:value-type="float" office:value="-18">
                <text:p>-18</text:p>
              </table:table-cell>
              <table:table-cell office:value-type="float" office:value="-20">
                <text:p>-20</text:p>
              </table:table-cell>
            </table:table-row>
            <table:table-row>
              <table:table-cell office:value-type="string">
                <text:p>44</text:p>
              </table:table-cell>
              <table:table-cell office:value-type="float" office:value="0.0000859999978274573">
                <text:p>0.0000859999978274573</text:p>
              </table:table-cell>
              <table:table-cell office:value-type="float" office:value="-18.3999996185303">
                <text:p>-18.3999996185303</text:p>
              </table:table-cell>
              <table:table-cell office:value-type="float" office:value="-20">
                <text:p>-20</text:p>
              </table:table-cell>
            </table:table-row>
            <table:table-row>
              <table:table-cell office:value-type="string">
                <text:p>45</text:p>
              </table:table-cell>
              <table:table-cell office:value-type="float" office:value="0.000087999997776933">
                <text:p>0.000087999997776933</text:p>
              </table:table-cell>
              <table:table-cell office:value-type="float" office:value="-18.7999992370605">
                <text:p>-18.7999992370605</text:p>
              </table:table-cell>
              <table:table-cell office:value-type="float" office:value="-20">
                <text:p>-20</text:p>
              </table:table-cell>
            </table:table-row>
            <table:table-row>
              <table:table-cell office:value-type="string">
                <text:p>46</text:p>
              </table:table-cell>
              <table:table-cell office:value-type="float" office:value="0.0000899999977264088">
                <text:p>0.0000899999977264088</text:p>
              </table:table-cell>
              <table:table-cell office:value-type="float" office:value="-19">
                <text:p>-19</text:p>
              </table:table-cell>
              <table:table-cell office:value-type="float" office:value="-20">
                <text:p>-20</text:p>
              </table:table-cell>
            </table:table-row>
            <table:table-row>
              <table:table-cell office:value-type="string">
                <text:p>47</text:p>
              </table:table-cell>
              <table:table-cell office:value-type="float" office:value="0.0000919999976758845">
                <text:p>0.0000919999976758845</text:p>
              </table:table-cell>
              <table:table-cell office:value-type="float" office:value="-19.3999996185303">
                <text:p>-19.3999996185303</text:p>
              </table:table-cell>
              <table:table-cell office:value-type="float" office:value="-20">
                <text:p>-20</text:p>
              </table:table-cell>
            </table:table-row>
            <table:table-row>
              <table:table-cell office:value-type="string">
                <text:p>48</text:p>
              </table:table-cell>
              <table:table-cell office:value-type="float" office:value="0.0000939999976253603">
                <text:p>0.0000939999976253603</text:p>
              </table:table-cell>
              <table:table-cell office:value-type="float" office:value="-19.7999992370605">
                <text:p>-19.7999992370605</text:p>
              </table:table-cell>
              <table:table-cell office:value-type="float" office:value="-20">
                <text:p>-20</text:p>
              </table:table-cell>
            </table:table-row>
            <table:table-row>
              <table:table-cell office:value-type="string">
                <text:p>49</text:p>
              </table:table-cell>
              <table:table-cell office:value-type="float" office:value="0.000095999997574836">
                <text:p>0.000095999997574836</text:p>
              </table:table-cell>
              <table:table-cell office:value-type="float" office:value="-20.3999996185303">
                <text:p>-20.3999996185303</text:p>
              </table:table-cell>
              <table:table-cell office:value-type="float" office:value="-20">
                <text:p>-20</text:p>
              </table:table-cell>
            </table:table-row>
            <table:table-row>
              <table:table-cell office:value-type="string">
                <text:p>50</text:p>
              </table:table-cell>
              <table:table-cell office:value-type="float" office:value="0.0000979999975243118">
                <text:p>0.0000979999975243118</text:p>
              </table:table-cell>
              <table:table-cell office:value-type="float" office:value="-20.6000003814697">
                <text:p>-20.6000003814697</text:p>
              </table:table-cell>
              <table:table-cell office:value-type="float" office:value="-20">
                <text:p>-20</text:p>
              </table:table-cell>
            </table:table-row>
            <table:table-row>
              <table:table-cell office:value-type="string">
                <text:p>51</text:p>
              </table:table-cell>
              <table:table-cell office:value-type="float" office:value="0.0000999999974737875">
                <text:p>0.0000999999974737875</text:p>
              </table:table-cell>
              <table:table-cell office:value-type="float" office:value="-20.7999992370605">
                <text:p>-20.7999992370605</text:p>
              </table:table-cell>
              <table:table-cell office:value-type="float" office:value="-20">
                <text:p>-20</text:p>
              </table:table-cell>
            </table:table-row>
            <table:table-row>
              <table:table-cell office:value-type="string">
                <text:p>52</text:p>
              </table:table-cell>
              <table:table-cell office:value-type="float" office:value="0.000101999997423263">
                <text:p>0.000101999997423263</text:p>
              </table:table-cell>
              <table:table-cell office:value-type="float" office:value="-21.2000007629395">
                <text:p>-21.2000007629395</text:p>
              </table:table-cell>
              <table:table-cell office:value-type="float" office:value="-20">
                <text:p>-20</text:p>
              </table:table-cell>
            </table:table-row>
            <table:table-row>
              <table:table-cell office:value-type="string">
                <text:p>53</text:p>
              </table:table-cell>
              <table:table-cell office:value-type="float" office:value="0.000103999997372739">
                <text:p>0.000103999997372739</text:p>
              </table:table-cell>
              <table:table-cell office:value-type="float" office:value="-21.6000003814697">
                <text:p>-21.6000003814697</text:p>
              </table:table-cell>
              <table:table-cell office:value-type="float" office:value="-20">
                <text:p>-20</text:p>
              </table:table-cell>
            </table:table-row>
            <table:table-row>
              <table:table-cell office:value-type="string">
                <text:p>54</text:p>
              </table:table-cell>
              <table:table-cell office:value-type="float" office:value="0.000105999997322215">
                <text:p>0.000105999997322215</text:p>
              </table:table-cell>
              <table:table-cell office:value-type="float" office:value="-22">
                <text:p>-22</text:p>
              </table:table-cell>
              <table:table-cell office:value-type="float" office:value="-20">
                <text:p>-20</text:p>
              </table:table-cell>
            </table:table-row>
            <table:table-row>
              <table:table-cell office:value-type="string">
                <text:p>55</text:p>
              </table:table-cell>
              <table:table-cell office:value-type="float" office:value="0.000107999997271691">
                <text:p>0.000107999997271691</text:p>
              </table:table-cell>
              <table:table-cell office:value-type="float" office:value="-22.3999996185303">
                <text:p>-22.3999996185303</text:p>
              </table:table-cell>
              <table:table-cell office:value-type="float" office:value="-20">
                <text:p>-20</text:p>
              </table:table-cell>
            </table:table-row>
            <table:table-row>
              <table:table-cell office:value-type="string">
                <text:p>56</text:p>
              </table:table-cell>
              <table:table-cell office:value-type="float" office:value="0.000109999997221166">
                <text:p>0.000109999997221166</text:p>
              </table:table-cell>
              <table:table-cell office:value-type="float" office:value="-22.7999992370605">
                <text:p>-22.7999992370605</text:p>
              </table:table-cell>
              <table:table-cell office:value-type="float" office:value="-20">
                <text:p>-20</text:p>
              </table:table-cell>
            </table:table-row>
            <table:table-row>
              <table:table-cell office:value-type="string">
                <text:p>57</text:p>
              </table:table-cell>
              <table:table-cell office:value-type="float" office:value="0.000111999997170642">
                <text:p>0.000111999997170642</text:p>
              </table:table-cell>
              <table:table-cell office:value-type="float" office:value="-23.2000007629395">
                <text:p>-23.2000007629395</text:p>
              </table:table-cell>
              <table:table-cell office:value-type="float" office:value="-20">
                <text:p>-20</text:p>
              </table:table-cell>
            </table:table-row>
            <table:table-row>
              <table:table-cell office:value-type="string">
                <text:p>58</text:p>
              </table:table-cell>
              <table:table-cell office:value-type="float" office:value="0.000113999997120118">
                <text:p>0.000113999997120118</text:p>
              </table:table-cell>
              <table:table-cell office:value-type="float" office:value="-23.3999996185303">
                <text:p>-23.3999996185303</text:p>
              </table:table-cell>
              <table:table-cell office:value-type="float" office:value="-20">
                <text:p>-20</text:p>
              </table:table-cell>
            </table:table-row>
            <table:table-row>
              <table:table-cell office:value-type="string">
                <text:p>59</text:p>
              </table:table-cell>
              <table:table-cell office:value-type="float" office:value="0.000115999997069594">
                <text:p>0.000115999997069594</text:p>
              </table:table-cell>
              <table:table-cell office:value-type="float" office:value="-24">
                <text:p>-24</text:p>
              </table:table-cell>
              <table:table-cell office:value-type="float" office:value="-20">
                <text:p>-20</text:p>
              </table:table-cell>
            </table:table-row>
            <table:table-row>
              <table:table-cell office:value-type="string">
                <text:p>60</text:p>
              </table:table-cell>
              <table:table-cell office:value-type="float" office:value="0.000117999997019069">
                <text:p>0.000117999997019069</text:p>
              </table:table-cell>
              <table:table-cell office:value-type="float" office:value="-24.3999996185303">
                <text:p>-24.3999996185303</text:p>
              </table:table-cell>
              <table:table-cell office:value-type="float" office:value="-20">
                <text:p>-20</text:p>
              </table:table-cell>
            </table:table-row>
            <table:table-row>
              <table:table-cell office:value-type="string">
                <text:p>61</text:p>
              </table:table-cell>
              <table:table-cell office:value-type="float" office:value="0.000119999996968545">
                <text:p>0.000119999996968545</text:p>
              </table:table-cell>
              <table:table-cell office:value-type="float" office:value="-24.7999992370605">
                <text:p>-24.7999992370605</text:p>
              </table:table-cell>
              <table:table-cell office:value-type="float" office:value="-20">
                <text:p>-20</text:p>
              </table:table-cell>
            </table:table-row>
            <table:table-row>
              <table:table-cell office:value-type="string">
                <text:p>62</text:p>
              </table:table-cell>
              <table:table-cell office:value-type="float" office:value="0.000121999996918021">
                <text:p>0.000121999996918021</text:p>
              </table:table-cell>
              <table:table-cell office:value-type="float" office:value="-25.2000007629395">
                <text:p>-25.2000007629395</text:p>
              </table:table-cell>
              <table:table-cell office:value-type="float" office:value="-20">
                <text:p>-20</text:p>
              </table:table-cell>
            </table:table-row>
            <table:table-row>
              <table:table-cell office:value-type="string">
                <text:p>63</text:p>
              </table:table-cell>
              <table:table-cell office:value-type="float" office:value="0.000123999996867497">
                <text:p>0.000123999996867497</text:p>
              </table:table-cell>
              <table:table-cell office:value-type="float" office:value="-25.3999996185303">
                <text:p>-25.3999996185303</text:p>
              </table:table-cell>
              <table:table-cell office:value-type="float" office:value="-20">
                <text:p>-20</text:p>
              </table:table-cell>
            </table:table-row>
            <table:table-row>
              <table:table-cell office:value-type="string">
                <text:p>64</text:p>
              </table:table-cell>
              <table:table-cell office:value-type="float" office:value="0.000125999996816972">
                <text:p>0.000125999996816972</text:p>
              </table:table-cell>
              <table:table-cell office:value-type="float" office:value="-25.7999992370605">
                <text:p>-25.7999992370605</text:p>
              </table:table-cell>
              <table:table-cell office:value-type="float" office:value="-20">
                <text:p>-20</text:p>
              </table:table-cell>
            </table:table-row>
            <table:table-row>
              <table:table-cell office:value-type="string">
                <text:p>65</text:p>
              </table:table-cell>
              <table:table-cell office:value-type="float" office:value="0.000127999996766448">
                <text:p>0.000127999996766448</text:p>
              </table:table-cell>
              <table:table-cell office:value-type="float" office:value="-26.3999996185303">
                <text:p>-26.3999996185303</text:p>
              </table:table-cell>
              <table:table-cell office:value-type="float" office:value="-20">
                <text:p>-20</text:p>
              </table:table-cell>
            </table:table-row>
            <table:table-row>
              <table:table-cell office:value-type="string">
                <text:p>66</text:p>
              </table:table-cell>
              <table:table-cell office:value-type="float" office:value="0.000129999996715924">
                <text:p>0.000129999996715924</text:p>
              </table:table-cell>
              <table:table-cell office:value-type="float" office:value="-26.6000003814697">
                <text:p>-26.6000003814697</text:p>
              </table:table-cell>
              <table:table-cell office:value-type="float" office:value="-20">
                <text:p>-20</text:p>
              </table:table-cell>
            </table:table-row>
            <table:table-row>
              <table:table-cell office:value-type="string">
                <text:p>67</text:p>
              </table:table-cell>
              <table:table-cell office:value-type="float" office:value="0.0001319999966654">
                <text:p>0.0001319999966654</text:p>
              </table:table-cell>
              <table:table-cell office:value-type="float" office:value="-26.7999992370605">
                <text:p>-26.7999992370605</text:p>
              </table:table-cell>
              <table:table-cell office:value-type="float" office:value="-20">
                <text:p>-20</text:p>
              </table:table-cell>
            </table:table-row>
            <table:table-row>
              <table:table-cell office:value-type="string">
                <text:p>68</text:p>
              </table:table-cell>
              <table:table-cell office:value-type="float" office:value="0.000133999996614875">
                <text:p>0.000133999996614875</text:p>
              </table:table-cell>
              <table:table-cell office:value-type="float" office:value="-27.3999996185303">
                <text:p>-27.3999996185303</text:p>
              </table:table-cell>
              <table:table-cell office:value-type="float" office:value="-20">
                <text:p>-20</text:p>
              </table:table-cell>
            </table:table-row>
            <table:table-row>
              <table:table-cell office:value-type="string">
                <text:p>69</text:p>
              </table:table-cell>
              <table:table-cell office:value-type="float" office:value="0.000135999996564351">
                <text:p>0.000135999996564351</text:p>
              </table:table-cell>
              <table:table-cell office:value-type="float" office:value="-27.6000003814697">
                <text:p>-27.6000003814697</text:p>
              </table:table-cell>
              <table:table-cell office:value-type="float" office:value="-20">
                <text:p>-20</text:p>
              </table:table-cell>
            </table:table-row>
            <table:table-row>
              <table:table-cell office:value-type="string">
                <text:p>70</text:p>
              </table:table-cell>
              <table:table-cell office:value-type="float" office:value="0.000137999996513827">
                <text:p>0.000137999996513827</text:p>
              </table:table-cell>
              <table:table-cell office:value-type="float" office:value="-28">
                <text:p>-28</text:p>
              </table:table-cell>
              <table:table-cell office:value-type="float" office:value="-20">
                <text:p>-20</text:p>
              </table:table-cell>
            </table:table-row>
            <table:table-row>
              <table:table-cell office:value-type="string">
                <text:p>71</text:p>
              </table:table-cell>
              <table:table-cell office:value-type="float" office:value="0.000139999996463303">
                <text:p>0.000139999996463303</text:p>
              </table:table-cell>
              <table:table-cell office:value-type="float" office:value="-28.3999996185303">
                <text:p>-28.3999996185303</text:p>
              </table:table-cell>
              <table:table-cell office:value-type="float" office:value="-20">
                <text:p>-20</text:p>
              </table:table-cell>
            </table:table-row>
            <table:table-row>
              <table:table-cell office:value-type="string">
                <text:p>72</text:p>
              </table:table-cell>
              <table:table-cell office:value-type="float" office:value="0.000141999996412778">
                <text:p>0.000141999996412778</text:p>
              </table:table-cell>
              <table:table-cell office:value-type="float" office:value="-28.7999992370605">
                <text:p>-28.7999992370605</text:p>
              </table:table-cell>
              <table:table-cell office:value-type="float" office:value="-20">
                <text:p>-20</text:p>
              </table:table-cell>
            </table:table-row>
            <table:table-row>
              <table:table-cell office:value-type="string">
                <text:p>73</text:p>
              </table:table-cell>
              <table:table-cell office:value-type="float" office:value="0.000143999996362254">
                <text:p>0.000143999996362254</text:p>
              </table:table-cell>
              <table:table-cell office:value-type="float" office:value="-29.3999996185303">
                <text:p>-29.3999996185303</text:p>
              </table:table-cell>
              <table:table-cell office:value-type="float" office:value="-20">
                <text:p>-20</text:p>
              </table:table-cell>
            </table:table-row>
            <table:table-row>
              <table:table-cell office:value-type="string">
                <text:p>74</text:p>
              </table:table-cell>
              <table:table-cell office:value-type="float" office:value="0.00014599999631173">
                <text:p>0.00014599999631173</text:p>
              </table:table-cell>
              <table:table-cell office:value-type="float" office:value="-29.6000003814697">
                <text:p>-29.6000003814697</text:p>
              </table:table-cell>
              <table:table-cell office:value-type="float" office:value="-20">
                <text:p>-20</text:p>
              </table:table-cell>
            </table:table-row>
            <table:table-row>
              <table:table-cell office:value-type="string">
                <text:p>75</text:p>
              </table:table-cell>
              <table:table-cell office:value-type="float" office:value="0.000147999996261206">
                <text:p>0.000147999996261206</text:p>
              </table:table-cell>
              <table:table-cell office:value-type="float" office:value="-29.6000003814697">
                <text:p>-29.6000003814697</text:p>
              </table:table-cell>
              <table:table-cell office:value-type="float" office:value="-20">
                <text:p>-20</text:p>
              </table:table-cell>
            </table:table-row>
            <table:table-row>
              <table:table-cell office:value-type="string">
                <text:p>76</text:p>
              </table:table-cell>
              <table:table-cell office:value-type="float" office:value="0.000149999996210681">
                <text:p>0.000149999996210681</text:p>
              </table:table-cell>
              <table:table-cell office:value-type="float" office:value="-30.2000007629395">
                <text:p>-30.2000007629395</text:p>
              </table:table-cell>
              <table:table-cell office:value-type="float" office:value="-20">
                <text:p>-20</text:p>
              </table:table-cell>
            </table:table-row>
            <table:table-row>
              <table:table-cell office:value-type="string">
                <text:p>77</text:p>
              </table:table-cell>
              <table:table-cell office:value-type="float" office:value="0.000151999996160157">
                <text:p>0.000151999996160157</text:p>
              </table:table-cell>
              <table:table-cell office:value-type="float" office:value="-30.3999996185303">
                <text:p>-30.3999996185303</text:p>
              </table:table-cell>
              <table:table-cell office:value-type="float" office:value="-20">
                <text:p>-20</text:p>
              </table:table-cell>
            </table:table-row>
            <table:table-row>
              <table:table-cell office:value-type="string">
                <text:p>78</text:p>
              </table:table-cell>
              <table:table-cell office:value-type="float" office:value="0.000153999996109633">
                <text:p>0.000153999996109633</text:p>
              </table:table-cell>
              <table:table-cell office:value-type="float" office:value="-31">
                <text:p>-31</text:p>
              </table:table-cell>
              <table:table-cell office:value-type="float" office:value="-20">
                <text:p>-20</text:p>
              </table:table-cell>
            </table:table-row>
            <table:table-row>
              <table:table-cell office:value-type="string">
                <text:p>79</text:p>
              </table:table-cell>
              <table:table-cell office:value-type="float" office:value="0.000155999996059109">
                <text:p>0.000155999996059109</text:p>
              </table:table-cell>
              <table:table-cell office:value-type="float" office:value="-31.2000007629395">
                <text:p>-31.2000007629395</text:p>
              </table:table-cell>
              <table:table-cell office:value-type="float" office:value="-20">
                <text:p>-20</text:p>
              </table:table-cell>
            </table:table-row>
            <table:table-row>
              <table:table-cell office:value-type="string">
                <text:p>80</text:p>
              </table:table-cell>
              <table:table-cell office:value-type="float" office:value="0.000157999996008584">
                <text:p>0.000157999996008584</text:p>
              </table:table-cell>
              <table:table-cell office:value-type="float" office:value="-31.7999992370605">
                <text:p>-31.7999992370605</text:p>
              </table:table-cell>
              <table:table-cell office:value-type="float" office:value="-20">
                <text:p>-20</text:p>
              </table:table-cell>
            </table:table-row>
            <table:table-row>
              <table:table-cell office:value-type="string">
                <text:p>81</text:p>
              </table:table-cell>
              <table:table-cell office:value-type="float" office:value="0.00015999999595806">
                <text:p>0.00015999999595806</text:p>
              </table:table-cell>
              <table:table-cell office:value-type="float" office:value="-32.2000007629395">
                <text:p>-32.2000007629395</text:p>
              </table:table-cell>
              <table:table-cell office:value-type="float" office:value="-20">
                <text:p>-20</text:p>
              </table:table-cell>
            </table:table-row>
            <table:table-row>
              <table:table-cell office:value-type="string">
                <text:p>82</text:p>
              </table:table-cell>
              <table:table-cell office:value-type="float" office:value="0.000161999995907536">
                <text:p>0.000161999995907536</text:p>
              </table:table-cell>
              <table:table-cell office:value-type="float" office:value="-32.4000015258789">
                <text:p>-32.4000015258789</text:p>
              </table:table-cell>
              <table:table-cell office:value-type="float" office:value="-20">
                <text:p>-20</text:p>
              </table:table-cell>
            </table:table-row>
            <table:table-row>
              <table:table-cell office:value-type="string">
                <text:p>83</text:p>
              </table:table-cell>
              <table:table-cell office:value-type="float" office:value="0.000163999995857012">
                <text:p>0.000163999995857012</text:p>
              </table:table-cell>
              <table:table-cell office:value-type="float" office:value="-32.7999992370606">
                <text:p>-32.7999992370606</text:p>
              </table:table-cell>
              <table:table-cell office:value-type="float" office:value="-20">
                <text:p>-20</text:p>
              </table:table-cell>
            </table:table-row>
            <table:table-row>
              <table:table-cell office:value-type="string">
                <text:p>84</text:p>
              </table:table-cell>
              <table:table-cell office:value-type="float" office:value="0.000165999995806487">
                <text:p>0.000165999995806487</text:p>
              </table:table-cell>
              <table:table-cell office:value-type="float" office:value="-33.2000007629395">
                <text:p>-33.2000007629395</text:p>
              </table:table-cell>
              <table:table-cell office:value-type="float" office:value="-20">
                <text:p>-20</text:p>
              </table:table-cell>
            </table:table-row>
            <table:table-row>
              <table:table-cell office:value-type="string">
                <text:p>85</text:p>
              </table:table-cell>
              <table:table-cell office:value-type="float" office:value="0.000167999995755963">
                <text:p>0.000167999995755963</text:p>
              </table:table-cell>
              <table:table-cell office:value-type="float" office:value="-33.5999984741211">
                <text:p>-33.5999984741211</text:p>
              </table:table-cell>
              <table:table-cell office:value-type="float" office:value="-20">
                <text:p>-20</text:p>
              </table:table-cell>
            </table:table-row>
            <table:table-row>
              <table:table-cell office:value-type="string">
                <text:p>86</text:p>
              </table:table-cell>
              <table:table-cell office:value-type="float" office:value="0.000169999995705439">
                <text:p>0.000169999995705439</text:p>
              </table:table-cell>
              <table:table-cell office:value-type="float" office:value="-34">
                <text:p>-34</text:p>
              </table:table-cell>
              <table:table-cell office:value-type="float" office:value="-20">
                <text:p>-20</text:p>
              </table:table-cell>
            </table:table-row>
            <table:table-row>
              <table:table-cell office:value-type="string">
                <text:p>87</text:p>
              </table:table-cell>
              <table:table-cell office:value-type="float" office:value="0.000171999995654915">
                <text:p>0.000171999995654915</text:p>
              </table:table-cell>
              <table:table-cell office:value-type="float" office:value="-34.2000007629395">
                <text:p>-34.2000007629395</text:p>
              </table:table-cell>
              <table:table-cell office:value-type="float" office:value="-20">
                <text:p>-20</text:p>
              </table:table-cell>
            </table:table-row>
            <table:table-row>
              <table:table-cell office:value-type="string">
                <text:p>88</text:p>
              </table:table-cell>
              <table:table-cell office:value-type="float" office:value="0.00017399999560439">
                <text:p>0.00017399999560439</text:p>
              </table:table-cell>
              <table:table-cell office:value-type="float" office:value="-34.5999984741211">
                <text:p>-34.5999984741211</text:p>
              </table:table-cell>
              <table:table-cell office:value-type="float" office:value="-20">
                <text:p>-20</text:p>
              </table:table-cell>
            </table:table-row>
            <table:table-row>
              <table:table-cell office:value-type="string">
                <text:p>89</text:p>
              </table:table-cell>
              <table:table-cell office:value-type="float" office:value="0.000175999995553866">
                <text:p>0.000175999995553866</text:p>
              </table:table-cell>
              <table:table-cell office:value-type="float" office:value="-35.2000007629395">
                <text:p>-35.2000007629395</text:p>
              </table:table-cell>
              <table:table-cell office:value-type="float" office:value="-20">
                <text:p>-20</text:p>
              </table:table-cell>
            </table:table-row>
            <table:table-row>
              <table:table-cell office:value-type="string">
                <text:p>90</text:p>
              </table:table-cell>
              <table:table-cell office:value-type="float" office:value="0.000177999995503342">
                <text:p>0.000177999995503342</text:p>
              </table:table-cell>
              <table:table-cell office:value-type="float" office:value="-35.4000015258789">
                <text:p>-35.4000015258789</text:p>
              </table:table-cell>
              <table:table-cell office:value-type="float" office:value="-20">
                <text:p>-20</text:p>
              </table:table-cell>
            </table:table-row>
            <table:table-row>
              <table:table-cell office:value-type="string">
                <text:p>91</text:p>
              </table:table-cell>
              <table:table-cell office:value-type="float" office:value="0.000179999995452818">
                <text:p>0.000179999995452818</text:p>
              </table:table-cell>
              <table:table-cell office:value-type="float" office:value="-35.7999992370606">
                <text:p>-35.7999992370606</text:p>
              </table:table-cell>
              <table:table-cell office:value-type="float" office:value="-20">
                <text:p>-20</text:p>
              </table:table-cell>
            </table:table-row>
            <table:table-row>
              <table:table-cell office:value-type="string">
                <text:p>92</text:p>
              </table:table-cell>
              <table:table-cell office:value-type="float" office:value="0.000181999995402293">
                <text:p>0.000181999995402293</text:p>
              </table:table-cell>
              <table:table-cell office:value-type="float" office:value="-36.2000007629395">
                <text:p>-36.2000007629395</text:p>
              </table:table-cell>
              <table:table-cell office:value-type="float" office:value="-20">
                <text:p>-20</text:p>
              </table:table-cell>
            </table:table-row>
            <table:table-row>
              <table:table-cell office:value-type="string">
                <text:p>93</text:p>
              </table:table-cell>
              <table:table-cell office:value-type="float" office:value="0.000183999995351769">
                <text:p>0.000183999995351769</text:p>
              </table:table-cell>
              <table:table-cell office:value-type="float" office:value="-36.5999984741211">
                <text:p>-36.5999984741211</text:p>
              </table:table-cell>
              <table:table-cell office:value-type="float" office:value="-20">
                <text:p>-20</text:p>
              </table:table-cell>
            </table:table-row>
            <table:table-row>
              <table:table-cell office:value-type="string">
                <text:p>94</text:p>
              </table:table-cell>
              <table:table-cell office:value-type="float" office:value="0.000185999995301245">
                <text:p>0.000185999995301245</text:p>
              </table:table-cell>
              <table:table-cell office:value-type="float" office:value="-36.7999992370606">
                <text:p>-36.7999992370606</text:p>
              </table:table-cell>
              <table:table-cell office:value-type="float" office:value="-20">
                <text:p>-20</text:p>
              </table:table-cell>
            </table:table-row>
            <table:table-row>
              <table:table-cell office:value-type="string">
                <text:p>95</text:p>
              </table:table-cell>
              <table:table-cell office:value-type="float" office:value="0.000187999995250721">
                <text:p>0.000187999995250721</text:p>
              </table:table-cell>
              <table:table-cell office:value-type="float" office:value="-37">
                <text:p>-37</text:p>
              </table:table-cell>
              <table:table-cell office:value-type="float" office:value="-20">
                <text:p>-20</text:p>
              </table:table-cell>
            </table:table-row>
            <table:table-row>
              <table:table-cell office:value-type="string">
                <text:p>96</text:p>
              </table:table-cell>
              <table:table-cell office:value-type="float" office:value="0.000189999995200196">
                <text:p>0.000189999995200196</text:p>
              </table:table-cell>
              <table:table-cell office:value-type="float" office:value="-37.4000015258789">
                <text:p>-37.4000015258789</text:p>
              </table:table-cell>
              <table:table-cell office:value-type="float" office:value="-20">
                <text:p>-20</text:p>
              </table:table-cell>
            </table:table-row>
            <table:table-row>
              <table:table-cell office:value-type="string">
                <text:p>97</text:p>
              </table:table-cell>
              <table:table-cell office:value-type="float" office:value="0.000191999995149672">
                <text:p>0.000191999995149672</text:p>
              </table:table-cell>
              <table:table-cell office:value-type="float" office:value="-38">
                <text:p>-38</text:p>
              </table:table-cell>
              <table:table-cell office:value-type="float" office:value="-20">
                <text:p>-20</text:p>
              </table:table-cell>
            </table:table-row>
            <table:table-row>
              <table:table-cell office:value-type="string">
                <text:p>98</text:p>
              </table:table-cell>
              <table:table-cell office:value-type="float" office:value="0.000193999995099148">
                <text:p>0.000193999995099148</text:p>
              </table:table-cell>
              <table:table-cell office:value-type="float" office:value="-38.4000015258789">
                <text:p>-38.4000015258789</text:p>
              </table:table-cell>
              <table:table-cell office:value-type="float" office:value="-20">
                <text:p>-20</text:p>
              </table:table-cell>
            </table:table-row>
            <table:table-row>
              <table:table-cell office:value-type="string">
                <text:p>99</text:p>
              </table:table-cell>
              <table:table-cell office:value-type="float" office:value="0.000195999995048624">
                <text:p>0.000195999995048624</text:p>
              </table:table-cell>
              <table:table-cell office:value-type="float" office:value="-38.5999984741211">
                <text:p>-38.5999984741211</text:p>
              </table:table-cell>
              <table:table-cell office:value-type="float" office:value="-20">
                <text:p>-20</text:p>
              </table:table-cell>
            </table:table-row>
            <table:table-row>
              <table:table-cell office:value-type="string">
                <text:p>100</text:p>
              </table:table-cell>
              <table:table-cell office:value-type="float" office:value="0.000197999994998099">
                <text:p>0.000197999994998099</text:p>
              </table:table-cell>
              <table:table-cell office:value-type="float" office:value="-38.7999992370606">
                <text:p>-38.7999992370606</text:p>
              </table:table-cell>
              <table:table-cell office:value-type="float" office:value="-20">
                <text:p>-20</text:p>
              </table:table-cell>
            </table:table-row>
            <table:table-row>
              <table:table-cell office:value-type="string">
                <text:p>101</text:p>
              </table:table-cell>
              <table:table-cell office:value-type="float" office:value="0.000199999994947575">
                <text:p>0.000199999994947575</text:p>
              </table:table-cell>
              <table:table-cell office:value-type="float" office:value="-39.2000007629395">
                <text:p>-39.2000007629395</text:p>
              </table:table-cell>
              <table:table-cell office:value-type="float" office:value="-20">
                <text:p>-20</text:p>
              </table:table-cell>
            </table:table-row>
            <table:table-row>
              <table:table-cell office:value-type="string">
                <text:p>102</text:p>
              </table:table-cell>
              <table:table-cell office:value-type="float" office:value="0.000201999994897051">
                <text:p>0.000201999994897051</text:p>
              </table:table-cell>
              <table:table-cell office:value-type="float" office:value="-39.5999984741211">
                <text:p>-39.5999984741211</text:p>
              </table:table-cell>
              <table:table-cell office:value-type="float" office:value="-20">
                <text:p>-20</text:p>
              </table:table-cell>
            </table:table-row>
            <table:table-row>
              <table:table-cell office:value-type="string">
                <text:p>103</text:p>
              </table:table-cell>
              <table:table-cell office:value-type="float" office:value="0.000203999994846527">
                <text:p>0.000203999994846527</text:p>
              </table:table-cell>
              <table:table-cell office:value-type="float" office:value="-39.5999984741211">
                <text:p>-39.5999984741211</text:p>
              </table:table-cell>
              <table:table-cell office:value-type="float" office:value="-20">
                <text:p>-20</text:p>
              </table:table-cell>
            </table:table-row>
            <table:table-row>
              <table:table-cell office:value-type="string">
                <text:p>104</text:p>
              </table:table-cell>
              <table:table-cell office:value-type="float" office:value="0.000205999994796002">
                <text:p>0.000205999994796002</text:p>
              </table:table-cell>
              <table:table-cell office:value-type="float" office:value="-40">
                <text:p>-40</text:p>
              </table:table-cell>
              <table:table-cell office:value-type="float" office:value="-20">
                <text:p>-20</text:p>
              </table:table-cell>
            </table:table-row>
            <table:table-row>
              <table:table-cell office:value-type="string">
                <text:p>105</text:p>
              </table:table-cell>
              <table:table-cell office:value-type="float" office:value="0.000207999994745478">
                <text:p>0.000207999994745478</text:p>
              </table:table-cell>
              <table:table-cell office:value-type="float" office:value="-40">
                <text:p>-40</text:p>
              </table:table-cell>
              <table:table-cell office:value-type="float" office:value="-20">
                <text:p>-20</text:p>
              </table:table-cell>
            </table:table-row>
            <table:table-row>
              <table:table-cell office:value-type="string">
                <text:p>106</text:p>
              </table:table-cell>
              <table:table-cell office:value-type="float" office:value="0.000209999994694954">
                <text:p>0.000209999994694954</text:p>
              </table:table-cell>
              <table:table-cell office:value-type="float" office:value="-40">
                <text:p>-40</text:p>
              </table:table-cell>
              <table:table-cell office:value-type="float" office:value="-20">
                <text:p>-20</text:p>
              </table:table-cell>
            </table:table-row>
            <table:table-row>
              <table:table-cell office:value-type="string">
                <text:p>107</text:p>
              </table:table-cell>
              <table:table-cell office:value-type="float" office:value="0.00021199999464443">
                <text:p>0.00021199999464443</text:p>
              </table:table-cell>
              <table:table-cell office:value-type="float" office:value="-40">
                <text:p>-40</text:p>
              </table:table-cell>
              <table:table-cell office:value-type="float" office:value="-20">
                <text:p>-20</text:p>
              </table:table-cell>
            </table:table-row>
            <table:table-row>
              <table:table-cell office:value-type="string">
                <text:p>108</text:p>
              </table:table-cell>
              <table:table-cell office:value-type="float" office:value="0.000213999994593905">
                <text:p>0.000213999994593905</text:p>
              </table:table-cell>
              <table:table-cell office:value-type="float" office:value="-40">
                <text:p>-40</text:p>
              </table:table-cell>
              <table:table-cell office:value-type="float" office:value="-20">
                <text:p>-20</text:p>
              </table:table-cell>
            </table:table-row>
            <table:table-row>
              <table:table-cell office:value-type="string">
                <text:p>109</text:p>
              </table:table-cell>
              <table:table-cell office:value-type="float" office:value="0.000215999994543381">
                <text:p>0.000215999994543381</text:p>
              </table:table-cell>
              <table:table-cell office:value-type="float" office:value="-40">
                <text:p>-40</text:p>
              </table:table-cell>
              <table:table-cell office:value-type="float" office:value="-20">
                <text:p>-20</text:p>
              </table:table-cell>
            </table:table-row>
            <table:table-row>
              <table:table-cell office:value-type="string">
                <text:p>110</text:p>
              </table:table-cell>
              <table:table-cell office:value-type="float" office:value="0.000217999994492857">
                <text:p>0.000217999994492857</text:p>
              </table:table-cell>
              <table:table-cell office:value-type="float" office:value="-40">
                <text:p>-40</text:p>
              </table:table-cell>
              <table:table-cell office:value-type="float" office:value="-20">
                <text:p>-20</text:p>
              </table:table-cell>
            </table:table-row>
            <table:table-row>
              <table:table-cell office:value-type="string">
                <text:p>111</text:p>
              </table:table-cell>
              <table:table-cell office:value-type="float" office:value="0.000219999994442333">
                <text:p>0.000219999994442333</text:p>
              </table:table-cell>
              <table:table-cell office:value-type="float" office:value="-40">
                <text:p>-40</text:p>
              </table:table-cell>
              <table:table-cell office:value-type="float" office:value="-20">
                <text:p>-20</text:p>
              </table:table-cell>
            </table:table-row>
            <table:table-row>
              <table:table-cell office:value-type="string">
                <text:p>112</text:p>
              </table:table-cell>
              <table:table-cell office:value-type="float" office:value="0.000221999994391808">
                <text:p>0.000221999994391808</text:p>
              </table:table-cell>
              <table:table-cell office:value-type="float" office:value="-40">
                <text:p>-40</text:p>
              </table:table-cell>
              <table:table-cell office:value-type="float" office:value="-20">
                <text:p>-20</text:p>
              </table:table-cell>
            </table:table-row>
            <table:table-row>
              <table:table-cell office:value-type="string">
                <text:p>113</text:p>
              </table:table-cell>
              <table:table-cell office:value-type="float" office:value="0.000223999994341284">
                <text:p>0.000223999994341284</text:p>
              </table:table-cell>
              <table:table-cell office:value-type="float" office:value="-40">
                <text:p>-40</text:p>
              </table:table-cell>
              <table:table-cell office:value-type="float" office:value="-20">
                <text:p>-20</text:p>
              </table:table-cell>
            </table:table-row>
            <table:table-row>
              <table:table-cell office:value-type="string">
                <text:p>114</text:p>
              </table:table-cell>
              <table:table-cell office:value-type="float" office:value="0.00022599999429076">
                <text:p>0.00022599999429076</text:p>
              </table:table-cell>
              <table:table-cell office:value-type="float" office:value="-40">
                <text:p>-40</text:p>
              </table:table-cell>
              <table:table-cell office:value-type="float" office:value="-20">
                <text:p>-20</text:p>
              </table:table-cell>
            </table:table-row>
            <table:table-row>
              <table:table-cell office:value-type="string">
                <text:p>115</text:p>
              </table:table-cell>
              <table:table-cell office:value-type="float" office:value="0.000227999994240236">
                <text:p>0.000227999994240236</text:p>
              </table:table-cell>
              <table:table-cell office:value-type="float" office:value="-40">
                <text:p>-40</text:p>
              </table:table-cell>
              <table:table-cell office:value-type="float" office:value="-20">
                <text:p>-20</text:p>
              </table:table-cell>
            </table:table-row>
            <table:table-row>
              <table:table-cell office:value-type="string">
                <text:p>116</text:p>
              </table:table-cell>
              <table:table-cell office:value-type="float" office:value="0.000229999994189711">
                <text:p>0.000229999994189711</text:p>
              </table:table-cell>
              <table:table-cell office:value-type="float" office:value="-40">
                <text:p>-40</text:p>
              </table:table-cell>
              <table:table-cell office:value-type="float" office:value="-20">
                <text:p>-20</text:p>
              </table:table-cell>
            </table:table-row>
            <table:table-row>
              <table:table-cell office:value-type="string">
                <text:p>117</text:p>
              </table:table-cell>
              <table:table-cell office:value-type="float" office:value="0.000231999994139187">
                <text:p>0.000231999994139187</text:p>
              </table:table-cell>
              <table:table-cell office:value-type="float" office:value="-40">
                <text:p>-40</text:p>
              </table:table-cell>
              <table:table-cell office:value-type="float" office:value="-20">
                <text:p>-20</text:p>
              </table:table-cell>
            </table:table-row>
            <table:table-row>
              <table:table-cell office:value-type="string">
                <text:p>118</text:p>
              </table:table-cell>
              <table:table-cell office:value-type="float" office:value="0.000233999994088663">
                <text:p>0.000233999994088663</text:p>
              </table:table-cell>
              <table:table-cell office:value-type="float" office:value="-40">
                <text:p>-40</text:p>
              </table:table-cell>
              <table:table-cell office:value-type="float" office:value="-20">
                <text:p>-20</text:p>
              </table:table-cell>
            </table:table-row>
            <table:table-row>
              <table:table-cell office:value-type="string">
                <text:p>119</text:p>
              </table:table-cell>
              <table:table-cell office:value-type="float" office:value="0.000235999994038139">
                <text:p>0.000235999994038139</text:p>
              </table:table-cell>
              <table:table-cell office:value-type="float" office:value="-40">
                <text:p>-40</text:p>
              </table:table-cell>
              <table:table-cell office:value-type="float" office:value="-20">
                <text:p>-20</text:p>
              </table:table-cell>
            </table:table-row>
            <table:table-row>
              <table:table-cell office:value-type="string">
                <text:p>120</text:p>
              </table:table-cell>
              <table:table-cell office:value-type="float" office:value="0.000237999993987614">
                <text:p>0.000237999993987614</text:p>
              </table:table-cell>
              <table:table-cell office:value-type="float" office:value="-40">
                <text:p>-40</text:p>
              </table:table-cell>
              <table:table-cell office:value-type="float" office:value="-20">
                <text:p>-20</text:p>
              </table:table-cell>
            </table:table-row>
            <table:table-row>
              <table:table-cell office:value-type="string">
                <text:p>121</text:p>
              </table:table-cell>
              <table:table-cell office:value-type="float" office:value="0.00023999999393709">
                <text:p>0.00023999999393709</text:p>
              </table:table-cell>
              <table:table-cell office:value-type="float" office:value="-40">
                <text:p>-40</text:p>
              </table:table-cell>
              <table:table-cell office:value-type="float" office:value="-20">
                <text:p>-20</text:p>
              </table:table-cell>
            </table:table-row>
            <table:table-row>
              <table:table-cell office:value-type="string">
                <text:p>122</text:p>
              </table:table-cell>
              <table:table-cell office:value-type="float" office:value="0.000241999993886566">
                <text:p>0.000241999993886566</text:p>
              </table:table-cell>
              <table:table-cell office:value-type="float" office:value="-40">
                <text:p>-40</text:p>
              </table:table-cell>
              <table:table-cell office:value-type="float" office:value="-20">
                <text:p>-20</text:p>
              </table:table-cell>
            </table:table-row>
            <table:table-row>
              <table:table-cell office:value-type="string">
                <text:p>123</text:p>
              </table:table-cell>
              <table:table-cell office:value-type="float" office:value="0.000243999993836042">
                <text:p>0.000243999993836042</text:p>
              </table:table-cell>
              <table:table-cell office:value-type="float" office:value="-40">
                <text:p>-40</text:p>
              </table:table-cell>
              <table:table-cell office:value-type="float" office:value="-20">
                <text:p>-20</text:p>
              </table:table-cell>
            </table:table-row>
            <table:table-row>
              <table:table-cell office:value-type="string">
                <text:p>124</text:p>
              </table:table-cell>
              <table:table-cell office:value-type="float" office:value="0.000245999993785517">
                <text:p>0.000245999993785517</text:p>
              </table:table-cell>
              <table:table-cell office:value-type="float" office:value="-40">
                <text:p>-40</text:p>
              </table:table-cell>
              <table:table-cell office:value-type="float" office:value="-20">
                <text:p>-20</text:p>
              </table:table-cell>
            </table:table-row>
            <table:table-row>
              <table:table-cell office:value-type="string">
                <text:p>125</text:p>
              </table:table-cell>
              <table:table-cell office:value-type="float" office:value="0.000247999993734993">
                <text:p>0.000247999993734993</text:p>
              </table:table-cell>
              <table:table-cell office:value-type="float" office:value="-40">
                <text:p>-40</text:p>
              </table:table-cell>
              <table:table-cell office:value-type="float" office:value="-20">
                <text:p>-20</text:p>
              </table:table-cell>
            </table:table-row>
            <table:table-row>
              <table:table-cell office:value-type="string">
                <text:p>126</text:p>
              </table:table-cell>
              <table:table-cell office:value-type="float" office:value="0.000249999993684469">
                <text:p>0.000249999993684469</text:p>
              </table:table-cell>
              <table:table-cell office:value-type="float" office:value="-40">
                <text:p>-40</text:p>
              </table:table-cell>
              <table:table-cell office:value-type="float" office:value="-20">
                <text:p>-20</text:p>
              </table:table-cell>
            </table:table-row>
            <table:table-row>
              <table:table-cell office:value-type="string">
                <text:p>127</text:p>
              </table:table-cell>
              <table:table-cell office:value-type="float" office:value="0.000251999993633945">
                <text:p>0.000251999993633945</text:p>
              </table:table-cell>
              <table:table-cell office:value-type="float" office:value="-40">
                <text:p>-40</text:p>
              </table:table-cell>
              <table:table-cell office:value-type="float" office:value="-20">
                <text:p>-20</text:p>
              </table:table-cell>
            </table:table-row>
            <table:table-row>
              <table:table-cell office:value-type="string">
                <text:p>128</text:p>
              </table:table-cell>
              <table:table-cell office:value-type="float" office:value="0.00025399999358342">
                <text:p>0.00025399999358342</text:p>
              </table:table-cell>
              <table:table-cell office:value-type="float" office:value="-40">
                <text:p>-40</text:p>
              </table:table-cell>
              <table:table-cell office:value-type="float" office:value="-20">
                <text:p>-20</text:p>
              </table:table-cell>
            </table:table-row>
            <table:table-row>
              <table:table-cell office:value-type="string">
                <text:p>129</text:p>
              </table:table-cell>
              <table:table-cell office:value-type="float" office:value="0.000255999993532896">
                <text:p>0.000255999993532896</text:p>
              </table:table-cell>
              <table:table-cell office:value-type="float" office:value="-40">
                <text:p>-40</text:p>
              </table:table-cell>
              <table:table-cell office:value-type="float" office:value="-20">
                <text:p>-20</text:p>
              </table:table-cell>
            </table:table-row>
            <table:table-row>
              <table:table-cell office:value-type="string">
                <text:p>130</text:p>
              </table:table-cell>
              <table:table-cell office:value-type="float" office:value="0.000257999993482372">
                <text:p>0.000257999993482372</text:p>
              </table:table-cell>
              <table:table-cell office:value-type="float" office:value="-40">
                <text:p>-40</text:p>
              </table:table-cell>
              <table:table-cell office:value-type="float" office:value="-20">
                <text:p>-20</text:p>
              </table:table-cell>
            </table:table-row>
            <table:table-row>
              <table:table-cell office:value-type="string">
                <text:p>131</text:p>
              </table:table-cell>
              <table:table-cell office:value-type="float" office:value="0.000259999993431848">
                <text:p>0.000259999993431848</text:p>
              </table:table-cell>
              <table:table-cell office:value-type="float" office:value="-40">
                <text:p>-40</text:p>
              </table:table-cell>
              <table:table-cell office:value-type="float" office:value="-20">
                <text:p>-20</text:p>
              </table:table-cell>
            </table:table-row>
            <table:table-row>
              <table:table-cell office:value-type="string">
                <text:p>132</text:p>
              </table:table-cell>
              <table:table-cell office:value-type="float" office:value="0.000261999993381323">
                <text:p>0.000261999993381323</text:p>
              </table:table-cell>
              <table:table-cell office:value-type="float" office:value="-40">
                <text:p>-40</text:p>
              </table:table-cell>
              <table:table-cell office:value-type="float" office:value="-20">
                <text:p>-20</text:p>
              </table:table-cell>
            </table:table-row>
            <table:table-row>
              <table:table-cell office:value-type="string">
                <text:p>133</text:p>
              </table:table-cell>
              <table:table-cell office:value-type="float" office:value="0.000263999993330799">
                <text:p>0.000263999993330799</text:p>
              </table:table-cell>
              <table:table-cell office:value-type="float" office:value="-40">
                <text:p>-40</text:p>
              </table:table-cell>
              <table:table-cell office:value-type="float" office:value="-20">
                <text:p>-20</text:p>
              </table:table-cell>
            </table:table-row>
            <table:table-row>
              <table:table-cell office:value-type="string">
                <text:p>134</text:p>
              </table:table-cell>
              <table:table-cell office:value-type="float" office:value="0.000265999993280275">
                <text:p>0.000265999993280275</text:p>
              </table:table-cell>
              <table:table-cell office:value-type="float" office:value="-40">
                <text:p>-40</text:p>
              </table:table-cell>
              <table:table-cell office:value-type="float" office:value="-20">
                <text:p>-20</text:p>
              </table:table-cell>
            </table:table-row>
            <table:table-row>
              <table:table-cell office:value-type="string">
                <text:p>135</text:p>
              </table:table-cell>
              <table:table-cell office:value-type="float" office:value="0.000267999993229751">
                <text:p>0.000267999993229751</text:p>
              </table:table-cell>
              <table:table-cell office:value-type="float" office:value="-40">
                <text:p>-40</text:p>
              </table:table-cell>
              <table:table-cell office:value-type="float" office:value="-20">
                <text:p>-20</text:p>
              </table:table-cell>
            </table:table-row>
            <table:table-row>
              <table:table-cell office:value-type="string">
                <text:p>136</text:p>
              </table:table-cell>
              <table:table-cell office:value-type="float" office:value="0.000269999993179226">
                <text:p>0.000269999993179226</text:p>
              </table:table-cell>
              <table:table-cell office:value-type="float" office:value="-40">
                <text:p>-40</text:p>
              </table:table-cell>
              <table:table-cell office:value-type="float" office:value="-20">
                <text:p>-20</text:p>
              </table:table-cell>
            </table:table-row>
            <table:table-row>
              <table:table-cell office:value-type="string">
                <text:p>137</text:p>
              </table:table-cell>
              <table:table-cell office:value-type="float" office:value="0.000271999993128702">
                <text:p>0.000271999993128702</text:p>
              </table:table-cell>
              <table:table-cell office:value-type="float" office:value="-40">
                <text:p>-40</text:p>
              </table:table-cell>
              <table:table-cell office:value-type="float" office:value="-20">
                <text:p>-20</text:p>
              </table:table-cell>
            </table:table-row>
            <table:table-row>
              <table:table-cell office:value-type="string">
                <text:p>138</text:p>
              </table:table-cell>
              <table:table-cell office:value-type="float" office:value="0.000273999993078178">
                <text:p>0.000273999993078178</text:p>
              </table:table-cell>
              <table:table-cell office:value-type="float" office:value="-39.7999992370606">
                <text:p>-39.7999992370606</text:p>
              </table:table-cell>
              <table:table-cell office:value-type="float" office:value="-20">
                <text:p>-20</text:p>
              </table:table-cell>
            </table:table-row>
            <table:table-row>
              <table:table-cell office:value-type="string">
                <text:p>139</text:p>
              </table:table-cell>
              <table:table-cell office:value-type="float" office:value="0.000275999993027654">
                <text:p>0.000275999993027654</text:p>
              </table:table-cell>
              <table:table-cell office:value-type="float" office:value="-39.5999984741211">
                <text:p>-39.5999984741211</text:p>
              </table:table-cell>
              <table:table-cell office:value-type="float" office:value="-20">
                <text:p>-20</text:p>
              </table:table-cell>
            </table:table-row>
            <table:table-row>
              <table:table-cell office:value-type="string">
                <text:p>140</text:p>
              </table:table-cell>
              <table:table-cell office:value-type="float" office:value="0.000277999992977129">
                <text:p>0.000277999992977129</text:p>
              </table:table-cell>
              <table:table-cell office:value-type="float" office:value="-39.2000007629395">
                <text:p>-39.2000007629395</text:p>
              </table:table-cell>
              <table:table-cell office:value-type="float" office:value="-20">
                <text:p>-20</text:p>
              </table:table-cell>
            </table:table-row>
            <table:table-row>
              <table:table-cell office:value-type="string">
                <text:p>141</text:p>
              </table:table-cell>
              <table:table-cell office:value-type="float" office:value="0.000279999992926605">
                <text:p>0.000279999992926605</text:p>
              </table:table-cell>
              <table:table-cell office:value-type="float" office:value="-39">
                <text:p>-39</text:p>
              </table:table-cell>
              <table:table-cell office:value-type="float" office:value="-20">
                <text:p>-20</text:p>
              </table:table-cell>
            </table:table-row>
            <table:table-row>
              <table:table-cell office:value-type="string">
                <text:p>142</text:p>
              </table:table-cell>
              <table:table-cell office:value-type="float" office:value="0.000281999992876081">
                <text:p>0.000281999992876081</text:p>
              </table:table-cell>
              <table:table-cell office:value-type="float" office:value="-38.7999992370606">
                <text:p>-38.7999992370606</text:p>
              </table:table-cell>
              <table:table-cell office:value-type="float" office:value="-20">
                <text:p>-20</text:p>
              </table:table-cell>
            </table:table-row>
            <table:table-row>
              <table:table-cell office:value-type="string">
                <text:p>143</text:p>
              </table:table-cell>
              <table:table-cell office:value-type="float" office:value="0.000283999992825557">
                <text:p>0.000283999992825557</text:p>
              </table:table-cell>
              <table:table-cell office:value-type="float" office:value="-38.4000015258789">
                <text:p>-38.4000015258789</text:p>
              </table:table-cell>
              <table:table-cell office:value-type="float" office:value="-20">
                <text:p>-20</text:p>
              </table:table-cell>
            </table:table-row>
            <table:table-row>
              <table:table-cell office:value-type="string">
                <text:p>144</text:p>
              </table:table-cell>
              <table:table-cell office:value-type="float" office:value="0.000285999992775032">
                <text:p>0.000285999992775032</text:p>
              </table:table-cell>
              <table:table-cell office:value-type="float" office:value="-38">
                <text:p>-38</text:p>
              </table:table-cell>
              <table:table-cell office:value-type="float" office:value="-20">
                <text:p>-20</text:p>
              </table:table-cell>
            </table:table-row>
            <table:table-row>
              <table:table-cell office:value-type="string">
                <text:p>145</text:p>
              </table:table-cell>
              <table:table-cell office:value-type="float" office:value="0.000287999992724508">
                <text:p>0.000287999992724508</text:p>
              </table:table-cell>
              <table:table-cell office:value-type="float" office:value="-38">
                <text:p>-38</text:p>
              </table:table-cell>
              <table:table-cell office:value-type="float" office:value="-20">
                <text:p>-20</text:p>
              </table:table-cell>
            </table:table-row>
            <table:table-row>
              <table:table-cell office:value-type="string">
                <text:p>146</text:p>
              </table:table-cell>
              <table:table-cell office:value-type="float" office:value="0.000289999992673984">
                <text:p>0.000289999992673984</text:p>
              </table:table-cell>
              <table:table-cell office:value-type="float" office:value="-37.2000007629395">
                <text:p>-37.2000007629395</text:p>
              </table:table-cell>
              <table:table-cell office:value-type="float" office:value="-20">
                <text:p>-20</text:p>
              </table:table-cell>
            </table:table-row>
            <table:table-row>
              <table:table-cell office:value-type="string">
                <text:p>147</text:p>
              </table:table-cell>
              <table:table-cell office:value-type="float" office:value="0.00029199999262346">
                <text:p>0.00029199999262346</text:p>
              </table:table-cell>
              <table:table-cell office:value-type="float" office:value="-37">
                <text:p>-37</text:p>
              </table:table-cell>
              <table:table-cell office:value-type="float" office:value="-20">
                <text:p>-20</text:p>
              </table:table-cell>
            </table:table-row>
            <table:table-row>
              <table:table-cell office:value-type="string">
                <text:p>148</text:p>
              </table:table-cell>
              <table:table-cell office:value-type="float" office:value="0.000293999992572935">
                <text:p>0.000293999992572935</text:p>
              </table:table-cell>
              <table:table-cell office:value-type="float" office:value="-36.5999984741211">
                <text:p>-36.5999984741211</text:p>
              </table:table-cell>
              <table:table-cell office:value-type="float" office:value="-20">
                <text:p>-20</text:p>
              </table:table-cell>
            </table:table-row>
            <table:table-row>
              <table:table-cell office:value-type="string">
                <text:p>149</text:p>
              </table:table-cell>
              <table:table-cell office:value-type="float" office:value="0.000295999992522411">
                <text:p>0.000295999992522411</text:p>
              </table:table-cell>
              <table:table-cell office:value-type="float" office:value="-36.4000015258789">
                <text:p>-36.4000015258789</text:p>
              </table:table-cell>
              <table:table-cell office:value-type="float" office:value="-20">
                <text:p>-20</text:p>
              </table:table-cell>
            </table:table-row>
            <table:table-row>
              <table:table-cell office:value-type="string">
                <text:p>150</text:p>
              </table:table-cell>
              <table:table-cell office:value-type="float" office:value="0.000297999992471887">
                <text:p>0.000297999992471887</text:p>
              </table:table-cell>
              <table:table-cell office:value-type="float" office:value="-36">
                <text:p>-36</text:p>
              </table:table-cell>
              <table:table-cell office:value-type="float" office:value="-20">
                <text:p>-20</text:p>
              </table:table-cell>
            </table:table-row>
            <table:table-row>
              <table:table-cell office:value-type="string">
                <text:p>151</text:p>
              </table:table-cell>
              <table:table-cell office:value-type="float" office:value="0.000299999992421363">
                <text:p>0.000299999992421363</text:p>
              </table:table-cell>
              <table:table-cell office:value-type="float" office:value="-35.4000015258789">
                <text:p>-35.4000015258789</text:p>
              </table:table-cell>
              <table:table-cell office:value-type="float" office:value="-20">
                <text:p>-20</text:p>
              </table:table-cell>
            </table:table-row>
            <table:table-row>
              <table:table-cell office:value-type="string">
                <text:p>152</text:p>
              </table:table-cell>
              <table:table-cell office:value-type="float" office:value="0.000301999992370838">
                <text:p>0.000301999992370838</text:p>
              </table:table-cell>
              <table:table-cell office:value-type="float" office:value="-35">
                <text:p>-35</text:p>
              </table:table-cell>
              <table:table-cell office:value-type="float" office:value="-20">
                <text:p>-20</text:p>
              </table:table-cell>
            </table:table-row>
            <table:table-row>
              <table:table-cell office:value-type="string">
                <text:p>153</text:p>
              </table:table-cell>
              <table:table-cell office:value-type="float" office:value="0.000303999992320314">
                <text:p>0.000303999992320314</text:p>
              </table:table-cell>
              <table:table-cell office:value-type="float" office:value="-34.7999992370606">
                <text:p>-34.7999992370606</text:p>
              </table:table-cell>
              <table:table-cell office:value-type="float" office:value="-20">
                <text:p>-20</text:p>
              </table:table-cell>
            </table:table-row>
            <table:table-row>
              <table:table-cell office:value-type="string">
                <text:p>154</text:p>
              </table:table-cell>
              <table:table-cell office:value-type="float" office:value="0.00030599999226979">
                <text:p>0.00030599999226979</text:p>
              </table:table-cell>
              <table:table-cell office:value-type="float" office:value="-34.4000015258789">
                <text:p>-34.4000015258789</text:p>
              </table:table-cell>
              <table:table-cell office:value-type="float" office:value="-20">
                <text:p>-20</text:p>
              </table:table-cell>
            </table:table-row>
            <table:table-row>
              <table:table-cell office:value-type="string">
                <text:p>155</text:p>
              </table:table-cell>
              <table:table-cell office:value-type="float" office:value="0.000307999992219266">
                <text:p>0.000307999992219266</text:p>
              </table:table-cell>
              <table:table-cell office:value-type="float" office:value="-34.2000007629395">
                <text:p>-34.2000007629395</text:p>
              </table:table-cell>
              <table:table-cell office:value-type="float" office:value="-20">
                <text:p>-20</text:p>
              </table:table-cell>
            </table:table-row>
            <table:table-row>
              <table:table-cell office:value-type="string">
                <text:p>156</text:p>
              </table:table-cell>
              <table:table-cell office:value-type="float" office:value="0.000309999992168741">
                <text:p>0.000309999992168741</text:p>
              </table:table-cell>
              <table:table-cell office:value-type="float" office:value="-33.5999984741211">
                <text:p>-33.5999984741211</text:p>
              </table:table-cell>
              <table:table-cell office:value-type="float" office:value="-20">
                <text:p>-20</text:p>
              </table:table-cell>
            </table:table-row>
            <table:table-row>
              <table:table-cell office:value-type="string">
                <text:p>157</text:p>
              </table:table-cell>
              <table:table-cell office:value-type="float" office:value="0.000311999992118217">
                <text:p>0.000311999992118217</text:p>
              </table:table-cell>
              <table:table-cell office:value-type="float" office:value="-33.2000007629395">
                <text:p>-33.2000007629395</text:p>
              </table:table-cell>
              <table:table-cell office:value-type="float" office:value="-20">
                <text:p>-20</text:p>
              </table:table-cell>
            </table:table-row>
            <table:table-row>
              <table:table-cell office:value-type="string">
                <text:p>158</text:p>
              </table:table-cell>
              <table:table-cell office:value-type="float" office:value="0.000313999992067693">
                <text:p>0.000313999992067693</text:p>
              </table:table-cell>
              <table:table-cell office:value-type="float" office:value="-32.7999992370606">
                <text:p>-32.7999992370606</text:p>
              </table:table-cell>
              <table:table-cell office:value-type="float" office:value="-20">
                <text:p>-20</text:p>
              </table:table-cell>
            </table:table-row>
            <table:table-row>
              <table:table-cell office:value-type="string">
                <text:p>159</text:p>
              </table:table-cell>
              <table:table-cell office:value-type="float" office:value="0.000315999992017169">
                <text:p>0.000315999992017169</text:p>
              </table:table-cell>
              <table:table-cell office:value-type="float" office:value="-32.5999984741211">
                <text:p>-32.5999984741211</text:p>
              </table:table-cell>
              <table:table-cell office:value-type="float" office:value="-20">
                <text:p>-20</text:p>
              </table:table-cell>
            </table:table-row>
            <table:table-row>
              <table:table-cell office:value-type="string">
                <text:p>160</text:p>
              </table:table-cell>
              <table:table-cell office:value-type="float" office:value="0.000317999991966644">
                <text:p>0.000317999991966644</text:p>
              </table:table-cell>
              <table:table-cell office:value-type="float" office:value="-32.2000007629395">
                <text:p>-32.2000007629395</text:p>
              </table:table-cell>
              <table:table-cell office:value-type="float" office:value="-20">
                <text:p>-20</text:p>
              </table:table-cell>
            </table:table-row>
            <table:table-row>
              <table:table-cell office:value-type="string">
                <text:p>161</text:p>
              </table:table-cell>
              <table:table-cell office:value-type="float" office:value="0.00031999999191612">
                <text:p>0.00031999999191612</text:p>
              </table:table-cell>
              <table:table-cell office:value-type="float" office:value="-32.2000007629395">
                <text:p>-32.2000007629395</text:p>
              </table:table-cell>
              <table:table-cell office:value-type="float" office:value="-20">
                <text:p>-20</text:p>
              </table:table-cell>
            </table:table-row>
            <table:table-row>
              <table:table-cell office:value-type="string">
                <text:p>162</text:p>
              </table:table-cell>
              <table:table-cell office:value-type="float" office:value="0.000321999991865596">
                <text:p>0.000321999991865596</text:p>
              </table:table-cell>
              <table:table-cell office:value-type="float" office:value="-31.3999996185303">
                <text:p>-31.3999996185303</text:p>
              </table:table-cell>
              <table:table-cell office:value-type="float" office:value="-20">
                <text:p>-20</text:p>
              </table:table-cell>
            </table:table-row>
            <table:table-row>
              <table:table-cell office:value-type="string">
                <text:p>163</text:p>
              </table:table-cell>
              <table:table-cell office:value-type="float" office:value="0.000323999991815072">
                <text:p>0.000323999991815072</text:p>
              </table:table-cell>
              <table:table-cell office:value-type="float" office:value="-31.2000007629395">
                <text:p>-31.2000007629395</text:p>
              </table:table-cell>
              <table:table-cell office:value-type="float" office:value="-20">
                <text:p>-20</text:p>
              </table:table-cell>
            </table:table-row>
            <table:table-row>
              <table:table-cell office:value-type="string">
                <text:p>164</text:p>
              </table:table-cell>
              <table:table-cell office:value-type="float" office:value="0.000325999991764547">
                <text:p>0.000325999991764547</text:p>
              </table:table-cell>
              <table:table-cell office:value-type="float" office:value="-30.6000003814697">
                <text:p>-30.6000003814697</text:p>
              </table:table-cell>
              <table:table-cell office:value-type="float" office:value="-20">
                <text:p>-20</text:p>
              </table:table-cell>
            </table:table-row>
            <table:table-row>
              <table:table-cell office:value-type="string">
                <text:p>165</text:p>
              </table:table-cell>
              <table:table-cell office:value-type="float" office:value="0.000327999991714023">
                <text:p>0.000327999991714023</text:p>
              </table:table-cell>
              <table:table-cell office:value-type="float" office:value="-30.3999996185303">
                <text:p>-30.3999996185303</text:p>
              </table:table-cell>
              <table:table-cell office:value-type="float" office:value="-20">
                <text:p>-20</text:p>
              </table:table-cell>
            </table:table-row>
            <table:table-row>
              <table:table-cell office:value-type="string">
                <text:p>166</text:p>
              </table:table-cell>
              <table:table-cell office:value-type="float" office:value="0.000329999991663499">
                <text:p>0.000329999991663499</text:p>
              </table:table-cell>
              <table:table-cell office:value-type="float" office:value="-29.7999992370605">
                <text:p>-29.7999992370605</text:p>
              </table:table-cell>
              <table:table-cell office:value-type="float" office:value="-20">
                <text:p>-20</text:p>
              </table:table-cell>
            </table:table-row>
            <table:table-row>
              <table:table-cell office:value-type="string">
                <text:p>167</text:p>
              </table:table-cell>
              <table:table-cell office:value-type="float" office:value="0.000331999991612975">
                <text:p>0.000331999991612975</text:p>
              </table:table-cell>
              <table:table-cell office:value-type="float" office:value="-29.6000003814697">
                <text:p>-29.6000003814697</text:p>
              </table:table-cell>
              <table:table-cell office:value-type="float" office:value="-20">
                <text:p>-20</text:p>
              </table:table-cell>
            </table:table-row>
            <table:table-row>
              <table:table-cell office:value-type="string">
                <text:p>168</text:p>
              </table:table-cell>
              <table:table-cell office:value-type="float" office:value="0.00033399999156245">
                <text:p>0.00033399999156245</text:p>
              </table:table-cell>
              <table:table-cell office:value-type="float" office:value="-29.6000003814697">
                <text:p>-29.6000003814697</text:p>
              </table:table-cell>
              <table:table-cell office:value-type="float" office:value="-20">
                <text:p>-20</text:p>
              </table:table-cell>
            </table:table-row>
            <table:table-row>
              <table:table-cell office:value-type="string">
                <text:p>169</text:p>
              </table:table-cell>
              <table:table-cell office:value-type="float" office:value="0.000335999991511926">
                <text:p>0.000335999991511926</text:p>
              </table:table-cell>
              <table:table-cell office:value-type="float" office:value="-29.2000007629395">
                <text:p>-29.2000007629395</text:p>
              </table:table-cell>
              <table:table-cell office:value-type="float" office:value="-20">
                <text:p>-20</text:p>
              </table:table-cell>
            </table:table-row>
            <table:table-row>
              <table:table-cell office:value-type="string">
                <text:p>170</text:p>
              </table:table-cell>
              <table:table-cell office:value-type="float" office:value="0.000337999991461402">
                <text:p>0.000337999991461402</text:p>
              </table:table-cell>
              <table:table-cell office:value-type="float" office:value="-28.3999996185303">
                <text:p>-28.3999996185303</text:p>
              </table:table-cell>
              <table:table-cell office:value-type="float" office:value="-20">
                <text:p>-20</text:p>
              </table:table-cell>
            </table:table-row>
            <table:table-row>
              <table:table-cell office:value-type="string">
                <text:p>171</text:p>
              </table:table-cell>
              <table:table-cell office:value-type="float" office:value="0.000339999991410878">
                <text:p>0.000339999991410878</text:p>
              </table:table-cell>
              <table:table-cell office:value-type="float" office:value="-28.2000007629395">
                <text:p>-28.2000007629395</text:p>
              </table:table-cell>
              <table:table-cell office:value-type="float" office:value="-20">
                <text:p>-20</text:p>
              </table:table-cell>
            </table:table-row>
            <table:table-row>
              <table:table-cell office:value-type="string">
                <text:p>172</text:p>
              </table:table-cell>
              <table:table-cell office:value-type="float" office:value="0.000341999991360353">
                <text:p>0.000341999991360353</text:p>
              </table:table-cell>
              <table:table-cell office:value-type="float" office:value="-27.6000003814697">
                <text:p>-27.6000003814697</text:p>
              </table:table-cell>
              <table:table-cell office:value-type="float" office:value="-20">
                <text:p>-20</text:p>
              </table:table-cell>
            </table:table-row>
            <table:table-row>
              <table:table-cell office:value-type="string">
                <text:p>173</text:p>
              </table:table-cell>
              <table:table-cell office:value-type="float" office:value="0.000343999991309829">
                <text:p>0.000343999991309829</text:p>
              </table:table-cell>
              <table:table-cell office:value-type="float" office:value="-27.3999996185303">
                <text:p>-27.3999996185303</text:p>
              </table:table-cell>
              <table:table-cell office:value-type="float" office:value="-20">
                <text:p>-20</text:p>
              </table:table-cell>
            </table:table-row>
            <table:table-row>
              <table:table-cell office:value-type="string">
                <text:p>174</text:p>
              </table:table-cell>
              <table:table-cell office:value-type="float" office:value="0.000345999991259305">
                <text:p>0.000345999991259305</text:p>
              </table:table-cell>
              <table:table-cell office:value-type="float" office:value="-27">
                <text:p>-27</text:p>
              </table:table-cell>
              <table:table-cell office:value-type="float" office:value="-20">
                <text:p>-20</text:p>
              </table:table-cell>
            </table:table-row>
            <table:table-row>
              <table:table-cell office:value-type="string">
                <text:p>175</text:p>
              </table:table-cell>
              <table:table-cell office:value-type="float" office:value="0.000347999991208781">
                <text:p>0.000347999991208781</text:p>
              </table:table-cell>
              <table:table-cell office:value-type="float" office:value="-26.6000003814697">
                <text:p>-26.6000003814697</text:p>
              </table:table-cell>
              <table:table-cell office:value-type="float" office:value="-20">
                <text:p>-20</text:p>
              </table:table-cell>
            </table:table-row>
            <table:table-row>
              <table:table-cell office:value-type="string">
                <text:p>176</text:p>
              </table:table-cell>
              <table:table-cell office:value-type="float" office:value="0.000349999991158256">
                <text:p>0.000349999991158256</text:p>
              </table:table-cell>
              <table:table-cell office:value-type="float" office:value="-26.3999996185303">
                <text:p>-26.3999996185303</text:p>
              </table:table-cell>
              <table:table-cell office:value-type="float" office:value="-20">
                <text:p>-20</text:p>
              </table:table-cell>
            </table:table-row>
            <table:table-row>
              <table:table-cell office:value-type="string">
                <text:p>177</text:p>
              </table:table-cell>
              <table:table-cell office:value-type="float" office:value="0.000351999991107732">
                <text:p>0.000351999991107732</text:p>
              </table:table-cell>
              <table:table-cell office:value-type="float" office:value="-26.2000007629395">
                <text:p>-26.2000007629395</text:p>
              </table:table-cell>
              <table:table-cell office:value-type="float" office:value="-20">
                <text:p>-20</text:p>
              </table:table-cell>
            </table:table-row>
            <table:table-row>
              <table:table-cell office:value-type="string">
                <text:p>178</text:p>
              </table:table-cell>
              <table:table-cell office:value-type="float" office:value="0.000353999991057208">
                <text:p>0.000353999991057208</text:p>
              </table:table-cell>
              <table:table-cell office:value-type="float" office:value="-25.2000007629395">
                <text:p>-25.2000007629395</text:p>
              </table:table-cell>
              <table:table-cell office:value-type="float" office:value="-20">
                <text:p>-20</text:p>
              </table:table-cell>
            </table:table-row>
            <table:table-row>
              <table:table-cell office:value-type="string">
                <text:p>179</text:p>
              </table:table-cell>
              <table:table-cell office:value-type="float" office:value="0.000355999991006684">
                <text:p>0.000355999991006684</text:p>
              </table:table-cell>
              <table:table-cell office:value-type="float" office:value="-25.2000007629395">
                <text:p>-25.2000007629395</text:p>
              </table:table-cell>
              <table:table-cell office:value-type="float" office:value="-20">
                <text:p>-20</text:p>
              </table:table-cell>
            </table:table-row>
            <table:table-row>
              <table:table-cell office:value-type="string">
                <text:p>180</text:p>
              </table:table-cell>
              <table:table-cell office:value-type="float" office:value="0.000357999990956159">
                <text:p>0.000357999990956159</text:p>
              </table:table-cell>
              <table:table-cell office:value-type="float" office:value="-25">
                <text:p>-25</text:p>
              </table:table-cell>
              <table:table-cell office:value-type="float" office:value="-20">
                <text:p>-20</text:p>
              </table:table-cell>
            </table:table-row>
            <table:table-row>
              <table:table-cell office:value-type="string">
                <text:p>181</text:p>
              </table:table-cell>
              <table:table-cell office:value-type="float" office:value="0.000359999990905635">
                <text:p>0.000359999990905635</text:p>
              </table:table-cell>
              <table:table-cell office:value-type="float" office:value="-24.7999992370605">
                <text:p>-24.7999992370605</text:p>
              </table:table-cell>
              <table:table-cell office:value-type="float" office:value="-20">
                <text:p>-20</text:p>
              </table:table-cell>
            </table:table-row>
            <table:table-row>
              <table:table-cell office:value-type="string">
                <text:p>182</text:p>
              </table:table-cell>
              <table:table-cell office:value-type="float" office:value="0.000361999990855111">
                <text:p>0.000361999990855111</text:p>
              </table:table-cell>
              <table:table-cell office:value-type="float" office:value="-24">
                <text:p>-24</text:p>
              </table:table-cell>
              <table:table-cell office:value-type="float" office:value="-20">
                <text:p>-20</text:p>
              </table:table-cell>
            </table:table-row>
            <table:table-row>
              <table:table-cell office:value-type="string">
                <text:p>183</text:p>
              </table:table-cell>
              <table:table-cell office:value-type="float" office:value="0.000363999990804587">
                <text:p>0.000363999990804587</text:p>
              </table:table-cell>
              <table:table-cell office:value-type="float" office:value="-23.6000003814697">
                <text:p>-23.6000003814697</text:p>
              </table:table-cell>
              <table:table-cell office:value-type="float" office:value="-20">
                <text:p>-20</text:p>
              </table:table-cell>
            </table:table-row>
            <table:table-row>
              <table:table-cell office:value-type="string">
                <text:p>184</text:p>
              </table:table-cell>
              <table:table-cell office:value-type="float" office:value="0.000365999990754062">
                <text:p>0.000365999990754062</text:p>
              </table:table-cell>
              <table:table-cell office:value-type="float" office:value="-23.3999996185303">
                <text:p>-23.3999996185303</text:p>
              </table:table-cell>
              <table:table-cell office:value-type="float" office:value="-20">
                <text:p>-20</text:p>
              </table:table-cell>
            </table:table-row>
            <table:table-row>
              <table:table-cell office:value-type="string">
                <text:p>185</text:p>
              </table:table-cell>
              <table:table-cell office:value-type="float" office:value="0.000367999990703538">
                <text:p>0.000367999990703538</text:p>
              </table:table-cell>
              <table:table-cell office:value-type="float" office:value="-23.2000007629395">
                <text:p>-23.2000007629395</text:p>
              </table:table-cell>
              <table:table-cell office:value-type="float" office:value="-20">
                <text:p>-20</text:p>
              </table:table-cell>
            </table:table-row>
            <table:table-row>
              <table:table-cell office:value-type="string">
                <text:p>186</text:p>
              </table:table-cell>
              <table:table-cell office:value-type="float" office:value="0.000369999990653014">
                <text:p>0.000369999990653014</text:p>
              </table:table-cell>
              <table:table-cell office:value-type="float" office:value="-22.6000003814697">
                <text:p>-22.6000003814697</text:p>
              </table:table-cell>
              <table:table-cell office:value-type="float" office:value="-20">
                <text:p>-20</text:p>
              </table:table-cell>
            </table:table-row>
            <table:table-row>
              <table:table-cell office:value-type="string">
                <text:p>187</text:p>
              </table:table-cell>
              <table:table-cell office:value-type="float" office:value="0.00037199999060249">
                <text:p>0.00037199999060249</text:p>
              </table:table-cell>
              <table:table-cell office:value-type="float" office:value="-22.3999996185303">
                <text:p>-22.3999996185303</text:p>
              </table:table-cell>
              <table:table-cell office:value-type="float" office:value="-20">
                <text:p>-20</text:p>
              </table:table-cell>
            </table:table-row>
            <table:table-row>
              <table:table-cell office:value-type="string">
                <text:p>188</text:p>
              </table:table-cell>
              <table:table-cell office:value-type="float" office:value="0.000373999990551965">
                <text:p>0.000373999990551965</text:p>
              </table:table-cell>
              <table:table-cell office:value-type="float" office:value="-22">
                <text:p>-22</text:p>
              </table:table-cell>
              <table:table-cell office:value-type="float" office:value="-20">
                <text:p>-20</text:p>
              </table:table-cell>
            </table:table-row>
            <table:table-row>
              <table:table-cell office:value-type="string">
                <text:p>189</text:p>
              </table:table-cell>
              <table:table-cell office:value-type="float" office:value="0.000375999990501441">
                <text:p>0.000375999990501441</text:p>
              </table:table-cell>
              <table:table-cell office:value-type="float" office:value="-21.6000003814697">
                <text:p>-21.6000003814697</text:p>
              </table:table-cell>
              <table:table-cell office:value-type="float" office:value="-20">
                <text:p>-20</text:p>
              </table:table-cell>
            </table:table-row>
            <table:table-row>
              <table:table-cell office:value-type="string">
                <text:p>190</text:p>
              </table:table-cell>
              <table:table-cell office:value-type="float" office:value="0.000377999990450917">
                <text:p>0.000377999990450917</text:p>
              </table:table-cell>
              <table:table-cell office:value-type="float" office:value="-21">
                <text:p>-21</text:p>
              </table:table-cell>
              <table:table-cell office:value-type="float" office:value="-20">
                <text:p>-20</text:p>
              </table:table-cell>
            </table:table-row>
            <table:table-row>
              <table:table-cell office:value-type="string">
                <text:p>191</text:p>
              </table:table-cell>
              <table:table-cell office:value-type="float" office:value="0.000379999990400393">
                <text:p>0.000379999990400393</text:p>
              </table:table-cell>
              <table:table-cell office:value-type="float" office:value="-20.7999992370605">
                <text:p>-20.7999992370605</text:p>
              </table:table-cell>
              <table:table-cell office:value-type="float" office:value="-20">
                <text:p>-20</text:p>
              </table:table-cell>
            </table:table-row>
            <table:table-row>
              <table:table-cell office:value-type="string">
                <text:p>192</text:p>
              </table:table-cell>
              <table:table-cell office:value-type="float" office:value="0.000381999990349868">
                <text:p>0.000381999990349868</text:p>
              </table:table-cell>
              <table:table-cell office:value-type="float" office:value="-20.3999996185303">
                <text:p>-20.3999996185303</text:p>
              </table:table-cell>
              <table:table-cell office:value-type="float" office:value="-20">
                <text:p>-20</text:p>
              </table:table-cell>
            </table:table-row>
            <table:table-row>
              <table:table-cell office:value-type="string">
                <text:p>193</text:p>
              </table:table-cell>
              <table:table-cell office:value-type="float" office:value="0.000383999990299344">
                <text:p>0.000383999990299344</text:p>
              </table:table-cell>
              <table:table-cell office:value-type="float" office:value="-20.3999996185303">
                <text:p>-20.3999996185303</text:p>
              </table:table-cell>
              <table:table-cell office:value-type="float" office:value="-20">
                <text:p>-20</text:p>
              </table:table-cell>
            </table:table-row>
            <table:table-row>
              <table:table-cell office:value-type="string">
                <text:p>194</text:p>
              </table:table-cell>
              <table:table-cell office:value-type="float" office:value="0.00038599999024882">
                <text:p>0.00038599999024882</text:p>
              </table:table-cell>
              <table:table-cell office:value-type="float" office:value="-19.6000003814697">
                <text:p>-19.6000003814697</text:p>
              </table:table-cell>
              <table:table-cell office:value-type="float" office:value="-20">
                <text:p>-20</text:p>
              </table:table-cell>
            </table:table-row>
            <table:table-row>
              <table:table-cell office:value-type="string">
                <text:p>195</text:p>
              </table:table-cell>
              <table:table-cell office:value-type="float" office:value="0.000387999990198296">
                <text:p>0.000387999990198296</text:p>
              </table:table-cell>
              <table:table-cell office:value-type="float" office:value="-19.2000007629395">
                <text:p>-19.2000007629395</text:p>
              </table:table-cell>
              <table:table-cell office:value-type="float" office:value="-20">
                <text:p>-20</text:p>
              </table:table-cell>
            </table:table-row>
            <table:table-row>
              <table:table-cell office:value-type="string">
                <text:p>196</text:p>
              </table:table-cell>
              <table:table-cell office:value-type="float" office:value="0.000389999990147771">
                <text:p>0.000389999990147771</text:p>
              </table:table-cell>
              <table:table-cell office:value-type="float" office:value="-18.7999992370605">
                <text:p>-18.7999992370605</text:p>
              </table:table-cell>
              <table:table-cell office:value-type="float" office:value="-20">
                <text:p>-20</text:p>
              </table:table-cell>
            </table:table-row>
            <table:table-row>
              <table:table-cell office:value-type="string">
                <text:p>197</text:p>
              </table:table-cell>
              <table:table-cell office:value-type="float" office:value="0.000391999990097247">
                <text:p>0.000391999990097247</text:p>
              </table:table-cell>
              <table:table-cell office:value-type="float" office:value="-18.6000003814697">
                <text:p>-18.6000003814697</text:p>
              </table:table-cell>
              <table:table-cell office:value-type="float" office:value="-20">
                <text:p>-20</text:p>
              </table:table-cell>
            </table:table-row>
            <table:table-row>
              <table:table-cell office:value-type="string">
                <text:p>198</text:p>
              </table:table-cell>
              <table:table-cell office:value-type="float" office:value="0.000393999990046723">
                <text:p>0.000393999990046723</text:p>
              </table:table-cell>
              <table:table-cell office:value-type="float" office:value="-18.2000007629395">
                <text:p>-18.2000007629395</text:p>
              </table:table-cell>
              <table:table-cell office:value-type="float" office:value="-20">
                <text:p>-20</text:p>
              </table:table-cell>
            </table:table-row>
            <table:table-row>
              <table:table-cell office:value-type="string">
                <text:p>199</text:p>
              </table:table-cell>
              <table:table-cell office:value-type="float" office:value="0.000395999989996199">
                <text:p>0.000395999989996199</text:p>
              </table:table-cell>
              <table:table-cell office:value-type="float" office:value="-17.7999992370605">
                <text:p>-17.7999992370605</text:p>
              </table:table-cell>
              <table:table-cell office:value-type="float" office:value="-20">
                <text:p>-20</text:p>
              </table:table-cell>
            </table:table-row>
            <table:table-row>
              <table:table-cell office:value-type="string">
                <text:p>200</text:p>
              </table:table-cell>
              <table:table-cell office:value-type="float" office:value="0.000397999989945674">
                <text:p>0.000397999989945674</text:p>
              </table:table-cell>
              <table:table-cell office:value-type="float" office:value="-17.6000003814697">
                <text:p>-17.6000003814697</text:p>
              </table:table-cell>
              <table:table-cell office:value-type="float" office:value="-20">
                <text:p>-20</text:p>
              </table:table-cell>
            </table:table-row>
            <table:table-row>
              <table:table-cell office:value-type="string">
                <text:p>201</text:p>
              </table:table-cell>
              <table:table-cell office:value-type="float" office:value="0.00039999998989515">
                <text:p>0.00039999998989515</text:p>
              </table:table-cell>
              <table:table-cell office:value-type="float" office:value="-17">
                <text:p>-17</text:p>
              </table:table-cell>
              <table:table-cell office:value-type="float" office:value="-20">
                <text:p>-20</text:p>
              </table:table-cell>
            </table:table-row>
            <table:table-row>
              <table:table-cell office:value-type="string">
                <text:p>202</text:p>
              </table:table-cell>
              <table:table-cell office:value-type="float" office:value="0.000401999989844626">
                <text:p>0.000401999989844626</text:p>
              </table:table-cell>
              <table:table-cell office:value-type="float" office:value="-16.6000003814697">
                <text:p>-16.6000003814697</text:p>
              </table:table-cell>
              <table:table-cell office:value-type="float" office:value="-20">
                <text:p>-20</text:p>
              </table:table-cell>
            </table:table-row>
            <table:table-row>
              <table:table-cell office:value-type="string">
                <text:p>203</text:p>
              </table:table-cell>
              <table:table-cell office:value-type="float" office:value="0.000403999989794102">
                <text:p>0.000403999989794102</text:p>
              </table:table-cell>
              <table:table-cell office:value-type="float" office:value="-16.3999996185303">
                <text:p>-16.3999996185303</text:p>
              </table:table-cell>
              <table:table-cell office:value-type="float" office:value="-20">
                <text:p>-20</text:p>
              </table:table-cell>
            </table:table-row>
            <table:table-row>
              <table:table-cell office:value-type="string">
                <text:p>204</text:p>
              </table:table-cell>
              <table:table-cell office:value-type="float" office:value="0.000405999989743577">
                <text:p>0.000405999989743577</text:p>
              </table:table-cell>
              <table:table-cell office:value-type="float" office:value="-16">
                <text:p>-16</text:p>
              </table:table-cell>
              <table:table-cell office:value-type="float" office:value="-20">
                <text:p>-20</text:p>
              </table:table-cell>
            </table:table-row>
            <table:table-row>
              <table:table-cell office:value-type="string">
                <text:p>205</text:p>
              </table:table-cell>
              <table:table-cell office:value-type="float" office:value="0.000407999989693053">
                <text:p>0.000407999989693053</text:p>
              </table:table-cell>
              <table:table-cell office:value-type="float" office:value="-15.6000003814697">
                <text:p>-15.6000003814697</text:p>
              </table:table-cell>
              <table:table-cell office:value-type="float" office:value="-20">
                <text:p>-20</text:p>
              </table:table-cell>
            </table:table-row>
            <table:table-row>
              <table:table-cell office:value-type="string">
                <text:p>206</text:p>
              </table:table-cell>
              <table:table-cell office:value-type="float" office:value="0.000409999989642529">
                <text:p>0.000409999989642529</text:p>
              </table:table-cell>
              <table:table-cell office:value-type="float" office:value="-15.1999998092651">
                <text:p>-15.1999998092651</text:p>
              </table:table-cell>
              <table:table-cell office:value-type="float" office:value="-20">
                <text:p>-20</text:p>
              </table:table-cell>
            </table:table-row>
            <table:table-row>
              <table:table-cell office:value-type="string">
                <text:p>207</text:p>
              </table:table-cell>
              <table:table-cell office:value-type="float" office:value="0.000411999989592005">
                <text:p>0.000411999989592005</text:p>
              </table:table-cell>
              <table:table-cell office:value-type="float" office:value="-14.8000001907349">
                <text:p>-14.8000001907349</text:p>
              </table:table-cell>
              <table:table-cell office:value-type="float" office:value="-20">
                <text:p>-20</text:p>
              </table:table-cell>
            </table:table-row>
            <table:table-row>
              <table:table-cell office:value-type="string">
                <text:p>208</text:p>
              </table:table-cell>
              <table:table-cell office:value-type="float" office:value="0.00041399998954148">
                <text:p>0.00041399998954148</text:p>
              </table:table-cell>
              <table:table-cell office:value-type="float" office:value="-14.6000003814697">
                <text:p>-14.6000003814697</text:p>
              </table:table-cell>
              <table:table-cell office:value-type="float" office:value="-20">
                <text:p>-20</text:p>
              </table:table-cell>
            </table:table-row>
            <table:table-row>
              <table:table-cell office:value-type="string">
                <text:p>209</text:p>
              </table:table-cell>
              <table:table-cell office:value-type="float" office:value="0.000415999989490956">
                <text:p>0.000415999989490956</text:p>
              </table:table-cell>
              <table:table-cell office:value-type="float" office:value="-14.3999996185303">
                <text:p>-14.3999996185303</text:p>
              </table:table-cell>
              <table:table-cell office:value-type="float" office:value="-20">
                <text:p>-20</text:p>
              </table:table-cell>
            </table:table-row>
            <table:table-row>
              <table:table-cell office:value-type="string">
                <text:p>210</text:p>
              </table:table-cell>
              <table:table-cell office:value-type="float" office:value="0.000417999989440432">
                <text:p>0.000417999989440432</text:p>
              </table:table-cell>
              <table:table-cell office:value-type="float" office:value="-13.8000001907349">
                <text:p>-13.8000001907349</text:p>
              </table:table-cell>
              <table:table-cell office:value-type="float" office:value="-20">
                <text:p>-20</text:p>
              </table:table-cell>
            </table:table-row>
            <table:table-row>
              <table:table-cell office:value-type="string">
                <text:p>211</text:p>
              </table:table-cell>
              <table:table-cell office:value-type="float" office:value="0.000419999989389908">
                <text:p>0.000419999989389908</text:p>
              </table:table-cell>
              <table:table-cell office:value-type="float" office:value="-13.3999996185303">
                <text:p>-13.3999996185303</text:p>
              </table:table-cell>
              <table:table-cell office:value-type="float" office:value="-20">
                <text:p>-20</text:p>
              </table:table-cell>
            </table:table-row>
            <table:table-row>
              <table:table-cell office:value-type="string">
                <text:p>212</text:p>
              </table:table-cell>
              <table:table-cell office:value-type="float" office:value="0.000421999989339383">
                <text:p>0.000421999989339383</text:p>
              </table:table-cell>
              <table:table-cell office:value-type="float" office:value="-13.3999996185303">
                <text:p>-13.3999996185303</text:p>
              </table:table-cell>
              <table:table-cell office:value-type="float" office:value="-20">
                <text:p>-20</text:p>
              </table:table-cell>
            </table:table-row>
            <table:table-row>
              <table:table-cell office:value-type="string">
                <text:p>213</text:p>
              </table:table-cell>
              <table:table-cell office:value-type="float" office:value="0.000423999989288859">
                <text:p>0.000423999989288859</text:p>
              </table:table-cell>
              <table:table-cell office:value-type="float" office:value="-12.8000001907349">
                <text:p>-12.8000001907349</text:p>
              </table:table-cell>
              <table:table-cell office:value-type="float" office:value="-20">
                <text:p>-20</text:p>
              </table:table-cell>
            </table:table-row>
            <table:table-row>
              <table:table-cell office:value-type="string">
                <text:p>214</text:p>
              </table:table-cell>
              <table:table-cell office:value-type="float" office:value="0.000425999989238335">
                <text:p>0.000425999989238335</text:p>
              </table:table-cell>
              <table:table-cell office:value-type="float" office:value="-12.1999998092651">
                <text:p>-12.1999998092651</text:p>
              </table:table-cell>
              <table:table-cell office:value-type="float" office:value="-20">
                <text:p>-20</text:p>
              </table:table-cell>
            </table:table-row>
            <table:table-row>
              <table:table-cell office:value-type="string">
                <text:p>215</text:p>
              </table:table-cell>
              <table:table-cell office:value-type="float" office:value="0.000427999989187811">
                <text:p>0.000427999989187811</text:p>
              </table:table-cell>
              <table:table-cell office:value-type="float" office:value="-11.8000001907349">
                <text:p>-11.8000001907349</text:p>
              </table:table-cell>
              <table:table-cell office:value-type="float" office:value="-20">
                <text:p>-20</text:p>
              </table:table-cell>
            </table:table-row>
            <table:table-row>
              <table:table-cell office:value-type="string">
                <text:p>216</text:p>
              </table:table-cell>
              <table:table-cell office:value-type="float" office:value="0.000429999989137286">
                <text:p>0.000429999989137286</text:p>
              </table:table-cell>
              <table:table-cell office:value-type="float" office:value="-11.6000003814697">
                <text:p>-11.6000003814697</text:p>
              </table:table-cell>
              <table:table-cell office:value-type="float" office:value="-20">
                <text:p>-20</text:p>
              </table:table-cell>
            </table:table-row>
            <table:table-row>
              <table:table-cell office:value-type="string">
                <text:p>217</text:p>
              </table:table-cell>
              <table:table-cell office:value-type="float" office:value="0.000431999989086762">
                <text:p>0.000431999989086762</text:p>
              </table:table-cell>
              <table:table-cell office:value-type="float" office:value="-11.3999996185303">
                <text:p>-11.3999996185303</text:p>
              </table:table-cell>
              <table:table-cell office:value-type="float" office:value="-20">
                <text:p>-20</text:p>
              </table:table-cell>
            </table:table-row>
            <table:table-row>
              <table:table-cell office:value-type="string">
                <text:p>218</text:p>
              </table:table-cell>
              <table:table-cell office:value-type="float" office:value="0.000433999989036238">
                <text:p>0.000433999989036238</text:p>
              </table:table-cell>
              <table:table-cell office:value-type="float" office:value="-10.6000003814697">
                <text:p>-10.6000003814697</text:p>
              </table:table-cell>
              <table:table-cell office:value-type="float" office:value="-20">
                <text:p>-20</text:p>
              </table:table-cell>
            </table:table-row>
            <table:table-row>
              <table:table-cell office:value-type="string">
                <text:p>219</text:p>
              </table:table-cell>
              <table:table-cell office:value-type="float" office:value="0.000435999988985714">
                <text:p>0.000435999988985714</text:p>
              </table:table-cell>
              <table:table-cell office:value-type="float" office:value="-10.6000003814697">
                <text:p>-10.6000003814697</text:p>
              </table:table-cell>
              <table:table-cell office:value-type="float" office:value="-20">
                <text:p>-20</text:p>
              </table:table-cell>
            </table:table-row>
            <table:table-row>
              <table:table-cell office:value-type="string">
                <text:p>220</text:p>
              </table:table-cell>
              <table:table-cell office:value-type="float" office:value="0.000437999988935189">
                <text:p>0.000437999988935189</text:p>
              </table:table-cell>
              <table:table-cell office:value-type="float" office:value="-10.1999998092651">
                <text:p>-10.1999998092651</text:p>
              </table:table-cell>
              <table:table-cell office:value-type="float" office:value="-20">
                <text:p>-20</text:p>
              </table:table-cell>
            </table:table-row>
            <table:table-row>
              <table:table-cell office:value-type="string">
                <text:p>221</text:p>
              </table:table-cell>
              <table:table-cell office:value-type="float" office:value="0.000439999988884665">
                <text:p>0.000439999988884665</text:p>
              </table:table-cell>
              <table:table-cell office:value-type="float" office:value="-9.60000038146973">
                <text:p>-9.60000038146973</text:p>
              </table:table-cell>
              <table:table-cell office:value-type="float" office:value="-20">
                <text:p>-20</text:p>
              </table:table-cell>
            </table:table-row>
            <table:table-row>
              <table:table-cell office:value-type="string">
                <text:p>222</text:p>
              </table:table-cell>
              <table:table-cell office:value-type="float" office:value="0.000441999988834141">
                <text:p>0.000441999988834141</text:p>
              </table:table-cell>
              <table:table-cell office:value-type="float" office:value="-9.19999980926514">
                <text:p>-9.19999980926514</text:p>
              </table:table-cell>
              <table:table-cell office:value-type="float" office:value="-20">
                <text:p>-20</text:p>
              </table:table-cell>
            </table:table-row>
            <table:table-row>
              <table:table-cell office:value-type="string">
                <text:p>223</text:p>
              </table:table-cell>
              <table:table-cell office:value-type="float" office:value="0.000443999988783617">
                <text:p>0.000443999988783617</text:p>
              </table:table-cell>
              <table:table-cell office:value-type="float" office:value="-9">
                <text:p>-9</text:p>
              </table:table-cell>
              <table:table-cell office:value-type="float" office:value="-20">
                <text:p>-20</text:p>
              </table:table-cell>
            </table:table-row>
            <table:table-row>
              <table:table-cell office:value-type="string">
                <text:p>224</text:p>
              </table:table-cell>
              <table:table-cell office:value-type="float" office:value="0.000445999988733092">
                <text:p>0.000445999988733092</text:p>
              </table:table-cell>
              <table:table-cell office:value-type="float" office:value="-8.80000019073486">
                <text:p>-8.80000019073486</text:p>
              </table:table-cell>
              <table:table-cell office:value-type="float" office:value="-20">
                <text:p>-20</text:p>
              </table:table-cell>
            </table:table-row>
            <table:table-row>
              <table:table-cell office:value-type="string">
                <text:p>225</text:p>
              </table:table-cell>
              <table:table-cell office:value-type="float" office:value="0.000447999988682568">
                <text:p>0.000447999988682568</text:p>
              </table:table-cell>
              <table:table-cell office:value-type="float" office:value="-8.60000038146973">
                <text:p>-8.60000038146973</text:p>
              </table:table-cell>
              <table:table-cell office:value-type="float" office:value="-20">
                <text:p>-20</text:p>
              </table:table-cell>
            </table:table-row>
            <table:table-row>
              <table:table-cell office:value-type="string">
                <text:p>226</text:p>
              </table:table-cell>
              <table:table-cell office:value-type="float" office:value="0.000449999988632044">
                <text:p>0.000449999988632044</text:p>
              </table:table-cell>
              <table:table-cell office:value-type="float" office:value="-7.80000019073486">
                <text:p>-7.80000019073486</text:p>
              </table:table-cell>
              <table:table-cell office:value-type="float" office:value="-20">
                <text:p>-20</text:p>
              </table:table-cell>
            </table:table-row>
            <table:table-row>
              <table:table-cell office:value-type="string">
                <text:p>227</text:p>
              </table:table-cell>
              <table:table-cell office:value-type="float" office:value="0.00045199998858152">
                <text:p>0.00045199998858152</text:p>
              </table:table-cell>
              <table:table-cell office:value-type="float" office:value="-7.40000009536743">
                <text:p>-7.40000009536743</text:p>
              </table:table-cell>
              <table:table-cell office:value-type="float" office:value="-20">
                <text:p>-20</text:p>
              </table:table-cell>
            </table:table-row>
            <table:table-row>
              <table:table-cell office:value-type="string">
                <text:p>228</text:p>
              </table:table-cell>
              <table:table-cell office:value-type="float" office:value="0.000453999988530995">
                <text:p>0.000453999988530995</text:p>
              </table:table-cell>
              <table:table-cell office:value-type="float" office:value="-7">
                <text:p>-7</text:p>
              </table:table-cell>
              <table:table-cell office:value-type="float" office:value="-20">
                <text:p>-20</text:p>
              </table:table-cell>
            </table:table-row>
            <table:table-row>
              <table:table-cell office:value-type="string">
                <text:p>229</text:p>
              </table:table-cell>
              <table:table-cell office:value-type="float" office:value="0.000455999988480471">
                <text:p>0.000455999988480471</text:p>
              </table:table-cell>
              <table:table-cell office:value-type="float" office:value="-6.80000019073486">
                <text:p>-6.80000019073486</text:p>
              </table:table-cell>
              <table:table-cell office:value-type="float" office:value="-20">
                <text:p>-20</text:p>
              </table:table-cell>
            </table:table-row>
            <table:table-row>
              <table:table-cell office:value-type="string">
                <text:p>230</text:p>
              </table:table-cell>
              <table:table-cell office:value-type="float" office:value="0.000457999988429947">
                <text:p>0.000457999988429947</text:p>
              </table:table-cell>
              <table:table-cell office:value-type="float" office:value="-6.40000009536743">
                <text:p>-6.40000009536743</text:p>
              </table:table-cell>
              <table:table-cell office:value-type="float" office:value="-20">
                <text:p>-20</text:p>
              </table:table-cell>
            </table:table-row>
            <table:table-row>
              <table:table-cell office:value-type="string">
                <text:p>231</text:p>
              </table:table-cell>
              <table:table-cell office:value-type="float" office:value="0.000459999988379423">
                <text:p>0.000459999988379423</text:p>
              </table:table-cell>
              <table:table-cell office:value-type="float" office:value="-6">
                <text:p>-6</text:p>
              </table:table-cell>
              <table:table-cell office:value-type="float" office:value="-20">
                <text:p>-20</text:p>
              </table:table-cell>
            </table:table-row>
            <table:table-row>
              <table:table-cell office:value-type="string">
                <text:p>232</text:p>
              </table:table-cell>
              <table:table-cell office:value-type="float" office:value="0.000461999988328898">
                <text:p>0.000461999988328898</text:p>
              </table:table-cell>
              <table:table-cell office:value-type="float" office:value="-5.59999990463257">
                <text:p>-5.59999990463257</text:p>
              </table:table-cell>
              <table:table-cell office:value-type="float" office:value="-20">
                <text:p>-20</text:p>
              </table:table-cell>
            </table:table-row>
            <table:table-row>
              <table:table-cell office:value-type="string">
                <text:p>233</text:p>
              </table:table-cell>
              <table:table-cell office:value-type="float" office:value="0.000463999988278374">
                <text:p>0.000463999988278374</text:p>
              </table:table-cell>
              <table:table-cell office:value-type="float" office:value="-5.19999980926514">
                <text:p>-5.19999980926514</text:p>
              </table:table-cell>
              <table:table-cell office:value-type="float" office:value="-20">
                <text:p>-20</text:p>
              </table:table-cell>
            </table:table-row>
            <table:table-row>
              <table:table-cell office:value-type="string">
                <text:p>234</text:p>
              </table:table-cell>
              <table:table-cell office:value-type="float" office:value="0.00046599998822785">
                <text:p>0.00046599998822785</text:p>
              </table:table-cell>
              <table:table-cell office:value-type="float" office:value="-4.80000019073486">
                <text:p>-4.80000019073486</text:p>
              </table:table-cell>
              <table:table-cell office:value-type="float" office:value="-20">
                <text:p>-20</text:p>
              </table:table-cell>
            </table:table-row>
            <table:table-row>
              <table:table-cell office:value-type="string">
                <text:p>235</text:p>
              </table:table-cell>
              <table:table-cell office:value-type="float" office:value="0.000467999988177326">
                <text:p>0.000467999988177326</text:p>
              </table:table-cell>
              <table:table-cell office:value-type="float" office:value="-4.59999990463257">
                <text:p>-4.59999990463257</text:p>
              </table:table-cell>
              <table:table-cell office:value-type="float" office:value="-20">
                <text:p>-20</text:p>
              </table:table-cell>
            </table:table-row>
            <table:table-row>
              <table:table-cell office:value-type="string">
                <text:p>236</text:p>
              </table:table-cell>
              <table:table-cell office:value-type="float" office:value="0.000469999988126801">
                <text:p>0.000469999988126801</text:p>
              </table:table-cell>
              <table:table-cell office:value-type="float" office:value="-4.40000009536743">
                <text:p>-4.40000009536743</text:p>
              </table:table-cell>
              <table:table-cell office:value-type="float" office:value="-20">
                <text:p>-20</text:p>
              </table:table-cell>
            </table:table-row>
            <table:table-row>
              <table:table-cell office:value-type="string">
                <text:p>237</text:p>
              </table:table-cell>
              <table:table-cell office:value-type="float" office:value="0.000471999988076277">
                <text:p>0.000471999988076277</text:p>
              </table:table-cell>
              <table:table-cell office:value-type="float" office:value="-4">
                <text:p>-4</text:p>
              </table:table-cell>
              <table:table-cell office:value-type="float" office:value="-20">
                <text:p>-20</text:p>
              </table:table-cell>
            </table:table-row>
            <table:table-row>
              <table:table-cell office:value-type="string">
                <text:p>238</text:p>
              </table:table-cell>
              <table:table-cell office:value-type="float" office:value="0.000473999988025753">
                <text:p>0.000473999988025753</text:p>
              </table:table-cell>
              <table:table-cell office:value-type="float" office:value="-3.40000009536743">
                <text:p>-3.40000009536743</text:p>
              </table:table-cell>
              <table:table-cell office:value-type="float" office:value="-20">
                <text:p>-20</text:p>
              </table:table-cell>
            </table:table-row>
            <table:table-row>
              <table:table-cell office:value-type="string">
                <text:p>239</text:p>
              </table:table-cell>
              <table:table-cell office:value-type="float" office:value="0.000475999987975229">
                <text:p>0.000475999987975229</text:p>
              </table:table-cell>
              <table:table-cell office:value-type="float" office:value="-3">
                <text:p>-3</text:p>
              </table:table-cell>
              <table:table-cell office:value-type="float" office:value="-20">
                <text:p>-20</text:p>
              </table:table-cell>
            </table:table-row>
            <table:table-row>
              <table:table-cell office:value-type="string">
                <text:p>240</text:p>
              </table:table-cell>
              <table:table-cell office:value-type="float" office:value="0.000477999987924704">
                <text:p>0.000477999987924704</text:p>
              </table:table-cell>
              <table:table-cell office:value-type="float" office:value="-2.79999995231628">
                <text:p>-2.79999995231628</text:p>
              </table:table-cell>
              <table:table-cell office:value-type="float" office:value="-20">
                <text:p>-20</text:p>
              </table:table-cell>
            </table:table-row>
            <table:table-row>
              <table:table-cell office:value-type="string">
                <text:p>241</text:p>
              </table:table-cell>
              <table:table-cell office:value-type="float" office:value="0.00047999998787418">
                <text:p>0.00047999998787418</text:p>
              </table:table-cell>
              <table:table-cell office:value-type="float" office:value="-2.59999990463257">
                <text:p>-2.59999990463257</text:p>
              </table:table-cell>
              <table:table-cell office:value-type="float" office:value="-20">
                <text:p>-20</text:p>
              </table:table-cell>
            </table:table-row>
            <table:table-row>
              <table:table-cell office:value-type="string">
                <text:p>242</text:p>
              </table:table-cell>
              <table:table-cell office:value-type="float" office:value="0.000481999987823656">
                <text:p>0.000481999987823656</text:p>
              </table:table-cell>
              <table:table-cell office:value-type="float" office:value="-2">
                <text:p>-2</text:p>
              </table:table-cell>
              <table:table-cell office:value-type="float" office:value="-20">
                <text:p>-20</text:p>
              </table:table-cell>
            </table:table-row>
            <table:table-row>
              <table:table-cell office:value-type="string">
                <text:p>243</text:p>
              </table:table-cell>
              <table:table-cell office:value-type="float" office:value="0.000483999987773132">
                <text:p>0.000483999987773132</text:p>
              </table:table-cell>
              <table:table-cell office:value-type="float" office:value="-1.60000002384186">
                <text:p>-1.60000002384186</text:p>
              </table:table-cell>
              <table:table-cell office:value-type="float" office:value="-20">
                <text:p>-20</text:p>
              </table:table-cell>
            </table:table-row>
            <table:table-row>
              <table:table-cell office:value-type="string">
                <text:p>244</text:p>
              </table:table-cell>
              <table:table-cell office:value-type="float" office:value="0.000485999987722607">
                <text:p>0.000485999987722607</text:p>
              </table:table-cell>
              <table:table-cell office:value-type="float" office:value="-1.39999997615814">
                <text:p>-1.39999997615814</text:p>
              </table:table-cell>
              <table:table-cell office:value-type="float" office:value="-20">
                <text:p>-20</text:p>
              </table:table-cell>
            </table:table-row>
            <table:table-row>
              <table:table-cell office:value-type="string">
                <text:p>245</text:p>
              </table:table-cell>
              <table:table-cell office:value-type="float" office:value="0.000487999987672083">
                <text:p>0.000487999987672083</text:p>
              </table:table-cell>
              <table:table-cell office:value-type="float" office:value="-0.800000011920929">
                <text:p>-0.800000011920929</text:p>
              </table:table-cell>
              <table:table-cell office:value-type="float" office:value="-20">
                <text:p>-20</text:p>
              </table:table-cell>
            </table:table-row>
            <table:table-row>
              <table:table-cell office:value-type="string">
                <text:p>246</text:p>
              </table:table-cell>
              <table:table-cell office:value-type="float" office:value="0.000489999987621559">
                <text:p>0.000489999987621559</text:p>
              </table:table-cell>
              <table:table-cell office:value-type="float" office:value="-0.400000005960465">
                <text:p>-0.400000005960465</text:p>
              </table:table-cell>
              <table:table-cell office:value-type="float" office:value="-20">
                <text:p>-20</text:p>
              </table:table-cell>
            </table:table-row>
            <table:table-row>
              <table:table-cell office:value-type="string">
                <text:p>247</text:p>
              </table:table-cell>
              <table:table-cell office:value-type="float" office:value="0.000491999987571035">
                <text:p>0.000491999987571035</text:p>
              </table:table-cell>
              <table:table-cell office:value-type="float" office:value="0">
                <text:p>0</text:p>
              </table:table-cell>
              <table:table-cell office:value-type="float" office:value="-20">
                <text:p>-20</text:p>
              </table:table-cell>
            </table:table-row>
            <table:table-row>
              <table:table-cell office:value-type="string">
                <text:p>248</text:p>
              </table:table-cell>
              <table:table-cell office:value-type="float" office:value="0.00049399998752051">
                <text:p>0.00049399998752051</text:p>
              </table:table-cell>
              <table:table-cell office:value-type="float" office:value="0.200000002980232">
                <text:p>0.200000002980232</text:p>
              </table:table-cell>
              <table:table-cell office:value-type="float" office:value="-20">
                <text:p>-20</text:p>
              </table:table-cell>
            </table:table-row>
            <table:table-row>
              <table:table-cell office:value-type="string">
                <text:p>249</text:p>
              </table:table-cell>
              <table:table-cell office:value-type="float" office:value="0.000495999987469986">
                <text:p>0.000495999987469986</text:p>
              </table:table-cell>
              <table:table-cell office:value-type="float" office:value="0.400000005960465">
                <text:p>0.400000005960465</text:p>
              </table:table-cell>
              <table:table-cell office:value-type="float" office:value="-20">
                <text:p>-20</text:p>
              </table:table-cell>
            </table:table-row>
            <table:table-row>
              <table:table-cell office:value-type="string">
                <text:p>250</text:p>
              </table:table-cell>
              <table:table-cell office:value-type="float" office:value="0.000497999987419462">
                <text:p>0.000497999987419462</text:p>
              </table:table-cell>
              <table:table-cell office:value-type="float" office:value="1">
                <text:p>1</text:p>
              </table:table-cell>
              <table:table-cell office:value-type="float" office:value="-20">
                <text:p>-20</text:p>
              </table:table-cell>
            </table:table-row>
            <table:table-row>
              <table:table-cell office:value-type="string">
                <text:p>251</text:p>
              </table:table-cell>
              <table:table-cell office:value-type="float" office:value="0.000499999987368938">
                <text:p>0.000499999987368938</text:p>
              </table:table-cell>
              <table:table-cell office:value-type="float" office:value="1.39999997615814">
                <text:p>1.39999997615814</text:p>
              </table:table-cell>
              <table:table-cell office:value-type="float" office:value="-20">
                <text:p>-20</text:p>
              </table:table-cell>
            </table:table-row>
            <table:table-row>
              <table:table-cell office:value-type="string">
                <text:p>252</text:p>
              </table:table-cell>
              <table:table-cell office:value-type="float" office:value="0.000501999987318413">
                <text:p>0.000501999987318413</text:p>
              </table:table-cell>
              <table:table-cell office:value-type="float" office:value="1.60000002384186">
                <text:p>1.60000002384186</text:p>
              </table:table-cell>
              <table:table-cell office:value-type="float" office:value="-20">
                <text:p>-20</text:p>
              </table:table-cell>
            </table:table-row>
            <table:table-row>
              <table:table-cell office:value-type="string">
                <text:p>253</text:p>
              </table:table-cell>
              <table:table-cell office:value-type="float" office:value="0.000503999987267889">
                <text:p>0.000503999987267889</text:p>
              </table:table-cell>
              <table:table-cell office:value-type="float" office:value="2.20000004768372">
                <text:p>2.20000004768372</text:p>
              </table:table-cell>
              <table:table-cell office:value-type="float" office:value="-20">
                <text:p>-20</text:p>
              </table:table-cell>
            </table:table-row>
            <table:table-row>
              <table:table-cell office:value-type="string">
                <text:p>254</text:p>
              </table:table-cell>
              <table:table-cell office:value-type="float" office:value="0.000505999987217365">
                <text:p>0.000505999987217365</text:p>
              </table:table-cell>
              <table:table-cell office:value-type="float" office:value="2.40000009536743">
                <text:p>2.40000009536743</text:p>
              </table:table-cell>
              <table:table-cell office:value-type="float" office:value="-20">
                <text:p>-20</text:p>
              </table:table-cell>
            </table:table-row>
            <table:table-row>
              <table:table-cell office:value-type="string">
                <text:p>255</text:p>
              </table:table-cell>
              <table:table-cell office:value-type="float" office:value="0.000507999987166841">
                <text:p>0.000507999987166841</text:p>
              </table:table-cell>
              <table:table-cell office:value-type="float" office:value="2.79999995231628">
                <text:p>2.79999995231628</text:p>
              </table:table-cell>
              <table:table-cell office:value-type="float" office:value="-20">
                <text:p>-20</text:p>
              </table:table-cell>
            </table:table-row>
            <table:table-row>
              <table:table-cell office:value-type="string">
                <text:p>256</text:p>
              </table:table-cell>
              <table:table-cell office:value-type="float" office:value="0.000509999987116316">
                <text:p>0.000509999987116316</text:p>
              </table:table-cell>
              <table:table-cell office:value-type="float" office:value="3">
                <text:p>3</text:p>
              </table:table-cell>
              <table:table-cell office:value-type="float" office:value="-20">
                <text:p>-20</text:p>
              </table:table-cell>
            </table:table-row>
            <table:table-row>
              <table:table-cell office:value-type="string">
                <text:p>257</text:p>
              </table:table-cell>
              <table:table-cell office:value-type="float" office:value="0.000511999987065792">
                <text:p>0.000511999987065792</text:p>
              </table:table-cell>
              <table:table-cell office:value-type="float" office:value="3.59999990463257">
                <text:p>3.59999990463257</text:p>
              </table:table-cell>
              <table:table-cell office:value-type="float" office:value="-20">
                <text:p>-20</text:p>
              </table:table-cell>
            </table:table-row>
            <table:table-row>
              <table:table-cell office:value-type="string">
                <text:p>258</text:p>
              </table:table-cell>
              <table:table-cell office:value-type="float" office:value="0.000513999987015268">
                <text:p>0.000513999987015268</text:p>
              </table:table-cell>
              <table:table-cell office:value-type="float" office:value="4">
                <text:p>4</text:p>
              </table:table-cell>
              <table:table-cell office:value-type="float" office:value="-20">
                <text:p>-20</text:p>
              </table:table-cell>
            </table:table-row>
            <table:table-row>
              <table:table-cell office:value-type="string">
                <text:p>259</text:p>
              </table:table-cell>
              <table:table-cell office:value-type="float" office:value="0.000515999986964744">
                <text:p>0.000515999986964744</text:p>
              </table:table-cell>
              <table:table-cell office:value-type="float" office:value="4.40000009536743">
                <text:p>4.40000009536743</text:p>
              </table:table-cell>
              <table:table-cell office:value-type="float" office:value="-20">
                <text:p>-20</text:p>
              </table:table-cell>
            </table:table-row>
            <table:table-row>
              <table:table-cell office:value-type="string">
                <text:p>260</text:p>
              </table:table-cell>
              <table:table-cell office:value-type="float" office:value="0.000517999986914219">
                <text:p>0.000517999986914219</text:p>
              </table:table-cell>
              <table:table-cell office:value-type="float" office:value="4.59999990463257">
                <text:p>4.59999990463257</text:p>
              </table:table-cell>
              <table:table-cell office:value-type="float" office:value="-20">
                <text:p>-20</text:p>
              </table:table-cell>
            </table:table-row>
            <table:table-row>
              <table:table-cell office:value-type="string">
                <text:p>261</text:p>
              </table:table-cell>
              <table:table-cell office:value-type="float" office:value="0.000519999986863695">
                <text:p>0.000519999986863695</text:p>
              </table:table-cell>
              <table:table-cell office:value-type="float" office:value="5">
                <text:p>5</text:p>
              </table:table-cell>
              <table:table-cell office:value-type="float" office:value="-20">
                <text:p>-20</text:p>
              </table:table-cell>
            </table:table-row>
            <table:table-row>
              <table:table-cell office:value-type="string">
                <text:p>262</text:p>
              </table:table-cell>
              <table:table-cell office:value-type="float" office:value="0.000521999986813171">
                <text:p>0.000521999986813171</text:p>
              </table:table-cell>
              <table:table-cell office:value-type="float" office:value="5.40000009536743">
                <text:p>5.40000009536743</text:p>
              </table:table-cell>
              <table:table-cell office:value-type="float" office:value="-20">
                <text:p>-20</text:p>
              </table:table-cell>
            </table:table-row>
            <table:table-row>
              <table:table-cell office:value-type="string">
                <text:p>263</text:p>
              </table:table-cell>
              <table:table-cell office:value-type="float" office:value="0.000523999986762647">
                <text:p>0.000523999986762647</text:p>
              </table:table-cell>
              <table:table-cell office:value-type="float" office:value="5.80000019073486">
                <text:p>5.80000019073486</text:p>
              </table:table-cell>
              <table:table-cell office:value-type="float" office:value="-20">
                <text:p>-20</text:p>
              </table:table-cell>
            </table:table-row>
            <table:table-row>
              <table:table-cell office:value-type="string">
                <text:p>264</text:p>
              </table:table-cell>
              <table:table-cell office:value-type="float" office:value="0.000525999986712122">
                <text:p>0.000525999986712122</text:p>
              </table:table-cell>
              <table:table-cell office:value-type="float" office:value="6">
                <text:p>6</text:p>
              </table:table-cell>
              <table:table-cell office:value-type="float" office:value="-20">
                <text:p>-20</text:p>
              </table:table-cell>
            </table:table-row>
            <table:table-row>
              <table:table-cell office:value-type="string">
                <text:p>265</text:p>
              </table:table-cell>
              <table:table-cell office:value-type="float" office:value="0.000527999986661598">
                <text:p>0.000527999986661598</text:p>
              </table:table-cell>
              <table:table-cell office:value-type="float" office:value="6.59999990463257">
                <text:p>6.59999990463257</text:p>
              </table:table-cell>
              <table:table-cell office:value-type="float" office:value="-20">
                <text:p>-20</text:p>
              </table:table-cell>
            </table:table-row>
            <table:table-row>
              <table:table-cell office:value-type="string">
                <text:p>266</text:p>
              </table:table-cell>
              <table:table-cell office:value-type="float" office:value="0.000529999986611074">
                <text:p>0.000529999986611074</text:p>
              </table:table-cell>
              <table:table-cell office:value-type="float" office:value="7">
                <text:p>7</text:p>
              </table:table-cell>
              <table:table-cell office:value-type="float" office:value="-20">
                <text:p>-20</text:p>
              </table:table-cell>
            </table:table-row>
            <table:table-row>
              <table:table-cell office:value-type="string">
                <text:p>267</text:p>
              </table:table-cell>
              <table:table-cell office:value-type="float" office:value="0.00053199998656055">
                <text:p>0.00053199998656055</text:p>
              </table:table-cell>
              <table:table-cell office:value-type="float" office:value="7.19999980926514">
                <text:p>7.19999980926514</text:p>
              </table:table-cell>
              <table:table-cell office:value-type="float" office:value="-20">
                <text:p>-20</text:p>
              </table:table-cell>
            </table:table-row>
            <table:table-row>
              <table:table-cell office:value-type="string">
                <text:p>268</text:p>
              </table:table-cell>
              <table:table-cell office:value-type="float" office:value="0.000533999986510025">
                <text:p>0.000533999986510025</text:p>
              </table:table-cell>
              <table:table-cell office:value-type="float" office:value="7.59999990463257">
                <text:p>7.59999990463257</text:p>
              </table:table-cell>
              <table:table-cell office:value-type="float" office:value="-20">
                <text:p>-20</text:p>
              </table:table-cell>
            </table:table-row>
            <table:table-row>
              <table:table-cell office:value-type="string">
                <text:p>269</text:p>
              </table:table-cell>
              <table:table-cell office:value-type="float" office:value="0.000535999986459501">
                <text:p>0.000535999986459501</text:p>
              </table:table-cell>
              <table:table-cell office:value-type="float" office:value="8.19999980926514">
                <text:p>8.19999980926514</text:p>
              </table:table-cell>
              <table:table-cell office:value-type="float" office:value="-20">
                <text:p>-20</text:p>
              </table:table-cell>
            </table:table-row>
            <table:table-row>
              <table:table-cell office:value-type="string">
                <text:p>270</text:p>
              </table:table-cell>
              <table:table-cell office:value-type="float" office:value="0.000537999986408977">
                <text:p>0.000537999986408977</text:p>
              </table:table-cell>
              <table:table-cell office:value-type="float" office:value="8.39999961853027">
                <text:p>8.39999961853027</text:p>
              </table:table-cell>
              <table:table-cell office:value-type="float" office:value="-20">
                <text:p>-20</text:p>
              </table:table-cell>
            </table:table-row>
            <table:table-row>
              <table:table-cell office:value-type="string">
                <text:p>271</text:p>
              </table:table-cell>
              <table:table-cell office:value-type="float" office:value="0.000539999986358453">
                <text:p>0.000539999986358453</text:p>
              </table:table-cell>
              <table:table-cell office:value-type="float" office:value="8.80000019073486">
                <text:p>8.80000019073486</text:p>
              </table:table-cell>
              <table:table-cell office:value-type="float" office:value="-20">
                <text:p>-20</text:p>
              </table:table-cell>
            </table:table-row>
            <table:table-row>
              <table:table-cell office:value-type="string">
                <text:p>272</text:p>
              </table:table-cell>
              <table:table-cell office:value-type="float" office:value="0.000541999986307928">
                <text:p>0.000541999986307928</text:p>
              </table:table-cell>
              <table:table-cell office:value-type="float" office:value="9.19999980926514">
                <text:p>9.19999980926514</text:p>
              </table:table-cell>
              <table:table-cell office:value-type="float" office:value="-20">
                <text:p>-20</text:p>
              </table:table-cell>
            </table:table-row>
            <table:table-row>
              <table:table-cell office:value-type="string">
                <text:p>273</text:p>
              </table:table-cell>
              <table:table-cell office:value-type="float" office:value="0.000543999986257404">
                <text:p>0.000543999986257404</text:p>
              </table:table-cell>
              <table:table-cell office:value-type="float" office:value="9.39999961853027">
                <text:p>9.39999961853027</text:p>
              </table:table-cell>
              <table:table-cell office:value-type="float" office:value="-20">
                <text:p>-20</text:p>
              </table:table-cell>
            </table:table-row>
            <table:table-row>
              <table:table-cell office:value-type="string">
                <text:p>274</text:p>
              </table:table-cell>
              <table:table-cell office:value-type="float" office:value="0.00054599998620688">
                <text:p>0.00054599998620688</text:p>
              </table:table-cell>
              <table:table-cell office:value-type="float" office:value="9.80000019073486">
                <text:p>9.80000019073486</text:p>
              </table:table-cell>
              <table:table-cell office:value-type="float" office:value="-20">
                <text:p>-20</text:p>
              </table:table-cell>
            </table:table-row>
            <table:table-row>
              <table:table-cell office:value-type="string">
                <text:p>275</text:p>
              </table:table-cell>
              <table:table-cell office:value-type="float" office:value="0.000547999986156356">
                <text:p>0.000547999986156356</text:p>
              </table:table-cell>
              <table:table-cell office:value-type="float" office:value="10">
                <text:p>10</text:p>
              </table:table-cell>
              <table:table-cell office:value-type="float" office:value="-20">
                <text:p>-20</text:p>
              </table:table-cell>
            </table:table-row>
            <table:table-row>
              <table:table-cell office:value-type="string">
                <text:p>276</text:p>
              </table:table-cell>
              <table:table-cell office:value-type="float" office:value="0.000549999986105831">
                <text:p>0.000549999986105831</text:p>
              </table:table-cell>
              <table:table-cell office:value-type="float" office:value="10.6000003814697">
                <text:p>10.6000003814697</text:p>
              </table:table-cell>
              <table:table-cell office:value-type="float" office:value="-20">
                <text:p>-20</text:p>
              </table:table-cell>
            </table:table-row>
            <table:table-row>
              <table:table-cell office:value-type="string">
                <text:p>277</text:p>
              </table:table-cell>
              <table:table-cell office:value-type="float" office:value="0.000551999986055307">
                <text:p>0.000551999986055307</text:p>
              </table:table-cell>
              <table:table-cell office:value-type="float" office:value="11">
                <text:p>11</text:p>
              </table:table-cell>
              <table:table-cell office:value-type="float" office:value="-20">
                <text:p>-20</text:p>
              </table:table-cell>
            </table:table-row>
            <table:table-row>
              <table:table-cell office:value-type="string">
                <text:p>278</text:p>
              </table:table-cell>
              <table:table-cell office:value-type="float" office:value="0.000553999986004783">
                <text:p>0.000553999986004783</text:p>
              </table:table-cell>
              <table:table-cell office:value-type="float" office:value="11.3999996185303">
                <text:p>11.3999996185303</text:p>
              </table:table-cell>
              <table:table-cell office:value-type="float" office:value="-20">
                <text:p>-20</text:p>
              </table:table-cell>
            </table:table-row>
            <table:table-row>
              <table:table-cell office:value-type="string">
                <text:p>279</text:p>
              </table:table-cell>
              <table:table-cell office:value-type="float" office:value="0.000555999985954259">
                <text:p>0.000555999985954259</text:p>
              </table:table-cell>
              <table:table-cell office:value-type="float" office:value="11.6000003814697">
                <text:p>11.6000003814697</text:p>
              </table:table-cell>
              <table:table-cell office:value-type="float" office:value="-20">
                <text:p>-20</text:p>
              </table:table-cell>
            </table:table-row>
            <table:table-row>
              <table:table-cell office:value-type="string">
                <text:p>280</text:p>
              </table:table-cell>
              <table:table-cell office:value-type="float" office:value="0.000557999985903734">
                <text:p>0.000557999985903734</text:p>
              </table:table-cell>
              <table:table-cell office:value-type="float" office:value="12">
                <text:p>12</text:p>
              </table:table-cell>
              <table:table-cell office:value-type="float" office:value="-20">
                <text:p>-20</text:p>
              </table:table-cell>
            </table:table-row>
            <table:table-row>
              <table:table-cell office:value-type="string">
                <text:p>281</text:p>
              </table:table-cell>
              <table:table-cell office:value-type="float" office:value="0.00055999998585321">
                <text:p>0.00055999998585321</text:p>
              </table:table-cell>
              <table:table-cell office:value-type="float" office:value="12.3999996185303">
                <text:p>12.3999996185303</text:p>
              </table:table-cell>
              <table:table-cell office:value-type="float" office:value="-20">
                <text:p>-20</text:p>
              </table:table-cell>
            </table:table-row>
            <table:table-row>
              <table:table-cell office:value-type="string">
                <text:p>282</text:p>
              </table:table-cell>
              <table:table-cell office:value-type="float" office:value="0.000561999985802686">
                <text:p>0.000561999985802686</text:p>
              </table:table-cell>
              <table:table-cell office:value-type="float" office:value="12.8000001907349">
                <text:p>12.8000001907349</text:p>
              </table:table-cell>
              <table:table-cell office:value-type="float" office:value="-20">
                <text:p>-20</text:p>
              </table:table-cell>
            </table:table-row>
            <table:table-row>
              <table:table-cell office:value-type="string">
                <text:p>283</text:p>
              </table:table-cell>
              <table:table-cell office:value-type="float" office:value="0.000563999985752162">
                <text:p>0.000563999985752162</text:p>
              </table:table-cell>
              <table:table-cell office:value-type="float" office:value="13.1999998092651">
                <text:p>13.1999998092651</text:p>
              </table:table-cell>
              <table:table-cell office:value-type="float" office:value="-20">
                <text:p>-20</text:p>
              </table:table-cell>
            </table:table-row>
            <table:table-row>
              <table:table-cell office:value-type="string">
                <text:p>284</text:p>
              </table:table-cell>
              <table:table-cell office:value-type="float" office:value="0.000565999985701637">
                <text:p>0.000565999985701637</text:p>
              </table:table-cell>
              <table:table-cell office:value-type="float" office:value="13.6000003814697">
                <text:p>13.6000003814697</text:p>
              </table:table-cell>
              <table:table-cell office:value-type="float" office:value="-20">
                <text:p>-20</text:p>
              </table:table-cell>
            </table:table-row>
            <table:table-row>
              <table:table-cell office:value-type="string">
                <text:p>285</text:p>
              </table:table-cell>
              <table:table-cell office:value-type="float" office:value="0.000567999985651113">
                <text:p>0.000567999985651113</text:p>
              </table:table-cell>
              <table:table-cell office:value-type="float" office:value="13.8000001907349">
                <text:p>13.8000001907349</text:p>
              </table:table-cell>
              <table:table-cell office:value-type="float" office:value="-20">
                <text:p>-20</text:p>
              </table:table-cell>
            </table:table-row>
            <table:table-row>
              <table:table-cell office:value-type="string">
                <text:p>286</text:p>
              </table:table-cell>
              <table:table-cell office:value-type="float" office:value="0.000569999985600589">
                <text:p>0.000569999985600589</text:p>
              </table:table-cell>
              <table:table-cell office:value-type="float" office:value="14.1999998092651">
                <text:p>14.1999998092651</text:p>
              </table:table-cell>
              <table:table-cell office:value-type="float" office:value="-20">
                <text:p>-20</text:p>
              </table:table-cell>
            </table:table-row>
            <table:table-row>
              <table:table-cell office:value-type="string">
                <text:p>287</text:p>
              </table:table-cell>
              <table:table-cell office:value-type="float" office:value="0.000571999985550065">
                <text:p>0.000571999985550065</text:p>
              </table:table-cell>
              <table:table-cell office:value-type="float" office:value="14.6000003814697">
                <text:p>14.6000003814697</text:p>
              </table:table-cell>
              <table:table-cell office:value-type="float" office:value="-20">
                <text:p>-20</text:p>
              </table:table-cell>
            </table:table-row>
            <table:table-row>
              <table:table-cell office:value-type="string">
                <text:p>288</text:p>
              </table:table-cell>
              <table:table-cell office:value-type="float" office:value="0.00057399998549954">
                <text:p>0.00057399998549954</text:p>
              </table:table-cell>
              <table:table-cell office:value-type="float" office:value="15">
                <text:p>15</text:p>
              </table:table-cell>
              <table:table-cell office:value-type="float" office:value="-20">
                <text:p>-20</text:p>
              </table:table-cell>
            </table:table-row>
            <table:table-row>
              <table:table-cell office:value-type="string">
                <text:p>289</text:p>
              </table:table-cell>
              <table:table-cell office:value-type="float" office:value="0.000575999985449016">
                <text:p>0.000575999985449016</text:p>
              </table:table-cell>
              <table:table-cell office:value-type="float" office:value="15.3999996185303">
                <text:p>15.3999996185303</text:p>
              </table:table-cell>
              <table:table-cell office:value-type="float" office:value="-20">
                <text:p>-20</text:p>
              </table:table-cell>
            </table:table-row>
            <table:table-row>
              <table:table-cell office:value-type="string">
                <text:p>290</text:p>
              </table:table-cell>
              <table:table-cell office:value-type="float" office:value="0.000577999985398492">
                <text:p>0.000577999985398492</text:p>
              </table:table-cell>
              <table:table-cell office:value-type="float" office:value="15.8000001907349">
                <text:p>15.8000001907349</text:p>
              </table:table-cell>
              <table:table-cell office:value-type="float" office:value="-20">
                <text:p>-20</text:p>
              </table:table-cell>
            </table:table-row>
            <table:table-row>
              <table:table-cell office:value-type="string">
                <text:p>291</text:p>
              </table:table-cell>
              <table:table-cell office:value-type="float" office:value="0.000579999985347968">
                <text:p>0.000579999985347968</text:p>
              </table:table-cell>
              <table:table-cell office:value-type="float" office:value="16.2000007629395">
                <text:p>16.2000007629395</text:p>
              </table:table-cell>
              <table:table-cell office:value-type="float" office:value="-20">
                <text:p>-20</text:p>
              </table:table-cell>
            </table:table-row>
            <table:table-row>
              <table:table-cell office:value-type="string">
                <text:p>292</text:p>
              </table:table-cell>
              <table:table-cell office:value-type="float" office:value="0.000581999985297443">
                <text:p>0.000581999985297443</text:p>
              </table:table-cell>
              <table:table-cell office:value-type="float" office:value="16.3999996185303">
                <text:p>16.3999996185303</text:p>
              </table:table-cell>
              <table:table-cell office:value-type="float" office:value="-20">
                <text:p>-20</text:p>
              </table:table-cell>
            </table:table-row>
            <table:table-row>
              <table:table-cell office:value-type="string">
                <text:p>293</text:p>
              </table:table-cell>
              <table:table-cell office:value-type="float" office:value="0.000583999985246919">
                <text:p>0.000583999985246919</text:p>
              </table:table-cell>
              <table:table-cell office:value-type="float" office:value="16.7999992370605">
                <text:p>16.7999992370605</text:p>
              </table:table-cell>
              <table:table-cell office:value-type="float" office:value="-20">
                <text:p>-20</text:p>
              </table:table-cell>
            </table:table-row>
            <table:table-row>
              <table:table-cell office:value-type="string">
                <text:p>294</text:p>
              </table:table-cell>
              <table:table-cell office:value-type="float" office:value="0.000585999985196395">
                <text:p>0.000585999985196395</text:p>
              </table:table-cell>
              <table:table-cell office:value-type="float" office:value="17.2000007629395">
                <text:p>17.2000007629395</text:p>
              </table:table-cell>
              <table:table-cell office:value-type="float" office:value="-20">
                <text:p>-20</text:p>
              </table:table-cell>
            </table:table-row>
            <table:table-row>
              <table:table-cell office:value-type="string">
                <text:p>295</text:p>
              </table:table-cell>
              <table:table-cell office:value-type="float" office:value="0.000587999985145871">
                <text:p>0.000587999985145871</text:p>
              </table:table-cell>
              <table:table-cell office:value-type="float" office:value="17.6000003814697">
                <text:p>17.6000003814697</text:p>
              </table:table-cell>
              <table:table-cell office:value-type="float" office:value="-20">
                <text:p>-20</text:p>
              </table:table-cell>
            </table:table-row>
            <table:table-row>
              <table:table-cell office:value-type="string">
                <text:p>296</text:p>
              </table:table-cell>
              <table:table-cell office:value-type="float" office:value="0.000589999985095346">
                <text:p>0.000589999985095346</text:p>
              </table:table-cell>
              <table:table-cell office:value-type="float" office:value="18">
                <text:p>18</text:p>
              </table:table-cell>
              <table:table-cell office:value-type="float" office:value="-20">
                <text:p>-20</text:p>
              </table:table-cell>
            </table:table-row>
            <table:table-row>
              <table:table-cell office:value-type="string">
                <text:p>297</text:p>
              </table:table-cell>
              <table:table-cell office:value-type="float" office:value="0.000591999985044822">
                <text:p>0.000591999985044822</text:p>
              </table:table-cell>
              <table:table-cell office:value-type="float" office:value="18.3999996185303">
                <text:p>18.3999996185303</text:p>
              </table:table-cell>
              <table:table-cell office:value-type="float" office:value="-20">
                <text:p>-20</text:p>
              </table:table-cell>
            </table:table-row>
            <table:table-row>
              <table:table-cell office:value-type="string">
                <text:p>298</text:p>
              </table:table-cell>
              <table:table-cell office:value-type="float" office:value="0.000593999984994298">
                <text:p>0.000593999984994298</text:p>
              </table:table-cell>
              <table:table-cell office:value-type="float" office:value="18.6000003814697">
                <text:p>18.6000003814697</text:p>
              </table:table-cell>
              <table:table-cell office:value-type="float" office:value="-20">
                <text:p>-20</text:p>
              </table:table-cell>
            </table:table-row>
            <table:table-row>
              <table:table-cell office:value-type="string">
                <text:p>299</text:p>
              </table:table-cell>
              <table:table-cell office:value-type="float" office:value="0.000595999984943774">
                <text:p>0.000595999984943774</text:p>
              </table:table-cell>
              <table:table-cell office:value-type="float" office:value="19">
                <text:p>19</text:p>
              </table:table-cell>
              <table:table-cell office:value-type="float" office:value="-20">
                <text:p>-20</text:p>
              </table:table-cell>
            </table:table-row>
            <table:table-row>
              <table:table-cell office:value-type="string">
                <text:p>300</text:p>
              </table:table-cell>
              <table:table-cell office:value-type="float" office:value="0.000597999984893249">
                <text:p>0.000597999984893249</text:p>
              </table:table-cell>
              <table:table-cell office:value-type="float" office:value="19.3999996185303">
                <text:p>19.3999996185303</text:p>
              </table:table-cell>
              <table:table-cell office:value-type="float" office:value="-20">
                <text:p>-20</text:p>
              </table:table-cell>
            </table:table-row>
            <table:table-row>
              <table:table-cell office:value-type="string">
                <text:p>301</text:p>
              </table:table-cell>
              <table:table-cell office:value-type="float" office:value="0.000599999984842725">
                <text:p>0.000599999984842725</text:p>
              </table:table-cell>
              <table:table-cell office:value-type="float" office:value="19.7999992370605">
                <text:p>19.7999992370605</text:p>
              </table:table-cell>
              <table:table-cell office:value-type="float" office:value="-20">
                <text:p>-20</text:p>
              </table:table-cell>
            </table:table-row>
            <table:table-row>
              <table:table-cell office:value-type="string">
                <text:p>302</text:p>
              </table:table-cell>
              <table:table-cell office:value-type="float" office:value="0.000601999984792201">
                <text:p>0.000601999984792201</text:p>
              </table:table-cell>
              <table:table-cell office:value-type="float" office:value="20.3999996185303">
                <text:p>20.3999996185303</text:p>
              </table:table-cell>
              <table:table-cell office:value-type="float" office:value="-20">
                <text:p>-20</text:p>
              </table:table-cell>
            </table:table-row>
            <table:table-row>
              <table:table-cell office:value-type="string">
                <text:p>303</text:p>
              </table:table-cell>
              <table:table-cell office:value-type="float" office:value="0.000603999984741677">
                <text:p>0.000603999984741677</text:p>
              </table:table-cell>
              <table:table-cell office:value-type="float" office:value="20.6000003814697">
                <text:p>20.6000003814697</text:p>
              </table:table-cell>
              <table:table-cell office:value-type="float" office:value="-20">
                <text:p>-20</text:p>
              </table:table-cell>
            </table:table-row>
            <table:table-row>
              <table:table-cell office:value-type="string">
                <text:p>304</text:p>
              </table:table-cell>
              <table:table-cell office:value-type="float" office:value="0.000605999984691152">
                <text:p>0.000605999984691152</text:p>
              </table:table-cell>
              <table:table-cell office:value-type="float" office:value="20.7999992370605">
                <text:p>20.7999992370605</text:p>
              </table:table-cell>
              <table:table-cell office:value-type="float" office:value="-20">
                <text:p>-20</text:p>
              </table:table-cell>
            </table:table-row>
            <table:table-row>
              <table:table-cell office:value-type="string">
                <text:p>305</text:p>
              </table:table-cell>
              <table:table-cell office:value-type="float" office:value="0.000607999984640628">
                <text:p>0.000607999984640628</text:p>
              </table:table-cell>
              <table:table-cell office:value-type="float" office:value="21.2000007629395">
                <text:p>21.2000007629395</text:p>
              </table:table-cell>
              <table:table-cell office:value-type="float" office:value="-20">
                <text:p>-20</text:p>
              </table:table-cell>
            </table:table-row>
            <table:table-row>
              <table:table-cell office:value-type="string">
                <text:p>306</text:p>
              </table:table-cell>
              <table:table-cell office:value-type="float" office:value="0.000609999984590104">
                <text:p>0.000609999984590104</text:p>
              </table:table-cell>
              <table:table-cell office:value-type="float" office:value="21.7999992370605">
                <text:p>21.7999992370605</text:p>
              </table:table-cell>
              <table:table-cell office:value-type="float" office:value="-20">
                <text:p>-20</text:p>
              </table:table-cell>
            </table:table-row>
            <table:table-row>
              <table:table-cell office:value-type="string">
                <text:p>307</text:p>
              </table:table-cell>
              <table:table-cell office:value-type="float" office:value="0.00061199998453958">
                <text:p>0.00061199998453958</text:p>
              </table:table-cell>
              <table:table-cell office:value-type="float" office:value="22">
                <text:p>22</text:p>
              </table:table-cell>
              <table:table-cell office:value-type="float" office:value="-20">
                <text:p>-20</text:p>
              </table:table-cell>
            </table:table-row>
            <table:table-row>
              <table:table-cell office:value-type="string">
                <text:p>308</text:p>
              </table:table-cell>
              <table:table-cell office:value-type="float" office:value="0.000613999984489055">
                <text:p>0.000613999984489055</text:p>
              </table:table-cell>
              <table:table-cell office:value-type="float" office:value="22.3999996185303">
                <text:p>22.3999996185303</text:p>
              </table:table-cell>
              <table:table-cell office:value-type="float" office:value="-20">
                <text:p>-20</text:p>
              </table:table-cell>
            </table:table-row>
            <table:table-row>
              <table:table-cell office:value-type="string">
                <text:p>309</text:p>
              </table:table-cell>
              <table:table-cell office:value-type="float" office:value="0.000615999984438531">
                <text:p>0.000615999984438531</text:p>
              </table:table-cell>
              <table:table-cell office:value-type="float" office:value="22.7999992370605">
                <text:p>22.7999992370605</text:p>
              </table:table-cell>
              <table:table-cell office:value-type="float" office:value="-20">
                <text:p>-20</text:p>
              </table:table-cell>
            </table:table-row>
            <table:table-row>
              <table:table-cell office:value-type="string">
                <text:p>310</text:p>
              </table:table-cell>
              <table:table-cell office:value-type="float" office:value="0.000617999984388007">
                <text:p>0.000617999984388007</text:p>
              </table:table-cell>
              <table:table-cell office:value-type="float" office:value="23">
                <text:p>23</text:p>
              </table:table-cell>
              <table:table-cell office:value-type="float" office:value="-20">
                <text:p>-20</text:p>
              </table:table-cell>
            </table:table-row>
            <table:table-row>
              <table:table-cell office:value-type="string">
                <text:p>311</text:p>
              </table:table-cell>
              <table:table-cell office:value-type="float" office:value="0.000619999984337483">
                <text:p>0.000619999984337483</text:p>
              </table:table-cell>
              <table:table-cell office:value-type="float" office:value="23.3999996185303">
                <text:p>23.3999996185303</text:p>
              </table:table-cell>
              <table:table-cell office:value-type="float" office:value="-20">
                <text:p>-20</text:p>
              </table:table-cell>
            </table:table-row>
            <table:table-row>
              <table:table-cell office:value-type="string">
                <text:p>312</text:p>
              </table:table-cell>
              <table:table-cell office:value-type="float" office:value="0.000621999984286958">
                <text:p>0.000621999984286958</text:p>
              </table:table-cell>
              <table:table-cell office:value-type="float" office:value="23.6000003814697">
                <text:p>23.6000003814697</text:p>
              </table:table-cell>
              <table:table-cell office:value-type="float" office:value="-20">
                <text:p>-20</text:p>
              </table:table-cell>
            </table:table-row>
            <table:table-row>
              <table:table-cell office:value-type="string">
                <text:p>313</text:p>
              </table:table-cell>
              <table:table-cell office:value-type="float" office:value="0.000623999984236434">
                <text:p>0.000623999984236434</text:p>
              </table:table-cell>
              <table:table-cell office:value-type="float" office:value="24.2000007629395">
                <text:p>24.2000007629395</text:p>
              </table:table-cell>
              <table:table-cell office:value-type="float" office:value="-20">
                <text:p>-20</text:p>
              </table:table-cell>
            </table:table-row>
            <table:table-row>
              <table:table-cell office:value-type="string">
                <text:p>314</text:p>
              </table:table-cell>
              <table:table-cell office:value-type="float" office:value="0.00062599998418591">
                <text:p>0.00062599998418591</text:p>
              </table:table-cell>
              <table:table-cell office:value-type="float" office:value="24.6000003814697">
                <text:p>24.6000003814697</text:p>
              </table:table-cell>
              <table:table-cell office:value-type="float" office:value="-20">
                <text:p>-20</text:p>
              </table:table-cell>
            </table:table-row>
            <table:table-row>
              <table:table-cell office:value-type="string">
                <text:p>315</text:p>
              </table:table-cell>
              <table:table-cell office:value-type="float" office:value="0.000627999984135386">
                <text:p>0.000627999984135386</text:p>
              </table:table-cell>
              <table:table-cell office:value-type="float" office:value="25">
                <text:p>25</text:p>
              </table:table-cell>
              <table:table-cell office:value-type="float" office:value="-20">
                <text:p>-20</text:p>
              </table:table-cell>
            </table:table-row>
            <table:table-row>
              <table:table-cell office:value-type="string">
                <text:p>316</text:p>
              </table:table-cell>
              <table:table-cell office:value-type="float" office:value="0.000629999984084861">
                <text:p>0.000629999984084861</text:p>
              </table:table-cell>
              <table:table-cell office:value-type="float" office:value="25.6000003814697">
                <text:p>25.6000003814697</text:p>
              </table:table-cell>
              <table:table-cell office:value-type="float" office:value="-20">
                <text:p>-20</text:p>
              </table:table-cell>
            </table:table-row>
            <table:table-row>
              <table:table-cell office:value-type="string">
                <text:p>317</text:p>
              </table:table-cell>
              <table:table-cell office:value-type="float" office:value="0.000631999984034337">
                <text:p>0.000631999984034337</text:p>
              </table:table-cell>
              <table:table-cell office:value-type="float" office:value="25.7999992370605">
                <text:p>25.7999992370605</text:p>
              </table:table-cell>
              <table:table-cell office:value-type="float" office:value="-20">
                <text:p>-20</text:p>
              </table:table-cell>
            </table:table-row>
            <table:table-row>
              <table:table-cell office:value-type="string">
                <text:p>318</text:p>
              </table:table-cell>
              <table:table-cell office:value-type="float" office:value="0.000633999983983813">
                <text:p>0.000633999983983813</text:p>
              </table:table-cell>
              <table:table-cell office:value-type="float" office:value="26.2000007629395">
                <text:p>26.2000007629395</text:p>
              </table:table-cell>
              <table:table-cell office:value-type="float" office:value="-20">
                <text:p>-20</text:p>
              </table:table-cell>
            </table:table-row>
            <table:table-row>
              <table:table-cell office:value-type="string">
                <text:p>319</text:p>
              </table:table-cell>
              <table:table-cell office:value-type="float" office:value="0.000635999983933289">
                <text:p>0.000635999983933289</text:p>
              </table:table-cell>
              <table:table-cell office:value-type="float" office:value="26.3999996185303">
                <text:p>26.3999996185303</text:p>
              </table:table-cell>
              <table:table-cell office:value-type="float" office:value="-20">
                <text:p>-20</text:p>
              </table:table-cell>
            </table:table-row>
            <table:table-row>
              <table:table-cell office:value-type="string">
                <text:p>320</text:p>
              </table:table-cell>
              <table:table-cell office:value-type="float" office:value="0.000637999983882764">
                <text:p>0.000637999983882764</text:p>
              </table:table-cell>
              <table:table-cell office:value-type="float" office:value="26.7999992370605">
                <text:p>26.7999992370605</text:p>
              </table:table-cell>
              <table:table-cell office:value-type="float" office:value="-20">
                <text:p>-20</text:p>
              </table:table-cell>
            </table:table-row>
            <table:table-row>
              <table:table-cell office:value-type="string">
                <text:p>321</text:p>
              </table:table-cell>
              <table:table-cell office:value-type="float" office:value="0.00063999998383224">
                <text:p>0.00063999998383224</text:p>
              </table:table-cell>
              <table:table-cell office:value-type="float" office:value="27.2000007629395">
                <text:p>27.2000007629395</text:p>
              </table:table-cell>
              <table:table-cell office:value-type="float" office:value="-20">
                <text:p>-20</text:p>
              </table:table-cell>
            </table:table-row>
            <table:table-row>
              <table:table-cell office:value-type="string">
                <text:p>322</text:p>
              </table:table-cell>
              <table:table-cell office:value-type="float" office:value="0.000641999983781716">
                <text:p>0.000641999983781716</text:p>
              </table:table-cell>
              <table:table-cell office:value-type="float" office:value="27.7999992370605">
                <text:p>27.7999992370605</text:p>
              </table:table-cell>
              <table:table-cell office:value-type="float" office:value="-20">
                <text:p>-20</text:p>
              </table:table-cell>
            </table:table-row>
            <table:table-row>
              <table:table-cell office:value-type="string">
                <text:p>323</text:p>
              </table:table-cell>
              <table:table-cell office:value-type="float" office:value="0.000643999983731192">
                <text:p>0.000643999983731192</text:p>
              </table:table-cell>
              <table:table-cell office:value-type="float" office:value="27.7999992370605">
                <text:p>27.7999992370605</text:p>
              </table:table-cell>
              <table:table-cell office:value-type="float" office:value="-20">
                <text:p>-20</text:p>
              </table:table-cell>
            </table:table-row>
            <table:table-row>
              <table:table-cell office:value-type="string">
                <text:p>324</text:p>
              </table:table-cell>
              <table:table-cell office:value-type="float" office:value="0.000645999983680667">
                <text:p>0.000645999983680667</text:p>
              </table:table-cell>
              <table:table-cell office:value-type="float" office:value="28.3999996185303">
                <text:p>28.3999996185303</text:p>
              </table:table-cell>
              <table:table-cell office:value-type="float" office:value="-20">
                <text:p>-20</text:p>
              </table:table-cell>
            </table:table-row>
            <table:table-row>
              <table:table-cell office:value-type="string">
                <text:p>325</text:p>
              </table:table-cell>
              <table:table-cell office:value-type="float" office:value="0.000647999983630143">
                <text:p>0.000647999983630143</text:p>
              </table:table-cell>
              <table:table-cell office:value-type="float" office:value="28.7999992370605">
                <text:p>28.7999992370605</text:p>
              </table:table-cell>
              <table:table-cell office:value-type="float" office:value="-20">
                <text:p>-20</text:p>
              </table:table-cell>
            </table:table-row>
            <table:table-row>
              <table:table-cell office:value-type="string">
                <text:p>326</text:p>
              </table:table-cell>
              <table:table-cell office:value-type="float" office:value="0.000649999983579619">
                <text:p>0.000649999983579619</text:p>
              </table:table-cell>
              <table:table-cell office:value-type="float" office:value="29.2000007629395">
                <text:p>29.2000007629395</text:p>
              </table:table-cell>
              <table:table-cell office:value-type="float" office:value="-20">
                <text:p>-20</text:p>
              </table:table-cell>
            </table:table-row>
            <table:table-row>
              <table:table-cell office:value-type="string">
                <text:p>327</text:p>
              </table:table-cell>
              <table:table-cell office:value-type="float" office:value="0.000651999983529095">
                <text:p>0.000651999983529095</text:p>
              </table:table-cell>
              <table:table-cell office:value-type="float" office:value="29.3999996185303">
                <text:p>29.3999996185303</text:p>
              </table:table-cell>
              <table:table-cell office:value-type="float" office:value="-20">
                <text:p>-20</text:p>
              </table:table-cell>
            </table:table-row>
            <table:table-row>
              <table:table-cell office:value-type="string">
                <text:p>328</text:p>
              </table:table-cell>
              <table:table-cell office:value-type="float" office:value="0.00065399998347857">
                <text:p>0.00065399998347857</text:p>
              </table:table-cell>
              <table:table-cell office:value-type="float" office:value="29.7999992370605">
                <text:p>29.7999992370605</text:p>
              </table:table-cell>
              <table:table-cell office:value-type="float" office:value="-20">
                <text:p>-20</text:p>
              </table:table-cell>
            </table:table-row>
            <table:table-row>
              <table:table-cell office:value-type="string">
                <text:p>329</text:p>
              </table:table-cell>
              <table:table-cell office:value-type="float" office:value="0.000655999983428046">
                <text:p>0.000655999983428046</text:p>
              </table:table-cell>
              <table:table-cell office:value-type="float" office:value="30">
                <text:p>30</text:p>
              </table:table-cell>
              <table:table-cell office:value-type="float" office:value="-20">
                <text:p>-20</text:p>
              </table:table-cell>
            </table:table-row>
            <table:table-row>
              <table:table-cell office:value-type="string">
                <text:p>330</text:p>
              </table:table-cell>
              <table:table-cell office:value-type="float" office:value="0.000657999983377522">
                <text:p>0.000657999983377522</text:p>
              </table:table-cell>
              <table:table-cell office:value-type="float" office:value="30.6000003814697">
                <text:p>30.6000003814697</text:p>
              </table:table-cell>
              <table:table-cell office:value-type="float" office:value="-20">
                <text:p>-20</text:p>
              </table:table-cell>
            </table:table-row>
            <table:table-row>
              <table:table-cell office:value-type="string">
                <text:p>331</text:p>
              </table:table-cell>
              <table:table-cell office:value-type="float" office:value="0.000659999983326998">
                <text:p>0.000659999983326998</text:p>
              </table:table-cell>
              <table:table-cell office:value-type="float" office:value="31">
                <text:p>31</text:p>
              </table:table-cell>
              <table:table-cell office:value-type="float" office:value="-20">
                <text:p>-20</text:p>
              </table:table-cell>
            </table:table-row>
            <table:table-row>
              <table:table-cell office:value-type="string">
                <text:p>332</text:p>
              </table:table-cell>
              <table:table-cell office:value-type="float" office:value="0.000661999983276473">
                <text:p>0.000661999983276473</text:p>
              </table:table-cell>
              <table:table-cell office:value-type="float" office:value="31.3999996185303">
                <text:p>31.3999996185303</text:p>
              </table:table-cell>
              <table:table-cell office:value-type="float" office:value="-20">
                <text:p>-20</text:p>
              </table:table-cell>
            </table:table-row>
            <table:table-row>
              <table:table-cell office:value-type="string">
                <text:p>333</text:p>
              </table:table-cell>
              <table:table-cell office:value-type="float" office:value="0.000663999983225949">
                <text:p>0.000663999983225949</text:p>
              </table:table-cell>
              <table:table-cell office:value-type="float" office:value="32">
                <text:p>32</text:p>
              </table:table-cell>
              <table:table-cell office:value-type="float" office:value="-20">
                <text:p>-20</text:p>
              </table:table-cell>
            </table:table-row>
            <table:table-row>
              <table:table-cell office:value-type="string">
                <text:p>334</text:p>
              </table:table-cell>
              <table:table-cell office:value-type="float" office:value="0.000665999983175425">
                <text:p>0.000665999983175425</text:p>
              </table:table-cell>
              <table:table-cell office:value-type="float" office:value="32.2000007629395">
                <text:p>32.2000007629395</text:p>
              </table:table-cell>
              <table:table-cell office:value-type="float" office:value="-20">
                <text:p>-20</text:p>
              </table:table-cell>
            </table:table-row>
            <table:table-row>
              <table:table-cell office:value-type="string">
                <text:p>335</text:p>
              </table:table-cell>
              <table:table-cell office:value-type="float" office:value="0.000667999983124901">
                <text:p>0.000667999983124901</text:p>
              </table:table-cell>
              <table:table-cell office:value-type="float" office:value="32.2000007629395">
                <text:p>32.2000007629395</text:p>
              </table:table-cell>
              <table:table-cell office:value-type="float" office:value="-20">
                <text:p>-20</text:p>
              </table:table-cell>
            </table:table-row>
            <table:table-row>
              <table:table-cell office:value-type="string">
                <text:p>336</text:p>
              </table:table-cell>
              <table:table-cell office:value-type="float" office:value="0.000669999983074376">
                <text:p>0.000669999983074376</text:p>
              </table:table-cell>
              <table:table-cell office:value-type="float" office:value="32.5999984741211">
                <text:p>32.5999984741211</text:p>
              </table:table-cell>
              <table:table-cell office:value-type="float" office:value="-20">
                <text:p>-20</text:p>
              </table:table-cell>
            </table:table-row>
            <table:table-row>
              <table:table-cell office:value-type="string">
                <text:p>337</text:p>
              </table:table-cell>
              <table:table-cell office:value-type="float" office:value="0.000671999983023852">
                <text:p>0.000671999983023852</text:p>
              </table:table-cell>
              <table:table-cell office:value-type="float" office:value="33">
                <text:p>33</text:p>
              </table:table-cell>
              <table:table-cell office:value-type="float" office:value="-20">
                <text:p>-20</text:p>
              </table:table-cell>
            </table:table-row>
            <table:table-row>
              <table:table-cell office:value-type="string">
                <text:p>338</text:p>
              </table:table-cell>
              <table:table-cell office:value-type="float" office:value="0.000673999982973328">
                <text:p>0.000673999982973328</text:p>
              </table:table-cell>
              <table:table-cell office:value-type="float" office:value="33.5999984741211">
                <text:p>33.5999984741211</text:p>
              </table:table-cell>
              <table:table-cell office:value-type="float" office:value="-20">
                <text:p>-20</text:p>
              </table:table-cell>
            </table:table-row>
            <table:table-row>
              <table:table-cell office:value-type="string">
                <text:p>339</text:p>
              </table:table-cell>
              <table:table-cell office:value-type="float" office:value="0.000675999982922804">
                <text:p>0.000675999982922804</text:p>
              </table:table-cell>
              <table:table-cell office:value-type="float" office:value="33.7999992370606">
                <text:p>33.7999992370606</text:p>
              </table:table-cell>
              <table:table-cell office:value-type="float" office:value="-20">
                <text:p>-20</text:p>
              </table:table-cell>
            </table:table-row>
            <table:table-row>
              <table:table-cell office:value-type="string">
                <text:p>340</text:p>
              </table:table-cell>
              <table:table-cell office:value-type="float" office:value="0.000677999982872279">
                <text:p>0.000677999982872279</text:p>
              </table:table-cell>
              <table:table-cell office:value-type="float" office:value="34.4000015258789">
                <text:p>34.4000015258789</text:p>
              </table:table-cell>
              <table:table-cell office:value-type="float" office:value="-20">
                <text:p>-20</text:p>
              </table:table-cell>
            </table:table-row>
            <table:table-row>
              <table:table-cell office:value-type="string">
                <text:p>341</text:p>
              </table:table-cell>
              <table:table-cell office:value-type="float" office:value="0.000679999982821755">
                <text:p>0.000679999982821755</text:p>
              </table:table-cell>
              <table:table-cell office:value-type="float" office:value="34.7999992370606">
                <text:p>34.7999992370606</text:p>
              </table:table-cell>
              <table:table-cell office:value-type="float" office:value="-20">
                <text:p>-20</text:p>
              </table:table-cell>
            </table:table-row>
            <table:table-row>
              <table:table-cell office:value-type="string">
                <text:p>342</text:p>
              </table:table-cell>
              <table:table-cell office:value-type="float" office:value="0.000681999982771231">
                <text:p>0.000681999982771231</text:p>
              </table:table-cell>
              <table:table-cell office:value-type="float" office:value="35">
                <text:p>35</text:p>
              </table:table-cell>
              <table:table-cell office:value-type="float" office:value="-20">
                <text:p>-20</text:p>
              </table:table-cell>
            </table:table-row>
            <table:table-row>
              <table:table-cell office:value-type="string">
                <text:p>343</text:p>
              </table:table-cell>
              <table:table-cell office:value-type="float" office:value="0.000683999982720707">
                <text:p>0.000683999982720707</text:p>
              </table:table-cell>
              <table:table-cell office:value-type="float" office:value="35.2000007629395">
                <text:p>35.2000007629395</text:p>
              </table:table-cell>
              <table:table-cell office:value-type="float" office:value="-20">
                <text:p>-20</text:p>
              </table:table-cell>
            </table:table-row>
            <table:table-row>
              <table:table-cell office:value-type="string">
                <text:p>344</text:p>
              </table:table-cell>
              <table:table-cell office:value-type="float" office:value="0.000685999982670182">
                <text:p>0.000685999982670182</text:p>
              </table:table-cell>
              <table:table-cell office:value-type="float" office:value="35.5999984741211">
                <text:p>35.5999984741211</text:p>
              </table:table-cell>
              <table:table-cell office:value-type="float" office:value="-20">
                <text:p>-20</text:p>
              </table:table-cell>
            </table:table-row>
            <table:table-row>
              <table:table-cell office:value-type="string">
                <text:p>345</text:p>
              </table:table-cell>
              <table:table-cell office:value-type="float" office:value="0.000687999982619658">
                <text:p>0.000687999982619658</text:p>
              </table:table-cell>
              <table:table-cell office:value-type="float" office:value="36.4000015258789">
                <text:p>36.4000015258789</text:p>
              </table:table-cell>
              <table:table-cell office:value-type="float" office:value="-20">
                <text:p>-20</text:p>
              </table:table-cell>
            </table:table-row>
            <table:table-row>
              <table:table-cell office:value-type="string">
                <text:p>346</text:p>
              </table:table-cell>
              <table:table-cell office:value-type="float" office:value="0.000689999982569134">
                <text:p>0.000689999982569134</text:p>
              </table:table-cell>
              <table:table-cell office:value-type="float" office:value="36.5999984741211">
                <text:p>36.5999984741211</text:p>
              </table:table-cell>
              <table:table-cell office:value-type="float" office:value="-20">
                <text:p>-20</text:p>
              </table:table-cell>
            </table:table-row>
            <table:table-row>
              <table:table-cell office:value-type="string">
                <text:p>347</text:p>
              </table:table-cell>
              <table:table-cell office:value-type="float" office:value="0.00069199998251861">
                <text:p>0.00069199998251861</text:p>
              </table:table-cell>
              <table:table-cell office:value-type="float" office:value="36.7999992370606">
                <text:p>36.7999992370606</text:p>
              </table:table-cell>
              <table:table-cell office:value-type="float" office:value="-20">
                <text:p>-20</text:p>
              </table:table-cell>
            </table:table-row>
            <table:table-row>
              <table:table-cell office:value-type="string">
                <text:p>348</text:p>
              </table:table-cell>
              <table:table-cell office:value-type="float" office:value="0.000693999982468085">
                <text:p>0.000693999982468085</text:p>
              </table:table-cell>
              <table:table-cell office:value-type="float" office:value="37">
                <text:p>37</text:p>
              </table:table-cell>
              <table:table-cell office:value-type="float" office:value="-20">
                <text:p>-20</text:p>
              </table:table-cell>
            </table:table-row>
            <table:table-row>
              <table:table-cell office:value-type="string">
                <text:p>349</text:p>
              </table:table-cell>
              <table:table-cell office:value-type="float" office:value="0.000695999982417561">
                <text:p>0.000695999982417561</text:p>
              </table:table-cell>
              <table:table-cell office:value-type="float" office:value="37.5999984741211">
                <text:p>37.5999984741211</text:p>
              </table:table-cell>
              <table:table-cell office:value-type="float" office:value="-20">
                <text:p>-20</text:p>
              </table:table-cell>
            </table:table-row>
            <table:table-row>
              <table:table-cell office:value-type="string">
                <text:p>350</text:p>
              </table:table-cell>
              <table:table-cell office:value-type="float" office:value="0.000697999982367037">
                <text:p>0.000697999982367037</text:p>
              </table:table-cell>
              <table:table-cell office:value-type="float" office:value="38">
                <text:p>38</text:p>
              </table:table-cell>
              <table:table-cell office:value-type="float" office:value="-20">
                <text:p>-20</text:p>
              </table:table-cell>
            </table:table-row>
            <table:table-row>
              <table:table-cell office:value-type="string">
                <text:p>351</text:p>
              </table:table-cell>
              <table:table-cell office:value-type="float" office:value="0.000699999982316513">
                <text:p>0.000699999982316513</text:p>
              </table:table-cell>
              <table:table-cell office:value-type="float" office:value="38.4000015258789">
                <text:p>38.4000015258789</text:p>
              </table:table-cell>
              <table:table-cell office:value-type="float" office:value="-20">
                <text:p>-20</text:p>
              </table:table-cell>
            </table:table-row>
            <table:table-row>
              <table:table-cell office:value-type="string">
                <text:p>352</text:p>
              </table:table-cell>
              <table:table-cell office:value-type="float" office:value="0.000701999982265988">
                <text:p>0.000701999982265988</text:p>
              </table:table-cell>
              <table:table-cell office:value-type="float" office:value="38.5999984741211">
                <text:p>38.5999984741211</text:p>
              </table:table-cell>
              <table:table-cell office:value-type="float" office:value="-20">
                <text:p>-20</text:p>
              </table:table-cell>
            </table:table-row>
            <table:table-row>
              <table:table-cell office:value-type="string">
                <text:p>353</text:p>
              </table:table-cell>
              <table:table-cell office:value-type="float" office:value="0.000703999982215464">
                <text:p>0.000703999982215464</text:p>
              </table:table-cell>
              <table:table-cell office:value-type="float" office:value="39">
                <text:p>39</text:p>
              </table:table-cell>
              <table:table-cell office:value-type="float" office:value="-20">
                <text:p>-20</text:p>
              </table:table-cell>
            </table:table-row>
            <table:table-row>
              <table:table-cell office:value-type="string">
                <text:p>354</text:p>
              </table:table-cell>
              <table:table-cell office:value-type="float" office:value="0.00070599998216494">
                <text:p>0.00070599998216494</text:p>
              </table:table-cell>
              <table:table-cell office:value-type="float" office:value="39.4000015258789">
                <text:p>39.4000015258789</text:p>
              </table:table-cell>
              <table:table-cell office:value-type="float" office:value="-20">
                <text:p>-20</text:p>
              </table:table-cell>
            </table:table-row>
            <table:table-row>
              <table:table-cell office:value-type="string">
                <text:p>355</text:p>
              </table:table-cell>
              <table:table-cell office:value-type="float" office:value="0.000707999982114416">
                <text:p>0.000707999982114416</text:p>
              </table:table-cell>
              <table:table-cell office:value-type="float" office:value="39.5999984741211">
                <text:p>39.5999984741211</text:p>
              </table:table-cell>
              <table:table-cell office:value-type="float" office:value="-20">
                <text:p>-20</text:p>
              </table:table-cell>
            </table:table-row>
            <table:table-row>
              <table:table-cell office:value-type="string">
                <text:p>356</text:p>
              </table:table-cell>
              <table:table-cell office:value-type="float" office:value="0.000709999982063891">
                <text:p>0.000709999982063891</text:p>
              </table:table-cell>
              <table:table-cell office:value-type="float" office:value="40">
                <text:p>40</text:p>
              </table:table-cell>
              <table:table-cell office:value-type="float" office:value="-20">
                <text:p>-20</text:p>
              </table:table-cell>
            </table:table-row>
            <table:table-row>
              <table:table-cell office:value-type="string">
                <text:p>357</text:p>
              </table:table-cell>
              <table:table-cell office:value-type="float" office:value="0.000711999982013367">
                <text:p>0.000711999982013367</text:p>
              </table:table-cell>
              <table:table-cell office:value-type="float" office:value="40.2000007629395">
                <text:p>40.2000007629395</text:p>
              </table:table-cell>
              <table:table-cell office:value-type="float" office:value="-20">
                <text:p>-20</text:p>
              </table:table-cell>
            </table:table-row>
            <table:table-row>
              <table:table-cell office:value-type="string">
                <text:p>358</text:p>
              </table:table-cell>
              <table:table-cell office:value-type="float" office:value="0.000713999981962843">
                <text:p>0.000713999981962843</text:p>
              </table:table-cell>
              <table:table-cell office:value-type="float" office:value="40.2000007629395">
                <text:p>40.2000007629395</text:p>
              </table:table-cell>
              <table:table-cell office:value-type="float" office:value="-20">
                <text:p>-20</text:p>
              </table:table-cell>
            </table:table-row>
            <table:table-row>
              <table:table-cell office:value-type="string">
                <text:p>359</text:p>
              </table:table-cell>
              <table:table-cell office:value-type="float" office:value="0.000715999981912319">
                <text:p>0.000715999981912319</text:p>
              </table:table-cell>
              <table:table-cell office:value-type="float" office:value="40.2000007629395">
                <text:p>40.2000007629395</text:p>
              </table:table-cell>
              <table:table-cell office:value-type="float" office:value="-20">
                <text:p>-20</text:p>
              </table:table-cell>
            </table:table-row>
            <table:table-row>
              <table:table-cell office:value-type="string">
                <text:p>360</text:p>
              </table:table-cell>
              <table:table-cell office:value-type="float" office:value="0.000717999981861794">
                <text:p>0.000717999981861794</text:p>
              </table:table-cell>
              <table:table-cell office:value-type="float" office:value="40.2000007629395">
                <text:p>40.2000007629395</text:p>
              </table:table-cell>
              <table:table-cell office:value-type="float" office:value="-20">
                <text:p>-20</text:p>
              </table:table-cell>
            </table:table-row>
            <table:table-row>
              <table:table-cell office:value-type="string">
                <text:p>361</text:p>
              </table:table-cell>
              <table:table-cell office:value-type="float" office:value="0.00071999998181127">
                <text:p>0.00071999998181127</text:p>
              </table:table-cell>
              <table:table-cell office:value-type="float" office:value="40.2000007629395">
                <text:p>40.2000007629395</text:p>
              </table:table-cell>
              <table:table-cell office:value-type="float" office:value="-20">
                <text:p>-20</text:p>
              </table:table-cell>
            </table:table-row>
            <table:table-row>
              <table:table-cell office:value-type="string">
                <text:p>362</text:p>
              </table:table-cell>
              <table:table-cell office:value-type="float" office:value="0.000721999981760746">
                <text:p>0.000721999981760746</text:p>
              </table:table-cell>
              <table:table-cell office:value-type="float" office:value="40.2000007629395">
                <text:p>40.2000007629395</text:p>
              </table:table-cell>
              <table:table-cell office:value-type="float" office:value="-20">
                <text:p>-20</text:p>
              </table:table-cell>
            </table:table-row>
            <table:table-row>
              <table:table-cell office:value-type="string">
                <text:p>363</text:p>
              </table:table-cell>
              <table:table-cell office:value-type="float" office:value="0.000723999981710222">
                <text:p>0.000723999981710222</text:p>
              </table:table-cell>
              <table:table-cell office:value-type="float" office:value="40.2000007629395">
                <text:p>40.2000007629395</text:p>
              </table:table-cell>
              <table:table-cell office:value-type="float" office:value="-20">
                <text:p>-20</text:p>
              </table:table-cell>
            </table:table-row>
            <table:table-row>
              <table:table-cell office:value-type="string">
                <text:p>364</text:p>
              </table:table-cell>
              <table:table-cell office:value-type="float" office:value="0.000725999981659697">
                <text:p>0.000725999981659697</text:p>
              </table:table-cell>
              <table:table-cell office:value-type="float" office:value="40.2000007629395">
                <text:p>40.2000007629395</text:p>
              </table:table-cell>
              <table:table-cell office:value-type="float" office:value="-20">
                <text:p>-20</text:p>
              </table:table-cell>
            </table:table-row>
            <table:table-row>
              <table:table-cell office:value-type="string">
                <text:p>365</text:p>
              </table:table-cell>
              <table:table-cell office:value-type="float" office:value="0.000727999981609173">
                <text:p>0.000727999981609173</text:p>
              </table:table-cell>
              <table:table-cell office:value-type="float" office:value="40.2000007629395">
                <text:p>40.2000007629395</text:p>
              </table:table-cell>
              <table:table-cell office:value-type="float" office:value="-20">
                <text:p>-20</text:p>
              </table:table-cell>
            </table:table-row>
            <table:table-row>
              <table:table-cell office:value-type="string">
                <text:p>366</text:p>
              </table:table-cell>
              <table:table-cell office:value-type="float" office:value="0.000729999981558649">
                <text:p>0.000729999981558649</text:p>
              </table:table-cell>
              <table:table-cell office:value-type="float" office:value="40.2000007629395">
                <text:p>40.2000007629395</text:p>
              </table:table-cell>
              <table:table-cell office:value-type="float" office:value="-20">
                <text:p>-20</text:p>
              </table:table-cell>
            </table:table-row>
            <table:table-row>
              <table:table-cell office:value-type="string">
                <text:p>367</text:p>
              </table:table-cell>
              <table:table-cell office:value-type="float" office:value="0.000731999981508125">
                <text:p>0.000731999981508125</text:p>
              </table:table-cell>
              <table:table-cell office:value-type="float" office:value="40.2000007629395">
                <text:p>40.2000007629395</text:p>
              </table:table-cell>
              <table:table-cell office:value-type="float" office:value="-20">
                <text:p>-20</text:p>
              </table:table-cell>
            </table:table-row>
            <table:table-row>
              <table:table-cell office:value-type="string">
                <text:p>368</text:p>
              </table:table-cell>
              <table:table-cell office:value-type="float" office:value="0.0007339999814576">
                <text:p>0.0007339999814576</text:p>
              </table:table-cell>
              <table:table-cell office:value-type="float" office:value="40.2000007629395">
                <text:p>40.2000007629395</text:p>
              </table:table-cell>
              <table:table-cell office:value-type="float" office:value="-20">
                <text:p>-20</text:p>
              </table:table-cell>
            </table:table-row>
            <table:table-row>
              <table:table-cell office:value-type="string">
                <text:p>369</text:p>
              </table:table-cell>
              <table:table-cell office:value-type="float" office:value="0.000735999981407076">
                <text:p>0.000735999981407076</text:p>
              </table:table-cell>
              <table:table-cell office:value-type="float" office:value="40.2000007629395">
                <text:p>40.2000007629395</text:p>
              </table:table-cell>
              <table:table-cell office:value-type="float" office:value="-20">
                <text:p>-20</text:p>
              </table:table-cell>
            </table:table-row>
            <table:table-row>
              <table:table-cell office:value-type="string">
                <text:p>370</text:p>
              </table:table-cell>
              <table:table-cell office:value-type="float" office:value="0.000737999981356552">
                <text:p>0.000737999981356552</text:p>
              </table:table-cell>
              <table:table-cell office:value-type="float" office:value="40.2000007629395">
                <text:p>40.2000007629395</text:p>
              </table:table-cell>
              <table:table-cell office:value-type="float" office:value="-20">
                <text:p>-20</text:p>
              </table:table-cell>
            </table:table-row>
            <table:table-row>
              <table:table-cell office:value-type="string">
                <text:p>371</text:p>
              </table:table-cell>
              <table:table-cell office:value-type="float" office:value="0.000739999981306028">
                <text:p>0.000739999981306028</text:p>
              </table:table-cell>
              <table:table-cell office:value-type="float" office:value="40.2000007629395">
                <text:p>40.2000007629395</text:p>
              </table:table-cell>
              <table:table-cell office:value-type="float" office:value="-20">
                <text:p>-20</text:p>
              </table:table-cell>
            </table:table-row>
            <table:table-row>
              <table:table-cell office:value-type="string">
                <text:p>372</text:p>
              </table:table-cell>
              <table:table-cell office:value-type="float" office:value="0.000741999981255503">
                <text:p>0.000741999981255503</text:p>
              </table:table-cell>
              <table:table-cell office:value-type="float" office:value="40.2000007629395">
                <text:p>40.2000007629395</text:p>
              </table:table-cell>
              <table:table-cell office:value-type="float" office:value="-20">
                <text:p>-20</text:p>
              </table:table-cell>
            </table:table-row>
            <table:table-row>
              <table:table-cell office:value-type="string">
                <text:p>373</text:p>
              </table:table-cell>
              <table:table-cell office:value-type="float" office:value="0.000743999981204979">
                <text:p>0.000743999981204979</text:p>
              </table:table-cell>
              <table:table-cell office:value-type="float" office:value="40.2000007629395">
                <text:p>40.2000007629395</text:p>
              </table:table-cell>
              <table:table-cell office:value-type="float" office:value="-20">
                <text:p>-20</text:p>
              </table:table-cell>
            </table:table-row>
            <table:table-row>
              <table:table-cell office:value-type="string">
                <text:p>374</text:p>
              </table:table-cell>
              <table:table-cell office:value-type="float" office:value="0.000745999981154455">
                <text:p>0.000745999981154455</text:p>
              </table:table-cell>
              <table:table-cell office:value-type="float" office:value="40.2000007629395">
                <text:p>40.2000007629395</text:p>
              </table:table-cell>
              <table:table-cell office:value-type="float" office:value="-20">
                <text:p>-20</text:p>
              </table:table-cell>
            </table:table-row>
            <table:table-row>
              <table:table-cell office:value-type="string">
                <text:p>375</text:p>
              </table:table-cell>
              <table:table-cell office:value-type="float" office:value="0.000747999981103931">
                <text:p>0.000747999981103931</text:p>
              </table:table-cell>
              <table:table-cell office:value-type="float" office:value="40.2000007629395">
                <text:p>40.2000007629395</text:p>
              </table:table-cell>
              <table:table-cell office:value-type="float" office:value="-20">
                <text:p>-20</text:p>
              </table:table-cell>
            </table:table-row>
            <table:table-row>
              <table:table-cell office:value-type="string">
                <text:p>376</text:p>
              </table:table-cell>
              <table:table-cell office:value-type="float" office:value="0.000749999981053406">
                <text:p>0.000749999981053406</text:p>
              </table:table-cell>
              <table:table-cell office:value-type="float" office:value="40.2000007629395">
                <text:p>40.2000007629395</text:p>
              </table:table-cell>
              <table:table-cell office:value-type="float" office:value="-20">
                <text:p>-20</text:p>
              </table:table-cell>
            </table:table-row>
            <table:table-row>
              <table:table-cell office:value-type="string">
                <text:p>377</text:p>
              </table:table-cell>
              <table:table-cell office:value-type="float" office:value="0.000751999981002882">
                <text:p>0.000751999981002882</text:p>
              </table:table-cell>
              <table:table-cell office:value-type="float" office:value="40.2000007629395">
                <text:p>40.2000007629395</text:p>
              </table:table-cell>
              <table:table-cell office:value-type="float" office:value="-20">
                <text:p>-20</text:p>
              </table:table-cell>
            </table:table-row>
            <table:table-row>
              <table:table-cell office:value-type="string">
                <text:p>378</text:p>
              </table:table-cell>
              <table:table-cell office:value-type="float" office:value="0.000753999980952358">
                <text:p>0.000753999980952358</text:p>
              </table:table-cell>
              <table:table-cell office:value-type="float" office:value="40.2000007629395">
                <text:p>40.2000007629395</text:p>
              </table:table-cell>
              <table:table-cell office:value-type="float" office:value="-20">
                <text:p>-20</text:p>
              </table:table-cell>
            </table:table-row>
            <table:table-row>
              <table:table-cell office:value-type="string">
                <text:p>379</text:p>
              </table:table-cell>
              <table:table-cell office:value-type="float" office:value="0.000755999980901834">
                <text:p>0.000755999980901834</text:p>
              </table:table-cell>
              <table:table-cell office:value-type="float" office:value="40.2000007629395">
                <text:p>40.2000007629395</text:p>
              </table:table-cell>
              <table:table-cell office:value-type="float" office:value="-20">
                <text:p>-20</text:p>
              </table:table-cell>
            </table:table-row>
            <table:table-row>
              <table:table-cell office:value-type="string">
                <text:p>380</text:p>
              </table:table-cell>
              <table:table-cell office:value-type="float" office:value="0.000757999980851309">
                <text:p>0.000757999980851309</text:p>
              </table:table-cell>
              <table:table-cell office:value-type="float" office:value="40.2000007629395">
                <text:p>40.2000007629395</text:p>
              </table:table-cell>
              <table:table-cell office:value-type="float" office:value="-20">
                <text:p>-20</text:p>
              </table:table-cell>
            </table:table-row>
            <table:table-row>
              <table:table-cell office:value-type="string">
                <text:p>381</text:p>
              </table:table-cell>
              <table:table-cell office:value-type="float" office:value="0.000759999980800785">
                <text:p>0.000759999980800785</text:p>
              </table:table-cell>
              <table:table-cell office:value-type="float" office:value="40.2000007629395">
                <text:p>40.2000007629395</text:p>
              </table:table-cell>
              <table:table-cell office:value-type="float" office:value="-20">
                <text:p>-20</text:p>
              </table:table-cell>
            </table:table-row>
            <table:table-row>
              <table:table-cell office:value-type="string">
                <text:p>382</text:p>
              </table:table-cell>
              <table:table-cell office:value-type="float" office:value="0.000761999980750261">
                <text:p>0.000761999980750261</text:p>
              </table:table-cell>
              <table:table-cell office:value-type="float" office:value="40.2000007629395">
                <text:p>40.2000007629395</text:p>
              </table:table-cell>
              <table:table-cell office:value-type="float" office:value="-20">
                <text:p>-20</text:p>
              </table:table-cell>
            </table:table-row>
            <table:table-row>
              <table:table-cell office:value-type="string">
                <text:p>383</text:p>
              </table:table-cell>
              <table:table-cell office:value-type="float" office:value="0.000763999980699737">
                <text:p>0.000763999980699737</text:p>
              </table:table-cell>
              <table:table-cell office:value-type="float" office:value="40.2000007629395">
                <text:p>40.2000007629395</text:p>
              </table:table-cell>
              <table:table-cell office:value-type="float" office:value="-20">
                <text:p>-20</text:p>
              </table:table-cell>
            </table:table-row>
            <table:table-row>
              <table:table-cell office:value-type="string">
                <text:p>384</text:p>
              </table:table-cell>
              <table:table-cell office:value-type="float" office:value="0.000765999980649212">
                <text:p>0.000765999980649212</text:p>
              </table:table-cell>
              <table:table-cell office:value-type="float" office:value="40.2000007629395">
                <text:p>40.2000007629395</text:p>
              </table:table-cell>
              <table:table-cell office:value-type="float" office:value="-20">
                <text:p>-20</text:p>
              </table:table-cell>
            </table:table-row>
            <table:table-row>
              <table:table-cell office:value-type="string">
                <text:p>385</text:p>
              </table:table-cell>
              <table:table-cell office:value-type="float" office:value="0.000767999980598688">
                <text:p>0.000767999980598688</text:p>
              </table:table-cell>
              <table:table-cell office:value-type="float" office:value="40.2000007629395">
                <text:p>40.2000007629395</text:p>
              </table:table-cell>
              <table:table-cell office:value-type="float" office:value="-20">
                <text:p>-20</text:p>
              </table:table-cell>
            </table:table-row>
            <table:table-row>
              <table:table-cell office:value-type="string">
                <text:p>386</text:p>
              </table:table-cell>
              <table:table-cell office:value-type="float" office:value="0.000769999980548164">
                <text:p>0.000769999980548164</text:p>
              </table:table-cell>
              <table:table-cell office:value-type="float" office:value="40.2000007629395">
                <text:p>40.2000007629395</text:p>
              </table:table-cell>
              <table:table-cell office:value-type="float" office:value="-20">
                <text:p>-20</text:p>
              </table:table-cell>
            </table:table-row>
            <table:table-row>
              <table:table-cell office:value-type="string">
                <text:p>387</text:p>
              </table:table-cell>
              <table:table-cell office:value-type="float" office:value="0.00077199998049764">
                <text:p>0.00077199998049764</text:p>
              </table:table-cell>
              <table:table-cell office:value-type="float" office:value="40.2000007629395">
                <text:p>40.2000007629395</text:p>
              </table:table-cell>
              <table:table-cell office:value-type="float" office:value="-20">
                <text:p>-20</text:p>
              </table:table-cell>
            </table:table-row>
            <table:table-row>
              <table:table-cell office:value-type="string">
                <text:p>388</text:p>
              </table:table-cell>
              <table:table-cell office:value-type="float" office:value="0.000773999980447115">
                <text:p>0.000773999980447115</text:p>
              </table:table-cell>
              <table:table-cell office:value-type="float" office:value="40.2000007629395">
                <text:p>40.2000007629395</text:p>
              </table:table-cell>
              <table:table-cell office:value-type="float" office:value="-20">
                <text:p>-20</text:p>
              </table:table-cell>
            </table:table-row>
            <table:table-row>
              <table:table-cell office:value-type="string">
                <text:p>389</text:p>
              </table:table-cell>
              <table:table-cell office:value-type="float" office:value="0.000775999980396591">
                <text:p>0.000775999980396591</text:p>
              </table:table-cell>
              <table:table-cell office:value-type="float" office:value="39.7999992370606">
                <text:p>39.7999992370606</text:p>
              </table:table-cell>
              <table:table-cell office:value-type="float" office:value="-20">
                <text:p>-20</text:p>
              </table:table-cell>
            </table:table-row>
            <table:table-row>
              <table:table-cell office:value-type="string">
                <text:p>390</text:p>
              </table:table-cell>
              <table:table-cell office:value-type="float" office:value="0.000777999980346067">
                <text:p>0.000777999980346067</text:p>
              </table:table-cell>
              <table:table-cell office:value-type="float" office:value="39.2000007629395">
                <text:p>39.2000007629395</text:p>
              </table:table-cell>
              <table:table-cell office:value-type="float" office:value="-20">
                <text:p>-20</text:p>
              </table:table-cell>
            </table:table-row>
            <table:table-row>
              <table:table-cell office:value-type="string">
                <text:p>391</text:p>
              </table:table-cell>
              <table:table-cell office:value-type="float" office:value="0.000779999980295543">
                <text:p>0.000779999980295543</text:p>
              </table:table-cell>
              <table:table-cell office:value-type="float" office:value="39.2000007629395">
                <text:p>39.2000007629395</text:p>
              </table:table-cell>
              <table:table-cell office:value-type="float" office:value="-20">
                <text:p>-20</text:p>
              </table:table-cell>
            </table:table-row>
            <table:table-row>
              <table:table-cell office:value-type="string">
                <text:p>392</text:p>
              </table:table-cell>
              <table:table-cell office:value-type="float" office:value="0.000781999980245018">
                <text:p>0.000781999980245018</text:p>
              </table:table-cell>
              <table:table-cell office:value-type="float" office:value="38.5999984741211">
                <text:p>38.5999984741211</text:p>
              </table:table-cell>
              <table:table-cell office:value-type="float" office:value="-20">
                <text:p>-20</text:p>
              </table:table-cell>
            </table:table-row>
            <table:table-row>
              <table:table-cell office:value-type="string">
                <text:p>393</text:p>
              </table:table-cell>
              <table:table-cell office:value-type="float" office:value="0.000783999980194494">
                <text:p>0.000783999980194494</text:p>
              </table:table-cell>
              <table:table-cell office:value-type="float" office:value="38.4000015258789">
                <text:p>38.4000015258789</text:p>
              </table:table-cell>
              <table:table-cell office:value-type="float" office:value="-20">
                <text:p>-20</text:p>
              </table:table-cell>
            </table:table-row>
            <table:table-row>
              <table:table-cell office:value-type="string">
                <text:p>394</text:p>
              </table:table-cell>
              <table:table-cell office:value-type="float" office:value="0.00078599998014397">
                <text:p>0.00078599998014397</text:p>
              </table:table-cell>
              <table:table-cell office:value-type="float" office:value="38">
                <text:p>38</text:p>
              </table:table-cell>
              <table:table-cell office:value-type="float" office:value="-20">
                <text:p>-20</text:p>
              </table:table-cell>
            </table:table-row>
            <table:table-row>
              <table:table-cell office:value-type="string">
                <text:p>395</text:p>
              </table:table-cell>
              <table:table-cell office:value-type="float" office:value="0.000787999980093446">
                <text:p>0.000787999980093446</text:p>
              </table:table-cell>
              <table:table-cell office:value-type="float" office:value="37.5999984741211">
                <text:p>37.5999984741211</text:p>
              </table:table-cell>
              <table:table-cell office:value-type="float" office:value="-20">
                <text:p>-20</text:p>
              </table:table-cell>
            </table:table-row>
            <table:table-row>
              <table:table-cell office:value-type="string">
                <text:p>396</text:p>
              </table:table-cell>
              <table:table-cell office:value-type="float" office:value="0.000789999980042921">
                <text:p>0.000789999980042921</text:p>
              </table:table-cell>
              <table:table-cell office:value-type="float" office:value="37.2000007629395">
                <text:p>37.2000007629395</text:p>
              </table:table-cell>
              <table:table-cell office:value-type="float" office:value="-20">
                <text:p>-20</text:p>
              </table:table-cell>
            </table:table-row>
            <table:table-row>
              <table:table-cell office:value-type="string">
                <text:p>397</text:p>
              </table:table-cell>
              <table:table-cell office:value-type="float" office:value="0.000791999979992397">
                <text:p>0.000791999979992397</text:p>
              </table:table-cell>
              <table:table-cell office:value-type="float" office:value="36.7999992370606">
                <text:p>36.7999992370606</text:p>
              </table:table-cell>
              <table:table-cell office:value-type="float" office:value="-20">
                <text:p>-20</text:p>
              </table:table-cell>
            </table:table-row>
            <table:table-row>
              <table:table-cell office:value-type="string">
                <text:p>398</text:p>
              </table:table-cell>
              <table:table-cell office:value-type="float" office:value="0.000793999979941873">
                <text:p>0.000793999979941873</text:p>
              </table:table-cell>
              <table:table-cell office:value-type="float" office:value="36.5999984741211">
                <text:p>36.5999984741211</text:p>
              </table:table-cell>
              <table:table-cell office:value-type="float" office:value="-20">
                <text:p>-20</text:p>
              </table:table-cell>
            </table:table-row>
            <table:table-row>
              <table:table-cell office:value-type="string">
                <text:p>399</text:p>
              </table:table-cell>
              <table:table-cell office:value-type="float" office:value="0.000795999979891349">
                <text:p>0.000795999979891349</text:p>
              </table:table-cell>
              <table:table-cell office:value-type="float" office:value="36.4000015258789">
                <text:p>36.4000015258789</text:p>
              </table:table-cell>
              <table:table-cell office:value-type="float" office:value="-20">
                <text:p>-20</text:p>
              </table:table-cell>
            </table:table-row>
            <table:table-row>
              <table:table-cell office:value-type="string">
                <text:p>400</text:p>
              </table:table-cell>
              <table:table-cell office:value-type="float" office:value="0.000797999979840824">
                <text:p>0.000797999979840824</text:p>
              </table:table-cell>
              <table:table-cell office:value-type="float" office:value="35.4000015258789">
                <text:p>35.4000015258789</text:p>
              </table:table-cell>
              <table:table-cell office:value-type="float" office:value="-20">
                <text:p>-20</text:p>
              </table:table-cell>
            </table:table-row>
            <table:table-row>
              <table:table-cell office:value-type="string">
                <text:p>401</text:p>
              </table:table-cell>
              <table:table-cell office:value-type="float" office:value="0.0007999999797903">
                <text:p>0.0007999999797903</text:p>
              </table:table-cell>
              <table:table-cell office:value-type="float" office:value="35.2000007629395">
                <text:p>35.2000007629395</text:p>
              </table:table-cell>
              <table:table-cell office:value-type="float" office:value="-20">
                <text:p>-20</text:p>
              </table:table-cell>
            </table:table-row>
            <table:table-row>
              <table:table-cell office:value-type="string">
                <text:p>402</text:p>
              </table:table-cell>
              <table:table-cell office:value-type="float" office:value="0.000801999979739776">
                <text:p>0.000801999979739776</text:p>
              </table:table-cell>
              <table:table-cell office:value-type="float" office:value="35">
                <text:p>35</text:p>
              </table:table-cell>
              <table:table-cell office:value-type="float" office:value="-20">
                <text:p>-20</text:p>
              </table:table-cell>
            </table:table-row>
            <table:table-row>
              <table:table-cell office:value-type="string">
                <text:p>403</text:p>
              </table:table-cell>
              <table:table-cell office:value-type="float" office:value="0.000803999979689252">
                <text:p>0.000803999979689252</text:p>
              </table:table-cell>
              <table:table-cell office:value-type="float" office:value="34.5999984741211">
                <text:p>34.5999984741211</text:p>
              </table:table-cell>
              <table:table-cell office:value-type="float" office:value="-20">
                <text:p>-20</text:p>
              </table:table-cell>
            </table:table-row>
            <table:table-row>
              <table:table-cell office:value-type="string">
                <text:p>404</text:p>
              </table:table-cell>
              <table:table-cell office:value-type="float" office:value="0.000805999979638727">
                <text:p>0.000805999979638727</text:p>
              </table:table-cell>
              <table:table-cell office:value-type="float" office:value="34.4000015258789">
                <text:p>34.4000015258789</text:p>
              </table:table-cell>
              <table:table-cell office:value-type="float" office:value="-20">
                <text:p>-20</text:p>
              </table:table-cell>
            </table:table-row>
            <table:table-row>
              <table:table-cell office:value-type="string">
                <text:p>405</text:p>
              </table:table-cell>
              <table:table-cell office:value-type="float" office:value="0.000807999979588203">
                <text:p>0.000807999979588203</text:p>
              </table:table-cell>
              <table:table-cell office:value-type="float" office:value="34.2000007629395">
                <text:p>34.2000007629395</text:p>
              </table:table-cell>
              <table:table-cell office:value-type="float" office:value="-20">
                <text:p>-20</text:p>
              </table:table-cell>
            </table:table-row>
            <table:table-row>
              <table:table-cell office:value-type="string">
                <text:p>406</text:p>
              </table:table-cell>
              <table:table-cell office:value-type="float" office:value="0.000809999979537679">
                <text:p>0.000809999979537679</text:p>
              </table:table-cell>
              <table:table-cell office:value-type="float" office:value="33.4000015258789">
                <text:p>33.4000015258789</text:p>
              </table:table-cell>
              <table:table-cell office:value-type="float" office:value="-20">
                <text:p>-20</text:p>
              </table:table-cell>
            </table:table-row>
            <table:table-row>
              <table:table-cell office:value-type="string">
                <text:p>407</text:p>
              </table:table-cell>
              <table:table-cell office:value-type="float" office:value="0.000811999979487155">
                <text:p>0.000811999979487155</text:p>
              </table:table-cell>
              <table:table-cell office:value-type="float" office:value="33.4000015258789">
                <text:p>33.4000015258789</text:p>
              </table:table-cell>
              <table:table-cell office:value-type="float" office:value="-20">
                <text:p>-20</text:p>
              </table:table-cell>
            </table:table-row>
            <table:table-row>
              <table:table-cell office:value-type="string">
                <text:p>408</text:p>
              </table:table-cell>
              <table:table-cell office:value-type="float" office:value="0.00081399997943663">
                <text:p>0.00081399997943663</text:p>
              </table:table-cell>
              <table:table-cell office:value-type="float" office:value="32.5999984741211">
                <text:p>32.5999984741211</text:p>
              </table:table-cell>
              <table:table-cell office:value-type="float" office:value="-20">
                <text:p>-20</text:p>
              </table:table-cell>
            </table:table-row>
            <table:table-row>
              <table:table-cell office:value-type="string">
                <text:p>409</text:p>
              </table:table-cell>
              <table:table-cell office:value-type="float" office:value="0.000815999979386106">
                <text:p>0.000815999979386106</text:p>
              </table:table-cell>
              <table:table-cell office:value-type="float" office:value="32.4000015258789">
                <text:p>32.4000015258789</text:p>
              </table:table-cell>
              <table:table-cell office:value-type="float" office:value="-20">
                <text:p>-20</text:p>
              </table:table-cell>
            </table:table-row>
            <table:table-row>
              <table:table-cell office:value-type="string">
                <text:p>410</text:p>
              </table:table-cell>
              <table:table-cell office:value-type="float" office:value="0.000817999979335582">
                <text:p>0.000817999979335582</text:p>
              </table:table-cell>
              <table:table-cell office:value-type="float" office:value="32.2000007629395">
                <text:p>32.2000007629395</text:p>
              </table:table-cell>
              <table:table-cell office:value-type="float" office:value="-20">
                <text:p>-20</text:p>
              </table:table-cell>
            </table:table-row>
            <table:table-row>
              <table:table-cell office:value-type="string">
                <text:p>411</text:p>
              </table:table-cell>
              <table:table-cell office:value-type="float" office:value="0.000819999979285058">
                <text:p>0.000819999979285058</text:p>
              </table:table-cell>
              <table:table-cell office:value-type="float" office:value="32">
                <text:p>32</text:p>
              </table:table-cell>
              <table:table-cell office:value-type="float" office:value="-20">
                <text:p>-20</text:p>
              </table:table-cell>
            </table:table-row>
            <table:table-row>
              <table:table-cell office:value-type="string">
                <text:p>412</text:p>
              </table:table-cell>
              <table:table-cell office:value-type="float" office:value="0.000821999979234533">
                <text:p>0.000821999979234533</text:p>
              </table:table-cell>
              <table:table-cell office:value-type="float" office:value="31.3999996185303">
                <text:p>31.3999996185303</text:p>
              </table:table-cell>
              <table:table-cell office:value-type="float" office:value="-20">
                <text:p>-20</text:p>
              </table:table-cell>
            </table:table-row>
            <table:table-row>
              <table:table-cell office:value-type="string">
                <text:p>413</text:p>
              </table:table-cell>
              <table:table-cell office:value-type="float" office:value="0.000823999979184009">
                <text:p>0.000823999979184009</text:p>
              </table:table-cell>
              <table:table-cell office:value-type="float" office:value="31">
                <text:p>31</text:p>
              </table:table-cell>
              <table:table-cell office:value-type="float" office:value="-20">
                <text:p>-20</text:p>
              </table:table-cell>
            </table:table-row>
            <table:table-row>
              <table:table-cell office:value-type="string">
                <text:p>414</text:p>
              </table:table-cell>
              <table:table-cell office:value-type="float" office:value="0.000825999979133485">
                <text:p>0.000825999979133485</text:p>
              </table:table-cell>
              <table:table-cell office:value-type="float" office:value="30.3999996185303">
                <text:p>30.3999996185303</text:p>
              </table:table-cell>
              <table:table-cell office:value-type="float" office:value="-20">
                <text:p>-20</text:p>
              </table:table-cell>
            </table:table-row>
            <table:table-row>
              <table:table-cell office:value-type="string">
                <text:p>415</text:p>
              </table:table-cell>
              <table:table-cell office:value-type="float" office:value="0.000827999979082961">
                <text:p>0.000827999979082961</text:p>
              </table:table-cell>
              <table:table-cell office:value-type="float" office:value="30.2000007629395">
                <text:p>30.2000007629395</text:p>
              </table:table-cell>
              <table:table-cell office:value-type="float" office:value="-20">
                <text:p>-20</text:p>
              </table:table-cell>
            </table:table-row>
            <table:table-row>
              <table:table-cell office:value-type="string">
                <text:p>416</text:p>
              </table:table-cell>
              <table:table-cell office:value-type="float" office:value="0.000829999979032436">
                <text:p>0.000829999979032436</text:p>
              </table:table-cell>
              <table:table-cell office:value-type="float" office:value="29.7999992370605">
                <text:p>29.7999992370605</text:p>
              </table:table-cell>
              <table:table-cell office:value-type="float" office:value="-20">
                <text:p>-20</text:p>
              </table:table-cell>
            </table:table-row>
            <table:table-row>
              <table:table-cell office:value-type="string">
                <text:p>417</text:p>
              </table:table-cell>
              <table:table-cell office:value-type="float" office:value="0.000831999978981912">
                <text:p>0.000831999978981912</text:p>
              </table:table-cell>
              <table:table-cell office:value-type="float" office:value="29.3999996185303">
                <text:p>29.3999996185303</text:p>
              </table:table-cell>
              <table:table-cell office:value-type="float" office:value="-20">
                <text:p>-20</text:p>
              </table:table-cell>
            </table:table-row>
            <table:table-row>
              <table:table-cell office:value-type="string">
                <text:p>418</text:p>
              </table:table-cell>
              <table:table-cell office:value-type="float" office:value="0.000833999978931388">
                <text:p>0.000833999978931388</text:p>
              </table:table-cell>
              <table:table-cell office:value-type="float" office:value="29.2000007629395">
                <text:p>29.2000007629395</text:p>
              </table:table-cell>
              <table:table-cell office:value-type="float" office:value="-20">
                <text:p>-20</text:p>
              </table:table-cell>
            </table:table-row>
            <table:table-row>
              <table:table-cell office:value-type="string">
                <text:p>419</text:p>
              </table:table-cell>
              <table:table-cell office:value-type="float" office:value="0.000835999978880864">
                <text:p>0.000835999978880864</text:p>
              </table:table-cell>
              <table:table-cell office:value-type="float" office:value="29">
                <text:p>29</text:p>
              </table:table-cell>
              <table:table-cell office:value-type="float" office:value="-20">
                <text:p>-20</text:p>
              </table:table-cell>
            </table:table-row>
            <table:table-row>
              <table:table-cell office:value-type="string">
                <text:p>420</text:p>
              </table:table-cell>
              <table:table-cell office:value-type="float" office:value="0.000837999978830339">
                <text:p>0.000837999978830339</text:p>
              </table:table-cell>
              <table:table-cell office:value-type="float" office:value="28.3999996185303">
                <text:p>28.3999996185303</text:p>
              </table:table-cell>
              <table:table-cell office:value-type="float" office:value="-20">
                <text:p>-20</text:p>
              </table:table-cell>
            </table:table-row>
            <table:table-row>
              <table:table-cell office:value-type="string">
                <text:p>421</text:p>
              </table:table-cell>
              <table:table-cell office:value-type="float" office:value="0.000839999978779815">
                <text:p>0.000839999978779815</text:p>
              </table:table-cell>
              <table:table-cell office:value-type="float" office:value="28.2000007629395">
                <text:p>28.2000007629395</text:p>
              </table:table-cell>
              <table:table-cell office:value-type="float" office:value="-20">
                <text:p>-20</text:p>
              </table:table-cell>
            </table:table-row>
            <table:table-row>
              <table:table-cell office:value-type="string">
                <text:p>422</text:p>
              </table:table-cell>
              <table:table-cell office:value-type="float" office:value="0.000841999978729291">
                <text:p>0.000841999978729291</text:p>
              </table:table-cell>
              <table:table-cell office:value-type="float" office:value="27.7999992370605">
                <text:p>27.7999992370605</text:p>
              </table:table-cell>
              <table:table-cell office:value-type="float" office:value="-20">
                <text:p>-20</text:p>
              </table:table-cell>
            </table:table-row>
            <table:table-row>
              <table:table-cell office:value-type="string">
                <text:p>423</text:p>
              </table:table-cell>
              <table:table-cell office:value-type="float" office:value="0.000843999978678767">
                <text:p>0.000843999978678767</text:p>
              </table:table-cell>
              <table:table-cell office:value-type="float" office:value="27.2000007629395">
                <text:p>27.2000007629395</text:p>
              </table:table-cell>
              <table:table-cell office:value-type="float" office:value="-20">
                <text:p>-20</text:p>
              </table:table-cell>
            </table:table-row>
            <table:table-row>
              <table:table-cell office:value-type="string">
                <text:p>424</text:p>
              </table:table-cell>
              <table:table-cell office:value-type="float" office:value="0.000845999978628242">
                <text:p>0.000845999978628242</text:p>
              </table:table-cell>
              <table:table-cell office:value-type="float" office:value="26.7999992370605">
                <text:p>26.7999992370605</text:p>
              </table:table-cell>
              <table:table-cell office:value-type="float" office:value="-20">
                <text:p>-20</text:p>
              </table:table-cell>
            </table:table-row>
            <table:table-row>
              <table:table-cell office:value-type="string">
                <text:p>425</text:p>
              </table:table-cell>
              <table:table-cell office:value-type="float" office:value="0.000847999978577718">
                <text:p>0.000847999978577718</text:p>
              </table:table-cell>
              <table:table-cell office:value-type="float" office:value="26.6000003814697">
                <text:p>26.6000003814697</text:p>
              </table:table-cell>
              <table:table-cell office:value-type="float" office:value="-20">
                <text:p>-20</text:p>
              </table:table-cell>
            </table:table-row>
            <table:table-row>
              <table:table-cell office:value-type="string">
                <text:p>426</text:p>
              </table:table-cell>
              <table:table-cell office:value-type="float" office:value="0.000849999978527194">
                <text:p>0.000849999978527194</text:p>
              </table:table-cell>
              <table:table-cell office:value-type="float" office:value="26">
                <text:p>26</text:p>
              </table:table-cell>
              <table:table-cell office:value-type="float" office:value="-20">
                <text:p>-20</text:p>
              </table:table-cell>
            </table:table-row>
            <table:table-row>
              <table:table-cell office:value-type="string">
                <text:p>427</text:p>
              </table:table-cell>
              <table:table-cell office:value-type="float" office:value="0.00085199997847667">
                <text:p>0.00085199997847667</text:p>
              </table:table-cell>
              <table:table-cell office:value-type="float" office:value="26">
                <text:p>26</text:p>
              </table:table-cell>
              <table:table-cell office:value-type="float" office:value="-20">
                <text:p>-20</text:p>
              </table:table-cell>
            </table:table-row>
            <table:table-row>
              <table:table-cell office:value-type="string">
                <text:p>428</text:p>
              </table:table-cell>
              <table:table-cell office:value-type="float" office:value="0.000853999978426145">
                <text:p>0.000853999978426145</text:p>
              </table:table-cell>
              <table:table-cell office:value-type="float" office:value="25.6000003814697">
                <text:p>25.6000003814697</text:p>
              </table:table-cell>
              <table:table-cell office:value-type="float" office:value="-20">
                <text:p>-20</text:p>
              </table:table-cell>
            </table:table-row>
            <table:table-row>
              <table:table-cell office:value-type="string">
                <text:p>429</text:p>
              </table:table-cell>
              <table:table-cell office:value-type="float" office:value="0.000855999978375621">
                <text:p>0.000855999978375621</text:p>
              </table:table-cell>
              <table:table-cell office:value-type="float" office:value="25.2000007629395">
                <text:p>25.2000007629395</text:p>
              </table:table-cell>
              <table:table-cell office:value-type="float" office:value="-20">
                <text:p>-20</text:p>
              </table:table-cell>
            </table:table-row>
            <table:table-row>
              <table:table-cell office:value-type="string">
                <text:p>430</text:p>
              </table:table-cell>
              <table:table-cell office:value-type="float" office:value="0.000857999978325097">
                <text:p>0.000857999978325097</text:p>
              </table:table-cell>
              <table:table-cell office:value-type="float" office:value="24.7999992370605">
                <text:p>24.7999992370605</text:p>
              </table:table-cell>
              <table:table-cell office:value-type="float" office:value="-20">
                <text:p>-20</text:p>
              </table:table-cell>
            </table:table-row>
            <table:table-row>
              <table:table-cell office:value-type="string">
                <text:p>431</text:p>
              </table:table-cell>
              <table:table-cell office:value-type="float" office:value="0.000859999978274573">
                <text:p>0.000859999978274573</text:p>
              </table:table-cell>
              <table:table-cell office:value-type="float" office:value="24.3999996185303">
                <text:p>24.3999996185303</text:p>
              </table:table-cell>
              <table:table-cell office:value-type="float" office:value="-20">
                <text:p>-20</text:p>
              </table:table-cell>
            </table:table-row>
            <table:table-row>
              <table:table-cell office:value-type="string">
                <text:p>432</text:p>
              </table:table-cell>
              <table:table-cell office:value-type="float" office:value="0.000861999978224048">
                <text:p>0.000861999978224048</text:p>
              </table:table-cell>
              <table:table-cell office:value-type="float" office:value="23.7999992370605">
                <text:p>23.7999992370605</text:p>
              </table:table-cell>
              <table:table-cell office:value-type="float" office:value="-20">
                <text:p>-20</text:p>
              </table:table-cell>
            </table:table-row>
            <table:table-row>
              <table:table-cell office:value-type="string">
                <text:p>433</text:p>
              </table:table-cell>
              <table:table-cell office:value-type="float" office:value="0.000863999978173524">
                <text:p>0.000863999978173524</text:p>
              </table:table-cell>
              <table:table-cell office:value-type="float" office:value="23.3999996185303">
                <text:p>23.3999996185303</text:p>
              </table:table-cell>
              <table:table-cell office:value-type="float" office:value="-20">
                <text:p>-20</text:p>
              </table:table-cell>
            </table:table-row>
            <table:table-row>
              <table:table-cell office:value-type="string">
                <text:p>434</text:p>
              </table:table-cell>
              <table:table-cell office:value-type="float" office:value="0.000865999978123">
                <text:p>0.000865999978123</text:p>
              </table:table-cell>
              <table:table-cell office:value-type="float" office:value="23.2000007629395">
                <text:p>23.2000007629395</text:p>
              </table:table-cell>
              <table:table-cell office:value-type="float" office:value="-20">
                <text:p>-20</text:p>
              </table:table-cell>
            </table:table-row>
            <table:table-row>
              <table:table-cell office:value-type="string">
                <text:p>435</text:p>
              </table:table-cell>
              <table:table-cell office:value-type="float" office:value="0.000867999978072476">
                <text:p>0.000867999978072476</text:p>
              </table:table-cell>
              <table:table-cell office:value-type="float" office:value="22.7999992370605">
                <text:p>22.7999992370605</text:p>
              </table:table-cell>
              <table:table-cell office:value-type="float" office:value="-20">
                <text:p>-20</text:p>
              </table:table-cell>
            </table:table-row>
            <table:table-row>
              <table:table-cell office:value-type="string">
                <text:p>436</text:p>
              </table:table-cell>
              <table:table-cell office:value-type="float" office:value="0.000869999978021951">
                <text:p>0.000869999978021951</text:p>
              </table:table-cell>
              <table:table-cell office:value-type="float" office:value="22.3999996185303">
                <text:p>22.3999996185303</text:p>
              </table:table-cell>
              <table:table-cell office:value-type="float" office:value="-20">
                <text:p>-20</text:p>
              </table:table-cell>
            </table:table-row>
            <table:table-row>
              <table:table-cell office:value-type="string">
                <text:p>437</text:p>
              </table:table-cell>
              <table:table-cell office:value-type="float" office:value="0.000871999977971427">
                <text:p>0.000871999977971427</text:p>
              </table:table-cell>
              <table:table-cell office:value-type="float" office:value="22">
                <text:p>22</text:p>
              </table:table-cell>
              <table:table-cell office:value-type="float" office:value="-20">
                <text:p>-20</text:p>
              </table:table-cell>
            </table:table-row>
            <table:table-row>
              <table:table-cell office:value-type="string">
                <text:p>438</text:p>
              </table:table-cell>
              <table:table-cell office:value-type="float" office:value="0.000873999977920903">
                <text:p>0.000873999977920903</text:p>
              </table:table-cell>
              <table:table-cell office:value-type="float" office:value="21.7999992370605">
                <text:p>21.7999992370605</text:p>
              </table:table-cell>
              <table:table-cell office:value-type="float" office:value="-20">
                <text:p>-20</text:p>
              </table:table-cell>
            </table:table-row>
            <table:table-row>
              <table:table-cell office:value-type="string">
                <text:p>439</text:p>
              </table:table-cell>
              <table:table-cell office:value-type="float" office:value="0.000875999977870379">
                <text:p>0.000875999977870379</text:p>
              </table:table-cell>
              <table:table-cell office:value-type="float" office:value="21.6000003814697">
                <text:p>21.6000003814697</text:p>
              </table:table-cell>
              <table:table-cell office:value-type="float" office:value="-20">
                <text:p>-20</text:p>
              </table:table-cell>
            </table:table-row>
            <table:table-row>
              <table:table-cell office:value-type="string">
                <text:p>440</text:p>
              </table:table-cell>
              <table:table-cell office:value-type="float" office:value="0.000877999977819854">
                <text:p>0.000877999977819854</text:p>
              </table:table-cell>
              <table:table-cell office:value-type="float" office:value="20.7999992370605">
                <text:p>20.7999992370605</text:p>
              </table:table-cell>
              <table:table-cell office:value-type="float" office:value="-20">
                <text:p>-20</text:p>
              </table:table-cell>
            </table:table-row>
            <table:table-row>
              <table:table-cell office:value-type="string">
                <text:p>441</text:p>
              </table:table-cell>
              <table:table-cell office:value-type="float" office:value="0.00087999997776933">
                <text:p>0.00087999997776933</text:p>
              </table:table-cell>
              <table:table-cell office:value-type="float" office:value="20.6000003814697">
                <text:p>20.6000003814697</text:p>
              </table:table-cell>
              <table:table-cell office:value-type="float" office:value="-20">
                <text:p>-20</text:p>
              </table:table-cell>
            </table:table-row>
            <table:table-row>
              <table:table-cell office:value-type="string">
                <text:p>442</text:p>
              </table:table-cell>
              <table:table-cell office:value-type="float" office:value="0.000881999977718806">
                <text:p>0.000881999977718806</text:p>
              </table:table-cell>
              <table:table-cell office:value-type="float" office:value="20.2000007629395">
                <text:p>20.2000007629395</text:p>
              </table:table-cell>
              <table:table-cell office:value-type="float" office:value="-20">
                <text:p>-20</text:p>
              </table:table-cell>
            </table:table-row>
            <table:table-row>
              <table:table-cell office:value-type="string">
                <text:p>443</text:p>
              </table:table-cell>
              <table:table-cell office:value-type="float" office:value="0.000883999977668282">
                <text:p>0.000883999977668282</text:p>
              </table:table-cell>
              <table:table-cell office:value-type="float" office:value="19.7999992370605">
                <text:p>19.7999992370605</text:p>
              </table:table-cell>
              <table:table-cell office:value-type="float" office:value="-20">
                <text:p>-20</text:p>
              </table:table-cell>
            </table:table-row>
            <table:table-row>
              <table:table-cell office:value-type="string">
                <text:p>444</text:p>
              </table:table-cell>
              <table:table-cell office:value-type="float" office:value="0.000885999977617757">
                <text:p>0.000885999977617757</text:p>
              </table:table-cell>
              <table:table-cell office:value-type="float" office:value="19.3999996185303">
                <text:p>19.3999996185303</text:p>
              </table:table-cell>
              <table:table-cell office:value-type="float" office:value="-20">
                <text:p>-20</text:p>
              </table:table-cell>
            </table:table-row>
            <table:table-row>
              <table:table-cell office:value-type="string">
                <text:p>445</text:p>
              </table:table-cell>
              <table:table-cell office:value-type="float" office:value="0.000887999977567233">
                <text:p>0.000887999977567233</text:p>
              </table:table-cell>
              <table:table-cell office:value-type="float" office:value="19">
                <text:p>19</text:p>
              </table:table-cell>
              <table:table-cell office:value-type="float" office:value="-20">
                <text:p>-20</text:p>
              </table:table-cell>
            </table:table-row>
            <table:table-row>
              <table:table-cell office:value-type="string">
                <text:p>446</text:p>
              </table:table-cell>
              <table:table-cell office:value-type="float" office:value="0.000889999977516709">
                <text:p>0.000889999977516709</text:p>
              </table:table-cell>
              <table:table-cell office:value-type="float" office:value="18.7999992370605">
                <text:p>18.7999992370605</text:p>
              </table:table-cell>
              <table:table-cell office:value-type="float" office:value="-20">
                <text:p>-20</text:p>
              </table:table-cell>
            </table:table-row>
            <table:table-row>
              <table:table-cell office:value-type="string">
                <text:p>447</text:p>
              </table:table-cell>
              <table:table-cell office:value-type="float" office:value="0.000891999977466185">
                <text:p>0.000891999977466185</text:p>
              </table:table-cell>
              <table:table-cell office:value-type="float" office:value="18.3999996185303">
                <text:p>18.3999996185303</text:p>
              </table:table-cell>
              <table:table-cell office:value-type="float" office:value="-20">
                <text:p>-20</text:p>
              </table:table-cell>
            </table:table-row>
            <table:table-row>
              <table:table-cell office:value-type="string">
                <text:p>448</text:p>
              </table:table-cell>
              <table:table-cell office:value-type="float" office:value="0.00089399997741566">
                <text:p>0.00089399997741566</text:p>
              </table:table-cell>
              <table:table-cell office:value-type="float" office:value="18">
                <text:p>18</text:p>
              </table:table-cell>
              <table:table-cell office:value-type="float" office:value="-20">
                <text:p>-20</text:p>
              </table:table-cell>
            </table:table-row>
            <table:table-row>
              <table:table-cell office:value-type="string">
                <text:p>449</text:p>
              </table:table-cell>
              <table:table-cell office:value-type="float" office:value="0.000895999977365136">
                <text:p>0.000895999977365136</text:p>
              </table:table-cell>
              <table:table-cell office:value-type="float" office:value="17.7999992370605">
                <text:p>17.7999992370605</text:p>
              </table:table-cell>
              <table:table-cell office:value-type="float" office:value="-20">
                <text:p>-20</text:p>
              </table:table-cell>
            </table:table-row>
            <table:table-row>
              <table:table-cell office:value-type="string">
                <text:p>450</text:p>
              </table:table-cell>
              <table:table-cell office:value-type="float" office:value="0.000897999977314612">
                <text:p>0.000897999977314612</text:p>
              </table:table-cell>
              <table:table-cell office:value-type="float" office:value="17.2000007629395">
                <text:p>17.2000007629395</text:p>
              </table:table-cell>
              <table:table-cell office:value-type="float" office:value="-20">
                <text:p>-20</text:p>
              </table:table-cell>
            </table:table-row>
            <table:table-row>
              <table:table-cell office:value-type="string">
                <text:p>451</text:p>
              </table:table-cell>
              <table:table-cell office:value-type="float" office:value="0.000899999977264088">
                <text:p>0.000899999977264088</text:p>
              </table:table-cell>
              <table:table-cell office:value-type="float" office:value="16.7999992370605">
                <text:p>16.7999992370605</text:p>
              </table:table-cell>
              <table:table-cell office:value-type="float" office:value="-20">
                <text:p>-20</text:p>
              </table:table-cell>
            </table:table-row>
            <table:table-row>
              <table:table-cell office:value-type="string">
                <text:p>452</text:p>
              </table:table-cell>
              <table:table-cell office:value-type="float" office:value="0.000901999977213563">
                <text:p>0.000901999977213563</text:p>
              </table:table-cell>
              <table:table-cell office:value-type="float" office:value="16.3999996185303">
                <text:p>16.3999996185303</text:p>
              </table:table-cell>
              <table:table-cell office:value-type="float" office:value="-20">
                <text:p>-20</text:p>
              </table:table-cell>
            </table:table-row>
            <table:table-row>
              <table:table-cell office:value-type="string">
                <text:p>453</text:p>
              </table:table-cell>
              <table:table-cell office:value-type="float" office:value="0.000903999977163039">
                <text:p>0.000903999977163039</text:p>
              </table:table-cell>
              <table:table-cell office:value-type="float" office:value="16.2000007629395">
                <text:p>16.2000007629395</text:p>
              </table:table-cell>
              <table:table-cell office:value-type="float" office:value="-20">
                <text:p>-20</text:p>
              </table:table-cell>
            </table:table-row>
            <table:table-row>
              <table:table-cell office:value-type="string">
                <text:p>454</text:p>
              </table:table-cell>
              <table:table-cell office:value-type="float" office:value="0.000905999977112515">
                <text:p>0.000905999977112515</text:p>
              </table:table-cell>
              <table:table-cell office:value-type="float" office:value="16">
                <text:p>16</text:p>
              </table:table-cell>
              <table:table-cell office:value-type="float" office:value="-20">
                <text:p>-20</text:p>
              </table:table-cell>
            </table:table-row>
            <table:table-row>
              <table:table-cell office:value-type="string">
                <text:p>455</text:p>
              </table:table-cell>
              <table:table-cell office:value-type="float" office:value="0.000907999977061991">
                <text:p>0.000907999977061991</text:p>
              </table:table-cell>
              <table:table-cell office:value-type="float" office:value="15.8000001907349">
                <text:p>15.8000001907349</text:p>
              </table:table-cell>
              <table:table-cell office:value-type="float" office:value="-20">
                <text:p>-20</text:p>
              </table:table-cell>
            </table:table-row>
            <table:table-row>
              <table:table-cell office:value-type="string">
                <text:p>456</text:p>
              </table:table-cell>
              <table:table-cell office:value-type="float" office:value="0.000909999977011466">
                <text:p>0.000909999977011466</text:p>
              </table:table-cell>
              <table:table-cell office:value-type="float" office:value="15">
                <text:p>15</text:p>
              </table:table-cell>
              <table:table-cell office:value-type="float" office:value="-20">
                <text:p>-20</text:p>
              </table:table-cell>
            </table:table-row>
            <table:table-row>
              <table:table-cell office:value-type="string">
                <text:p>457</text:p>
              </table:table-cell>
              <table:table-cell office:value-type="float" office:value="0.000911999976960942">
                <text:p>0.000911999976960942</text:p>
              </table:table-cell>
              <table:table-cell office:value-type="float" office:value="14.8000001907349">
                <text:p>14.8000001907349</text:p>
              </table:table-cell>
              <table:table-cell office:value-type="float" office:value="-20">
                <text:p>-20</text:p>
              </table:table-cell>
            </table:table-row>
            <table:table-row>
              <table:table-cell office:value-type="string">
                <text:p>458</text:p>
              </table:table-cell>
              <table:table-cell office:value-type="float" office:value="0.000913999976910418">
                <text:p>0.000913999976910418</text:p>
              </table:table-cell>
              <table:table-cell office:value-type="float" office:value="14.3999996185303">
                <text:p>14.3999996185303</text:p>
              </table:table-cell>
              <table:table-cell office:value-type="float" office:value="-20">
                <text:p>-20</text:p>
              </table:table-cell>
            </table:table-row>
            <table:table-row>
              <table:table-cell office:value-type="string">
                <text:p>459</text:p>
              </table:table-cell>
              <table:table-cell office:value-type="float" office:value="0.000915999976859894">
                <text:p>0.000915999976859894</text:p>
              </table:table-cell>
              <table:table-cell office:value-type="float" office:value="13.8000001907349">
                <text:p>13.8000001907349</text:p>
              </table:table-cell>
              <table:table-cell office:value-type="float" office:value="-20">
                <text:p>-20</text:p>
              </table:table-cell>
            </table:table-row>
            <table:table-row>
              <table:table-cell office:value-type="string">
                <text:p>460</text:p>
              </table:table-cell>
              <table:table-cell office:value-type="float" office:value="0.000917999976809369">
                <text:p>0.000917999976809369</text:p>
              </table:table-cell>
              <table:table-cell office:value-type="float" office:value="13.8000001907349">
                <text:p>13.8000001907349</text:p>
              </table:table-cell>
              <table:table-cell office:value-type="float" office:value="-20">
                <text:p>-20</text:p>
              </table:table-cell>
            </table:table-row>
            <table:table-row>
              <table:table-cell office:value-type="string">
                <text:p>461</text:p>
              </table:table-cell>
              <table:table-cell office:value-type="float" office:value="0.000919999976758845">
                <text:p>0.000919999976758845</text:p>
              </table:table-cell>
              <table:table-cell office:value-type="float" office:value="13.1999998092651">
                <text:p>13.1999998092651</text:p>
              </table:table-cell>
              <table:table-cell office:value-type="float" office:value="-20">
                <text:p>-20</text:p>
              </table:table-cell>
            </table:table-row>
            <table:table-row>
              <table:table-cell office:value-type="string">
                <text:p>462</text:p>
              </table:table-cell>
              <table:table-cell office:value-type="float" office:value="0.000921999976708321">
                <text:p>0.000921999976708321</text:p>
              </table:table-cell>
              <table:table-cell office:value-type="float" office:value="12.8000001907349">
                <text:p>12.8000001907349</text:p>
              </table:table-cell>
              <table:table-cell office:value-type="float" office:value="-20">
                <text:p>-20</text:p>
              </table:table-cell>
            </table:table-row>
            <table:table-row>
              <table:table-cell office:value-type="string">
                <text:p>463</text:p>
              </table:table-cell>
              <table:table-cell office:value-type="float" office:value="0.000923999976657797">
                <text:p>0.000923999976657797</text:p>
              </table:table-cell>
              <table:table-cell office:value-type="float" office:value="12.3999996185303">
                <text:p>12.3999996185303</text:p>
              </table:table-cell>
              <table:table-cell office:value-type="float" office:value="-20">
                <text:p>-20</text:p>
              </table:table-cell>
            </table:table-row>
            <table:table-row>
              <table:table-cell office:value-type="string">
                <text:p>464</text:p>
              </table:table-cell>
              <table:table-cell office:value-type="float" office:value="0.000925999976607272">
                <text:p>0.000925999976607272</text:p>
              </table:table-cell>
              <table:table-cell office:value-type="float" office:value="11.8000001907349">
                <text:p>11.8000001907349</text:p>
              </table:table-cell>
              <table:table-cell office:value-type="float" office:value="-20">
                <text:p>-20</text:p>
              </table:table-cell>
            </table:table-row>
            <table:table-row>
              <table:table-cell office:value-type="string">
                <text:p>465</text:p>
              </table:table-cell>
              <table:table-cell office:value-type="float" office:value="0.000927999976556748">
                <text:p>0.000927999976556748</text:p>
              </table:table-cell>
              <table:table-cell office:value-type="float" office:value="11.6000003814697">
                <text:p>11.6000003814697</text:p>
              </table:table-cell>
              <table:table-cell office:value-type="float" office:value="-20">
                <text:p>-20</text:p>
              </table:table-cell>
            </table:table-row>
            <table:table-row>
              <table:table-cell office:value-type="string">
                <text:p>466</text:p>
              </table:table-cell>
              <table:table-cell office:value-type="float" office:value="0.000929999976506224">
                <text:p>0.000929999976506224</text:p>
              </table:table-cell>
              <table:table-cell office:value-type="float" office:value="11.6000003814697">
                <text:p>11.6000003814697</text:p>
              </table:table-cell>
              <table:table-cell office:value-type="float" office:value="-20">
                <text:p>-20</text:p>
              </table:table-cell>
            </table:table-row>
            <table:table-row>
              <table:table-cell office:value-type="string">
                <text:p>467</text:p>
              </table:table-cell>
              <table:table-cell office:value-type="float" office:value="0.0009319999764557">
                <text:p>0.0009319999764557</text:p>
              </table:table-cell>
              <table:table-cell office:value-type="float" office:value="11">
                <text:p>11</text:p>
              </table:table-cell>
              <table:table-cell office:value-type="float" office:value="-20">
                <text:p>-20</text:p>
              </table:table-cell>
            </table:table-row>
            <table:table-row>
              <table:table-cell office:value-type="string">
                <text:p>468</text:p>
              </table:table-cell>
              <table:table-cell office:value-type="float" office:value="0.000933999976405175">
                <text:p>0.000933999976405175</text:p>
              </table:table-cell>
              <table:table-cell office:value-type="float" office:value="10.6000003814697">
                <text:p>10.6000003814697</text:p>
              </table:table-cell>
              <table:table-cell office:value-type="float" office:value="-20">
                <text:p>-20</text:p>
              </table:table-cell>
            </table:table-row>
            <table:table-row>
              <table:table-cell office:value-type="string">
                <text:p>469</text:p>
              </table:table-cell>
              <table:table-cell office:value-type="float" office:value="0.000935999976354651">
                <text:p>0.000935999976354651</text:p>
              </table:table-cell>
              <table:table-cell office:value-type="float" office:value="10.1999998092651">
                <text:p>10.1999998092651</text:p>
              </table:table-cell>
              <table:table-cell office:value-type="float" office:value="-20">
                <text:p>-20</text:p>
              </table:table-cell>
            </table:table-row>
            <table:table-row>
              <table:table-cell office:value-type="string">
                <text:p>470</text:p>
              </table:table-cell>
              <table:table-cell office:value-type="float" office:value="0.000937999976304127">
                <text:p>0.000937999976304127</text:p>
              </table:table-cell>
              <table:table-cell office:value-type="float" office:value="10">
                <text:p>10</text:p>
              </table:table-cell>
              <table:table-cell office:value-type="float" office:value="-20">
                <text:p>-20</text:p>
              </table:table-cell>
            </table:table-row>
            <table:table-row>
              <table:table-cell office:value-type="string">
                <text:p>471</text:p>
              </table:table-cell>
              <table:table-cell office:value-type="float" office:value="0.000939999976253603">
                <text:p>0.000939999976253603</text:p>
              </table:table-cell>
              <table:table-cell office:value-type="float" office:value="9.39999961853027">
                <text:p>9.39999961853027</text:p>
              </table:table-cell>
              <table:table-cell office:value-type="float" office:value="-20">
                <text:p>-20</text:p>
              </table:table-cell>
            </table:table-row>
            <table:table-row>
              <table:table-cell office:value-type="string">
                <text:p>472</text:p>
              </table:table-cell>
              <table:table-cell office:value-type="float" office:value="0.000941999976203078">
                <text:p>0.000941999976203078</text:p>
              </table:table-cell>
              <table:table-cell office:value-type="float" office:value="9.19999980926514">
                <text:p>9.19999980926514</text:p>
              </table:table-cell>
              <table:table-cell office:value-type="float" office:value="-20">
                <text:p>-20</text:p>
              </table:table-cell>
            </table:table-row>
            <table:table-row>
              <table:table-cell office:value-type="string">
                <text:p>473</text:p>
              </table:table-cell>
              <table:table-cell office:value-type="float" office:value="0.000943999976152554">
                <text:p>0.000943999976152554</text:p>
              </table:table-cell>
              <table:table-cell office:value-type="float" office:value="8.80000019073486">
                <text:p>8.80000019073486</text:p>
              </table:table-cell>
              <table:table-cell office:value-type="float" office:value="-20">
                <text:p>-20</text:p>
              </table:table-cell>
            </table:table-row>
            <table:table-row>
              <table:table-cell office:value-type="string">
                <text:p>474</text:p>
              </table:table-cell>
              <table:table-cell office:value-type="float" office:value="0.00094599997610203">
                <text:p>0.00094599997610203</text:p>
              </table:table-cell>
              <table:table-cell office:value-type="float" office:value="8.39999961853027">
                <text:p>8.39999961853027</text:p>
              </table:table-cell>
              <table:table-cell office:value-type="float" office:value="-20">
                <text:p>-20</text:p>
              </table:table-cell>
            </table:table-row>
            <table:table-row>
              <table:table-cell office:value-type="string">
                <text:p>475</text:p>
              </table:table-cell>
              <table:table-cell office:value-type="float" office:value="0.000947999976051506">
                <text:p>0.000947999976051506</text:p>
              </table:table-cell>
              <table:table-cell office:value-type="float" office:value="8.19999980926514">
                <text:p>8.19999980926514</text:p>
              </table:table-cell>
              <table:table-cell office:value-type="float" office:value="-20">
                <text:p>-20</text:p>
              </table:table-cell>
            </table:table-row>
            <table:table-row>
              <table:table-cell office:value-type="string">
                <text:p>476</text:p>
              </table:table-cell>
              <table:table-cell office:value-type="float" office:value="0.000949999976000981">
                <text:p>0.000949999976000981</text:p>
              </table:table-cell>
              <table:table-cell office:value-type="float" office:value="7.59999990463257">
                <text:p>7.59999990463257</text:p>
              </table:table-cell>
              <table:table-cell office:value-type="float" office:value="-20">
                <text:p>-20</text:p>
              </table:table-cell>
            </table:table-row>
            <table:table-row>
              <table:table-cell office:value-type="string">
                <text:p>477</text:p>
              </table:table-cell>
              <table:table-cell office:value-type="float" office:value="0.000951999975950457">
                <text:p>0.000951999975950457</text:p>
              </table:table-cell>
              <table:table-cell office:value-type="float" office:value="7.19999980926514">
                <text:p>7.19999980926514</text:p>
              </table:table-cell>
              <table:table-cell office:value-type="float" office:value="-20">
                <text:p>-20</text:p>
              </table:table-cell>
            </table:table-row>
            <table:table-row>
              <table:table-cell office:value-type="string">
                <text:p>478</text:p>
              </table:table-cell>
              <table:table-cell office:value-type="float" office:value="0.000953999975899933">
                <text:p>0.000953999975899933</text:p>
              </table:table-cell>
              <table:table-cell office:value-type="float" office:value="7">
                <text:p>7</text:p>
              </table:table-cell>
              <table:table-cell office:value-type="float" office:value="-20">
                <text:p>-20</text:p>
              </table:table-cell>
            </table:table-row>
            <table:table-row>
              <table:table-cell office:value-type="string">
                <text:p>479</text:p>
              </table:table-cell>
              <table:table-cell office:value-type="float" office:value="0.000955999975849409">
                <text:p>0.000955999975849409</text:p>
              </table:table-cell>
              <table:table-cell office:value-type="float" office:value="6.59999990463257">
                <text:p>6.59999990463257</text:p>
              </table:table-cell>
              <table:table-cell office:value-type="float" office:value="-20">
                <text:p>-20</text:p>
              </table:table-cell>
            </table:table-row>
            <table:table-row>
              <table:table-cell office:value-type="string">
                <text:p>480</text:p>
              </table:table-cell>
              <table:table-cell office:value-type="float" office:value="0.000957999975798884">
                <text:p>0.000957999975798884</text:p>
              </table:table-cell>
              <table:table-cell office:value-type="float" office:value="6">
                <text:p>6</text:p>
              </table:table-cell>
              <table:table-cell office:value-type="float" office:value="-20">
                <text:p>-20</text:p>
              </table:table-cell>
            </table:table-row>
            <table:table-row>
              <table:table-cell office:value-type="string">
                <text:p>481</text:p>
              </table:table-cell>
              <table:table-cell office:value-type="float" office:value="0.00095999997574836">
                <text:p>0.00095999997574836</text:p>
              </table:table-cell>
              <table:table-cell office:value-type="float" office:value="5.80000019073486">
                <text:p>5.80000019073486</text:p>
              </table:table-cell>
              <table:table-cell office:value-type="float" office:value="-20">
                <text:p>-20</text:p>
              </table:table-cell>
            </table:table-row>
            <table:table-row>
              <table:table-cell office:value-type="string">
                <text:p>482</text:p>
              </table:table-cell>
              <table:table-cell office:value-type="float" office:value="0.000961999975697836">
                <text:p>0.000961999975697836</text:p>
              </table:table-cell>
              <table:table-cell office:value-type="float" office:value="5.59999990463257">
                <text:p>5.59999990463257</text:p>
              </table:table-cell>
              <table:table-cell office:value-type="float" office:value="-20">
                <text:p>-20</text:p>
              </table:table-cell>
            </table:table-row>
            <table:table-row>
              <table:table-cell office:value-type="string">
                <text:p>483</text:p>
              </table:table-cell>
              <table:table-cell office:value-type="float" office:value="0.000963999975647312">
                <text:p>0.000963999975647312</text:p>
              </table:table-cell>
              <table:table-cell office:value-type="float" office:value="5">
                <text:p>5</text:p>
              </table:table-cell>
              <table:table-cell office:value-type="float" office:value="-20">
                <text:p>-20</text:p>
              </table:table-cell>
            </table:table-row>
            <table:table-row>
              <table:table-cell office:value-type="string">
                <text:p>484</text:p>
              </table:table-cell>
              <table:table-cell office:value-type="float" office:value="0.000965999975596787">
                <text:p>0.000965999975596787</text:p>
              </table:table-cell>
              <table:table-cell office:value-type="float" office:value="4.80000019073486">
                <text:p>4.80000019073486</text:p>
              </table:table-cell>
              <table:table-cell office:value-type="float" office:value="-20">
                <text:p>-20</text:p>
              </table:table-cell>
            </table:table-row>
            <table:table-row>
              <table:table-cell office:value-type="string">
                <text:p>485</text:p>
              </table:table-cell>
              <table:table-cell office:value-type="float" office:value="0.000967999975546263">
                <text:p>0.000967999975546263</text:p>
              </table:table-cell>
              <table:table-cell office:value-type="float" office:value="4.59999990463257">
                <text:p>4.59999990463257</text:p>
              </table:table-cell>
              <table:table-cell office:value-type="float" office:value="-20">
                <text:p>-20</text:p>
              </table:table-cell>
            </table:table-row>
            <table:table-row>
              <table:table-cell office:value-type="string">
                <text:p>486</text:p>
              </table:table-cell>
              <table:table-cell office:value-type="float" office:value="0.000969999975495739">
                <text:p>0.000969999975495739</text:p>
              </table:table-cell>
              <table:table-cell office:value-type="float" office:value="4.19999980926514">
                <text:p>4.19999980926514</text:p>
              </table:table-cell>
              <table:table-cell office:value-type="float" office:value="-20">
                <text:p>-20</text:p>
              </table:table-cell>
            </table:table-row>
            <table:table-row>
              <table:table-cell office:value-type="string">
                <text:p>487</text:p>
              </table:table-cell>
              <table:table-cell office:value-type="float" office:value="0.000971999975445215">
                <text:p>0.000971999975445215</text:p>
              </table:table-cell>
              <table:table-cell office:value-type="float" office:value="3.59999990463257">
                <text:p>3.59999990463257</text:p>
              </table:table-cell>
              <table:table-cell office:value-type="float" office:value="-20">
                <text:p>-20</text:p>
              </table:table-cell>
            </table:table-row>
            <table:table-row>
              <table:table-cell office:value-type="string">
                <text:p>488</text:p>
              </table:table-cell>
              <table:table-cell office:value-type="float" office:value="0.00097399997539469">
                <text:p>0.00097399997539469</text:p>
              </table:table-cell>
              <table:table-cell office:value-type="float" office:value="3.20000004768372">
                <text:p>3.20000004768372</text:p>
              </table:table-cell>
              <table:table-cell office:value-type="float" office:value="-20">
                <text:p>-20</text:p>
              </table:table-cell>
            </table:table-row>
            <table:table-row>
              <table:table-cell office:value-type="string">
                <text:p>489</text:p>
              </table:table-cell>
              <table:table-cell office:value-type="float" office:value="0.000975999975344166">
                <text:p>0.000975999975344166</text:p>
              </table:table-cell>
              <table:table-cell office:value-type="float" office:value="3">
                <text:p>3</text:p>
              </table:table-cell>
              <table:table-cell office:value-type="float" office:value="-20">
                <text:p>-20</text:p>
              </table:table-cell>
            </table:table-row>
            <table:table-row>
              <table:table-cell office:value-type="string">
                <text:p>490</text:p>
              </table:table-cell>
              <table:table-cell office:value-type="float" office:value="0.000977999975293642">
                <text:p>0.000977999975293642</text:p>
              </table:table-cell>
              <table:table-cell office:value-type="float" office:value="2.59999990463257">
                <text:p>2.59999990463257</text:p>
              </table:table-cell>
              <table:table-cell office:value-type="float" office:value="-20">
                <text:p>-20</text:p>
              </table:table-cell>
            </table:table-row>
            <table:table-row>
              <table:table-cell office:value-type="string">
                <text:p>491</text:p>
              </table:table-cell>
              <table:table-cell office:value-type="float" office:value="0.000979999975243118">
                <text:p>0.000979999975243118</text:p>
              </table:table-cell>
              <table:table-cell office:value-type="float" office:value="2.20000004768372">
                <text:p>2.20000004768372</text:p>
              </table:table-cell>
              <table:table-cell office:value-type="float" office:value="-20">
                <text:p>-20</text:p>
              </table:table-cell>
            </table:table-row>
            <table:table-row>
              <table:table-cell office:value-type="string">
                <text:p>492</text:p>
              </table:table-cell>
              <table:table-cell office:value-type="float" office:value="0.000981999975192594">
                <text:p>0.000981999975192594</text:p>
              </table:table-cell>
              <table:table-cell office:value-type="float" office:value="1.79999995231628">
                <text:p>1.79999995231628</text:p>
              </table:table-cell>
              <table:table-cell office:value-type="float" office:value="-20">
                <text:p>-20</text:p>
              </table:table-cell>
            </table:table-row>
            <table:table-row>
              <table:table-cell office:value-type="string">
                <text:p>493</text:p>
              </table:table-cell>
              <table:table-cell office:value-type="float" office:value="0.000983999975142069">
                <text:p>0.000983999975142069</text:p>
              </table:table-cell>
              <table:table-cell office:value-type="float" office:value="1.39999997615814">
                <text:p>1.39999997615814</text:p>
              </table:table-cell>
              <table:table-cell office:value-type="float" office:value="-20">
                <text:p>-20</text:p>
              </table:table-cell>
            </table:table-row>
            <table:table-row>
              <table:table-cell office:value-type="string">
                <text:p>494</text:p>
              </table:table-cell>
              <table:table-cell office:value-type="float" office:value="0.000985999975091545">
                <text:p>0.000985999975091545</text:p>
              </table:table-cell>
              <table:table-cell office:value-type="float" office:value="1.20000004768372">
                <text:p>1.20000004768372</text:p>
              </table:table-cell>
              <table:table-cell office:value-type="float" office:value="-20">
                <text:p>-20</text:p>
              </table:table-cell>
            </table:table-row>
            <table:table-row>
              <table:table-cell office:value-type="string">
                <text:p>495</text:p>
              </table:table-cell>
              <table:table-cell office:value-type="float" office:value="0.000987999975041021">
                <text:p>0.000987999975041021</text:p>
              </table:table-cell>
              <table:table-cell office:value-type="float" office:value="0.600000023841858">
                <text:p>0.600000023841858</text:p>
              </table:table-cell>
              <table:table-cell office:value-type="float" office:value="-20">
                <text:p>-20</text:p>
              </table:table-cell>
            </table:table-row>
            <table:table-row>
              <table:table-cell office:value-type="string">
                <text:p>496</text:p>
              </table:table-cell>
              <table:table-cell office:value-type="float" office:value="0.000989999974990496">
                <text:p>0.000989999974990496</text:p>
              </table:table-cell>
              <table:table-cell office:value-type="float" office:value="0.200000002980232">
                <text:p>0.200000002980232</text:p>
              </table:table-cell>
              <table:table-cell office:value-type="float" office:value="-20">
                <text:p>-20</text:p>
              </table:table-cell>
            </table:table-row>
            <table:table-row>
              <table:table-cell office:value-type="string">
                <text:p>497</text:p>
              </table:table-cell>
              <table:table-cell office:value-type="float" office:value="0.000991999974939972">
                <text:p>0.000991999974939972</text:p>
              </table:table-cell>
              <table:table-cell office:value-type="float" office:value="0">
                <text:p>0</text:p>
              </table:table-cell>
              <table:table-cell office:value-type="float" office:value="-20">
                <text:p>-20</text:p>
              </table:table-cell>
            </table:table-row>
            <table:table-row>
              <table:table-cell office:value-type="string">
                <text:p>498</text:p>
              </table:table-cell>
              <table:table-cell office:value-type="float" office:value="0.000993999974889448">
                <text:p>0.000993999974889448</text:p>
              </table:table-cell>
              <table:table-cell office:value-type="float" office:value="-0.400000005960465">
                <text:p>-0.400000005960465</text:p>
              </table:table-cell>
              <table:table-cell office:value-type="float" office:value="-20">
                <text:p>-20</text:p>
              </table:table-cell>
            </table:table-row>
            <table:table-row>
              <table:table-cell office:value-type="string">
                <text:p>499</text:p>
              </table:table-cell>
              <table:table-cell office:value-type="float" office:value="0.000995999974838924">
                <text:p>0.000995999974838924</text:p>
              </table:table-cell>
              <table:table-cell office:value-type="float" office:value="-0.800000011920929">
                <text:p>-0.800000011920929</text:p>
              </table:table-cell>
              <table:table-cell office:value-type="float" office:value="-20">
                <text:p>-20</text:p>
              </table:table-cell>
            </table:table-row>
            <table:table-row>
              <table:table-cell office:value-type="string">
                <text:p>500</text:p>
              </table:table-cell>
              <table:table-cell office:value-type="float" office:value="0.000997999974788399">
                <text:p>0.000997999974788399</text:p>
              </table:table-cell>
              <table:table-cell office:value-type="float" office:value="-1.20000004768372">
                <text:p>-1.20000004768372</text:p>
              </table:table-cell>
              <table:table-cell office:value-type="float" office:value="-20">
                <text:p>-20</text:p>
              </table:table-cell>
            </table:table-row>
            <table:table-row>
              <table:table-cell office:value-type="string">
                <text:p>501</text:p>
              </table:table-cell>
              <table:table-cell office:value-type="float" office:value="0.000999999974737875">
                <text:p>0.000999999974737875</text:p>
              </table:table-cell>
              <table:table-cell office:value-type="float" office:value="-1.79999995231628">
                <text:p>-1.79999995231628</text:p>
              </table:table-cell>
              <table:table-cell office:value-type="float" office:value="-20">
                <text:p>-20</text:p>
              </table:table-cell>
            </table:table-row>
            <table:table-row>
              <table:table-cell office:value-type="string">
                <text:p>502</text:p>
              </table:table-cell>
              <table:table-cell office:value-type="float" office:value="0.00100199997468735">
                <text:p>0.00100199997468735</text:p>
              </table:table-cell>
              <table:table-cell office:value-type="float" office:value="-2">
                <text:p>-2</text:p>
              </table:table-cell>
              <table:table-cell office:value-type="float" office:value="-20">
                <text:p>-20</text:p>
              </table:table-cell>
            </table:table-row>
            <table:table-row>
              <table:table-cell office:value-type="string">
                <text:p>503</text:p>
              </table:table-cell>
              <table:table-cell office:value-type="float" office:value="0.00100399997463683">
                <text:p>0.00100399997463683</text:p>
              </table:table-cell>
              <table:table-cell office:value-type="float" office:value="-2.20000004768372">
                <text:p>-2.20000004768372</text:p>
              </table:table-cell>
              <table:table-cell office:value-type="float" office:value="-20">
                <text:p>-20</text:p>
              </table:table-cell>
            </table:table-row>
            <table:table-row>
              <table:table-cell office:value-type="string">
                <text:p>504</text:p>
              </table:table-cell>
              <table:table-cell office:value-type="float" office:value="0.0010059999745863">
                <text:p>0.0010059999745863</text:p>
              </table:table-cell>
              <table:table-cell office:value-type="float" office:value="-2.79999995231628">
                <text:p>-2.79999995231628</text:p>
              </table:table-cell>
              <table:table-cell office:value-type="float" office:value="-20">
                <text:p>-20</text:p>
              </table:table-cell>
            </table:table-row>
            <table:table-row>
              <table:table-cell office:value-type="string">
                <text:p>505</text:p>
              </table:table-cell>
              <table:table-cell office:value-type="float" office:value="0.00100799997453578">
                <text:p>0.00100799997453578</text:p>
              </table:table-cell>
              <table:table-cell office:value-type="float" office:value="-3">
                <text:p>-3</text:p>
              </table:table-cell>
              <table:table-cell office:value-type="float" office:value="-20">
                <text:p>-20</text:p>
              </table:table-cell>
            </table:table-row>
            <table:table-row>
              <table:table-cell office:value-type="string">
                <text:p>506</text:p>
              </table:table-cell>
              <table:table-cell office:value-type="float" office:value="0.00100999997448525">
                <text:p>0.00100999997448525</text:p>
              </table:table-cell>
              <table:table-cell office:value-type="float" office:value="-3.40000009536743">
                <text:p>-3.40000009536743</text:p>
              </table:table-cell>
              <table:table-cell office:value-type="float" office:value="-20">
                <text:p>-20</text:p>
              </table:table-cell>
            </table:table-row>
            <table:table-row>
              <table:table-cell office:value-type="string">
                <text:p>507</text:p>
              </table:table-cell>
              <table:table-cell office:value-type="float" office:value="0.00101199997443473">
                <text:p>0.00101199997443473</text:p>
              </table:table-cell>
              <table:table-cell office:value-type="float" office:value="-3.79999995231628">
                <text:p>-3.79999995231628</text:p>
              </table:table-cell>
              <table:table-cell office:value-type="float" office:value="-20">
                <text:p>-20</text:p>
              </table:table-cell>
            </table:table-row>
            <table:table-row>
              <table:table-cell office:value-type="string">
                <text:p>508</text:p>
              </table:table-cell>
              <table:table-cell office:value-type="float" office:value="0.00101399997438421">
                <text:p>0.00101399997438421</text:p>
              </table:table-cell>
              <table:table-cell office:value-type="float" office:value="-4.19999980926514">
                <text:p>-4.19999980926514</text:p>
              </table:table-cell>
              <table:table-cell office:value-type="float" office:value="-20">
                <text:p>-20</text:p>
              </table:table-cell>
            </table:table-row>
            <table:table-row>
              <table:table-cell office:value-type="string">
                <text:p>509</text:p>
              </table:table-cell>
              <table:table-cell office:value-type="float" office:value="0.00101599997433368">
                <text:p>0.00101599997433368</text:p>
              </table:table-cell>
              <table:table-cell office:value-type="float" office:value="-4.59999990463257">
                <text:p>-4.59999990463257</text:p>
              </table:table-cell>
              <table:table-cell office:value-type="float" office:value="-20">
                <text:p>-20</text:p>
              </table:table-cell>
            </table:table-row>
            <table:table-row>
              <table:table-cell office:value-type="string">
                <text:p>510</text:p>
              </table:table-cell>
              <table:table-cell office:value-type="float" office:value="0.00101799997428316">
                <text:p>0.00101799997428316</text:p>
              </table:table-cell>
              <table:table-cell office:value-type="float" office:value="-4.80000019073486">
                <text:p>-4.80000019073486</text:p>
              </table:table-cell>
              <table:table-cell office:value-type="float" office:value="-20">
                <text:p>-20</text:p>
              </table:table-cell>
            </table:table-row>
            <table:table-row>
              <table:table-cell office:value-type="string">
                <text:p>511</text:p>
              </table:table-cell>
              <table:table-cell office:value-type="float" office:value="0.00101999997423263">
                <text:p>0.00101999997423263</text:p>
              </table:table-cell>
              <table:table-cell office:value-type="float" office:value="-5.19999980926514">
                <text:p>-5.19999980926514</text:p>
              </table:table-cell>
              <table:table-cell office:value-type="float" office:value="-20">
                <text:p>-20</text:p>
              </table:table-cell>
            </table:table-row>
            <table:table-row>
              <table:table-cell office:value-type="string">
                <text:p>512</text:p>
              </table:table-cell>
              <table:table-cell office:value-type="float" office:value="0.00102199997418211">
                <text:p>0.00102199997418211</text:p>
              </table:table-cell>
              <table:table-cell office:value-type="float" office:value="-5.80000019073486">
                <text:p>-5.80000019073486</text:p>
              </table:table-cell>
              <table:table-cell office:value-type="float" office:value="-20">
                <text:p>-20</text:p>
              </table:table-cell>
            </table:table-row>
            <table:table-row>
              <table:table-cell office:value-type="string">
                <text:p>513</text:p>
              </table:table-cell>
              <table:table-cell office:value-type="float" office:value="0.00102399997413158">
                <text:p>0.00102399997413158</text:p>
              </table:table-cell>
              <table:table-cell office:value-type="float" office:value="-6">
                <text:p>-6</text:p>
              </table:table-cell>
              <table:table-cell office:value-type="float" office:value="-20">
                <text:p>-20</text:p>
              </table:table-cell>
            </table:table-row>
            <table:table-row>
              <table:table-cell office:value-type="string">
                <text:p>514</text:p>
              </table:table-cell>
              <table:table-cell office:value-type="float" office:value="0.00102599997408106">
                <text:p>0.00102599997408106</text:p>
              </table:table-cell>
              <table:table-cell office:value-type="float" office:value="-6.40000009536743">
                <text:p>-6.40000009536743</text:p>
              </table:table-cell>
              <table:table-cell office:value-type="float" office:value="-20">
                <text:p>-20</text:p>
              </table:table-cell>
            </table:table-row>
            <table:table-row>
              <table:table-cell office:value-type="string">
                <text:p>515</text:p>
              </table:table-cell>
              <table:table-cell office:value-type="float" office:value="0.00102799997403054">
                <text:p>0.00102799997403054</text:p>
              </table:table-cell>
              <table:table-cell office:value-type="float" office:value="-6.80000019073486">
                <text:p>-6.80000019073486</text:p>
              </table:table-cell>
              <table:table-cell office:value-type="float" office:value="-20">
                <text:p>-20</text:p>
              </table:table-cell>
            </table:table-row>
            <table:table-row>
              <table:table-cell office:value-type="string">
                <text:p>516</text:p>
              </table:table-cell>
              <table:table-cell office:value-type="float" office:value="0.00102999997398001">
                <text:p>0.00102999997398001</text:p>
              </table:table-cell>
              <table:table-cell office:value-type="float" office:value="-7">
                <text:p>-7</text:p>
              </table:table-cell>
              <table:table-cell office:value-type="float" office:value="-20">
                <text:p>-20</text:p>
              </table:table-cell>
            </table:table-row>
            <table:table-row>
              <table:table-cell office:value-type="string">
                <text:p>517</text:p>
              </table:table-cell>
              <table:table-cell office:value-type="float" office:value="0.00103199997392949">
                <text:p>0.00103199997392949</text:p>
              </table:table-cell>
              <table:table-cell office:value-type="float" office:value="-7.40000009536743">
                <text:p>-7.40000009536743</text:p>
              </table:table-cell>
              <table:table-cell office:value-type="float" office:value="-20">
                <text:p>-20</text:p>
              </table:table-cell>
            </table:table-row>
            <table:table-row>
              <table:table-cell office:value-type="string">
                <text:p>518</text:p>
              </table:table-cell>
              <table:table-cell office:value-type="float" office:value="0.00103399997387896">
                <text:p>0.00103399997387896</text:p>
              </table:table-cell>
              <table:table-cell office:value-type="float" office:value="-7.80000019073486">
                <text:p>-7.80000019073486</text:p>
              </table:table-cell>
              <table:table-cell office:value-type="float" office:value="-20">
                <text:p>-20</text:p>
              </table:table-cell>
            </table:table-row>
            <table:table-row>
              <table:table-cell office:value-type="string">
                <text:p>519</text:p>
              </table:table-cell>
              <table:table-cell office:value-type="float" office:value="0.00103599997382844">
                <text:p>0.00103599997382844</text:p>
              </table:table-cell>
              <table:table-cell office:value-type="float" office:value="-8.39999961853027">
                <text:p>-8.39999961853027</text:p>
              </table:table-cell>
              <table:table-cell office:value-type="float" office:value="-20">
                <text:p>-20</text:p>
              </table:table-cell>
            </table:table-row>
            <table:table-row>
              <table:table-cell office:value-type="string">
                <text:p>520</text:p>
              </table:table-cell>
              <table:table-cell office:value-type="float" office:value="0.00103799997377791">
                <text:p>0.00103799997377791</text:p>
              </table:table-cell>
              <table:table-cell office:value-type="float" office:value="-8.60000038146973">
                <text:p>-8.60000038146973</text:p>
              </table:table-cell>
              <table:table-cell office:value-type="float" office:value="-20">
                <text:p>-20</text:p>
              </table:table-cell>
            </table:table-row>
            <table:table-row>
              <table:table-cell office:value-type="string">
                <text:p>521</text:p>
              </table:table-cell>
              <table:table-cell office:value-type="float" office:value="0.00103999997372739">
                <text:p>0.00103999997372739</text:p>
              </table:table-cell>
              <table:table-cell office:value-type="float" office:value="-9">
                <text:p>-9</text:p>
              </table:table-cell>
              <table:table-cell office:value-type="float" office:value="-20">
                <text:p>-20</text:p>
              </table:table-cell>
            </table:table-row>
            <table:table-row>
              <table:table-cell office:value-type="string">
                <text:p>522</text:p>
              </table:table-cell>
              <table:table-cell office:value-type="float" office:value="0.00104199997367687">
                <text:p>0.00104199997367687</text:p>
              </table:table-cell>
              <table:table-cell office:value-type="float" office:value="-9.19999980926514">
                <text:p>-9.19999980926514</text:p>
              </table:table-cell>
              <table:table-cell office:value-type="float" office:value="-20">
                <text:p>-20</text:p>
              </table:table-cell>
            </table:table-row>
            <table:table-row>
              <table:table-cell office:value-type="string">
                <text:p>523</text:p>
              </table:table-cell>
              <table:table-cell office:value-type="float" office:value="0.00104399997362634">
                <text:p>0.00104399997362634</text:p>
              </table:table-cell>
              <table:table-cell office:value-type="float" office:value="-9.60000038146973">
                <text:p>-9.60000038146973</text:p>
              </table:table-cell>
              <table:table-cell office:value-type="float" office:value="-20">
                <text:p>-20</text:p>
              </table:table-cell>
            </table:table-row>
            <table:table-row>
              <table:table-cell office:value-type="string">
                <text:p>524</text:p>
              </table:table-cell>
              <table:table-cell office:value-type="float" office:value="0.00104599997357582">
                <text:p>0.00104599997357582</text:p>
              </table:table-cell>
              <table:table-cell office:value-type="float" office:value="-10">
                <text:p>-10</text:p>
              </table:table-cell>
              <table:table-cell office:value-type="float" office:value="-20">
                <text:p>-20</text:p>
              </table:table-cell>
            </table:table-row>
            <table:table-row>
              <table:table-cell office:value-type="string">
                <text:p>525</text:p>
              </table:table-cell>
              <table:table-cell office:value-type="float" office:value="0.00104799997352529">
                <text:p>0.00104799997352529</text:p>
              </table:table-cell>
              <table:table-cell office:value-type="float" office:value="-10.3999996185303">
                <text:p>-10.3999996185303</text:p>
              </table:table-cell>
              <table:table-cell office:value-type="float" office:value="-20">
                <text:p>-20</text:p>
              </table:table-cell>
            </table:table-row>
            <table:table-row>
              <table:table-cell office:value-type="string">
                <text:p>526</text:p>
              </table:table-cell>
              <table:table-cell office:value-type="float" office:value="0.00104999997347477">
                <text:p>0.00104999997347477</text:p>
              </table:table-cell>
              <table:table-cell office:value-type="float" office:value="-10.8000001907349">
                <text:p>-10.8000001907349</text:p>
              </table:table-cell>
              <table:table-cell office:value-type="float" office:value="-20">
                <text:p>-20</text:p>
              </table:table-cell>
            </table:table-row>
            <table:table-row>
              <table:table-cell office:value-type="string">
                <text:p>527</text:p>
              </table:table-cell>
              <table:table-cell office:value-type="float" office:value="0.00105199997342424">
                <text:p>0.00105199997342424</text:p>
              </table:table-cell>
              <table:table-cell office:value-type="float" office:value="-11.1999998092651">
                <text:p>-11.1999998092651</text:p>
              </table:table-cell>
              <table:table-cell office:value-type="float" office:value="-20">
                <text:p>-20</text:p>
              </table:table-cell>
            </table:table-row>
            <table:table-row>
              <table:table-cell office:value-type="string">
                <text:p>528</text:p>
              </table:table-cell>
              <table:table-cell office:value-type="float" office:value="0.00105399997337372">
                <text:p>0.00105399997337372</text:p>
              </table:table-cell>
              <table:table-cell office:value-type="float" office:value="-11.6000003814697">
                <text:p>-11.6000003814697</text:p>
              </table:table-cell>
              <table:table-cell office:value-type="float" office:value="-20">
                <text:p>-20</text:p>
              </table:table-cell>
            </table:table-row>
            <table:table-row>
              <table:table-cell office:value-type="string">
                <text:p>529</text:p>
              </table:table-cell>
              <table:table-cell office:value-type="float" office:value="0.0010559999733232">
                <text:p>0.0010559999733232</text:p>
              </table:table-cell>
              <table:table-cell office:value-type="float" office:value="-11.8000001907349">
                <text:p>-11.8000001907349</text:p>
              </table:table-cell>
              <table:table-cell office:value-type="float" office:value="-20">
                <text:p>-20</text:p>
              </table:table-cell>
            </table:table-row>
            <table:table-row>
              <table:table-cell office:value-type="string">
                <text:p>530</text:p>
              </table:table-cell>
              <table:table-cell office:value-type="float" office:value="0.00105799997327267">
                <text:p>0.00105799997327267</text:p>
              </table:table-cell>
              <table:table-cell office:value-type="float" office:value="-12.1999998092651">
                <text:p>-12.1999998092651</text:p>
              </table:table-cell>
              <table:table-cell office:value-type="float" office:value="-20">
                <text:p>-20</text:p>
              </table:table-cell>
            </table:table-row>
            <table:table-row>
              <table:table-cell office:value-type="string">
                <text:p>531</text:p>
              </table:table-cell>
              <table:table-cell office:value-type="float" office:value="0.00105999997322215">
                <text:p>0.00105999997322215</text:p>
              </table:table-cell>
              <table:table-cell office:value-type="float" office:value="-12.8000001907349">
                <text:p>-12.8000001907349</text:p>
              </table:table-cell>
              <table:table-cell office:value-type="float" office:value="-20">
                <text:p>-20</text:p>
              </table:table-cell>
            </table:table-row>
            <table:table-row>
              <table:table-cell office:value-type="string">
                <text:p>532</text:p>
              </table:table-cell>
              <table:table-cell office:value-type="float" office:value="0.00106199997317162">
                <text:p>0.00106199997317162</text:p>
              </table:table-cell>
              <table:table-cell office:value-type="float" office:value="-13">
                <text:p>-13</text:p>
              </table:table-cell>
              <table:table-cell office:value-type="float" office:value="-20">
                <text:p>-20</text:p>
              </table:table-cell>
            </table:table-row>
            <table:table-row>
              <table:table-cell office:value-type="string">
                <text:p>533</text:p>
              </table:table-cell>
              <table:table-cell office:value-type="float" office:value="0.0010639999731211">
                <text:p>0.0010639999731211</text:p>
              </table:table-cell>
              <table:table-cell office:value-type="float" office:value="-13.6000003814697">
                <text:p>-13.6000003814697</text:p>
              </table:table-cell>
              <table:table-cell office:value-type="float" office:value="-20">
                <text:p>-20</text:p>
              </table:table-cell>
            </table:table-row>
            <table:table-row>
              <table:table-cell office:value-type="string">
                <text:p>534</text:p>
              </table:table-cell>
              <table:table-cell office:value-type="float" office:value="0.00106599997307057">
                <text:p>0.00106599997307057</text:p>
              </table:table-cell>
              <table:table-cell office:value-type="float" office:value="-13.8000001907349">
                <text:p>-13.8000001907349</text:p>
              </table:table-cell>
              <table:table-cell office:value-type="float" office:value="-20">
                <text:p>-20</text:p>
              </table:table-cell>
            </table:table-row>
            <table:table-row>
              <table:table-cell office:value-type="string">
                <text:p>535</text:p>
              </table:table-cell>
              <table:table-cell office:value-type="float" office:value="0.00106799997302005">
                <text:p>0.00106799997302005</text:p>
              </table:table-cell>
              <table:table-cell office:value-type="float" office:value="-14">
                <text:p>-14</text:p>
              </table:table-cell>
              <table:table-cell office:value-type="float" office:value="-20">
                <text:p>-20</text:p>
              </table:table-cell>
            </table:table-row>
            <table:table-row>
              <table:table-cell office:value-type="string">
                <text:p>536</text:p>
              </table:table-cell>
              <table:table-cell office:value-type="float" office:value="0.00106999997296953">
                <text:p>0.00106999997296953</text:p>
              </table:table-cell>
              <table:table-cell office:value-type="float" office:value="-14.6000003814697">
                <text:p>-14.6000003814697</text:p>
              </table:table-cell>
              <table:table-cell office:value-type="float" office:value="-20">
                <text:p>-20</text:p>
              </table:table-cell>
            </table:table-row>
            <table:table-row>
              <table:table-cell office:value-type="string">
                <text:p>537</text:p>
              </table:table-cell>
              <table:table-cell office:value-type="float" office:value="0.001071999972919">
                <text:p>0.001071999972919</text:p>
              </table:table-cell>
              <table:table-cell office:value-type="float" office:value="-14.8000001907349">
                <text:p>-14.8000001907349</text:p>
              </table:table-cell>
              <table:table-cell office:value-type="float" office:value="-20">
                <text:p>-20</text:p>
              </table:table-cell>
            </table:table-row>
            <table:table-row>
              <table:table-cell office:value-type="string">
                <text:p>538</text:p>
              </table:table-cell>
              <table:table-cell office:value-type="float" office:value="0.00107399997286848">
                <text:p>0.00107399997286848</text:p>
              </table:table-cell>
              <table:table-cell office:value-type="float" office:value="-15.1999998092651">
                <text:p>-15.1999998092651</text:p>
              </table:table-cell>
              <table:table-cell office:value-type="float" office:value="-20">
                <text:p>-20</text:p>
              </table:table-cell>
            </table:table-row>
            <table:table-row>
              <table:table-cell office:value-type="string">
                <text:p>539</text:p>
              </table:table-cell>
              <table:table-cell office:value-type="float" office:value="0.00107599997281795">
                <text:p>0.00107599997281795</text:p>
              </table:table-cell>
              <table:table-cell office:value-type="float" office:value="-15.6000003814697">
                <text:p>-15.6000003814697</text:p>
              </table:table-cell>
              <table:table-cell office:value-type="float" office:value="-20">
                <text:p>-20</text:p>
              </table:table-cell>
            </table:table-row>
            <table:table-row>
              <table:table-cell office:value-type="string">
                <text:p>540</text:p>
              </table:table-cell>
              <table:table-cell office:value-type="float" office:value="0.00107799997276743">
                <text:p>0.00107799997276743</text:p>
              </table:table-cell>
              <table:table-cell office:value-type="float" office:value="-16">
                <text:p>-16</text:p>
              </table:table-cell>
              <table:table-cell office:value-type="float" office:value="-20">
                <text:p>-20</text:p>
              </table:table-cell>
            </table:table-row>
            <table:table-row>
              <table:table-cell office:value-type="string">
                <text:p>541</text:p>
              </table:table-cell>
              <table:table-cell office:value-type="float" office:value="0.00107999997271691">
                <text:p>0.00107999997271691</text:p>
              </table:table-cell>
              <table:table-cell office:value-type="float" office:value="-16.2000007629395">
                <text:p>-16.2000007629395</text:p>
              </table:table-cell>
              <table:table-cell office:value-type="float" office:value="-20">
                <text:p>-20</text:p>
              </table:table-cell>
            </table:table-row>
            <table:table-row>
              <table:table-cell office:value-type="string">
                <text:p>542</text:p>
              </table:table-cell>
              <table:table-cell office:value-type="float" office:value="0.00108199997266638">
                <text:p>0.00108199997266638</text:p>
              </table:table-cell>
              <table:table-cell office:value-type="float" office:value="-16.6000003814697">
                <text:p>-16.6000003814697</text:p>
              </table:table-cell>
              <table:table-cell office:value-type="float" office:value="-20">
                <text:p>-20</text:p>
              </table:table-cell>
            </table:table-row>
            <table:table-row>
              <table:table-cell office:value-type="string">
                <text:p>543</text:p>
              </table:table-cell>
              <table:table-cell office:value-type="float" office:value="0.00108399997261586">
                <text:p>0.00108399997261586</text:p>
              </table:table-cell>
              <table:table-cell office:value-type="float" office:value="-17.2000007629395">
                <text:p>-17.2000007629395</text:p>
              </table:table-cell>
              <table:table-cell office:value-type="float" office:value="-20">
                <text:p>-20</text:p>
              </table:table-cell>
            </table:table-row>
            <table:table-row>
              <table:table-cell office:value-type="string">
                <text:p>544</text:p>
              </table:table-cell>
              <table:table-cell office:value-type="float" office:value="0.00108599997256533">
                <text:p>0.00108599997256533</text:p>
              </table:table-cell>
              <table:table-cell office:value-type="float" office:value="-17.7999992370605">
                <text:p>-17.7999992370605</text:p>
              </table:table-cell>
              <table:table-cell office:value-type="float" office:value="-20">
                <text:p>-20</text:p>
              </table:table-cell>
            </table:table-row>
            <table:table-row>
              <table:table-cell office:value-type="string">
                <text:p>545</text:p>
              </table:table-cell>
              <table:table-cell office:value-type="float" office:value="0.00108799997251481">
                <text:p>0.00108799997251481</text:p>
              </table:table-cell>
              <table:table-cell office:value-type="float" office:value="-18">
                <text:p>-18</text:p>
              </table:table-cell>
              <table:table-cell office:value-type="float" office:value="-20">
                <text:p>-20</text:p>
              </table:table-cell>
            </table:table-row>
            <table:table-row>
              <table:table-cell office:value-type="string">
                <text:p>546</text:p>
              </table:table-cell>
              <table:table-cell office:value-type="float" office:value="0.00108999997246428">
                <text:p>0.00108999997246428</text:p>
              </table:table-cell>
              <table:table-cell office:value-type="float" office:value="-18.3999996185303">
                <text:p>-18.3999996185303</text:p>
              </table:table-cell>
              <table:table-cell office:value-type="float" office:value="-20">
                <text:p>-20</text:p>
              </table:table-cell>
            </table:table-row>
            <table:table-row>
              <table:table-cell office:value-type="string">
                <text:p>547</text:p>
              </table:table-cell>
              <table:table-cell office:value-type="float" office:value="0.00109199997241376">
                <text:p>0.00109199997241376</text:p>
              </table:table-cell>
              <table:table-cell office:value-type="float" office:value="-18.3999996185303">
                <text:p>-18.3999996185303</text:p>
              </table:table-cell>
              <table:table-cell office:value-type="float" office:value="-20">
                <text:p>-20</text:p>
              </table:table-cell>
            </table:table-row>
            <table:table-row>
              <table:table-cell office:value-type="string">
                <text:p>548</text:p>
              </table:table-cell>
              <table:table-cell office:value-type="float" office:value="0.00109399997236324">
                <text:p>0.00109399997236324</text:p>
              </table:table-cell>
              <table:table-cell office:value-type="float" office:value="-18.7999992370605">
                <text:p>-18.7999992370605</text:p>
              </table:table-cell>
              <table:table-cell office:value-type="float" office:value="-20">
                <text:p>-20</text:p>
              </table:table-cell>
            </table:table-row>
            <table:table-row>
              <table:table-cell office:value-type="string">
                <text:p>549</text:p>
              </table:table-cell>
              <table:table-cell office:value-type="float" office:value="0.00109599997231271">
                <text:p>0.00109599997231271</text:p>
              </table:table-cell>
              <table:table-cell office:value-type="float" office:value="-19.2000007629395">
                <text:p>-19.2000007629395</text:p>
              </table:table-cell>
              <table:table-cell office:value-type="float" office:value="-20">
                <text:p>-20</text:p>
              </table:table-cell>
            </table:table-row>
            <table:table-row>
              <table:table-cell office:value-type="string">
                <text:p>550</text:p>
              </table:table-cell>
              <table:table-cell office:value-type="float" office:value="0.00109799997226219">
                <text:p>0.00109799997226219</text:p>
              </table:table-cell>
              <table:table-cell office:value-type="float" office:value="-19.6000003814697">
                <text:p>-19.6000003814697</text:p>
              </table:table-cell>
              <table:table-cell office:value-type="float" office:value="-20">
                <text:p>-20</text:p>
              </table:table-cell>
            </table:table-row>
            <table:table-row>
              <table:table-cell office:value-type="string">
                <text:p>551</text:p>
              </table:table-cell>
              <table:table-cell office:value-type="float" office:value="0.00109999997221166">
                <text:p>0.00109999997221166</text:p>
              </table:table-cell>
              <table:table-cell office:value-type="float" office:value="-20.2000007629395">
                <text:p>-20.2000007629395</text:p>
              </table:table-cell>
              <table:table-cell office:value-type="float" office:value="-20">
                <text:p>-20</text:p>
              </table:table-cell>
            </table:table-row>
            <table:table-row>
              <table:table-cell office:value-type="string">
                <text:p>552</text:p>
              </table:table-cell>
              <table:table-cell office:value-type="float" office:value="0.00110199997216114">
                <text:p>0.00110199997216114</text:p>
              </table:table-cell>
              <table:table-cell office:value-type="float" office:value="-20.3999996185303">
                <text:p>-20.3999996185303</text:p>
              </table:table-cell>
              <table:table-cell office:value-type="float" office:value="-20">
                <text:p>-20</text:p>
              </table:table-cell>
            </table:table-row>
            <table:table-row>
              <table:table-cell office:value-type="string">
                <text:p>553</text:p>
              </table:table-cell>
              <table:table-cell office:value-type="float" office:value="0.00110399997211061">
                <text:p>0.00110399997211061</text:p>
              </table:table-cell>
              <table:table-cell office:value-type="float" office:value="-20.6000003814697">
                <text:p>-20.6000003814697</text:p>
              </table:table-cell>
              <table:table-cell office:value-type="float" office:value="-20">
                <text:p>-20</text:p>
              </table:table-cell>
            </table:table-row>
            <table:table-row>
              <table:table-cell office:value-type="string">
                <text:p>554</text:p>
              </table:table-cell>
              <table:table-cell office:value-type="float" office:value="0.00110599997206009">
                <text:p>0.00110599997206009</text:p>
              </table:table-cell>
              <table:table-cell office:value-type="float" office:value="-21">
                <text:p>-21</text:p>
              </table:table-cell>
              <table:table-cell office:value-type="float" office:value="-20">
                <text:p>-20</text:p>
              </table:table-cell>
            </table:table-row>
            <table:table-row>
              <table:table-cell office:value-type="string">
                <text:p>555</text:p>
              </table:table-cell>
              <table:table-cell office:value-type="float" office:value="0.00110799997200957">
                <text:p>0.00110799997200957</text:p>
              </table:table-cell>
              <table:table-cell office:value-type="float" office:value="-21.6000003814697">
                <text:p>-21.6000003814697</text:p>
              </table:table-cell>
              <table:table-cell office:value-type="float" office:value="-20">
                <text:p>-20</text:p>
              </table:table-cell>
            </table:table-row>
            <table:table-row>
              <table:table-cell office:value-type="string">
                <text:p>556</text:p>
              </table:table-cell>
              <table:table-cell office:value-type="float" office:value="0.00110999997195904">
                <text:p>0.00110999997195904</text:p>
              </table:table-cell>
              <table:table-cell office:value-type="float" office:value="-22">
                <text:p>-22</text:p>
              </table:table-cell>
              <table:table-cell office:value-type="float" office:value="-20">
                <text:p>-20</text:p>
              </table:table-cell>
            </table:table-row>
            <table:table-row>
              <table:table-cell office:value-type="string">
                <text:p>557</text:p>
              </table:table-cell>
              <table:table-cell office:value-type="float" office:value="0.00111199997190852">
                <text:p>0.00111199997190852</text:p>
              </table:table-cell>
              <table:table-cell office:value-type="float" office:value="-22.2000007629395">
                <text:p>-22.2000007629395</text:p>
              </table:table-cell>
              <table:table-cell office:value-type="float" office:value="-20">
                <text:p>-20</text:p>
              </table:table-cell>
            </table:table-row>
            <table:table-row>
              <table:table-cell office:value-type="string">
                <text:p>558</text:p>
              </table:table-cell>
              <table:table-cell office:value-type="float" office:value="0.00111399997185799">
                <text:p>0.00111399997185799</text:p>
              </table:table-cell>
              <table:table-cell office:value-type="float" office:value="-22.6000003814697">
                <text:p>-22.6000003814697</text:p>
              </table:table-cell>
              <table:table-cell office:value-type="float" office:value="-20">
                <text:p>-20</text:p>
              </table:table-cell>
            </table:table-row>
            <table:table-row>
              <table:table-cell office:value-type="string">
                <text:p>559</text:p>
              </table:table-cell>
              <table:table-cell office:value-type="float" office:value="0.00111599997180747">
                <text:p>0.00111599997180747</text:p>
              </table:table-cell>
              <table:table-cell office:value-type="float" office:value="-23">
                <text:p>-23</text:p>
              </table:table-cell>
              <table:table-cell office:value-type="float" office:value="-20">
                <text:p>-20</text:p>
              </table:table-cell>
            </table:table-row>
            <table:table-row>
              <table:table-cell office:value-type="string">
                <text:p>560</text:p>
              </table:table-cell>
              <table:table-cell office:value-type="float" office:value="0.00111799997175694">
                <text:p>0.00111799997175694</text:p>
              </table:table-cell>
              <table:table-cell office:value-type="float" office:value="-23.3999996185303">
                <text:p>-23.3999996185303</text:p>
              </table:table-cell>
              <table:table-cell office:value-type="float" office:value="-20">
                <text:p>-20</text:p>
              </table:table-cell>
            </table:table-row>
            <table:table-row>
              <table:table-cell office:value-type="string">
                <text:p>561</text:p>
              </table:table-cell>
              <table:table-cell office:value-type="float" office:value="0.00111999997170642">
                <text:p>0.00111999997170642</text:p>
              </table:table-cell>
              <table:table-cell office:value-type="float" office:value="-23.6000003814697">
                <text:p>-23.6000003814697</text:p>
              </table:table-cell>
              <table:table-cell office:value-type="float" office:value="-20">
                <text:p>-20</text:p>
              </table:table-cell>
            </table:table-row>
            <table:table-row>
              <table:table-cell office:value-type="string">
                <text:p>562</text:p>
              </table:table-cell>
              <table:table-cell office:value-type="float" office:value="0.0011219999716559">
                <text:p>0.0011219999716559</text:p>
              </table:table-cell>
              <table:table-cell office:value-type="float" office:value="-24">
                <text:p>-24</text:p>
              </table:table-cell>
              <table:table-cell office:value-type="float" office:value="-20">
                <text:p>-20</text:p>
              </table:table-cell>
            </table:table-row>
            <table:table-row>
              <table:table-cell office:value-type="string">
                <text:p>563</text:p>
              </table:table-cell>
              <table:table-cell office:value-type="float" office:value="0.00112399997160537">
                <text:p>0.00112399997160537</text:p>
              </table:table-cell>
              <table:table-cell office:value-type="float" office:value="-24.6000003814697">
                <text:p>-24.6000003814697</text:p>
              </table:table-cell>
              <table:table-cell office:value-type="float" office:value="-20">
                <text:p>-20</text:p>
              </table:table-cell>
            </table:table-row>
            <table:table-row>
              <table:table-cell office:value-type="string">
                <text:p>564</text:p>
              </table:table-cell>
              <table:table-cell office:value-type="float" office:value="0.00112599997155485">
                <text:p>0.00112599997155485</text:p>
              </table:table-cell>
              <table:table-cell office:value-type="float" office:value="-25">
                <text:p>-25</text:p>
              </table:table-cell>
              <table:table-cell office:value-type="float" office:value="-20">
                <text:p>-20</text:p>
              </table:table-cell>
            </table:table-row>
            <table:table-row>
              <table:table-cell office:value-type="string">
                <text:p>565</text:p>
              </table:table-cell>
              <table:table-cell office:value-type="float" office:value="0.00112799997150432">
                <text:p>0.00112799997150432</text:p>
              </table:table-cell>
              <table:table-cell office:value-type="float" office:value="-25.2000007629395">
                <text:p>-25.2000007629395</text:p>
              </table:table-cell>
              <table:table-cell office:value-type="float" office:value="-20">
                <text:p>-20</text:p>
              </table:table-cell>
            </table:table-row>
            <table:table-row>
              <table:table-cell office:value-type="string">
                <text:p>566</text:p>
              </table:table-cell>
              <table:table-cell office:value-type="float" office:value="0.0011299999714538">
                <text:p>0.0011299999714538</text:p>
              </table:table-cell>
              <table:table-cell office:value-type="float" office:value="-25.3999996185303">
                <text:p>-25.3999996185303</text:p>
              </table:table-cell>
              <table:table-cell office:value-type="float" office:value="-20">
                <text:p>-20</text:p>
              </table:table-cell>
            </table:table-row>
            <table:table-row>
              <table:table-cell office:value-type="string">
                <text:p>567</text:p>
              </table:table-cell>
              <table:table-cell office:value-type="float" office:value="0.00113199997140327">
                <text:p>0.00113199997140327</text:p>
              </table:table-cell>
              <table:table-cell office:value-type="float" office:value="-26">
                <text:p>-26</text:p>
              </table:table-cell>
              <table:table-cell office:value-type="float" office:value="-20">
                <text:p>-20</text:p>
              </table:table-cell>
            </table:table-row>
            <table:table-row>
              <table:table-cell office:value-type="string">
                <text:p>568</text:p>
              </table:table-cell>
              <table:table-cell office:value-type="float" office:value="0.00113399997135275">
                <text:p>0.00113399997135275</text:p>
              </table:table-cell>
              <table:table-cell office:value-type="float" office:value="-26.3999996185303">
                <text:p>-26.3999996185303</text:p>
              </table:table-cell>
              <table:table-cell office:value-type="float" office:value="-20">
                <text:p>-20</text:p>
              </table:table-cell>
            </table:table-row>
            <table:table-row>
              <table:table-cell office:value-type="string">
                <text:p>569</text:p>
              </table:table-cell>
              <table:table-cell office:value-type="float" office:value="0.00113599997130223">
                <text:p>0.00113599997130223</text:p>
              </table:table-cell>
              <table:table-cell office:value-type="float" office:value="-26.6000003814697">
                <text:p>-26.6000003814697</text:p>
              </table:table-cell>
              <table:table-cell office:value-type="float" office:value="-20">
                <text:p>-20</text:p>
              </table:table-cell>
            </table:table-row>
            <table:table-row>
              <table:table-cell office:value-type="string">
                <text:p>570</text:p>
              </table:table-cell>
              <table:table-cell office:value-type="float" office:value="0.0011379999712517">
                <text:p>0.0011379999712517</text:p>
              </table:table-cell>
              <table:table-cell office:value-type="float" office:value="-27">
                <text:p>-27</text:p>
              </table:table-cell>
              <table:table-cell office:value-type="float" office:value="-20">
                <text:p>-20</text:p>
              </table:table-cell>
            </table:table-row>
            <table:table-row>
              <table:table-cell office:value-type="string">
                <text:p>571</text:p>
              </table:table-cell>
              <table:table-cell office:value-type="float" office:value="0.00113999997120118">
                <text:p>0.00113999997120118</text:p>
              </table:table-cell>
              <table:table-cell office:value-type="float" office:value="-27.3999996185303">
                <text:p>-27.3999996185303</text:p>
              </table:table-cell>
              <table:table-cell office:value-type="float" office:value="-20">
                <text:p>-20</text:p>
              </table:table-cell>
            </table:table-row>
            <table:table-row>
              <table:table-cell office:value-type="string">
                <text:p>572</text:p>
              </table:table-cell>
              <table:table-cell office:value-type="float" office:value="0.00114199997115065">
                <text:p>0.00114199997115065</text:p>
              </table:table-cell>
              <table:table-cell office:value-type="float" office:value="-28">
                <text:p>-28</text:p>
              </table:table-cell>
              <table:table-cell office:value-type="float" office:value="-20">
                <text:p>-20</text:p>
              </table:table-cell>
            </table:table-row>
            <table:table-row>
              <table:table-cell office:value-type="string">
                <text:p>573</text:p>
              </table:table-cell>
              <table:table-cell office:value-type="float" office:value="0.00114399997110013">
                <text:p>0.00114399997110013</text:p>
              </table:table-cell>
              <table:table-cell office:value-type="float" office:value="-28.2000007629395">
                <text:p>-28.2000007629395</text:p>
              </table:table-cell>
              <table:table-cell office:value-type="float" office:value="-20">
                <text:p>-20</text:p>
              </table:table-cell>
            </table:table-row>
            <table:table-row>
              <table:table-cell office:value-type="string">
                <text:p>574</text:p>
              </table:table-cell>
              <table:table-cell office:value-type="float" office:value="0.0011459999710496">
                <text:p>0.0011459999710496</text:p>
              </table:table-cell>
              <table:table-cell office:value-type="float" office:value="-28.3999996185303">
                <text:p>-28.3999996185303</text:p>
              </table:table-cell>
              <table:table-cell office:value-type="float" office:value="-20">
                <text:p>-20</text:p>
              </table:table-cell>
            </table:table-row>
            <table:table-row>
              <table:table-cell office:value-type="string">
                <text:p>575</text:p>
              </table:table-cell>
              <table:table-cell office:value-type="float" office:value="0.00114799997099908">
                <text:p>0.00114799997099908</text:p>
              </table:table-cell>
              <table:table-cell office:value-type="float" office:value="-29.2000007629395">
                <text:p>-29.2000007629395</text:p>
              </table:table-cell>
              <table:table-cell office:value-type="float" office:value="-20">
                <text:p>-20</text:p>
              </table:table-cell>
            </table:table-row>
            <table:table-row>
              <table:table-cell office:value-type="string">
                <text:p>576</text:p>
              </table:table-cell>
              <table:table-cell office:value-type="float" office:value="0.00114999997094856">
                <text:p>0.00114999997094856</text:p>
              </table:table-cell>
              <table:table-cell office:value-type="float" office:value="-29.3999996185303">
                <text:p>-29.3999996185303</text:p>
              </table:table-cell>
              <table:table-cell office:value-type="float" office:value="-20">
                <text:p>-20</text:p>
              </table:table-cell>
            </table:table-row>
            <table:table-row>
              <table:table-cell office:value-type="string">
                <text:p>577</text:p>
              </table:table-cell>
              <table:table-cell office:value-type="float" office:value="0.00115199997089803">
                <text:p>0.00115199997089803</text:p>
              </table:table-cell>
              <table:table-cell office:value-type="float" office:value="-29.6000003814697">
                <text:p>-29.6000003814697</text:p>
              </table:table-cell>
              <table:table-cell office:value-type="float" office:value="-20">
                <text:p>-20</text:p>
              </table:table-cell>
            </table:table-row>
            <table:table-row>
              <table:table-cell office:value-type="string">
                <text:p>578</text:p>
              </table:table-cell>
              <table:table-cell office:value-type="float" office:value="0.00115399997084751">
                <text:p>0.00115399997084751</text:p>
              </table:table-cell>
              <table:table-cell office:value-type="float" office:value="-30">
                <text:p>-30</text:p>
              </table:table-cell>
              <table:table-cell office:value-type="float" office:value="-20">
                <text:p>-20</text:p>
              </table:table-cell>
            </table:table-row>
            <table:table-row>
              <table:table-cell office:value-type="string">
                <text:p>579</text:p>
              </table:table-cell>
              <table:table-cell office:value-type="float" office:value="0.00115599997079698">
                <text:p>0.00115599997079698</text:p>
              </table:table-cell>
              <table:table-cell office:value-type="float" office:value="-30.3999996185303">
                <text:p>-30.3999996185303</text:p>
              </table:table-cell>
              <table:table-cell office:value-type="float" office:value="-20">
                <text:p>-20</text:p>
              </table:table-cell>
            </table:table-row>
            <table:table-row>
              <table:table-cell office:value-type="string">
                <text:p>580</text:p>
              </table:table-cell>
              <table:table-cell office:value-type="float" office:value="0.00115799997074646">
                <text:p>0.00115799997074646</text:p>
              </table:table-cell>
              <table:table-cell office:value-type="float" office:value="-30.7999992370605">
                <text:p>-30.7999992370605</text:p>
              </table:table-cell>
              <table:table-cell office:value-type="float" office:value="-20">
                <text:p>-20</text:p>
              </table:table-cell>
            </table:table-row>
            <table:table-row>
              <table:table-cell office:value-type="string">
                <text:p>581</text:p>
              </table:table-cell>
              <table:table-cell office:value-type="float" office:value="0.00115999997069594">
                <text:p>0.00115999997069594</text:p>
              </table:table-cell>
              <table:table-cell office:value-type="float" office:value="-31.2000007629395">
                <text:p>-31.2000007629395</text:p>
              </table:table-cell>
              <table:table-cell office:value-type="float" office:value="-20">
                <text:p>-20</text:p>
              </table:table-cell>
            </table:table-row>
            <table:table-row>
              <table:table-cell office:value-type="string">
                <text:p>582</text:p>
              </table:table-cell>
              <table:table-cell office:value-type="float" office:value="0.00116199997064541">
                <text:p>0.00116199997064541</text:p>
              </table:table-cell>
              <table:table-cell office:value-type="float" office:value="-31.6000003814697">
                <text:p>-31.6000003814697</text:p>
              </table:table-cell>
              <table:table-cell office:value-type="float" office:value="-20">
                <text:p>-20</text:p>
              </table:table-cell>
            </table:table-row>
            <table:table-row>
              <table:table-cell office:value-type="string">
                <text:p>583</text:p>
              </table:table-cell>
              <table:table-cell office:value-type="float" office:value="0.00116399997059489">
                <text:p>0.00116399997059489</text:p>
              </table:table-cell>
              <table:table-cell office:value-type="float" office:value="-32">
                <text:p>-32</text:p>
              </table:table-cell>
              <table:table-cell office:value-type="float" office:value="-20">
                <text:p>-20</text:p>
              </table:table-cell>
            </table:table-row>
            <table:table-row>
              <table:table-cell office:value-type="string">
                <text:p>584</text:p>
              </table:table-cell>
              <table:table-cell office:value-type="float" office:value="0.00116599997054436">
                <text:p>0.00116599997054436</text:p>
              </table:table-cell>
              <table:table-cell office:value-type="float" office:value="-32.2000007629395">
                <text:p>-32.2000007629395</text:p>
              </table:table-cell>
              <table:table-cell office:value-type="float" office:value="-20">
                <text:p>-20</text:p>
              </table:table-cell>
            </table:table-row>
            <table:table-row>
              <table:table-cell office:value-type="string">
                <text:p>585</text:p>
              </table:table-cell>
              <table:table-cell office:value-type="float" office:value="0.00116799997049384">
                <text:p>0.00116799997049384</text:p>
              </table:table-cell>
              <table:table-cell office:value-type="float" office:value="-32.5999984741211">
                <text:p>-32.5999984741211</text:p>
              </table:table-cell>
              <table:table-cell office:value-type="float" office:value="-20">
                <text:p>-20</text:p>
              </table:table-cell>
            </table:table-row>
            <table:table-row>
              <table:table-cell office:value-type="string">
                <text:p>586</text:p>
              </table:table-cell>
              <table:table-cell office:value-type="float" office:value="0.00116999997044331">
                <text:p>0.00116999997044331</text:p>
              </table:table-cell>
              <table:table-cell office:value-type="float" office:value="-32.7999992370606">
                <text:p>-32.7999992370606</text:p>
              </table:table-cell>
              <table:table-cell office:value-type="float" office:value="-20">
                <text:p>-20</text:p>
              </table:table-cell>
            </table:table-row>
            <table:table-row>
              <table:table-cell office:value-type="string">
                <text:p>587</text:p>
              </table:table-cell>
              <table:table-cell office:value-type="float" office:value="0.00117199997039279">
                <text:p>0.00117199997039279</text:p>
              </table:table-cell>
              <table:table-cell office:value-type="float" office:value="-33.5999984741211">
                <text:p>-33.5999984741211</text:p>
              </table:table-cell>
              <table:table-cell office:value-type="float" office:value="-20">
                <text:p>-20</text:p>
              </table:table-cell>
            </table:table-row>
            <table:table-row>
              <table:table-cell office:value-type="string">
                <text:p>588</text:p>
              </table:table-cell>
              <table:table-cell office:value-type="float" office:value="0.00117399997034227">
                <text:p>0.00117399997034227</text:p>
              </table:table-cell>
              <table:table-cell office:value-type="float" office:value="-33.5999984741211">
                <text:p>-33.5999984741211</text:p>
              </table:table-cell>
              <table:table-cell office:value-type="float" office:value="-20">
                <text:p>-20</text:p>
              </table:table-cell>
            </table:table-row>
            <table:table-row>
              <table:table-cell office:value-type="string">
                <text:p>589</text:p>
              </table:table-cell>
              <table:table-cell office:value-type="float" office:value="0.00117599997029174">
                <text:p>0.00117599997029174</text:p>
              </table:table-cell>
              <table:table-cell office:value-type="float" office:value="-34.2000007629395">
                <text:p>-34.2000007629395</text:p>
              </table:table-cell>
              <table:table-cell office:value-type="float" office:value="-20">
                <text:p>-20</text:p>
              </table:table-cell>
            </table:table-row>
            <table:table-row>
              <table:table-cell office:value-type="string">
                <text:p>590</text:p>
              </table:table-cell>
              <table:table-cell office:value-type="float" office:value="0.00117799997024122">
                <text:p>0.00117799997024122</text:p>
              </table:table-cell>
              <table:table-cell office:value-type="float" office:value="-34.4000015258789">
                <text:p>-34.4000015258789</text:p>
              </table:table-cell>
              <table:table-cell office:value-type="float" office:value="-20">
                <text:p>-20</text:p>
              </table:table-cell>
            </table:table-row>
            <table:table-row>
              <table:table-cell office:value-type="string">
                <text:p>591</text:p>
              </table:table-cell>
              <table:table-cell office:value-type="float" office:value="0.00117999997019069">
                <text:p>0.00117999997019069</text:p>
              </table:table-cell>
              <table:table-cell office:value-type="float" office:value="-34.7999992370606">
                <text:p>-34.7999992370606</text:p>
              </table:table-cell>
              <table:table-cell office:value-type="float" office:value="-20">
                <text:p>-20</text:p>
              </table:table-cell>
            </table:table-row>
            <table:table-row>
              <table:table-cell office:value-type="string">
                <text:p>592</text:p>
              </table:table-cell>
              <table:table-cell office:value-type="float" office:value="0.00118199997014017">
                <text:p>0.00118199997014017</text:p>
              </table:table-cell>
              <table:table-cell office:value-type="float" office:value="-35.2000007629395">
                <text:p>-35.2000007629395</text:p>
              </table:table-cell>
              <table:table-cell office:value-type="float" office:value="-20">
                <text:p>-20</text:p>
              </table:table-cell>
            </table:table-row>
            <table:table-row>
              <table:table-cell office:value-type="string">
                <text:p>593</text:p>
              </table:table-cell>
              <table:table-cell office:value-type="float" office:value="0.00118399997008964">
                <text:p>0.00118399997008964</text:p>
              </table:table-cell>
              <table:table-cell office:value-type="float" office:value="-35.4000015258789">
                <text:p>-35.4000015258789</text:p>
              </table:table-cell>
              <table:table-cell office:value-type="float" office:value="-20">
                <text:p>-20</text:p>
              </table:table-cell>
            </table:table-row>
            <table:table-row>
              <table:table-cell office:value-type="string">
                <text:p>594</text:p>
              </table:table-cell>
              <table:table-cell office:value-type="float" office:value="0.00118599997003912">
                <text:p>0.00118599997003912</text:p>
              </table:table-cell>
              <table:table-cell office:value-type="float" office:value="-35.7999992370606">
                <text:p>-35.7999992370606</text:p>
              </table:table-cell>
              <table:table-cell office:value-type="float" office:value="-20">
                <text:p>-20</text:p>
              </table:table-cell>
            </table:table-row>
            <table:table-row>
              <table:table-cell office:value-type="string">
                <text:p>595</text:p>
              </table:table-cell>
              <table:table-cell office:value-type="float" office:value="0.0011879999699886">
                <text:p>0.0011879999699886</text:p>
              </table:table-cell>
              <table:table-cell office:value-type="float" office:value="-36.4000015258789">
                <text:p>-36.4000015258789</text:p>
              </table:table-cell>
              <table:table-cell office:value-type="float" office:value="-20">
                <text:p>-20</text:p>
              </table:table-cell>
            </table:table-row>
            <table:table-row>
              <table:table-cell office:value-type="string">
                <text:p>596</text:p>
              </table:table-cell>
              <table:table-cell office:value-type="float" office:value="0.00118999996993807">
                <text:p>0.00118999996993807</text:p>
              </table:table-cell>
              <table:table-cell office:value-type="float" office:value="-36.5999984741211">
                <text:p>-36.5999984741211</text:p>
              </table:table-cell>
              <table:table-cell office:value-type="float" office:value="-20">
                <text:p>-20</text:p>
              </table:table-cell>
            </table:table-row>
            <table:table-row>
              <table:table-cell office:value-type="string">
                <text:p>597</text:p>
              </table:table-cell>
              <table:table-cell office:value-type="float" office:value="0.00119199996988755">
                <text:p>0.00119199996988755</text:p>
              </table:table-cell>
              <table:table-cell office:value-type="float" office:value="-37">
                <text:p>-37</text:p>
              </table:table-cell>
              <table:table-cell office:value-type="float" office:value="-20">
                <text:p>-20</text:p>
              </table:table-cell>
            </table:table-row>
            <table:table-row>
              <table:table-cell office:value-type="string">
                <text:p>598</text:p>
              </table:table-cell>
              <table:table-cell office:value-type="float" office:value="0.00119399996983702">
                <text:p>0.00119399996983702</text:p>
              </table:table-cell>
              <table:table-cell office:value-type="float" office:value="-37">
                <text:p>-37</text:p>
              </table:table-cell>
              <table:table-cell office:value-type="float" office:value="-20">
                <text:p>-20</text:p>
              </table:table-cell>
            </table:table-row>
            <table:table-row>
              <table:table-cell office:value-type="string">
                <text:p>599</text:p>
              </table:table-cell>
              <table:table-cell office:value-type="float" office:value="0.0011959999697865">
                <text:p>0.0011959999697865</text:p>
              </table:table-cell>
              <table:table-cell office:value-type="float" office:value="-37.7999992370606">
                <text:p>-37.7999992370606</text:p>
              </table:table-cell>
              <table:table-cell office:value-type="float" office:value="-20">
                <text:p>-20</text:p>
              </table:table-cell>
            </table:table-row>
            <table:table-row>
              <table:table-cell office:value-type="string">
                <text:p>600</text:p>
              </table:table-cell>
              <table:table-cell office:value-type="float" office:value="0.00119799996973597">
                <text:p>0.00119799996973597</text:p>
              </table:table-cell>
              <table:table-cell office:value-type="float" office:value="-38.2000007629395">
                <text:p>-38.2000007629395</text:p>
              </table:table-cell>
              <table:table-cell office:value-type="float" office:value="-20">
                <text:p>-20</text:p>
              </table:table-cell>
            </table:table-row>
            <table:table-row>
              <table:table-cell office:value-type="string">
                <text:p>601</text:p>
              </table:table-cell>
              <table:table-cell office:value-type="float" office:value="0.00119999996968545">
                <text:p>0.00119999996968545</text:p>
              </table:table-cell>
              <table:table-cell office:value-type="float" office:value="-38.4000015258789">
                <text:p>-38.4000015258789</text:p>
              </table:table-cell>
              <table:table-cell office:value-type="float" office:value="-20">
                <text:p>-20</text:p>
              </table:table-cell>
            </table:table-row>
            <table:table-row>
              <table:table-cell office:value-type="string">
                <text:p>602</text:p>
              </table:table-cell>
              <table:table-cell office:value-type="float" office:value="0.00120199996963493">
                <text:p>0.00120199996963493</text:p>
              </table:table-cell>
              <table:table-cell office:value-type="float" office:value="-38.7999992370606">
                <text:p>-38.7999992370606</text:p>
              </table:table-cell>
              <table:table-cell office:value-type="float" office:value="-20">
                <text:p>-20</text:p>
              </table:table-cell>
            </table:table-row>
            <table:table-row>
              <table:table-cell office:value-type="string">
                <text:p>603</text:p>
              </table:table-cell>
              <table:table-cell office:value-type="float" office:value="0.0012039999695844">
                <text:p>0.0012039999695844</text:p>
              </table:table-cell>
              <table:table-cell office:value-type="float" office:value="-39">
                <text:p>-39</text:p>
              </table:table-cell>
              <table:table-cell office:value-type="float" office:value="-20">
                <text:p>-20</text:p>
              </table:table-cell>
            </table:table-row>
            <table:table-row>
              <table:table-cell office:value-type="string">
                <text:p>604</text:p>
              </table:table-cell>
              <table:table-cell office:value-type="float" office:value="0.00120599996953388">
                <text:p>0.00120599996953388</text:p>
              </table:table-cell>
              <table:table-cell office:value-type="float" office:value="-39.4000015258789">
                <text:p>-39.4000015258789</text:p>
              </table:table-cell>
              <table:table-cell office:value-type="float" office:value="-20">
                <text:p>-20</text:p>
              </table:table-cell>
            </table:table-row>
            <table:table-row>
              <table:table-cell office:value-type="string">
                <text:p>605</text:p>
              </table:table-cell>
              <table:table-cell office:value-type="float" office:value="0.00120799996948335">
                <text:p>0.00120799996948335</text:p>
              </table:table-cell>
              <table:table-cell office:value-type="float" office:value="-39.5999984741211">
                <text:p>-39.5999984741211</text:p>
              </table:table-cell>
              <table:table-cell office:value-type="float" office:value="-20">
                <text:p>-20</text:p>
              </table:table-cell>
            </table:table-row>
            <table:table-row>
              <table:table-cell office:value-type="string">
                <text:p>606</text:p>
              </table:table-cell>
              <table:table-cell office:value-type="float" office:value="0.00120999996943283">
                <text:p>0.00120999996943283</text:p>
              </table:table-cell>
              <table:table-cell office:value-type="float" office:value="-39.7999992370606">
                <text:p>-39.7999992370606</text:p>
              </table:table-cell>
              <table:table-cell office:value-type="float" office:value="-20">
                <text:p>-20</text:p>
              </table:table-cell>
            </table:table-row>
            <table:table-row>
              <table:table-cell office:value-type="string">
                <text:p>607</text:p>
              </table:table-cell>
              <table:table-cell office:value-type="float" office:value="0.0012119999693823">
                <text:p>0.0012119999693823</text:p>
              </table:table-cell>
              <table:table-cell office:value-type="float" office:value="-40">
                <text:p>-40</text:p>
              </table:table-cell>
              <table:table-cell office:value-type="float" office:value="-20">
                <text:p>-20</text:p>
              </table:table-cell>
            </table:table-row>
            <table:table-row>
              <table:table-cell office:value-type="string">
                <text:p>608</text:p>
              </table:table-cell>
              <table:table-cell office:value-type="float" office:value="0.00121399996933178">
                <text:p>0.00121399996933178</text:p>
              </table:table-cell>
              <table:table-cell office:value-type="float" office:value="-40">
                <text:p>-40</text:p>
              </table:table-cell>
              <table:table-cell office:value-type="float" office:value="-20">
                <text:p>-20</text:p>
              </table:table-cell>
            </table:table-row>
            <table:table-row>
              <table:table-cell office:value-type="string">
                <text:p>609</text:p>
              </table:table-cell>
              <table:table-cell office:value-type="float" office:value="0.00121599996928126">
                <text:p>0.00121599996928126</text:p>
              </table:table-cell>
              <table:table-cell office:value-type="float" office:value="-40">
                <text:p>-40</text:p>
              </table:table-cell>
              <table:table-cell office:value-type="float" office:value="-20">
                <text:p>-20</text:p>
              </table:table-cell>
            </table:table-row>
            <table:table-row>
              <table:table-cell office:value-type="string">
                <text:p>610</text:p>
              </table:table-cell>
              <table:table-cell office:value-type="float" office:value="0.00121799996923073">
                <text:p>0.00121799996923073</text:p>
              </table:table-cell>
              <table:table-cell office:value-type="float" office:value="-40">
                <text:p>-40</text:p>
              </table:table-cell>
              <table:table-cell office:value-type="float" office:value="-20">
                <text:p>-20</text:p>
              </table:table-cell>
            </table:table-row>
            <table:table-row>
              <table:table-cell office:value-type="string">
                <text:p>611</text:p>
              </table:table-cell>
              <table:table-cell office:value-type="float" office:value="0.00121999996918021">
                <text:p>0.00121999996918021</text:p>
              </table:table-cell>
              <table:table-cell office:value-type="float" office:value="-40">
                <text:p>-40</text:p>
              </table:table-cell>
              <table:table-cell office:value-type="float" office:value="-20">
                <text:p>-20</text:p>
              </table:table-cell>
            </table:table-row>
            <table:table-row>
              <table:table-cell office:value-type="string">
                <text:p>612</text:p>
              </table:table-cell>
              <table:table-cell office:value-type="float" office:value="0.00122199996912968">
                <text:p>0.00122199996912968</text:p>
              </table:table-cell>
              <table:table-cell office:value-type="float" office:value="-40">
                <text:p>-40</text:p>
              </table:table-cell>
              <table:table-cell office:value-type="float" office:value="-20">
                <text:p>-20</text:p>
              </table:table-cell>
            </table:table-row>
            <table:table-row>
              <table:table-cell office:value-type="string">
                <text:p>613</text:p>
              </table:table-cell>
              <table:table-cell office:value-type="float" office:value="0.00122399996907916">
                <text:p>0.00122399996907916</text:p>
              </table:table-cell>
              <table:table-cell office:value-type="float" office:value="-40">
                <text:p>-40</text:p>
              </table:table-cell>
              <table:table-cell office:value-type="float" office:value="-20">
                <text:p>-20</text:p>
              </table:table-cell>
            </table:table-row>
            <table:table-row>
              <table:table-cell office:value-type="string">
                <text:p>614</text:p>
              </table:table-cell>
              <table:table-cell office:value-type="float" office:value="0.00122599996902863">
                <text:p>0.00122599996902863</text:p>
              </table:table-cell>
              <table:table-cell office:value-type="float" office:value="-40">
                <text:p>-40</text:p>
              </table:table-cell>
              <table:table-cell office:value-type="float" office:value="-20">
                <text:p>-20</text:p>
              </table:table-cell>
            </table:table-row>
            <table:table-row>
              <table:table-cell office:value-type="string">
                <text:p>615</text:p>
              </table:table-cell>
              <table:table-cell office:value-type="float" office:value="0.00122799996897811">
                <text:p>0.00122799996897811</text:p>
              </table:table-cell>
              <table:table-cell office:value-type="float" office:value="-40">
                <text:p>-40</text:p>
              </table:table-cell>
              <table:table-cell office:value-type="float" office:value="-20">
                <text:p>-20</text:p>
              </table:table-cell>
            </table:table-row>
            <table:table-row>
              <table:table-cell office:value-type="string">
                <text:p>616</text:p>
              </table:table-cell>
              <table:table-cell office:value-type="float" office:value="0.00122999996892759">
                <text:p>0.00122999996892759</text:p>
              </table:table-cell>
              <table:table-cell office:value-type="float" office:value="-40">
                <text:p>-40</text:p>
              </table:table-cell>
              <table:table-cell office:value-type="float" office:value="-20">
                <text:p>-20</text:p>
              </table:table-cell>
            </table:table-row>
            <table:table-row>
              <table:table-cell office:value-type="string">
                <text:p>617</text:p>
              </table:table-cell>
              <table:table-cell office:value-type="float" office:value="0.00123199996887706">
                <text:p>0.00123199996887706</text:p>
              </table:table-cell>
              <table:table-cell office:value-type="float" office:value="-40">
                <text:p>-40</text:p>
              </table:table-cell>
              <table:table-cell office:value-type="float" office:value="-20">
                <text:p>-20</text:p>
              </table:table-cell>
            </table:table-row>
            <table:table-row>
              <table:table-cell office:value-type="string">
                <text:p>618</text:p>
              </table:table-cell>
              <table:table-cell office:value-type="float" office:value="0.00123399996882654">
                <text:p>0.00123399996882654</text:p>
              </table:table-cell>
              <table:table-cell office:value-type="float" office:value="-40">
                <text:p>-40</text:p>
              </table:table-cell>
              <table:table-cell office:value-type="float" office:value="-20">
                <text:p>-20</text:p>
              </table:table-cell>
            </table:table-row>
            <table:table-row>
              <table:table-cell office:value-type="string">
                <text:p>619</text:p>
              </table:table-cell>
              <table:table-cell office:value-type="float" office:value="0.00123599996877601">
                <text:p>0.00123599996877601</text:p>
              </table:table-cell>
              <table:table-cell office:value-type="float" office:value="-40">
                <text:p>-40</text:p>
              </table:table-cell>
              <table:table-cell office:value-type="float" office:value="-20">
                <text:p>-20</text:p>
              </table:table-cell>
            </table:table-row>
            <table:table-row>
              <table:table-cell office:value-type="string">
                <text:p>620</text:p>
              </table:table-cell>
              <table:table-cell office:value-type="float" office:value="0.00123799996872549">
                <text:p>0.00123799996872549</text:p>
              </table:table-cell>
              <table:table-cell office:value-type="float" office:value="-40">
                <text:p>-40</text:p>
              </table:table-cell>
              <table:table-cell office:value-type="float" office:value="-20">
                <text:p>-20</text:p>
              </table:table-cell>
            </table:table-row>
            <table:table-row>
              <table:table-cell office:value-type="string">
                <text:p>621</text:p>
              </table:table-cell>
              <table:table-cell office:value-type="float" office:value="0.00123999996867497">
                <text:p>0.00123999996867497</text:p>
              </table:table-cell>
              <table:table-cell office:value-type="float" office:value="-40">
                <text:p>-40</text:p>
              </table:table-cell>
              <table:table-cell office:value-type="float" office:value="-20">
                <text:p>-20</text:p>
              </table:table-cell>
            </table:table-row>
            <table:table-row>
              <table:table-cell office:value-type="string">
                <text:p>622</text:p>
              </table:table-cell>
              <table:table-cell office:value-type="float" office:value="0.00124199996862444">
                <text:p>0.00124199996862444</text:p>
              </table:table-cell>
              <table:table-cell office:value-type="float" office:value="-40">
                <text:p>-40</text:p>
              </table:table-cell>
              <table:table-cell office:value-type="float" office:value="-20">
                <text:p>-20</text:p>
              </table:table-cell>
            </table:table-row>
            <table:table-row>
              <table:table-cell office:value-type="string">
                <text:p>623</text:p>
              </table:table-cell>
              <table:table-cell office:value-type="float" office:value="0.00124399996857392">
                <text:p>0.00124399996857392</text:p>
              </table:table-cell>
              <table:table-cell office:value-type="float" office:value="-40">
                <text:p>-40</text:p>
              </table:table-cell>
              <table:table-cell office:value-type="float" office:value="-20">
                <text:p>-20</text:p>
              </table:table-cell>
            </table:table-row>
            <table:table-row>
              <table:table-cell office:value-type="string">
                <text:p>624</text:p>
              </table:table-cell>
              <table:table-cell office:value-type="float" office:value="0.00124599996852339">
                <text:p>0.00124599996852339</text:p>
              </table:table-cell>
              <table:table-cell office:value-type="float" office:value="-40">
                <text:p>-40</text:p>
              </table:table-cell>
              <table:table-cell office:value-type="float" office:value="-20">
                <text:p>-20</text:p>
              </table:table-cell>
            </table:table-row>
            <table:table-row>
              <table:table-cell office:value-type="string">
                <text:p>625</text:p>
              </table:table-cell>
              <table:table-cell office:value-type="float" office:value="0.00124799996847287">
                <text:p>0.00124799996847287</text:p>
              </table:table-cell>
              <table:table-cell office:value-type="float" office:value="-40">
                <text:p>-40</text:p>
              </table:table-cell>
              <table:table-cell office:value-type="float" office:value="-20">
                <text:p>-20</text:p>
              </table:table-cell>
            </table:table-row>
            <table:table-row>
              <table:table-cell office:value-type="string">
                <text:p>626</text:p>
              </table:table-cell>
              <table:table-cell office:value-type="float" office:value="0.00124999996842234">
                <text:p>0.00124999996842234</text:p>
              </table:table-cell>
              <table:table-cell office:value-type="float" office:value="-40">
                <text:p>-40</text:p>
              </table:table-cell>
              <table:table-cell office:value-type="float" office:value="-20">
                <text:p>-20</text:p>
              </table:table-cell>
            </table:table-row>
            <table:table-row>
              <table:table-cell office:value-type="string">
                <text:p>627</text:p>
              </table:table-cell>
              <table:table-cell office:value-type="float" office:value="0.00125199996837182">
                <text:p>0.00125199996837182</text:p>
              </table:table-cell>
              <table:table-cell office:value-type="float" office:value="-40">
                <text:p>-40</text:p>
              </table:table-cell>
              <table:table-cell office:value-type="float" office:value="-20">
                <text:p>-20</text:p>
              </table:table-cell>
            </table:table-row>
            <table:table-row>
              <table:table-cell office:value-type="string">
                <text:p>628</text:p>
              </table:table-cell>
              <table:table-cell office:value-type="float" office:value="0.0012539999683213">
                <text:p>0.0012539999683213</text:p>
              </table:table-cell>
              <table:table-cell office:value-type="float" office:value="-40">
                <text:p>-40</text:p>
              </table:table-cell>
              <table:table-cell office:value-type="float" office:value="-20">
                <text:p>-20</text:p>
              </table:table-cell>
            </table:table-row>
            <table:table-row>
              <table:table-cell office:value-type="string">
                <text:p>629</text:p>
              </table:table-cell>
              <table:table-cell office:value-type="float" office:value="0.00125599996827077">
                <text:p>0.00125599996827077</text:p>
              </table:table-cell>
              <table:table-cell office:value-type="float" office:value="-40">
                <text:p>-40</text:p>
              </table:table-cell>
              <table:table-cell office:value-type="float" office:value="-20">
                <text:p>-20</text:p>
              </table:table-cell>
            </table:table-row>
            <table:table-row>
              <table:table-cell office:value-type="string">
                <text:p>630</text:p>
              </table:table-cell>
              <table:table-cell office:value-type="float" office:value="0.00125799996822025">
                <text:p>0.00125799996822025</text:p>
              </table:table-cell>
              <table:table-cell office:value-type="float" office:value="-40">
                <text:p>-40</text:p>
              </table:table-cell>
              <table:table-cell office:value-type="float" office:value="-20">
                <text:p>-20</text:p>
              </table:table-cell>
            </table:table-row>
            <table:table-row>
              <table:table-cell office:value-type="string">
                <text:p>631</text:p>
              </table:table-cell>
              <table:table-cell office:value-type="float" office:value="0.00125999996816972">
                <text:p>0.00125999996816972</text:p>
              </table:table-cell>
              <table:table-cell office:value-type="float" office:value="-40">
                <text:p>-40</text:p>
              </table:table-cell>
              <table:table-cell office:value-type="float" office:value="-20">
                <text:p>-20</text:p>
              </table:table-cell>
            </table:table-row>
            <table:table-row>
              <table:table-cell office:value-type="string">
                <text:p>632</text:p>
              </table:table-cell>
              <table:table-cell office:value-type="float" office:value="0.0012619999681192">
                <text:p>0.0012619999681192</text:p>
              </table:table-cell>
              <table:table-cell office:value-type="float" office:value="-40">
                <text:p>-40</text:p>
              </table:table-cell>
              <table:table-cell office:value-type="float" office:value="-20">
                <text:p>-20</text:p>
              </table:table-cell>
            </table:table-row>
            <table:table-row>
              <table:table-cell office:value-type="string">
                <text:p>633</text:p>
              </table:table-cell>
              <table:table-cell office:value-type="float" office:value="0.00126399996806867">
                <text:p>0.00126399996806867</text:p>
              </table:table-cell>
              <table:table-cell office:value-type="float" office:value="-40">
                <text:p>-40</text:p>
              </table:table-cell>
              <table:table-cell office:value-type="float" office:value="-20">
                <text:p>-20</text:p>
              </table:table-cell>
            </table:table-row>
            <table:table-row>
              <table:table-cell office:value-type="string">
                <text:p>634</text:p>
              </table:table-cell>
              <table:table-cell office:value-type="float" office:value="0.00126599996801815">
                <text:p>0.00126599996801815</text:p>
              </table:table-cell>
              <table:table-cell office:value-type="float" office:value="-40">
                <text:p>-40</text:p>
              </table:table-cell>
              <table:table-cell office:value-type="float" office:value="-20">
                <text:p>-20</text:p>
              </table:table-cell>
            </table:table-row>
            <table:table-row>
              <table:table-cell office:value-type="string">
                <text:p>635</text:p>
              </table:table-cell>
              <table:table-cell office:value-type="float" office:value="0.00126799996796763">
                <text:p>0.00126799996796763</text:p>
              </table:table-cell>
              <table:table-cell office:value-type="float" office:value="-40">
                <text:p>-40</text:p>
              </table:table-cell>
              <table:table-cell office:value-type="float" office:value="-20">
                <text:p>-20</text:p>
              </table:table-cell>
            </table:table-row>
            <table:table-row>
              <table:table-cell office:value-type="string">
                <text:p>636</text:p>
              </table:table-cell>
              <table:table-cell office:value-type="float" office:value="0.0012699999679171">
                <text:p>0.0012699999679171</text:p>
              </table:table-cell>
              <table:table-cell office:value-type="float" office:value="-40">
                <text:p>-40</text:p>
              </table:table-cell>
              <table:table-cell office:value-type="float" office:value="-20">
                <text:p>-20</text:p>
              </table:table-cell>
            </table:table-row>
            <table:table-row>
              <table:table-cell office:value-type="string">
                <text:p>637</text:p>
              </table:table-cell>
              <table:table-cell office:value-type="float" office:value="0.00127199996786658">
                <text:p>0.00127199996786658</text:p>
              </table:table-cell>
              <table:table-cell office:value-type="float" office:value="-40">
                <text:p>-40</text:p>
              </table:table-cell>
              <table:table-cell office:value-type="float" office:value="-20">
                <text:p>-20</text:p>
              </table:table-cell>
            </table:table-row>
            <table:table-row>
              <table:table-cell office:value-type="string">
                <text:p>638</text:p>
              </table:table-cell>
              <table:table-cell office:value-type="float" office:value="0.00127399996781605">
                <text:p>0.00127399996781605</text:p>
              </table:table-cell>
              <table:table-cell office:value-type="float" office:value="-40">
                <text:p>-40</text:p>
              </table:table-cell>
              <table:table-cell office:value-type="float" office:value="-20">
                <text:p>-20</text:p>
              </table:table-cell>
            </table:table-row>
            <table:table-row>
              <table:table-cell office:value-type="string">
                <text:p>639</text:p>
              </table:table-cell>
              <table:table-cell office:value-type="float" office:value="0.00127599996776553">
                <text:p>0.00127599996776553</text:p>
              </table:table-cell>
              <table:table-cell office:value-type="float" office:value="-40">
                <text:p>-40</text:p>
              </table:table-cell>
              <table:table-cell office:value-type="float" office:value="-20">
                <text:p>-20</text:p>
              </table:table-cell>
            </table:table-row>
            <table:table-row>
              <table:table-cell office:value-type="string">
                <text:p>640</text:p>
              </table:table-cell>
              <table:table-cell office:value-type="float" office:value="0.001277999967715">
                <text:p>0.001277999967715</text:p>
              </table:table-cell>
              <table:table-cell office:value-type="float" office:value="-40">
                <text:p>-40</text:p>
              </table:table-cell>
              <table:table-cell office:value-type="float" office:value="-20">
                <text:p>-20</text:p>
              </table:table-cell>
            </table:table-row>
            <table:table-row>
              <table:table-cell office:value-type="string">
                <text:p>641</text:p>
              </table:table-cell>
              <table:table-cell office:value-type="float" office:value="0.00127999996766448">
                <text:p>0.00127999996766448</text:p>
              </table:table-cell>
              <table:table-cell office:value-type="float" office:value="-39.7999992370606">
                <text:p>-39.7999992370606</text:p>
              </table:table-cell>
              <table:table-cell office:value-type="float" office:value="-20">
                <text:p>-20</text:p>
              </table:table-cell>
            </table:table-row>
            <table:table-row>
              <table:table-cell office:value-type="string">
                <text:p>642</text:p>
              </table:table-cell>
              <table:table-cell office:value-type="float" office:value="0.00128199996761396">
                <text:p>0.00128199996761396</text:p>
              </table:table-cell>
              <table:table-cell office:value-type="float" office:value="-39.4000015258789">
                <text:p>-39.4000015258789</text:p>
              </table:table-cell>
              <table:table-cell office:value-type="float" office:value="-20">
                <text:p>-20</text:p>
              </table:table-cell>
            </table:table-row>
            <table:table-row>
              <table:table-cell office:value-type="string">
                <text:p>643</text:p>
              </table:table-cell>
              <table:table-cell office:value-type="float" office:value="0.00128399996756343">
                <text:p>0.00128399996756343</text:p>
              </table:table-cell>
              <table:table-cell office:value-type="float" office:value="-39.2000007629395">
                <text:p>-39.2000007629395</text:p>
              </table:table-cell>
              <table:table-cell office:value-type="float" office:value="-20">
                <text:p>-20</text:p>
              </table:table-cell>
            </table:table-row>
            <table:table-row>
              <table:table-cell office:value-type="string">
                <text:p>644</text:p>
              </table:table-cell>
              <table:table-cell office:value-type="float" office:value="0.00128599996751291">
                <text:p>0.00128599996751291</text:p>
              </table:table-cell>
              <table:table-cell office:value-type="float" office:value="-38.7999992370606">
                <text:p>-38.7999992370606</text:p>
              </table:table-cell>
              <table:table-cell office:value-type="float" office:value="-20">
                <text:p>-20</text:p>
              </table:table-cell>
            </table:table-row>
            <table:table-row>
              <table:table-cell office:value-type="string">
                <text:p>645</text:p>
              </table:table-cell>
              <table:table-cell office:value-type="float" office:value="0.00128799996746238">
                <text:p>0.00128799996746238</text:p>
              </table:table-cell>
              <table:table-cell office:value-type="float" office:value="-38.5999984741211">
                <text:p>-38.5999984741211</text:p>
              </table:table-cell>
              <table:table-cell office:value-type="float" office:value="-20">
                <text:p>-20</text:p>
              </table:table-cell>
            </table:table-row>
            <table:table-row>
              <table:table-cell office:value-type="string">
                <text:p>646</text:p>
              </table:table-cell>
              <table:table-cell office:value-type="float" office:value="0.00128999996741186">
                <text:p>0.00128999996741186</text:p>
              </table:table-cell>
              <table:table-cell office:value-type="float" office:value="-38.2000007629395">
                <text:p>-38.2000007629395</text:p>
              </table:table-cell>
              <table:table-cell office:value-type="float" office:value="-20">
                <text:p>-20</text:p>
              </table:table-cell>
            </table:table-row>
            <table:table-row>
              <table:table-cell office:value-type="string">
                <text:p>647</text:p>
              </table:table-cell>
              <table:table-cell office:value-type="float" office:value="0.00129199996736133">
                <text:p>0.00129199996736133</text:p>
              </table:table-cell>
              <table:table-cell office:value-type="float" office:value="-37.7999992370606">
                <text:p>-37.7999992370606</text:p>
              </table:table-cell>
              <table:table-cell office:value-type="float" office:value="-20">
                <text:p>-20</text:p>
              </table:table-cell>
            </table:table-row>
            <table:table-row>
              <table:table-cell office:value-type="string">
                <text:p>648</text:p>
              </table:table-cell>
              <table:table-cell office:value-type="float" office:value="0.00129399996731081">
                <text:p>0.00129399996731081</text:p>
              </table:table-cell>
              <table:table-cell office:value-type="float" office:value="-37.4000015258789">
                <text:p>-37.4000015258789</text:p>
              </table:table-cell>
              <table:table-cell office:value-type="float" office:value="-20">
                <text:p>-20</text:p>
              </table:table-cell>
            </table:table-row>
            <table:table-row>
              <table:table-cell office:value-type="string">
                <text:p>649</text:p>
              </table:table-cell>
              <table:table-cell office:value-type="float" office:value="0.00129599996726029">
                <text:p>0.00129599996726029</text:p>
              </table:table-cell>
              <table:table-cell office:value-type="float" office:value="-37">
                <text:p>-37</text:p>
              </table:table-cell>
              <table:table-cell office:value-type="float" office:value="-20">
                <text:p>-20</text:p>
              </table:table-cell>
            </table:table-row>
            <table:table-row>
              <table:table-cell office:value-type="string">
                <text:p>650</text:p>
              </table:table-cell>
              <table:table-cell office:value-type="float" office:value="0.00129799996720976">
                <text:p>0.00129799996720976</text:p>
              </table:table-cell>
              <table:table-cell office:value-type="float" office:value="-36.7999992370606">
                <text:p>-36.7999992370606</text:p>
              </table:table-cell>
              <table:table-cell office:value-type="float" office:value="-20">
                <text:p>-20</text:p>
              </table:table-cell>
            </table:table-row>
            <table:table-row>
              <table:table-cell office:value-type="string">
                <text:p>651</text:p>
              </table:table-cell>
              <table:table-cell office:value-type="float" office:value="0.00129999996715924">
                <text:p>0.00129999996715924</text:p>
              </table:table-cell>
              <table:table-cell office:value-type="float" office:value="-36.4000015258789">
                <text:p>-36.4000015258789</text:p>
              </table:table-cell>
              <table:table-cell office:value-type="float" office:value="-20">
                <text:p>-20</text:p>
              </table:table-cell>
            </table:table-row>
            <table:table-row>
              <table:table-cell office:value-type="string">
                <text:p>652</text:p>
              </table:table-cell>
              <table:table-cell office:value-type="float" office:value="0.00130199996710871">
                <text:p>0.00130199996710871</text:p>
              </table:table-cell>
              <table:table-cell office:value-type="float" office:value="-36">
                <text:p>-36</text:p>
              </table:table-cell>
              <table:table-cell office:value-type="float" office:value="-20">
                <text:p>-20</text:p>
              </table:table-cell>
            </table:table-row>
            <table:table-row>
              <table:table-cell office:value-type="string">
                <text:p>653</text:p>
              </table:table-cell>
              <table:table-cell office:value-type="float" office:value="0.00130399996705819">
                <text:p>0.00130399996705819</text:p>
              </table:table-cell>
              <table:table-cell office:value-type="float" office:value="-35.5999984741211">
                <text:p>-35.5999984741211</text:p>
              </table:table-cell>
              <table:table-cell office:value-type="float" office:value="-20">
                <text:p>-20</text:p>
              </table:table-cell>
            </table:table-row>
            <table:table-row>
              <table:table-cell office:value-type="string">
                <text:p>654</text:p>
              </table:table-cell>
              <table:table-cell office:value-type="float" office:value="0.00130599996700766">
                <text:p>0.00130599996700766</text:p>
              </table:table-cell>
              <table:table-cell office:value-type="float" office:value="-35.2000007629395">
                <text:p>-35.2000007629395</text:p>
              </table:table-cell>
              <table:table-cell office:value-type="float" office:value="-20">
                <text:p>-20</text:p>
              </table:table-cell>
            </table:table-row>
            <table:table-row>
              <table:table-cell office:value-type="string">
                <text:p>655</text:p>
              </table:table-cell>
              <table:table-cell office:value-type="float" office:value="0.00130799996695714">
                <text:p>0.00130799996695714</text:p>
              </table:table-cell>
              <table:table-cell office:value-type="float" office:value="-34.7999992370606">
                <text:p>-34.7999992370606</text:p>
              </table:table-cell>
              <table:table-cell office:value-type="float" office:value="-20">
                <text:p>-20</text:p>
              </table:table-cell>
            </table:table-row>
            <table:table-row>
              <table:table-cell office:value-type="string">
                <text:p>656</text:p>
              </table:table-cell>
              <table:table-cell office:value-type="float" office:value="0.00130999996690662">
                <text:p>0.00130999996690662</text:p>
              </table:table-cell>
              <table:table-cell office:value-type="float" office:value="-34.4000015258789">
                <text:p>-34.4000015258789</text:p>
              </table:table-cell>
              <table:table-cell office:value-type="float" office:value="-20">
                <text:p>-20</text:p>
              </table:table-cell>
            </table:table-row>
            <table:table-row>
              <table:table-cell office:value-type="string">
                <text:p>657</text:p>
              </table:table-cell>
              <table:table-cell office:value-type="float" office:value="0.00131199996685609">
                <text:p>0.00131199996685609</text:p>
              </table:table-cell>
              <table:table-cell office:value-type="float" office:value="-34.4000015258789">
                <text:p>-34.4000015258789</text:p>
              </table:table-cell>
              <table:table-cell office:value-type="float" office:value="-20">
                <text:p>-20</text:p>
              </table:table-cell>
            </table:table-row>
            <table:table-row>
              <table:table-cell office:value-type="string">
                <text:p>658</text:p>
              </table:table-cell>
              <table:table-cell office:value-type="float" office:value="0.00131399996680557">
                <text:p>0.00131399996680557</text:p>
              </table:table-cell>
              <table:table-cell office:value-type="float" office:value="-33.7999992370606">
                <text:p>-33.7999992370606</text:p>
              </table:table-cell>
              <table:table-cell office:value-type="float" office:value="-20">
                <text:p>-20</text:p>
              </table:table-cell>
            </table:table-row>
            <table:table-row>
              <table:table-cell office:value-type="string">
                <text:p>659</text:p>
              </table:table-cell>
              <table:table-cell office:value-type="float" office:value="0.00131599996675504">
                <text:p>0.00131599996675504</text:p>
              </table:table-cell>
              <table:table-cell office:value-type="float" office:value="-33.4000015258789">
                <text:p>-33.4000015258789</text:p>
              </table:table-cell>
              <table:table-cell office:value-type="float" office:value="-20">
                <text:p>-20</text:p>
              </table:table-cell>
            </table:table-row>
            <table:table-row>
              <table:table-cell office:value-type="string">
                <text:p>660</text:p>
              </table:table-cell>
              <table:table-cell office:value-type="float" office:value="0.00131799996670452">
                <text:p>0.00131799996670452</text:p>
              </table:table-cell>
              <table:table-cell office:value-type="float" office:value="-33.2000007629395">
                <text:p>-33.2000007629395</text:p>
              </table:table-cell>
              <table:table-cell office:value-type="float" office:value="-20">
                <text:p>-20</text:p>
              </table:table-cell>
            </table:table-row>
            <table:table-row>
              <table:table-cell office:value-type="string">
                <text:p>661</text:p>
              </table:table-cell>
              <table:table-cell office:value-type="float" office:value="0.001319999966654">
                <text:p>0.001319999966654</text:p>
              </table:table-cell>
              <table:table-cell office:value-type="float" office:value="-32.5999984741211">
                <text:p>-32.5999984741211</text:p>
              </table:table-cell>
              <table:table-cell office:value-type="float" office:value="-20">
                <text:p>-20</text:p>
              </table:table-cell>
            </table:table-row>
            <table:table-row>
              <table:table-cell office:value-type="string">
                <text:p>662</text:p>
              </table:table-cell>
              <table:table-cell office:value-type="float" office:value="0.00132199996660347">
                <text:p>0.00132199996660347</text:p>
              </table:table-cell>
              <table:table-cell office:value-type="float" office:value="-32.2000007629395">
                <text:p>-32.2000007629395</text:p>
              </table:table-cell>
              <table:table-cell office:value-type="float" office:value="-20">
                <text:p>-20</text:p>
              </table:table-cell>
            </table:table-row>
            <table:table-row>
              <table:table-cell office:value-type="string">
                <text:p>663</text:p>
              </table:table-cell>
              <table:table-cell office:value-type="float" office:value="0.00132399996655295">
                <text:p>0.00132399996655295</text:p>
              </table:table-cell>
              <table:table-cell office:value-type="float" office:value="-32.2000007629395">
                <text:p>-32.2000007629395</text:p>
              </table:table-cell>
              <table:table-cell office:value-type="float" office:value="-20">
                <text:p>-20</text:p>
              </table:table-cell>
            </table:table-row>
            <table:table-row>
              <table:table-cell office:value-type="string">
                <text:p>664</text:p>
              </table:table-cell>
              <table:table-cell office:value-type="float" office:value="0.00132599996650242">
                <text:p>0.00132599996650242</text:p>
              </table:table-cell>
              <table:table-cell office:value-type="float" office:value="-31.6000003814697">
                <text:p>-31.6000003814697</text:p>
              </table:table-cell>
              <table:table-cell office:value-type="float" office:value="-20">
                <text:p>-20</text:p>
              </table:table-cell>
            </table:table-row>
            <table:table-row>
              <table:table-cell office:value-type="string">
                <text:p>665</text:p>
              </table:table-cell>
              <table:table-cell office:value-type="float" office:value="0.0013279999664519">
                <text:p>0.0013279999664519</text:p>
              </table:table-cell>
              <table:table-cell office:value-type="float" office:value="-31.3999996185303">
                <text:p>-31.3999996185303</text:p>
              </table:table-cell>
              <table:table-cell office:value-type="float" office:value="-20">
                <text:p>-20</text:p>
              </table:table-cell>
            </table:table-row>
            <table:table-row>
              <table:table-cell office:value-type="string">
                <text:p>666</text:p>
              </table:table-cell>
              <table:table-cell office:value-type="float" office:value="0.00132999996640137">
                <text:p>0.00132999996640137</text:p>
              </table:table-cell>
              <table:table-cell office:value-type="float" office:value="-31">
                <text:p>-31</text:p>
              </table:table-cell>
              <table:table-cell office:value-type="float" office:value="-20">
                <text:p>-20</text:p>
              </table:table-cell>
            </table:table-row>
            <table:table-row>
              <table:table-cell office:value-type="string">
                <text:p>667</text:p>
              </table:table-cell>
              <table:table-cell office:value-type="float" office:value="0.00133199996635085">
                <text:p>0.00133199996635085</text:p>
              </table:table-cell>
              <table:table-cell office:value-type="float" office:value="-30.3999996185303">
                <text:p>-30.3999996185303</text:p>
              </table:table-cell>
              <table:table-cell office:value-type="float" office:value="-20">
                <text:p>-20</text:p>
              </table:table-cell>
            </table:table-row>
            <table:table-row>
              <table:table-cell office:value-type="string">
                <text:p>668</text:p>
              </table:table-cell>
              <table:table-cell office:value-type="float" office:value="0.00133399996630033">
                <text:p>0.00133399996630033</text:p>
              </table:table-cell>
              <table:table-cell office:value-type="float" office:value="-30.2000007629395">
                <text:p>-30.2000007629395</text:p>
              </table:table-cell>
              <table:table-cell office:value-type="float" office:value="-20">
                <text:p>-20</text:p>
              </table:table-cell>
            </table:table-row>
            <table:table-row>
              <table:table-cell office:value-type="string">
                <text:p>669</text:p>
              </table:table-cell>
              <table:table-cell office:value-type="float" office:value="0.0013359999662498">
                <text:p>0.0013359999662498</text:p>
              </table:table-cell>
              <table:table-cell office:value-type="float" office:value="-29.7999992370605">
                <text:p>-29.7999992370605</text:p>
              </table:table-cell>
              <table:table-cell office:value-type="float" office:value="-20">
                <text:p>-20</text:p>
              </table:table-cell>
            </table:table-row>
            <table:table-row>
              <table:table-cell office:value-type="string">
                <text:p>670</text:p>
              </table:table-cell>
              <table:table-cell office:value-type="float" office:value="0.00133799996619928">
                <text:p>0.00133799996619928</text:p>
              </table:table-cell>
              <table:table-cell office:value-type="float" office:value="-29.6000003814697">
                <text:p>-29.6000003814697</text:p>
              </table:table-cell>
              <table:table-cell office:value-type="float" office:value="-20">
                <text:p>-20</text:p>
              </table:table-cell>
            </table:table-row>
            <table:table-row>
              <table:table-cell office:value-type="string">
                <text:p>671</text:p>
              </table:table-cell>
              <table:table-cell office:value-type="float" office:value="0.00133999996614875">
                <text:p>0.00133999996614875</text:p>
              </table:table-cell>
              <table:table-cell office:value-type="float" office:value="-29.3999996185303">
                <text:p>-29.3999996185303</text:p>
              </table:table-cell>
              <table:table-cell office:value-type="float" office:value="-20">
                <text:p>-20</text:p>
              </table:table-cell>
            </table:table-row>
            <table:table-row>
              <table:table-cell office:value-type="string">
                <text:p>672</text:p>
              </table:table-cell>
              <table:table-cell office:value-type="float" office:value="0.00134199996609823">
                <text:p>0.00134199996609823</text:p>
              </table:table-cell>
              <table:table-cell office:value-type="float" office:value="-28.3999996185303">
                <text:p>-28.3999996185303</text:p>
              </table:table-cell>
              <table:table-cell office:value-type="float" office:value="-20">
                <text:p>-20</text:p>
              </table:table-cell>
            </table:table-row>
            <table:table-row>
              <table:table-cell office:value-type="string">
                <text:p>673</text:p>
              </table:table-cell>
              <table:table-cell office:value-type="float" office:value="0.0013439999660477">
                <text:p>0.0013439999660477</text:p>
              </table:table-cell>
              <table:table-cell office:value-type="float" office:value="-28.2000007629395">
                <text:p>-28.2000007629395</text:p>
              </table:table-cell>
              <table:table-cell office:value-type="float" office:value="-20">
                <text:p>-20</text:p>
              </table:table-cell>
            </table:table-row>
            <table:table-row>
              <table:table-cell office:value-type="string">
                <text:p>674</text:p>
              </table:table-cell>
              <table:table-cell office:value-type="float" office:value="0.00134599996599718">
                <text:p>0.00134599996599718</text:p>
              </table:table-cell>
              <table:table-cell office:value-type="float" office:value="-28">
                <text:p>-28</text:p>
              </table:table-cell>
              <table:table-cell office:value-type="float" office:value="-20">
                <text:p>-20</text:p>
              </table:table-cell>
            </table:table-row>
            <table:table-row>
              <table:table-cell office:value-type="string">
                <text:p>675</text:p>
              </table:table-cell>
              <table:table-cell office:value-type="float" office:value="0.00134799996594666">
                <text:p>0.00134799996594666</text:p>
              </table:table-cell>
              <table:table-cell office:value-type="float" office:value="-27.6000003814697">
                <text:p>-27.6000003814697</text:p>
              </table:table-cell>
              <table:table-cell office:value-type="float" office:value="-20">
                <text:p>-20</text:p>
              </table:table-cell>
            </table:table-row>
            <table:table-row>
              <table:table-cell office:value-type="string">
                <text:p>676</text:p>
              </table:table-cell>
              <table:table-cell office:value-type="float" office:value="0.00134999996589613">
                <text:p>0.00134999996589613</text:p>
              </table:table-cell>
              <table:table-cell office:value-type="float" office:value="-27.3999996185303">
                <text:p>-27.3999996185303</text:p>
              </table:table-cell>
              <table:table-cell office:value-type="float" office:value="-20">
                <text:p>-20</text:p>
              </table:table-cell>
            </table:table-row>
            <table:table-row>
              <table:table-cell office:value-type="string">
                <text:p>677</text:p>
              </table:table-cell>
              <table:table-cell office:value-type="float" office:value="0.00135199996584561">
                <text:p>0.00135199996584561</text:p>
              </table:table-cell>
              <table:table-cell office:value-type="float" office:value="-26.7999992370605">
                <text:p>-26.7999992370605</text:p>
              </table:table-cell>
              <table:table-cell office:value-type="float" office:value="-20">
                <text:p>-20</text:p>
              </table:table-cell>
            </table:table-row>
            <table:table-row>
              <table:table-cell office:value-type="string">
                <text:p>678</text:p>
              </table:table-cell>
              <table:table-cell office:value-type="float" office:value="0.00135399996579508">
                <text:p>0.00135399996579508</text:p>
              </table:table-cell>
              <table:table-cell office:value-type="float" office:value="-26.3999996185303">
                <text:p>-26.3999996185303</text:p>
              </table:table-cell>
              <table:table-cell office:value-type="float" office:value="-20">
                <text:p>-20</text:p>
              </table:table-cell>
            </table:table-row>
            <table:table-row>
              <table:table-cell office:value-type="string">
                <text:p>679</text:p>
              </table:table-cell>
              <table:table-cell office:value-type="float" office:value="0.00135599996574456">
                <text:p>0.00135599996574456</text:p>
              </table:table-cell>
              <table:table-cell office:value-type="float" office:value="-26.3999996185303">
                <text:p>-26.3999996185303</text:p>
              </table:table-cell>
              <table:table-cell office:value-type="float" office:value="-20">
                <text:p>-20</text:p>
              </table:table-cell>
            </table:table-row>
            <table:table-row>
              <table:table-cell office:value-type="string">
                <text:p>680</text:p>
              </table:table-cell>
              <table:table-cell office:value-type="float" office:value="0.00135799996569403">
                <text:p>0.00135799996569403</text:p>
              </table:table-cell>
              <table:table-cell office:value-type="float" office:value="-25.6000003814697">
                <text:p>-25.6000003814697</text:p>
              </table:table-cell>
              <table:table-cell office:value-type="float" office:value="-20">
                <text:p>-20</text:p>
              </table:table-cell>
            </table:table-row>
            <table:table-row>
              <table:table-cell office:value-type="string">
                <text:p>681</text:p>
              </table:table-cell>
              <table:table-cell office:value-type="float" office:value="0.00135999996564351">
                <text:p>0.00135999996564351</text:p>
              </table:table-cell>
              <table:table-cell office:value-type="float" office:value="-25.2000007629395">
                <text:p>-25.2000007629395</text:p>
              </table:table-cell>
              <table:table-cell office:value-type="float" office:value="-20">
                <text:p>-20</text:p>
              </table:table-cell>
            </table:table-row>
            <table:table-row>
              <table:table-cell office:value-type="string">
                <text:p>682</text:p>
              </table:table-cell>
              <table:table-cell office:value-type="float" office:value="0.00136199996559299">
                <text:p>0.00136199996559299</text:p>
              </table:table-cell>
              <table:table-cell office:value-type="float" office:value="-25.2000007629395">
                <text:p>-25.2000007629395</text:p>
              </table:table-cell>
              <table:table-cell office:value-type="float" office:value="-20">
                <text:p>-20</text:p>
              </table:table-cell>
            </table:table-row>
            <table:table-row>
              <table:table-cell office:value-type="string">
                <text:p>683</text:p>
              </table:table-cell>
              <table:table-cell office:value-type="float" office:value="0.00136399996554246">
                <text:p>0.00136399996554246</text:p>
              </table:table-cell>
              <table:table-cell office:value-type="float" office:value="-24.7999992370605">
                <text:p>-24.7999992370605</text:p>
              </table:table-cell>
              <table:table-cell office:value-type="float" office:value="-20">
                <text:p>-20</text:p>
              </table:table-cell>
            </table:table-row>
            <table:table-row>
              <table:table-cell office:value-type="string">
                <text:p>684</text:p>
              </table:table-cell>
              <table:table-cell office:value-type="float" office:value="0.00136599996549194">
                <text:p>0.00136599996549194</text:p>
              </table:table-cell>
              <table:table-cell office:value-type="float" office:value="-24.2000007629395">
                <text:p>-24.2000007629395</text:p>
              </table:table-cell>
              <table:table-cell office:value-type="float" office:value="-20">
                <text:p>-20</text:p>
              </table:table-cell>
            </table:table-row>
            <table:table-row>
              <table:table-cell office:value-type="string">
                <text:p>685</text:p>
              </table:table-cell>
              <table:table-cell office:value-type="float" office:value="0.00136799996544141">
                <text:p>0.00136799996544141</text:p>
              </table:table-cell>
              <table:table-cell office:value-type="float" office:value="-23.7999992370605">
                <text:p>-23.7999992370605</text:p>
              </table:table-cell>
              <table:table-cell office:value-type="float" office:value="-20">
                <text:p>-20</text:p>
              </table:table-cell>
            </table:table-row>
            <table:table-row>
              <table:table-cell office:value-type="string">
                <text:p>686</text:p>
              </table:table-cell>
              <table:table-cell office:value-type="float" office:value="0.00136999996539089">
                <text:p>0.00136999996539089</text:p>
              </table:table-cell>
              <table:table-cell office:value-type="float" office:value="-23.6000003814697">
                <text:p>-23.6000003814697</text:p>
              </table:table-cell>
              <table:table-cell office:value-type="float" office:value="-20">
                <text:p>-20</text:p>
              </table:table-cell>
            </table:table-row>
            <table:table-row>
              <table:table-cell office:value-type="string">
                <text:p>687</text:p>
              </table:table-cell>
              <table:table-cell office:value-type="float" office:value="0.00137199996534036">
                <text:p>0.00137199996534036</text:p>
              </table:table-cell>
              <table:table-cell office:value-type="float" office:value="-23.2000007629395">
                <text:p>-23.2000007629395</text:p>
              </table:table-cell>
              <table:table-cell office:value-type="float" office:value="-20">
                <text:p>-20</text:p>
              </table:table-cell>
            </table:table-row>
            <table:table-row>
              <table:table-cell office:value-type="string">
                <text:p>688</text:p>
              </table:table-cell>
              <table:table-cell office:value-type="float" office:value="0.00137399996528984">
                <text:p>0.00137399996528984</text:p>
              </table:table-cell>
              <table:table-cell office:value-type="float" office:value="-22.7999992370605">
                <text:p>-22.7999992370605</text:p>
              </table:table-cell>
              <table:table-cell office:value-type="float" office:value="-20">
                <text:p>-20</text:p>
              </table:table-cell>
            </table:table-row>
            <table:table-row>
              <table:table-cell office:value-type="string">
                <text:p>689</text:p>
              </table:table-cell>
              <table:table-cell office:value-type="float" office:value="0.00137599996523932">
                <text:p>0.00137599996523932</text:p>
              </table:table-cell>
              <table:table-cell office:value-type="float" office:value="-22.3999996185303">
                <text:p>-22.3999996185303</text:p>
              </table:table-cell>
              <table:table-cell office:value-type="float" office:value="-20">
                <text:p>-20</text:p>
              </table:table-cell>
            </table:table-row>
            <table:table-row>
              <table:table-cell office:value-type="string">
                <text:p>690</text:p>
              </table:table-cell>
              <table:table-cell office:value-type="float" office:value="0.00137799996518879">
                <text:p>0.00137799996518879</text:p>
              </table:table-cell>
              <table:table-cell office:value-type="float" office:value="-22">
                <text:p>-22</text:p>
              </table:table-cell>
              <table:table-cell office:value-type="float" office:value="-20">
                <text:p>-20</text:p>
              </table:table-cell>
            </table:table-row>
            <table:table-row>
              <table:table-cell office:value-type="string">
                <text:p>691</text:p>
              </table:table-cell>
              <table:table-cell office:value-type="float" office:value="0.00137999996513827">
                <text:p>0.00137999996513827</text:p>
              </table:table-cell>
              <table:table-cell office:value-type="float" office:value="-21.6000003814697">
                <text:p>-21.6000003814697</text:p>
              </table:table-cell>
              <table:table-cell office:value-type="float" office:value="-20">
                <text:p>-20</text:p>
              </table:table-cell>
            </table:table-row>
            <table:table-row>
              <table:table-cell office:value-type="string">
                <text:p>692</text:p>
              </table:table-cell>
              <table:table-cell office:value-type="float" office:value="0.00138199996508774">
                <text:p>0.00138199996508774</text:p>
              </table:table-cell>
              <table:table-cell office:value-type="float" office:value="-21.2000007629395">
                <text:p>-21.2000007629395</text:p>
              </table:table-cell>
              <table:table-cell office:value-type="float" office:value="-20">
                <text:p>-20</text:p>
              </table:table-cell>
            </table:table-row>
            <table:table-row>
              <table:table-cell office:value-type="string">
                <text:p>693</text:p>
              </table:table-cell>
              <table:table-cell office:value-type="float" office:value="0.00138399996503722">
                <text:p>0.00138399996503722</text:p>
              </table:table-cell>
              <table:table-cell office:value-type="float" office:value="-20.7999992370605">
                <text:p>-20.7999992370605</text:p>
              </table:table-cell>
              <table:table-cell office:value-type="float" office:value="-20">
                <text:p>-20</text:p>
              </table:table-cell>
            </table:table-row>
            <table:table-row>
              <table:table-cell office:value-type="string">
                <text:p>694</text:p>
              </table:table-cell>
              <table:table-cell office:value-type="float" office:value="0.00138599996498669">
                <text:p>0.00138599996498669</text:p>
              </table:table-cell>
              <table:table-cell office:value-type="float" office:value="-20.6000003814697">
                <text:p>-20.6000003814697</text:p>
              </table:table-cell>
              <table:table-cell office:value-type="float" office:value="-20">
                <text:p>-20</text:p>
              </table:table-cell>
            </table:table-row>
            <table:table-row>
              <table:table-cell office:value-type="string">
                <text:p>695</text:p>
              </table:table-cell>
              <table:table-cell office:value-type="float" office:value="0.00138799996493617">
                <text:p>0.00138799996493617</text:p>
              </table:table-cell>
              <table:table-cell office:value-type="float" office:value="-20.3999996185303">
                <text:p>-20.3999996185303</text:p>
              </table:table-cell>
              <table:table-cell office:value-type="float" office:value="-20">
                <text:p>-20</text:p>
              </table:table-cell>
            </table:table-row>
            <table:table-row>
              <table:table-cell office:value-type="string">
                <text:p>696</text:p>
              </table:table-cell>
              <table:table-cell office:value-type="float" office:value="0.00138999996488565">
                <text:p>0.00138999996488565</text:p>
              </table:table-cell>
              <table:table-cell office:value-type="float" office:value="-19.7999992370605">
                <text:p>-19.7999992370605</text:p>
              </table:table-cell>
              <table:table-cell office:value-type="float" office:value="-20">
                <text:p>-20</text:p>
              </table:table-cell>
            </table:table-row>
            <table:table-row>
              <table:table-cell office:value-type="string">
                <text:p>697</text:p>
              </table:table-cell>
              <table:table-cell office:value-type="float" office:value="0.00139199996483512">
                <text:p>0.00139199996483512</text:p>
              </table:table-cell>
              <table:table-cell office:value-type="float" office:value="-19.6000003814697">
                <text:p>-19.6000003814697</text:p>
              </table:table-cell>
              <table:table-cell office:value-type="float" office:value="-20">
                <text:p>-20</text:p>
              </table:table-cell>
            </table:table-row>
            <table:table-row>
              <table:table-cell office:value-type="string">
                <text:p>698</text:p>
              </table:table-cell>
              <table:table-cell office:value-type="float" office:value="0.0013939999647846">
                <text:p>0.0013939999647846</text:p>
              </table:table-cell>
              <table:table-cell office:value-type="float" office:value="-19.2000007629395">
                <text:p>-19.2000007629395</text:p>
              </table:table-cell>
              <table:table-cell office:value-type="float" office:value="-20">
                <text:p>-20</text:p>
              </table:table-cell>
            </table:table-row>
            <table:table-row>
              <table:table-cell office:value-type="string">
                <text:p>699</text:p>
              </table:table-cell>
              <table:table-cell office:value-type="float" office:value="0.00139599996473407">
                <text:p>0.00139599996473407</text:p>
              </table:table-cell>
              <table:table-cell office:value-type="float" office:value="-18.7999992370605">
                <text:p>-18.7999992370605</text:p>
              </table:table-cell>
              <table:table-cell office:value-type="float" office:value="-20">
                <text:p>-20</text:p>
              </table:table-cell>
            </table:table-row>
            <table:table-row>
              <table:table-cell office:value-type="string">
                <text:p>700</text:p>
              </table:table-cell>
              <table:table-cell office:value-type="float" office:value="0.00139799996468355">
                <text:p>0.00139799996468355</text:p>
              </table:table-cell>
              <table:table-cell office:value-type="float" office:value="-18.3999996185303">
                <text:p>-18.3999996185303</text:p>
              </table:table-cell>
              <table:table-cell office:value-type="float" office:value="-20">
                <text:p>-20</text:p>
              </table:table-cell>
            </table:table-row>
            <table:table-row>
              <table:table-cell office:value-type="string">
                <text:p>701</text:p>
              </table:table-cell>
              <table:table-cell office:value-type="float" office:value="0.00139999996463303">
                <text:p>0.00139999996463303</text:p>
              </table:table-cell>
              <table:table-cell office:value-type="float" office:value="-18">
                <text:p>-18</text:p>
              </table:table-cell>
              <table:table-cell office:value-type="float" office:value="-20">
                <text:p>-20</text:p>
              </table:table-cell>
            </table:table-row>
            <table:table-row>
              <table:table-cell office:value-type="string">
                <text:p>702</text:p>
              </table:table-cell>
              <table:table-cell office:value-type="float" office:value="0.0014019999645825">
                <text:p>0.0014019999645825</text:p>
              </table:table-cell>
              <table:table-cell office:value-type="float" office:value="-17.7999992370605">
                <text:p>-17.7999992370605</text:p>
              </table:table-cell>
              <table:table-cell office:value-type="float" office:value="-20">
                <text:p>-20</text:p>
              </table:table-cell>
            </table:table-row>
            <table:table-row>
              <table:table-cell office:value-type="string">
                <text:p>703</text:p>
              </table:table-cell>
              <table:table-cell office:value-type="float" office:value="0.00140399996453198">
                <text:p>0.00140399996453198</text:p>
              </table:table-cell>
              <table:table-cell office:value-type="float" office:value="-17.3999996185303">
                <text:p>-17.3999996185303</text:p>
              </table:table-cell>
              <table:table-cell office:value-type="float" office:value="-20">
                <text:p>-20</text:p>
              </table:table-cell>
            </table:table-row>
            <table:table-row>
              <table:table-cell office:value-type="string">
                <text:p>704</text:p>
              </table:table-cell>
              <table:table-cell office:value-type="float" office:value="0.00140599996448145">
                <text:p>0.00140599996448145</text:p>
              </table:table-cell>
              <table:table-cell office:value-type="float" office:value="-17">
                <text:p>-17</text:p>
              </table:table-cell>
              <table:table-cell office:value-type="float" office:value="-20">
                <text:p>-20</text:p>
              </table:table-cell>
            </table:table-row>
            <table:table-row>
              <table:table-cell office:value-type="string">
                <text:p>705</text:p>
              </table:table-cell>
              <table:table-cell office:value-type="float" office:value="0.00140799996443093">
                <text:p>0.00140799996443093</text:p>
              </table:table-cell>
              <table:table-cell office:value-type="float" office:value="-16.3999996185303">
                <text:p>-16.3999996185303</text:p>
              </table:table-cell>
              <table:table-cell office:value-type="float" office:value="-20">
                <text:p>-20</text:p>
              </table:table-cell>
            </table:table-row>
            <table:table-row>
              <table:table-cell office:value-type="string">
                <text:p>706</text:p>
              </table:table-cell>
              <table:table-cell office:value-type="float" office:value="0.0014099999643804">
                <text:p>0.0014099999643804</text:p>
              </table:table-cell>
              <table:table-cell office:value-type="float" office:value="-16.2000007629395">
                <text:p>-16.2000007629395</text:p>
              </table:table-cell>
              <table:table-cell office:value-type="float" office:value="-20">
                <text:p>-20</text:p>
              </table:table-cell>
            </table:table-row>
            <table:table-row>
              <table:table-cell office:value-type="string">
                <text:p>707</text:p>
              </table:table-cell>
              <table:table-cell office:value-type="float" office:value="0.00141199996432988">
                <text:p>0.00141199996432988</text:p>
              </table:table-cell>
              <table:table-cell office:value-type="float" office:value="-16">
                <text:p>-16</text:p>
              </table:table-cell>
              <table:table-cell office:value-type="float" office:value="-20">
                <text:p>-20</text:p>
              </table:table-cell>
            </table:table-row>
            <table:table-row>
              <table:table-cell office:value-type="string">
                <text:p>708</text:p>
              </table:table-cell>
              <table:table-cell office:value-type="float" office:value="0.00141399996427936">
                <text:p>0.00141399996427936</text:p>
              </table:table-cell>
              <table:table-cell office:value-type="float" office:value="-15.6000003814697">
                <text:p>-15.6000003814697</text:p>
              </table:table-cell>
              <table:table-cell office:value-type="float" office:value="-20">
                <text:p>-20</text:p>
              </table:table-cell>
            </table:table-row>
            <table:table-row>
              <table:table-cell office:value-type="string">
                <text:p>709</text:p>
              </table:table-cell>
              <table:table-cell office:value-type="float" office:value="0.00141599996422883">
                <text:p>0.00141599996422883</text:p>
              </table:table-cell>
              <table:table-cell office:value-type="float" office:value="-15">
                <text:p>-15</text:p>
              </table:table-cell>
              <table:table-cell office:value-type="float" office:value="-20">
                <text:p>-20</text:p>
              </table:table-cell>
            </table:table-row>
            <table:table-row>
              <table:table-cell office:value-type="string">
                <text:p>710</text:p>
              </table:table-cell>
              <table:table-cell office:value-type="float" office:value="0.00141799996417831">
                <text:p>0.00141799996417831</text:p>
              </table:table-cell>
              <table:table-cell office:value-type="float" office:value="-14.6000003814697">
                <text:p>-14.6000003814697</text:p>
              </table:table-cell>
              <table:table-cell office:value-type="float" office:value="-20">
                <text:p>-20</text:p>
              </table:table-cell>
            </table:table-row>
            <table:table-row>
              <table:table-cell office:value-type="string">
                <text:p>711</text:p>
              </table:table-cell>
              <table:table-cell office:value-type="float" office:value="0.00141999996412778">
                <text:p>0.00141999996412778</text:p>
              </table:table-cell>
              <table:table-cell office:value-type="float" office:value="-14.3999996185303">
                <text:p>-14.3999996185303</text:p>
              </table:table-cell>
              <table:table-cell office:value-type="float" office:value="-20">
                <text:p>-20</text:p>
              </table:table-cell>
            </table:table-row>
            <table:table-row>
              <table:table-cell office:value-type="string">
                <text:p>712</text:p>
              </table:table-cell>
              <table:table-cell office:value-type="float" office:value="0.00142199996407726">
                <text:p>0.00142199996407726</text:p>
              </table:table-cell>
              <table:table-cell office:value-type="float" office:value="-13.8000001907349">
                <text:p>-13.8000001907349</text:p>
              </table:table-cell>
              <table:table-cell office:value-type="float" office:value="-20">
                <text:p>-20</text:p>
              </table:table-cell>
            </table:table-row>
            <table:table-row>
              <table:table-cell office:value-type="string">
                <text:p>713</text:p>
              </table:table-cell>
              <table:table-cell office:value-type="float" office:value="0.00142399996402673">
                <text:p>0.00142399996402673</text:p>
              </table:table-cell>
              <table:table-cell office:value-type="float" office:value="-13.6000003814697">
                <text:p>-13.6000003814697</text:p>
              </table:table-cell>
              <table:table-cell office:value-type="float" office:value="-20">
                <text:p>-20</text:p>
              </table:table-cell>
            </table:table-row>
            <table:table-row>
              <table:table-cell office:value-type="string">
                <text:p>714</text:p>
              </table:table-cell>
              <table:table-cell office:value-type="float" office:value="0.00142599996397621">
                <text:p>0.00142599996397621</text:p>
              </table:table-cell>
              <table:table-cell office:value-type="float" office:value="-13.3999996185303">
                <text:p>-13.3999996185303</text:p>
              </table:table-cell>
              <table:table-cell office:value-type="float" office:value="-20">
                <text:p>-20</text:p>
              </table:table-cell>
            </table:table-row>
            <table:table-row>
              <table:table-cell office:value-type="string">
                <text:p>715</text:p>
              </table:table-cell>
              <table:table-cell office:value-type="float" office:value="0.00142799996392569">
                <text:p>0.00142799996392569</text:p>
              </table:table-cell>
              <table:table-cell office:value-type="float" office:value="-12.8000001907349">
                <text:p>-12.8000001907349</text:p>
              </table:table-cell>
              <table:table-cell office:value-type="float" office:value="-20">
                <text:p>-20</text:p>
              </table:table-cell>
            </table:table-row>
            <table:table-row>
              <table:table-cell office:value-type="string">
                <text:p>716</text:p>
              </table:table-cell>
              <table:table-cell office:value-type="float" office:value="0.00142999996387516">
                <text:p>0.00142999996387516</text:p>
              </table:table-cell>
              <table:table-cell office:value-type="float" office:value="-12.6000003814697">
                <text:p>-12.6000003814697</text:p>
              </table:table-cell>
              <table:table-cell office:value-type="float" office:value="-20">
                <text:p>-20</text:p>
              </table:table-cell>
            </table:table-row>
            <table:table-row>
              <table:table-cell office:value-type="string">
                <text:p>717</text:p>
              </table:table-cell>
              <table:table-cell office:value-type="float" office:value="0.00143199996382464">
                <text:p>0.00143199996382464</text:p>
              </table:table-cell>
              <table:table-cell office:value-type="float" office:value="-12">
                <text:p>-12</text:p>
              </table:table-cell>
              <table:table-cell office:value-type="float" office:value="-20">
                <text:p>-20</text:p>
              </table:table-cell>
            </table:table-row>
            <table:table-row>
              <table:table-cell office:value-type="string">
                <text:p>718</text:p>
              </table:table-cell>
              <table:table-cell office:value-type="float" office:value="0.00143399996377411">
                <text:p>0.00143399996377411</text:p>
              </table:table-cell>
              <table:table-cell office:value-type="float" office:value="-11.8000001907349">
                <text:p>-11.8000001907349</text:p>
              </table:table-cell>
              <table:table-cell office:value-type="float" office:value="-20">
                <text:p>-20</text:p>
              </table:table-cell>
            </table:table-row>
            <table:table-row>
              <table:table-cell office:value-type="string">
                <text:p>719</text:p>
              </table:table-cell>
              <table:table-cell office:value-type="float" office:value="0.00143599996372359">
                <text:p>0.00143599996372359</text:p>
              </table:table-cell>
              <table:table-cell office:value-type="float" office:value="-11.3999996185303">
                <text:p>-11.3999996185303</text:p>
              </table:table-cell>
              <table:table-cell office:value-type="float" office:value="-20">
                <text:p>-20</text:p>
              </table:table-cell>
            </table:table-row>
            <table:table-row>
              <table:table-cell office:value-type="string">
                <text:p>720</text:p>
              </table:table-cell>
              <table:table-cell office:value-type="float" office:value="0.00143799996367306">
                <text:p>0.00143799996367306</text:p>
              </table:table-cell>
              <table:table-cell office:value-type="float" office:value="-11">
                <text:p>-11</text:p>
              </table:table-cell>
              <table:table-cell office:value-type="float" office:value="-20">
                <text:p>-20</text:p>
              </table:table-cell>
            </table:table-row>
            <table:table-row>
              <table:table-cell office:value-type="string">
                <text:p>721</text:p>
              </table:table-cell>
              <table:table-cell office:value-type="float" office:value="0.00143999996362254">
                <text:p>0.00143999996362254</text:p>
              </table:table-cell>
              <table:table-cell office:value-type="float" office:value="-10.6000003814697">
                <text:p>-10.6000003814697</text:p>
              </table:table-cell>
              <table:table-cell office:value-type="float" office:value="-20">
                <text:p>-20</text:p>
              </table:table-cell>
            </table:table-row>
            <table:table-row>
              <table:table-cell office:value-type="string">
                <text:p>722</text:p>
              </table:table-cell>
              <table:table-cell office:value-type="float" office:value="0.00144199996357202">
                <text:p>0.00144199996357202</text:p>
              </table:table-cell>
              <table:table-cell office:value-type="float" office:value="-10.3999996185303">
                <text:p>-10.3999996185303</text:p>
              </table:table-cell>
              <table:table-cell office:value-type="float" office:value="-20">
                <text:p>-20</text:p>
              </table:table-cell>
            </table:table-row>
            <table:table-row>
              <table:table-cell office:value-type="string">
                <text:p>723</text:p>
              </table:table-cell>
              <table:table-cell office:value-type="float" office:value="0.00144399996352149">
                <text:p>0.00144399996352149</text:p>
              </table:table-cell>
              <table:table-cell office:value-type="float" office:value="-9.80000019073486">
                <text:p>-9.80000019073486</text:p>
              </table:table-cell>
              <table:table-cell office:value-type="float" office:value="-20">
                <text:p>-20</text:p>
              </table:table-cell>
            </table:table-row>
            <table:table-row>
              <table:table-cell office:value-type="string">
                <text:p>724</text:p>
              </table:table-cell>
              <table:table-cell office:value-type="float" office:value="0.00144599996347097">
                <text:p>0.00144599996347097</text:p>
              </table:table-cell>
              <table:table-cell office:value-type="float" office:value="-9.19999980926514">
                <text:p>-9.19999980926514</text:p>
              </table:table-cell>
              <table:table-cell office:value-type="float" office:value="-20">
                <text:p>-20</text:p>
              </table:table-cell>
            </table:table-row>
            <table:table-row>
              <table:table-cell office:value-type="string">
                <text:p>725</text:p>
              </table:table-cell>
              <table:table-cell office:value-type="float" office:value="0.00144799996342044">
                <text:p>0.00144799996342044</text:p>
              </table:table-cell>
              <table:table-cell office:value-type="float" office:value="-9">
                <text:p>-9</text:p>
              </table:table-cell>
              <table:table-cell office:value-type="float" office:value="-20">
                <text:p>-20</text:p>
              </table:table-cell>
            </table:table-row>
            <table:table-row>
              <table:table-cell office:value-type="string">
                <text:p>726</text:p>
              </table:table-cell>
              <table:table-cell office:value-type="float" office:value="0.00144999996336992">
                <text:p>0.00144999996336992</text:p>
              </table:table-cell>
              <table:table-cell office:value-type="float" office:value="-8.80000019073486">
                <text:p>-8.80000019073486</text:p>
              </table:table-cell>
              <table:table-cell office:value-type="float" office:value="-20">
                <text:p>-20</text:p>
              </table:table-cell>
            </table:table-row>
            <table:table-row>
              <table:table-cell office:value-type="string">
                <text:p>727</text:p>
              </table:table-cell>
              <table:table-cell office:value-type="float" office:value="0.00145199996331939">
                <text:p>0.00145199996331939</text:p>
              </table:table-cell>
              <table:table-cell office:value-type="float" office:value="-8.60000038146973">
                <text:p>-8.60000038146973</text:p>
              </table:table-cell>
              <table:table-cell office:value-type="float" office:value="-20">
                <text:p>-20</text:p>
              </table:table-cell>
            </table:table-row>
            <table:table-row>
              <table:table-cell office:value-type="string">
                <text:p>728</text:p>
              </table:table-cell>
              <table:table-cell office:value-type="float" office:value="0.00145399996326887">
                <text:p>0.00145399996326887</text:p>
              </table:table-cell>
              <table:table-cell office:value-type="float" office:value="-8.19999980926514">
                <text:p>-8.19999980926514</text:p>
              </table:table-cell>
              <table:table-cell office:value-type="float" office:value="-20">
                <text:p>-20</text:p>
              </table:table-cell>
            </table:table-row>
            <table:table-row>
              <table:table-cell office:value-type="string">
                <text:p>729</text:p>
              </table:table-cell>
              <table:table-cell office:value-type="float" office:value="0.00145599996321835">
                <text:p>0.00145599996321835</text:p>
              </table:table-cell>
              <table:table-cell office:value-type="float" office:value="-7.59999990463257">
                <text:p>-7.59999990463257</text:p>
              </table:table-cell>
              <table:table-cell office:value-type="float" office:value="-20">
                <text:p>-20</text:p>
              </table:table-cell>
            </table:table-row>
            <table:table-row>
              <table:table-cell office:value-type="string">
                <text:p>730</text:p>
              </table:table-cell>
              <table:table-cell office:value-type="float" office:value="0.00145799996316782">
                <text:p>0.00145799996316782</text:p>
              </table:table-cell>
              <table:table-cell office:value-type="float" office:value="-7.40000009536743">
                <text:p>-7.40000009536743</text:p>
              </table:table-cell>
              <table:table-cell office:value-type="float" office:value="-20">
                <text:p>-20</text:p>
              </table:table-cell>
            </table:table-row>
            <table:table-row>
              <table:table-cell office:value-type="string">
                <text:p>731</text:p>
              </table:table-cell>
              <table:table-cell office:value-type="float" office:value="0.0014599999631173">
                <text:p>0.0014599999631173</text:p>
              </table:table-cell>
              <table:table-cell office:value-type="float" office:value="-7">
                <text:p>-7</text:p>
              </table:table-cell>
              <table:table-cell office:value-type="float" office:value="-20">
                <text:p>-20</text:p>
              </table:table-cell>
            </table:table-row>
            <table:table-row>
              <table:table-cell office:value-type="string">
                <text:p>732</text:p>
              </table:table-cell>
              <table:table-cell office:value-type="float" office:value="0.00146199996306677">
                <text:p>0.00146199996306677</text:p>
              </table:table-cell>
              <table:table-cell office:value-type="float" office:value="-6.80000019073486">
                <text:p>-6.80000019073486</text:p>
              </table:table-cell>
              <table:table-cell office:value-type="float" office:value="-20">
                <text:p>-20</text:p>
              </table:table-cell>
            </table:table-row>
            <table:table-row>
              <table:table-cell office:value-type="string">
                <text:p>733</text:p>
              </table:table-cell>
              <table:table-cell office:value-type="float" office:value="0.00146399996301625">
                <text:p>0.00146399996301625</text:p>
              </table:table-cell>
              <table:table-cell office:value-type="float" office:value="-6.19999980926514">
                <text:p>-6.19999980926514</text:p>
              </table:table-cell>
              <table:table-cell office:value-type="float" office:value="-20">
                <text:p>-20</text:p>
              </table:table-cell>
            </table:table-row>
            <table:table-row>
              <table:table-cell office:value-type="string">
                <text:p>734</text:p>
              </table:table-cell>
              <table:table-cell office:value-type="float" office:value="0.00146599996296573">
                <text:p>0.00146599996296573</text:p>
              </table:table-cell>
              <table:table-cell office:value-type="float" office:value="-5.80000019073486">
                <text:p>-5.80000019073486</text:p>
              </table:table-cell>
              <table:table-cell office:value-type="float" office:value="-20">
                <text:p>-20</text:p>
              </table:table-cell>
            </table:table-row>
            <table:table-row>
              <table:table-cell office:value-type="string">
                <text:p>735</text:p>
              </table:table-cell>
              <table:table-cell office:value-type="float" office:value="0.0014679999629152">
                <text:p>0.0014679999629152</text:p>
              </table:table-cell>
              <table:table-cell office:value-type="float" office:value="-5.59999990463257">
                <text:p>-5.59999990463257</text:p>
              </table:table-cell>
              <table:table-cell office:value-type="float" office:value="-20">
                <text:p>-20</text:p>
              </table:table-cell>
            </table:table-row>
            <table:table-row>
              <table:table-cell office:value-type="string">
                <text:p>736</text:p>
              </table:table-cell>
              <table:table-cell office:value-type="float" office:value="0.00146999996286468">
                <text:p>0.00146999996286468</text:p>
              </table:table-cell>
              <table:table-cell office:value-type="float" office:value="-5">
                <text:p>-5</text:p>
              </table:table-cell>
              <table:table-cell office:value-type="float" office:value="-20">
                <text:p>-20</text:p>
              </table:table-cell>
            </table:table-row>
            <table:table-row>
              <table:table-cell office:value-type="string">
                <text:p>737</text:p>
              </table:table-cell>
              <table:table-cell office:value-type="float" office:value="0.00147199996281415">
                <text:p>0.00147199996281415</text:p>
              </table:table-cell>
              <table:table-cell office:value-type="float" office:value="-4.59999990463257">
                <text:p>-4.59999990463257</text:p>
              </table:table-cell>
              <table:table-cell office:value-type="float" office:value="-20">
                <text:p>-20</text:p>
              </table:table-cell>
            </table:table-row>
            <table:table-row>
              <table:table-cell office:value-type="string">
                <text:p>738</text:p>
              </table:table-cell>
              <table:table-cell office:value-type="float" office:value="0.00147399996276363">
                <text:p>0.00147399996276363</text:p>
              </table:table-cell>
              <table:table-cell office:value-type="float" office:value="-4.40000009536743">
                <text:p>-4.40000009536743</text:p>
              </table:table-cell>
              <table:table-cell office:value-type="float" office:value="-20">
                <text:p>-20</text:p>
              </table:table-cell>
            </table:table-row>
            <table:table-row>
              <table:table-cell office:value-type="string">
                <text:p>739</text:p>
              </table:table-cell>
              <table:table-cell office:value-type="float" office:value="0.0014759999627131">
                <text:p>0.0014759999627131</text:p>
              </table:table-cell>
              <table:table-cell office:value-type="float" office:value="-4">
                <text:p>-4</text:p>
              </table:table-cell>
              <table:table-cell office:value-type="float" office:value="-20">
                <text:p>-20</text:p>
              </table:table-cell>
            </table:table-row>
            <table:table-row>
              <table:table-cell office:value-type="string">
                <text:p>740</text:p>
              </table:table-cell>
              <table:table-cell office:value-type="float" office:value="0.00147799996266258">
                <text:p>0.00147799996266258</text:p>
              </table:table-cell>
              <table:table-cell office:value-type="float" office:value="-3.40000009536743">
                <text:p>-3.40000009536743</text:p>
              </table:table-cell>
              <table:table-cell office:value-type="float" office:value="-20">
                <text:p>-20</text:p>
              </table:table-cell>
            </table:table-row>
            <table:table-row>
              <table:table-cell office:value-type="string">
                <text:p>741</text:p>
              </table:table-cell>
              <table:table-cell office:value-type="float" office:value="0.00147999996261206">
                <text:p>0.00147999996261206</text:p>
              </table:table-cell>
              <table:table-cell office:value-type="float" office:value="-3.20000004768372">
                <text:p>-3.20000004768372</text:p>
              </table:table-cell>
              <table:table-cell office:value-type="float" office:value="-20">
                <text:p>-20</text:p>
              </table:table-cell>
            </table:table-row>
            <table:table-row>
              <table:table-cell office:value-type="string">
                <text:p>742</text:p>
              </table:table-cell>
              <table:table-cell office:value-type="float" office:value="0.00148199996256153">
                <text:p>0.00148199996256153</text:p>
              </table:table-cell>
              <table:table-cell office:value-type="float" office:value="-2.79999995231628">
                <text:p>-2.79999995231628</text:p>
              </table:table-cell>
              <table:table-cell office:value-type="float" office:value="-20">
                <text:p>-20</text:p>
              </table:table-cell>
            </table:table-row>
            <table:table-row>
              <table:table-cell office:value-type="string">
                <text:p>743</text:p>
              </table:table-cell>
              <table:table-cell office:value-type="float" office:value="0.00148399996251101">
                <text:p>0.00148399996251101</text:p>
              </table:table-cell>
              <table:table-cell office:value-type="float" office:value="-2.59999990463257">
                <text:p>-2.59999990463257</text:p>
              </table:table-cell>
              <table:table-cell office:value-type="float" office:value="-20">
                <text:p>-20</text:p>
              </table:table-cell>
            </table:table-row>
            <table:table-row>
              <table:table-cell office:value-type="string">
                <text:p>744</text:p>
              </table:table-cell>
              <table:table-cell office:value-type="float" office:value="0.00148599996246048">
                <text:p>0.00148599996246048</text:p>
              </table:table-cell>
              <table:table-cell office:value-type="float" office:value="-2">
                <text:p>-2</text:p>
              </table:table-cell>
              <table:table-cell office:value-type="float" office:value="-20">
                <text:p>-20</text:p>
              </table:table-cell>
            </table:table-row>
            <table:table-row>
              <table:table-cell office:value-type="string">
                <text:p>745</text:p>
              </table:table-cell>
              <table:table-cell office:value-type="float" office:value="0.00148799996240996">
                <text:p>0.00148799996240996</text:p>
              </table:table-cell>
              <table:table-cell office:value-type="float" office:value="-1.79999995231628">
                <text:p>-1.79999995231628</text:p>
              </table:table-cell>
              <table:table-cell office:value-type="float" office:value="-20">
                <text:p>-20</text:p>
              </table:table-cell>
            </table:table-row>
            <table:table-row>
              <table:table-cell office:value-type="string">
                <text:p>746</text:p>
              </table:table-cell>
              <table:table-cell office:value-type="float" office:value="0.00148999996235943">
                <text:p>0.00148999996235943</text:p>
              </table:table-cell>
              <table:table-cell office:value-type="float" office:value="-1.60000002384186">
                <text:p>-1.60000002384186</text:p>
              </table:table-cell>
              <table:table-cell office:value-type="float" office:value="-20">
                <text:p>-20</text:p>
              </table:table-cell>
            </table:table-row>
            <table:table-row>
              <table:table-cell office:value-type="string">
                <text:p>747</text:p>
              </table:table-cell>
              <table:table-cell office:value-type="float" office:value="0.00149199996230891">
                <text:p>0.00149199996230891</text:p>
              </table:table-cell>
              <table:table-cell office:value-type="float" office:value="-1">
                <text:p>-1</text:p>
              </table:table-cell>
              <table:table-cell office:value-type="float" office:value="-20">
                <text:p>-20</text:p>
              </table:table-cell>
            </table:table-row>
            <table:table-row>
              <table:table-cell office:value-type="string">
                <text:p>748</text:p>
              </table:table-cell>
              <table:table-cell office:value-type="float" office:value="0.00149399996225839">
                <text:p>0.00149399996225839</text:p>
              </table:table-cell>
              <table:table-cell office:value-type="float" office:value="-0.800000011920929">
                <text:p>-0.800000011920929</text:p>
              </table:table-cell>
              <table:table-cell office:value-type="float" office:value="-20">
                <text:p>-20</text:p>
              </table:table-cell>
            </table:table-row>
            <table:table-row>
              <table:table-cell office:value-type="string">
                <text:p>749</text:p>
              </table:table-cell>
              <table:table-cell office:value-type="float" office:value="0.00149599996220786">
                <text:p>0.00149599996220786</text:p>
              </table:table-cell>
              <table:table-cell office:value-type="float" office:value="-0.200000002980232">
                <text:p>-0.200000002980232</text:p>
              </table:table-cell>
              <table:table-cell office:value-type="float" office:value="-20">
                <text:p>-20</text:p>
              </table:table-cell>
            </table:table-row>
            <table:table-row>
              <table:table-cell office:value-type="string">
                <text:p>750</text:p>
              </table:table-cell>
              <table:table-cell office:value-type="float" office:value="0.00149799996215734">
                <text:p>0.00149799996215734</text:p>
              </table:table-cell>
              <table:table-cell office:value-type="float" office:value="0.200000002980232">
                <text:p>0.200000002980232</text:p>
              </table:table-cell>
              <table:table-cell office:value-type="float" office:value="-20">
                <text:p>-20</text:p>
              </table:table-cell>
            </table:table-row>
            <table:table-row>
              <table:table-cell office:value-type="string">
                <text:p>751</text:p>
              </table:table-cell>
              <table:table-cell office:value-type="float" office:value="0.00149999996210681">
                <text:p>0.00149999996210681</text:p>
              </table:table-cell>
              <table:table-cell office:value-type="float" office:value="0.200000002980232">
                <text:p>0.200000002980232</text:p>
              </table:table-cell>
              <table:table-cell office:value-type="float" office:value="-20">
                <text:p>-20</text:p>
              </table:table-cell>
            </table:table-row>
            <table:table-row>
              <table:table-cell office:value-type="string">
                <text:p>752</text:p>
              </table:table-cell>
              <table:table-cell office:value-type="float" office:value="0.00150199996205629">
                <text:p>0.00150199996205629</text:p>
              </table:table-cell>
              <table:table-cell office:value-type="float" office:value="1">
                <text:p>1</text:p>
              </table:table-cell>
              <table:table-cell office:value-type="float" office:value="-20">
                <text:p>-20</text:p>
              </table:table-cell>
            </table:table-row>
            <table:table-row>
              <table:table-cell office:value-type="string">
                <text:p>753</text:p>
              </table:table-cell>
              <table:table-cell office:value-type="float" office:value="0.00150399996200576">
                <text:p>0.00150399996200576</text:p>
              </table:table-cell>
              <table:table-cell office:value-type="float" office:value="1.39999997615814">
                <text:p>1.39999997615814</text:p>
              </table:table-cell>
              <table:table-cell office:value-type="float" office:value="-20">
                <text:p>-20</text:p>
              </table:table-cell>
            </table:table-row>
            <table:table-row>
              <table:table-cell office:value-type="string">
                <text:p>754</text:p>
              </table:table-cell>
              <table:table-cell office:value-type="float" office:value="0.00150599996195524">
                <text:p>0.00150599996195524</text:p>
              </table:table-cell>
              <table:table-cell office:value-type="float" office:value="1.60000002384186">
                <text:p>1.60000002384186</text:p>
              </table:table-cell>
              <table:table-cell office:value-type="float" office:value="-20">
                <text:p>-20</text:p>
              </table:table-cell>
            </table:table-row>
            <table:table-row>
              <table:table-cell office:value-type="string">
                <text:p>755</text:p>
              </table:table-cell>
              <table:table-cell office:value-type="float" office:value="0.00150799996190472">
                <text:p>0.00150799996190472</text:p>
              </table:table-cell>
              <table:table-cell office:value-type="float" office:value="2">
                <text:p>2</text:p>
              </table:table-cell>
              <table:table-cell office:value-type="float" office:value="-20">
                <text:p>-20</text:p>
              </table:table-cell>
            </table:table-row>
            <table:table-row>
              <table:table-cell office:value-type="string">
                <text:p>756</text:p>
              </table:table-cell>
              <table:table-cell office:value-type="float" office:value="0.00150999996185419">
                <text:p>0.00150999996185419</text:p>
              </table:table-cell>
              <table:table-cell office:value-type="float" office:value="2.40000009536743">
                <text:p>2.40000009536743</text:p>
              </table:table-cell>
              <table:table-cell office:value-type="float" office:value="-20">
                <text:p>-20</text:p>
              </table:table-cell>
            </table:table-row>
            <table:table-row>
              <table:table-cell office:value-type="string">
                <text:p>757</text:p>
              </table:table-cell>
              <table:table-cell office:value-type="float" office:value="0.00151199996180367">
                <text:p>0.00151199996180367</text:p>
              </table:table-cell>
              <table:table-cell office:value-type="float" office:value="2.59999990463257">
                <text:p>2.59999990463257</text:p>
              </table:table-cell>
              <table:table-cell office:value-type="float" office:value="-20">
                <text:p>-20</text:p>
              </table:table-cell>
            </table:table-row>
            <table:table-row>
              <table:table-cell office:value-type="string">
                <text:p>758</text:p>
              </table:table-cell>
              <table:table-cell office:value-type="float" office:value="0.00151399996175314">
                <text:p>0.00151399996175314</text:p>
              </table:table-cell>
              <table:table-cell office:value-type="float" office:value="3">
                <text:p>3</text:p>
              </table:table-cell>
              <table:table-cell office:value-type="float" office:value="-20">
                <text:p>-20</text:p>
              </table:table-cell>
            </table:table-row>
            <table:table-row>
              <table:table-cell office:value-type="string">
                <text:p>759</text:p>
              </table:table-cell>
              <table:table-cell office:value-type="float" office:value="0.00151599996170262">
                <text:p>0.00151599996170262</text:p>
              </table:table-cell>
              <table:table-cell office:value-type="float" office:value="3.20000004768372">
                <text:p>3.20000004768372</text:p>
              </table:table-cell>
              <table:table-cell office:value-type="float" office:value="-20">
                <text:p>-20</text:p>
              </table:table-cell>
            </table:table-row>
            <table:table-row>
              <table:table-cell office:value-type="string">
                <text:p>760</text:p>
              </table:table-cell>
              <table:table-cell office:value-type="float" office:value="0.00151799996165209">
                <text:p>0.00151799996165209</text:p>
              </table:table-cell>
              <table:table-cell office:value-type="float" office:value="3.59999990463257">
                <text:p>3.59999990463257</text:p>
              </table:table-cell>
              <table:table-cell office:value-type="float" office:value="-20">
                <text:p>-20</text:p>
              </table:table-cell>
            </table:table-row>
            <table:table-row>
              <table:table-cell office:value-type="string">
                <text:p>761</text:p>
              </table:table-cell>
              <table:table-cell office:value-type="float" office:value="0.00151999996160157">
                <text:p>0.00151999996160157</text:p>
              </table:table-cell>
              <table:table-cell office:value-type="float" office:value="4.40000009536743">
                <text:p>4.40000009536743</text:p>
              </table:table-cell>
              <table:table-cell office:value-type="float" office:value="-20">
                <text:p>-20</text:p>
              </table:table-cell>
            </table:table-row>
            <table:table-row>
              <table:table-cell office:value-type="string">
                <text:p>762</text:p>
              </table:table-cell>
              <table:table-cell office:value-type="float" office:value="0.00152199996155105">
                <text:p>0.00152199996155105</text:p>
              </table:table-cell>
              <table:table-cell office:value-type="float" office:value="4.59999990463257">
                <text:p>4.59999990463257</text:p>
              </table:table-cell>
              <table:table-cell office:value-type="float" office:value="-20">
                <text:p>-20</text:p>
              </table:table-cell>
            </table:table-row>
            <table:table-row>
              <table:table-cell office:value-type="string">
                <text:p>763</text:p>
              </table:table-cell>
              <table:table-cell office:value-type="float" office:value="0.00152399996150052">
                <text:p>0.00152399996150052</text:p>
              </table:table-cell>
              <table:table-cell office:value-type="float" office:value="4.80000019073486">
                <text:p>4.80000019073486</text:p>
              </table:table-cell>
              <table:table-cell office:value-type="float" office:value="-20">
                <text:p>-20</text:p>
              </table:table-cell>
            </table:table-row>
            <table:table-row>
              <table:table-cell office:value-type="string">
                <text:p>764</text:p>
              </table:table-cell>
              <table:table-cell office:value-type="float" office:value="0.00152599996145">
                <text:p>0.00152599996145</text:p>
              </table:table-cell>
              <table:table-cell office:value-type="float" office:value="5.40000009536743">
                <text:p>5.40000009536743</text:p>
              </table:table-cell>
              <table:table-cell office:value-type="float" office:value="-20">
                <text:p>-20</text:p>
              </table:table-cell>
            </table:table-row>
            <table:table-row>
              <table:table-cell office:value-type="string">
                <text:p>765</text:p>
              </table:table-cell>
              <table:table-cell office:value-type="float" office:value="0.00152799996139947">
                <text:p>0.00152799996139947</text:p>
              </table:table-cell>
              <table:table-cell office:value-type="float" office:value="5.59999990463257">
                <text:p>5.59999990463257</text:p>
              </table:table-cell>
              <table:table-cell office:value-type="float" office:value="-20">
                <text:p>-20</text:p>
              </table:table-cell>
            </table:table-row>
            <table:table-row>
              <table:table-cell office:value-type="string">
                <text:p>766</text:p>
              </table:table-cell>
              <table:table-cell office:value-type="float" office:value="0.00152999996134895">
                <text:p>0.00152999996134895</text:p>
              </table:table-cell>
              <table:table-cell office:value-type="float" office:value="6">
                <text:p>6</text:p>
              </table:table-cell>
              <table:table-cell office:value-type="float" office:value="-20">
                <text:p>-20</text:p>
              </table:table-cell>
            </table:table-row>
            <table:table-row>
              <table:table-cell office:value-type="string">
                <text:p>767</text:p>
              </table:table-cell>
              <table:table-cell office:value-type="float" office:value="0.00153199996129842">
                <text:p>0.00153199996129842</text:p>
              </table:table-cell>
              <table:table-cell office:value-type="float" office:value="6.19999980926514">
                <text:p>6.19999980926514</text:p>
              </table:table-cell>
              <table:table-cell office:value-type="float" office:value="-20">
                <text:p>-20</text:p>
              </table:table-cell>
            </table:table-row>
            <table:table-row>
              <table:table-cell office:value-type="string">
                <text:p>768</text:p>
              </table:table-cell>
              <table:table-cell office:value-type="float" office:value="0.0015339999612479">
                <text:p>0.0015339999612479</text:p>
              </table:table-cell>
              <table:table-cell office:value-type="float" office:value="7">
                <text:p>7</text:p>
              </table:table-cell>
              <table:table-cell office:value-type="float" office:value="-20">
                <text:p>-20</text:p>
              </table:table-cell>
            </table:table-row>
            <table:table-row>
              <table:table-cell office:value-type="string">
                <text:p>769</text:p>
              </table:table-cell>
              <table:table-cell office:value-type="float" office:value="0.00153599996119738">
                <text:p>0.00153599996119738</text:p>
              </table:table-cell>
              <table:table-cell office:value-type="float" office:value="7.19999980926514">
                <text:p>7.19999980926514</text:p>
              </table:table-cell>
              <table:table-cell office:value-type="float" office:value="-20">
                <text:p>-20</text:p>
              </table:table-cell>
            </table:table-row>
            <table:table-row>
              <table:table-cell office:value-type="string">
                <text:p>770</text:p>
              </table:table-cell>
              <table:table-cell office:value-type="float" office:value="0.00153799996114685">
                <text:p>0.00153799996114685</text:p>
              </table:table-cell>
              <table:table-cell office:value-type="float" office:value="7.19999980926514">
                <text:p>7.19999980926514</text:p>
              </table:table-cell>
              <table:table-cell office:value-type="float" office:value="-20">
                <text:p>-20</text:p>
              </table:table-cell>
            </table:table-row>
            <table:table-row>
              <table:table-cell office:value-type="string">
                <text:p>771</text:p>
              </table:table-cell>
              <table:table-cell office:value-type="float" office:value="0.00153999996109633">
                <text:p>0.00153999996109633</text:p>
              </table:table-cell>
              <table:table-cell office:value-type="float" office:value="7.80000019073486">
                <text:p>7.80000019073486</text:p>
              </table:table-cell>
              <table:table-cell office:value-type="float" office:value="-20">
                <text:p>-20</text:p>
              </table:table-cell>
            </table:table-row>
            <table:table-row>
              <table:table-cell office:value-type="string">
                <text:p>772</text:p>
              </table:table-cell>
              <table:table-cell office:value-type="float" office:value="0.0015419999610458">
                <text:p>0.0015419999610458</text:p>
              </table:table-cell>
              <table:table-cell office:value-type="float" office:value="8.39999961853027">
                <text:p>8.39999961853027</text:p>
              </table:table-cell>
              <table:table-cell office:value-type="float" office:value="-20">
                <text:p>-20</text:p>
              </table:table-cell>
            </table:table-row>
            <table:table-row>
              <table:table-cell office:value-type="string">
                <text:p>773</text:p>
              </table:table-cell>
              <table:table-cell office:value-type="float" office:value="0.00154399996099528">
                <text:p>0.00154399996099528</text:p>
              </table:table-cell>
              <table:table-cell office:value-type="float" office:value="8.60000038146973">
                <text:p>8.60000038146973</text:p>
              </table:table-cell>
              <table:table-cell office:value-type="float" office:value="-20">
                <text:p>-20</text:p>
              </table:table-cell>
            </table:table-row>
            <table:table-row>
              <table:table-cell office:value-type="string">
                <text:p>774</text:p>
              </table:table-cell>
              <table:table-cell office:value-type="float" office:value="0.00154599996094476">
                <text:p>0.00154599996094476</text:p>
              </table:table-cell>
              <table:table-cell office:value-type="float" office:value="9">
                <text:p>9</text:p>
              </table:table-cell>
              <table:table-cell office:value-type="float" office:value="-20">
                <text:p>-20</text:p>
              </table:table-cell>
            </table:table-row>
            <table:table-row>
              <table:table-cell office:value-type="string">
                <text:p>775</text:p>
              </table:table-cell>
              <table:table-cell office:value-type="float" office:value="0.00154799996089423">
                <text:p>0.00154799996089423</text:p>
              </table:table-cell>
              <table:table-cell office:value-type="float" office:value="9.19999980926514">
                <text:p>9.19999980926514</text:p>
              </table:table-cell>
              <table:table-cell office:value-type="float" office:value="-20">
                <text:p>-20</text:p>
              </table:table-cell>
            </table:table-row>
            <table:table-row>
              <table:table-cell office:value-type="string">
                <text:p>776</text:p>
              </table:table-cell>
              <table:table-cell office:value-type="float" office:value="0.00154999996084371">
                <text:p>0.00154999996084371</text:p>
              </table:table-cell>
              <table:table-cell office:value-type="float" office:value="9.60000038146973">
                <text:p>9.60000038146973</text:p>
              </table:table-cell>
              <table:table-cell office:value-type="float" office:value="-20">
                <text:p>-20</text:p>
              </table:table-cell>
            </table:table-row>
            <table:table-row>
              <table:table-cell office:value-type="string">
                <text:p>777</text:p>
              </table:table-cell>
              <table:table-cell office:value-type="float" office:value="0.00155199996079318">
                <text:p>0.00155199996079318</text:p>
              </table:table-cell>
              <table:table-cell office:value-type="float" office:value="10">
                <text:p>10</text:p>
              </table:table-cell>
              <table:table-cell office:value-type="float" office:value="-20">
                <text:p>-20</text:p>
              </table:table-cell>
            </table:table-row>
            <table:table-row>
              <table:table-cell office:value-type="string">
                <text:p>778</text:p>
              </table:table-cell>
              <table:table-cell office:value-type="float" office:value="0.00155399996074266">
                <text:p>0.00155399996074266</text:p>
              </table:table-cell>
              <table:table-cell office:value-type="float" office:value="10.3999996185303">
                <text:p>10.3999996185303</text:p>
              </table:table-cell>
              <table:table-cell office:value-type="float" office:value="-20">
                <text:p>-20</text:p>
              </table:table-cell>
            </table:table-row>
            <table:table-row>
              <table:table-cell office:value-type="string">
                <text:p>779</text:p>
              </table:table-cell>
              <table:table-cell office:value-type="float" office:value="0.00155599996069213">
                <text:p>0.00155599996069213</text:p>
              </table:table-cell>
              <table:table-cell office:value-type="float" office:value="10.8000001907349">
                <text:p>10.8000001907349</text:p>
              </table:table-cell>
              <table:table-cell office:value-type="float" office:value="-20">
                <text:p>-20</text:p>
              </table:table-cell>
            </table:table-row>
            <table:table-row>
              <table:table-cell office:value-type="string">
                <text:p>780</text:p>
              </table:table-cell>
              <table:table-cell office:value-type="float" office:value="0.00155799996064161">
                <text:p>0.00155799996064161</text:p>
              </table:table-cell>
              <table:table-cell office:value-type="float" office:value="11.3999996185303">
                <text:p>11.3999996185303</text:p>
              </table:table-cell>
              <table:table-cell office:value-type="float" office:value="-20">
                <text:p>-20</text:p>
              </table:table-cell>
            </table:table-row>
            <table:table-row>
              <table:table-cell office:value-type="string">
                <text:p>781</text:p>
              </table:table-cell>
              <table:table-cell office:value-type="float" office:value="0.00155999996059109">
                <text:p>0.00155999996059109</text:p>
              </table:table-cell>
              <table:table-cell office:value-type="float" office:value="11.6000003814697">
                <text:p>11.6000003814697</text:p>
              </table:table-cell>
              <table:table-cell office:value-type="float" office:value="-20">
                <text:p>-20</text:p>
              </table:table-cell>
            </table:table-row>
            <table:table-row>
              <table:table-cell office:value-type="string">
                <text:p>782</text:p>
              </table:table-cell>
              <table:table-cell office:value-type="float" office:value="0.00156199996054056">
                <text:p>0.00156199996054056</text:p>
              </table:table-cell>
              <table:table-cell office:value-type="float" office:value="11.8000001907349">
                <text:p>11.8000001907349</text:p>
              </table:table-cell>
              <table:table-cell office:value-type="float" office:value="-20">
                <text:p>-20</text:p>
              </table:table-cell>
            </table:table-row>
            <table:table-row>
              <table:table-cell office:value-type="string">
                <text:p>783</text:p>
              </table:table-cell>
              <table:table-cell office:value-type="float" office:value="0.00156399996049004">
                <text:p>0.00156399996049004</text:p>
              </table:table-cell>
              <table:table-cell office:value-type="float" office:value="12">
                <text:p>12</text:p>
              </table:table-cell>
              <table:table-cell office:value-type="float" office:value="-20">
                <text:p>-20</text:p>
              </table:table-cell>
            </table:table-row>
            <table:table-row>
              <table:table-cell office:value-type="string">
                <text:p>784</text:p>
              </table:table-cell>
              <table:table-cell office:value-type="float" office:value="0.00156599996043951">
                <text:p>0.00156599996043951</text:p>
              </table:table-cell>
              <table:table-cell office:value-type="float" office:value="12.8000001907349">
                <text:p>12.8000001907349</text:p>
              </table:table-cell>
              <table:table-cell office:value-type="float" office:value="-20">
                <text:p>-20</text:p>
              </table:table-cell>
            </table:table-row>
            <table:table-row>
              <table:table-cell office:value-type="string">
                <text:p>785</text:p>
              </table:table-cell>
              <table:table-cell office:value-type="float" office:value="0.00156799996038899">
                <text:p>0.00156799996038899</text:p>
              </table:table-cell>
              <table:table-cell office:value-type="float" office:value="13">
                <text:p>13</text:p>
              </table:table-cell>
              <table:table-cell office:value-type="float" office:value="-20">
                <text:p>-20</text:p>
              </table:table-cell>
            </table:table-row>
            <table:table-row>
              <table:table-cell office:value-type="string">
                <text:p>786</text:p>
              </table:table-cell>
              <table:table-cell office:value-type="float" office:value="0.00156999996033846">
                <text:p>0.00156999996033846</text:p>
              </table:table-cell>
              <table:table-cell office:value-type="float" office:value="13.3999996185303">
                <text:p>13.3999996185303</text:p>
              </table:table-cell>
              <table:table-cell office:value-type="float" office:value="-20">
                <text:p>-20</text:p>
              </table:table-cell>
            </table:table-row>
            <table:table-row>
              <table:table-cell office:value-type="string">
                <text:p>787</text:p>
              </table:table-cell>
              <table:table-cell office:value-type="float" office:value="0.00157199996028794">
                <text:p>0.00157199996028794</text:p>
              </table:table-cell>
              <table:table-cell office:value-type="float" office:value="13.8000001907349">
                <text:p>13.8000001907349</text:p>
              </table:table-cell>
              <table:table-cell office:value-type="float" office:value="-20">
                <text:p>-20</text:p>
              </table:table-cell>
            </table:table-row>
            <table:table-row>
              <table:table-cell office:value-type="string">
                <text:p>788</text:p>
              </table:table-cell>
              <table:table-cell office:value-type="float" office:value="0.00157399996023742">
                <text:p>0.00157399996023742</text:p>
              </table:table-cell>
              <table:table-cell office:value-type="float" office:value="14">
                <text:p>14</text:p>
              </table:table-cell>
              <table:table-cell office:value-type="float" office:value="-20">
                <text:p>-20</text:p>
              </table:table-cell>
            </table:table-row>
            <table:table-row>
              <table:table-cell office:value-type="string">
                <text:p>789</text:p>
              </table:table-cell>
              <table:table-cell office:value-type="float" office:value="0.00157599996018689">
                <text:p>0.00157599996018689</text:p>
              </table:table-cell>
              <table:table-cell office:value-type="float" office:value="14.3999996185303">
                <text:p>14.3999996185303</text:p>
              </table:table-cell>
              <table:table-cell office:value-type="float" office:value="-20">
                <text:p>-20</text:p>
              </table:table-cell>
            </table:table-row>
            <table:table-row>
              <table:table-cell office:value-type="string">
                <text:p>790</text:p>
              </table:table-cell>
              <table:table-cell office:value-type="float" office:value="0.00157799996013637">
                <text:p>0.00157799996013637</text:p>
              </table:table-cell>
              <table:table-cell office:value-type="float" office:value="14.8000001907349">
                <text:p>14.8000001907349</text:p>
              </table:table-cell>
              <table:table-cell office:value-type="float" office:value="-20">
                <text:p>-20</text:p>
              </table:table-cell>
            </table:table-row>
            <table:table-row>
              <table:table-cell office:value-type="string">
                <text:p>791</text:p>
              </table:table-cell>
              <table:table-cell office:value-type="float" office:value="0.00157999996008584">
                <text:p>0.00157999996008584</text:p>
              </table:table-cell>
              <table:table-cell office:value-type="float" office:value="15">
                <text:p>15</text:p>
              </table:table-cell>
              <table:table-cell office:value-type="float" office:value="-20">
                <text:p>-20</text:p>
              </table:table-cell>
            </table:table-row>
            <table:table-row>
              <table:table-cell office:value-type="string">
                <text:p>792</text:p>
              </table:table-cell>
              <table:table-cell office:value-type="float" office:value="0.00158199996003532">
                <text:p>0.00158199996003532</text:p>
              </table:table-cell>
              <table:table-cell office:value-type="float" office:value="15.8000001907349">
                <text:p>15.8000001907349</text:p>
              </table:table-cell>
              <table:table-cell office:value-type="float" office:value="-20">
                <text:p>-20</text:p>
              </table:table-cell>
            </table:table-row>
            <table:table-row>
              <table:table-cell office:value-type="string">
                <text:p>793</text:p>
              </table:table-cell>
              <table:table-cell office:value-type="float" office:value="0.00158399995998479">
                <text:p>0.00158399995998479</text:p>
              </table:table-cell>
              <table:table-cell office:value-type="float" office:value="16">
                <text:p>16</text:p>
              </table:table-cell>
              <table:table-cell office:value-type="float" office:value="-20">
                <text:p>-20</text:p>
              </table:table-cell>
            </table:table-row>
            <table:table-row>
              <table:table-cell office:value-type="string">
                <text:p>794</text:p>
              </table:table-cell>
              <table:table-cell office:value-type="float" office:value="0.00158599995993427">
                <text:p>0.00158599995993427</text:p>
              </table:table-cell>
              <table:table-cell office:value-type="float" office:value="16.2000007629395">
                <text:p>16.2000007629395</text:p>
              </table:table-cell>
              <table:table-cell office:value-type="float" office:value="-20">
                <text:p>-20</text:p>
              </table:table-cell>
            </table:table-row>
            <table:table-row>
              <table:table-cell office:value-type="string">
                <text:p>795</text:p>
              </table:table-cell>
              <table:table-cell office:value-type="float" office:value="0.00158799995988375">
                <text:p>0.00158799995988375</text:p>
              </table:table-cell>
              <table:table-cell office:value-type="float" office:value="16.3999996185303">
                <text:p>16.3999996185303</text:p>
              </table:table-cell>
              <table:table-cell office:value-type="float" office:value="-20">
                <text:p>-20</text:p>
              </table:table-cell>
            </table:table-row>
            <table:table-row>
              <table:table-cell office:value-type="string">
                <text:p>796</text:p>
              </table:table-cell>
              <table:table-cell office:value-type="float" office:value="0.00158999995983322">
                <text:p>0.00158999995983322</text:p>
              </table:table-cell>
              <table:table-cell office:value-type="float" office:value="17.2000007629395">
                <text:p>17.2000007629395</text:p>
              </table:table-cell>
              <table:table-cell office:value-type="float" office:value="-20">
                <text:p>-20</text:p>
              </table:table-cell>
            </table:table-row>
            <table:table-row>
              <table:table-cell office:value-type="string">
                <text:p>797</text:p>
              </table:table-cell>
              <table:table-cell office:value-type="float" office:value="0.0015919999597827">
                <text:p>0.0015919999597827</text:p>
              </table:table-cell>
              <table:table-cell office:value-type="float" office:value="17.3999996185303">
                <text:p>17.3999996185303</text:p>
              </table:table-cell>
              <table:table-cell office:value-type="float" office:value="-20">
                <text:p>-20</text:p>
              </table:table-cell>
            </table:table-row>
            <table:table-row>
              <table:table-cell office:value-type="string">
                <text:p>798</text:p>
              </table:table-cell>
              <table:table-cell office:value-type="float" office:value="0.00159399995973217">
                <text:p>0.00159399995973217</text:p>
              </table:table-cell>
              <table:table-cell office:value-type="float" office:value="17.7999992370605">
                <text:p>17.7999992370605</text:p>
              </table:table-cell>
              <table:table-cell office:value-type="float" office:value="-20">
                <text:p>-20</text:p>
              </table:table-cell>
            </table:table-row>
            <table:table-row>
              <table:table-cell office:value-type="string">
                <text:p>799</text:p>
              </table:table-cell>
              <table:table-cell office:value-type="float" office:value="0.00159599995968165">
                <text:p>0.00159599995968165</text:p>
              </table:table-cell>
              <table:table-cell office:value-type="float" office:value="18.2000007629395">
                <text:p>18.2000007629395</text:p>
              </table:table-cell>
              <table:table-cell office:value-type="float" office:value="-20">
                <text:p>-20</text:p>
              </table:table-cell>
            </table:table-row>
            <table:table-row>
              <table:table-cell office:value-type="string">
                <text:p>800</text:p>
              </table:table-cell>
              <table:table-cell office:value-type="float" office:value="0.00159799995963112">
                <text:p>0.00159799995963112</text:p>
              </table:table-cell>
              <table:table-cell office:value-type="float" office:value="18.3999996185303">
                <text:p>18.3999996185303</text:p>
              </table:table-cell>
              <table:table-cell office:value-type="float" office:value="-20">
                <text:p>-20</text:p>
              </table:table-cell>
            </table:table-row>
            <table:table-row>
              <table:table-cell office:value-type="string">
                <text:p>801</text:p>
              </table:table-cell>
              <table:table-cell office:value-type="float" office:value="0.0015999999595806">
                <text:p>0.0015999999595806</text:p>
              </table:table-cell>
              <table:table-cell office:value-type="float" office:value="18.7999992370605">
                <text:p>18.7999992370605</text:p>
              </table:table-cell>
              <table:table-cell office:value-type="float" office:value="-20">
                <text:p>-20</text:p>
              </table:table-cell>
            </table:table-row>
            <table:table-row>
              <table:table-cell office:value-type="string">
                <text:p>802</text:p>
              </table:table-cell>
              <table:table-cell office:value-type="float" office:value="0.00160199995953008">
                <text:p>0.00160199995953008</text:p>
              </table:table-cell>
              <table:table-cell office:value-type="float" office:value="19.2000007629395">
                <text:p>19.2000007629395</text:p>
              </table:table-cell>
              <table:table-cell office:value-type="float" office:value="-20">
                <text:p>-20</text:p>
              </table:table-cell>
            </table:table-row>
            <table:table-row>
              <table:table-cell office:value-type="string">
                <text:p>803</text:p>
              </table:table-cell>
              <table:table-cell office:value-type="float" office:value="0.00160399995947955">
                <text:p>0.00160399995947955</text:p>
              </table:table-cell>
              <table:table-cell office:value-type="float" office:value="19.3999996185303">
                <text:p>19.3999996185303</text:p>
              </table:table-cell>
              <table:table-cell office:value-type="float" office:value="-20">
                <text:p>-20</text:p>
              </table:table-cell>
            </table:table-row>
            <table:table-row>
              <table:table-cell office:value-type="string">
                <text:p>804</text:p>
              </table:table-cell>
              <table:table-cell office:value-type="float" office:value="0.00160599995942903">
                <text:p>0.00160599995942903</text:p>
              </table:table-cell>
              <table:table-cell office:value-type="float" office:value="20.2000007629395">
                <text:p>20.2000007629395</text:p>
              </table:table-cell>
              <table:table-cell office:value-type="float" office:value="-20">
                <text:p>-20</text:p>
              </table:table-cell>
            </table:table-row>
            <table:table-row>
              <table:table-cell office:value-type="string">
                <text:p>805</text:p>
              </table:table-cell>
              <table:table-cell office:value-type="float" office:value="0.0016079999593785">
                <text:p>0.0016079999593785</text:p>
              </table:table-cell>
              <table:table-cell office:value-type="float" office:value="20.3999996185303">
                <text:p>20.3999996185303</text:p>
              </table:table-cell>
              <table:table-cell office:value-type="float" office:value="-20">
                <text:p>-20</text:p>
              </table:table-cell>
            </table:table-row>
            <table:table-row>
              <table:table-cell office:value-type="string">
                <text:p>806</text:p>
              </table:table-cell>
              <table:table-cell office:value-type="float" office:value="0.00160999995932798">
                <text:p>0.00160999995932798</text:p>
              </table:table-cell>
              <table:table-cell office:value-type="float" office:value="20.7999992370605">
                <text:p>20.7999992370605</text:p>
              </table:table-cell>
              <table:table-cell office:value-type="float" office:value="-20">
                <text:p>-20</text:p>
              </table:table-cell>
            </table:table-row>
            <table:table-row>
              <table:table-cell office:value-type="string">
                <text:p>807</text:p>
              </table:table-cell>
              <table:table-cell office:value-type="float" office:value="0.00161199995927745">
                <text:p>0.00161199995927745</text:p>
              </table:table-cell>
              <table:table-cell office:value-type="float" office:value="20.7999992370605">
                <text:p>20.7999992370605</text:p>
              </table:table-cell>
              <table:table-cell office:value-type="float" office:value="-20">
                <text:p>-20</text:p>
              </table:table-cell>
            </table:table-row>
            <table:table-row>
              <table:table-cell office:value-type="string">
                <text:p>808</text:p>
              </table:table-cell>
              <table:table-cell office:value-type="float" office:value="0.00161399995922693">
                <text:p>0.00161399995922693</text:p>
              </table:table-cell>
              <table:table-cell office:value-type="float" office:value="21.3999996185303">
                <text:p>21.3999996185303</text:p>
              </table:table-cell>
              <table:table-cell office:value-type="float" office:value="-20">
                <text:p>-20</text:p>
              </table:table-cell>
            </table:table-row>
            <table:table-row>
              <table:table-cell office:value-type="string">
                <text:p>809</text:p>
              </table:table-cell>
              <table:table-cell office:value-type="float" office:value="0.00161599995917641">
                <text:p>0.00161599995917641</text:p>
              </table:table-cell>
              <table:table-cell office:value-type="float" office:value="22">
                <text:p>22</text:p>
              </table:table-cell>
              <table:table-cell office:value-type="float" office:value="-20">
                <text:p>-20</text:p>
              </table:table-cell>
            </table:table-row>
            <table:table-row>
              <table:table-cell office:value-type="string">
                <text:p>810</text:p>
              </table:table-cell>
              <table:table-cell office:value-type="float" office:value="0.00161799995912588">
                <text:p>0.00161799995912588</text:p>
              </table:table-cell>
              <table:table-cell office:value-type="float" office:value="22.2000007629395">
                <text:p>22.2000007629395</text:p>
              </table:table-cell>
              <table:table-cell office:value-type="float" office:value="-20">
                <text:p>-20</text:p>
              </table:table-cell>
            </table:table-row>
            <table:table-row>
              <table:table-cell office:value-type="string">
                <text:p>811</text:p>
              </table:table-cell>
              <table:table-cell office:value-type="float" office:value="0.00161999995907536">
                <text:p>0.00161999995907536</text:p>
              </table:table-cell>
              <table:table-cell office:value-type="float" office:value="22.6000003814697">
                <text:p>22.6000003814697</text:p>
              </table:table-cell>
              <table:table-cell office:value-type="float" office:value="-20">
                <text:p>-20</text:p>
              </table:table-cell>
            </table:table-row>
            <table:table-row>
              <table:table-cell office:value-type="string">
                <text:p>812</text:p>
              </table:table-cell>
              <table:table-cell office:value-type="float" office:value="0.00162199995902483">
                <text:p>0.00162199995902483</text:p>
              </table:table-cell>
              <table:table-cell office:value-type="float" office:value="23">
                <text:p>23</text:p>
              </table:table-cell>
              <table:table-cell office:value-type="float" office:value="-20">
                <text:p>-20</text:p>
              </table:table-cell>
            </table:table-row>
            <table:table-row>
              <table:table-cell office:value-type="string">
                <text:p>813</text:p>
              </table:table-cell>
              <table:table-cell office:value-type="float" office:value="0.00162399995897431">
                <text:p>0.00162399995897431</text:p>
              </table:table-cell>
              <table:table-cell office:value-type="float" office:value="23.2000007629395">
                <text:p>23.2000007629395</text:p>
              </table:table-cell>
              <table:table-cell office:value-type="float" office:value="-20">
                <text:p>-20</text:p>
              </table:table-cell>
            </table:table-row>
            <table:table-row>
              <table:table-cell office:value-type="string">
                <text:p>814</text:p>
              </table:table-cell>
              <table:table-cell office:value-type="float" office:value="0.00162599995892379">
                <text:p>0.00162599995892379</text:p>
              </table:table-cell>
              <table:table-cell office:value-type="float" office:value="23.7999992370605">
                <text:p>23.7999992370605</text:p>
              </table:table-cell>
              <table:table-cell office:value-type="float" office:value="-20">
                <text:p>-20</text:p>
              </table:table-cell>
            </table:table-row>
            <table:table-row>
              <table:table-cell office:value-type="string">
                <text:p>815</text:p>
              </table:table-cell>
              <table:table-cell office:value-type="float" office:value="0.00162799995887326">
                <text:p>0.00162799995887326</text:p>
              </table:table-cell>
              <table:table-cell office:value-type="float" office:value="23.7999992370605">
                <text:p>23.7999992370605</text:p>
              </table:table-cell>
              <table:table-cell office:value-type="float" office:value="-20">
                <text:p>-20</text:p>
              </table:table-cell>
            </table:table-row>
            <table:table-row>
              <table:table-cell office:value-type="string">
                <text:p>816</text:p>
              </table:table-cell>
              <table:table-cell office:value-type="float" office:value="0.00162999995882274">
                <text:p>0.00162999995882274</text:p>
              </table:table-cell>
              <table:table-cell office:value-type="float" office:value="24.6000003814697">
                <text:p>24.6000003814697</text:p>
              </table:table-cell>
              <table:table-cell office:value-type="float" office:value="-20">
                <text:p>-20</text:p>
              </table:table-cell>
            </table:table-row>
            <table:table-row>
              <table:table-cell office:value-type="string">
                <text:p>817</text:p>
              </table:table-cell>
              <table:table-cell office:value-type="float" office:value="0.00163199995877221">
                <text:p>0.00163199995877221</text:p>
              </table:table-cell>
              <table:table-cell office:value-type="float" office:value="24.7999992370605">
                <text:p>24.7999992370605</text:p>
              </table:table-cell>
              <table:table-cell office:value-type="float" office:value="-20">
                <text:p>-20</text:p>
              </table:table-cell>
            </table:table-row>
            <table:table-row>
              <table:table-cell office:value-type="string">
                <text:p>818</text:p>
              </table:table-cell>
              <table:table-cell office:value-type="float" office:value="0.00163399995872169">
                <text:p>0.00163399995872169</text:p>
              </table:table-cell>
              <table:table-cell office:value-type="float" office:value="25.3999996185303">
                <text:p>25.3999996185303</text:p>
              </table:table-cell>
              <table:table-cell office:value-type="float" office:value="-20">
                <text:p>-20</text:p>
              </table:table-cell>
            </table:table-row>
            <table:table-row>
              <table:table-cell office:value-type="string">
                <text:p>819</text:p>
              </table:table-cell>
              <table:table-cell office:value-type="float" office:value="0.00163599995867116">
                <text:p>0.00163599995867116</text:p>
              </table:table-cell>
              <table:table-cell office:value-type="float" office:value="25.6000003814697">
                <text:p>25.6000003814697</text:p>
              </table:table-cell>
              <table:table-cell office:value-type="float" office:value="-20">
                <text:p>-20</text:p>
              </table:table-cell>
            </table:table-row>
            <table:table-row>
              <table:table-cell office:value-type="string">
                <text:p>820</text:p>
              </table:table-cell>
              <table:table-cell office:value-type="float" office:value="0.00163799995862064">
                <text:p>0.00163799995862064</text:p>
              </table:table-cell>
              <table:table-cell office:value-type="float" office:value="26.2000007629395">
                <text:p>26.2000007629395</text:p>
              </table:table-cell>
              <table:table-cell office:value-type="float" office:value="-20">
                <text:p>-20</text:p>
              </table:table-cell>
            </table:table-row>
            <table:table-row>
              <table:table-cell office:value-type="string">
                <text:p>821</text:p>
              </table:table-cell>
              <table:table-cell office:value-type="float" office:value="0.00163999995857012">
                <text:p>0.00163999995857012</text:p>
              </table:table-cell>
              <table:table-cell office:value-type="float" office:value="26.2000007629395">
                <text:p>26.2000007629395</text:p>
              </table:table-cell>
              <table:table-cell office:value-type="float" office:value="-20">
                <text:p>-20</text:p>
              </table:table-cell>
            </table:table-row>
            <table:table-row>
              <table:table-cell office:value-type="string">
                <text:p>822</text:p>
              </table:table-cell>
              <table:table-cell office:value-type="float" office:value="0.00164199995851959">
                <text:p>0.00164199995851959</text:p>
              </table:table-cell>
              <table:table-cell office:value-type="float" office:value="26.6000003814697">
                <text:p>26.6000003814697</text:p>
              </table:table-cell>
              <table:table-cell office:value-type="float" office:value="-20">
                <text:p>-20</text:p>
              </table:table-cell>
            </table:table-row>
            <table:table-row>
              <table:table-cell office:value-type="string">
                <text:p>823</text:p>
              </table:table-cell>
              <table:table-cell office:value-type="float" office:value="0.00164399995846907">
                <text:p>0.00164399995846907</text:p>
              </table:table-cell>
              <table:table-cell office:value-type="float" office:value="27">
                <text:p>27</text:p>
              </table:table-cell>
              <table:table-cell office:value-type="float" office:value="-20">
                <text:p>-20</text:p>
              </table:table-cell>
            </table:table-row>
            <table:table-row>
              <table:table-cell office:value-type="string">
                <text:p>824</text:p>
              </table:table-cell>
              <table:table-cell office:value-type="float" office:value="0.00164599995841854">
                <text:p>0.00164599995841854</text:p>
              </table:table-cell>
              <table:table-cell office:value-type="float" office:value="27.6000003814697">
                <text:p>27.6000003814697</text:p>
              </table:table-cell>
              <table:table-cell office:value-type="float" office:value="-20">
                <text:p>-20</text:p>
              </table:table-cell>
            </table:table-row>
            <table:table-row>
              <table:table-cell office:value-type="string">
                <text:p>825</text:p>
              </table:table-cell>
              <table:table-cell office:value-type="float" office:value="0.00164799995836802">
                <text:p>0.00164799995836802</text:p>
              </table:table-cell>
              <table:table-cell office:value-type="float" office:value="27.7999992370605">
                <text:p>27.7999992370605</text:p>
              </table:table-cell>
              <table:table-cell office:value-type="float" office:value="-20">
                <text:p>-20</text:p>
              </table:table-cell>
            </table:table-row>
            <table:table-row>
              <table:table-cell office:value-type="string">
                <text:p>826</text:p>
              </table:table-cell>
              <table:table-cell office:value-type="float" office:value="0.00164999995831749">
                <text:p>0.00164999995831749</text:p>
              </table:table-cell>
              <table:table-cell office:value-type="float" office:value="28.2000007629395">
                <text:p>28.2000007629395</text:p>
              </table:table-cell>
              <table:table-cell office:value-type="float" office:value="-20">
                <text:p>-20</text:p>
              </table:table-cell>
            </table:table-row>
            <table:table-row>
              <table:table-cell office:value-type="string">
                <text:p>827</text:p>
              </table:table-cell>
              <table:table-cell office:value-type="float" office:value="0.00165199995826697">
                <text:p>0.00165199995826697</text:p>
              </table:table-cell>
              <table:table-cell office:value-type="float" office:value="28.6000003814697">
                <text:p>28.6000003814697</text:p>
              </table:table-cell>
              <table:table-cell office:value-type="float" office:value="-20">
                <text:p>-20</text:p>
              </table:table-cell>
            </table:table-row>
            <table:table-row>
              <table:table-cell office:value-type="string">
                <text:p>828</text:p>
              </table:table-cell>
              <table:table-cell office:value-type="float" office:value="0.00165399995821645">
                <text:p>0.00165399995821645</text:p>
              </table:table-cell>
              <table:table-cell office:value-type="float" office:value="29">
                <text:p>29</text:p>
              </table:table-cell>
              <table:table-cell office:value-type="float" office:value="-20">
                <text:p>-20</text:p>
              </table:table-cell>
            </table:table-row>
            <table:table-row>
              <table:table-cell office:value-type="string">
                <text:p>829</text:p>
              </table:table-cell>
              <table:table-cell office:value-type="float" office:value="0.00165599995816592">
                <text:p>0.00165599995816592</text:p>
              </table:table-cell>
              <table:table-cell office:value-type="float" office:value="29.3999996185303">
                <text:p>29.3999996185303</text:p>
              </table:table-cell>
              <table:table-cell office:value-type="float" office:value="-20">
                <text:p>-20</text:p>
              </table:table-cell>
            </table:table-row>
            <table:table-row>
              <table:table-cell office:value-type="string">
                <text:p>830</text:p>
              </table:table-cell>
              <table:table-cell office:value-type="float" office:value="0.0016579999581154">
                <text:p>0.0016579999581154</text:p>
              </table:table-cell>
              <table:table-cell office:value-type="float" office:value="29.6000003814697">
                <text:p>29.6000003814697</text:p>
              </table:table-cell>
              <table:table-cell office:value-type="float" office:value="-20">
                <text:p>-20</text:p>
              </table:table-cell>
            </table:table-row>
            <table:table-row>
              <table:table-cell office:value-type="string">
                <text:p>831</text:p>
              </table:table-cell>
              <table:table-cell office:value-type="float" office:value="0.00165999995806487">
                <text:p>0.00165999995806487</text:p>
              </table:table-cell>
              <table:table-cell office:value-type="float" office:value="30">
                <text:p>30</text:p>
              </table:table-cell>
              <table:table-cell office:value-type="float" office:value="-20">
                <text:p>-20</text:p>
              </table:table-cell>
            </table:table-row>
            <table:table-row>
              <table:table-cell office:value-type="string">
                <text:p>832</text:p>
              </table:table-cell>
              <table:table-cell office:value-type="float" office:value="0.00166199995801435">
                <text:p>0.00166199995801435</text:p>
              </table:table-cell>
              <table:table-cell office:value-type="float" office:value="30.3999996185303">
                <text:p>30.3999996185303</text:p>
              </table:table-cell>
              <table:table-cell office:value-type="float" office:value="-20">
                <text:p>-20</text:p>
              </table:table-cell>
            </table:table-row>
            <table:table-row>
              <table:table-cell office:value-type="string">
                <text:p>833</text:p>
              </table:table-cell>
              <table:table-cell office:value-type="float" office:value="0.00166399995796382">
                <text:p>0.00166399995796382</text:p>
              </table:table-cell>
              <table:table-cell office:value-type="float" office:value="31">
                <text:p>31</text:p>
              </table:table-cell>
              <table:table-cell office:value-type="float" office:value="-20">
                <text:p>-20</text:p>
              </table:table-cell>
            </table:table-row>
            <table:table-row>
              <table:table-cell office:value-type="string">
                <text:p>834</text:p>
              </table:table-cell>
              <table:table-cell office:value-type="float" office:value="0.0016659999579133">
                <text:p>0.0016659999579133</text:p>
              </table:table-cell>
              <table:table-cell office:value-type="float" office:value="31.2000007629395">
                <text:p>31.2000007629395</text:p>
              </table:table-cell>
              <table:table-cell office:value-type="float" office:value="-20">
                <text:p>-20</text:p>
              </table:table-cell>
            </table:table-row>
            <table:table-row>
              <table:table-cell office:value-type="string">
                <text:p>835</text:p>
              </table:table-cell>
              <table:table-cell office:value-type="float" office:value="0.00166799995786278">
                <text:p>0.00166799995786278</text:p>
              </table:table-cell>
              <table:table-cell office:value-type="float" office:value="31.6000003814697">
                <text:p>31.6000003814697</text:p>
              </table:table-cell>
              <table:table-cell office:value-type="float" office:value="-20">
                <text:p>-20</text:p>
              </table:table-cell>
            </table:table-row>
            <table:table-row>
              <table:table-cell office:value-type="string">
                <text:p>836</text:p>
              </table:table-cell>
              <table:table-cell office:value-type="float" office:value="0.00166999995781225">
                <text:p>0.00166999995781225</text:p>
              </table:table-cell>
              <table:table-cell office:value-type="float" office:value="32">
                <text:p>32</text:p>
              </table:table-cell>
              <table:table-cell office:value-type="float" office:value="-20">
                <text:p>-20</text:p>
              </table:table-cell>
            </table:table-row>
            <table:table-row>
              <table:table-cell office:value-type="string">
                <text:p>837</text:p>
              </table:table-cell>
              <table:table-cell office:value-type="float" office:value="0.00167199995776173">
                <text:p>0.00167199995776173</text:p>
              </table:table-cell>
              <table:table-cell office:value-type="float" office:value="32.2000007629395">
                <text:p>32.2000007629395</text:p>
              </table:table-cell>
              <table:table-cell office:value-type="float" office:value="-20">
                <text:p>-20</text:p>
              </table:table-cell>
            </table:table-row>
            <table:table-row>
              <table:table-cell office:value-type="string">
                <text:p>838</text:p>
              </table:table-cell>
              <table:table-cell office:value-type="float" office:value="0.0016739999577112">
                <text:p>0.0016739999577112</text:p>
              </table:table-cell>
              <table:table-cell office:value-type="float" office:value="32.4000015258789">
                <text:p>32.4000015258789</text:p>
              </table:table-cell>
              <table:table-cell office:value-type="float" office:value="-20">
                <text:p>-20</text:p>
              </table:table-cell>
            </table:table-row>
            <table:table-row>
              <table:table-cell office:value-type="string">
                <text:p>839</text:p>
              </table:table-cell>
              <table:table-cell office:value-type="float" office:value="0.00167599995766068">
                <text:p>0.00167599995766068</text:p>
              </table:table-cell>
              <table:table-cell office:value-type="float" office:value="33">
                <text:p>33</text:p>
              </table:table-cell>
              <table:table-cell office:value-type="float" office:value="-20">
                <text:p>-20</text:p>
              </table:table-cell>
            </table:table-row>
            <table:table-row>
              <table:table-cell office:value-type="string">
                <text:p>840</text:p>
              </table:table-cell>
              <table:table-cell office:value-type="float" office:value="0.00167799995761015">
                <text:p>0.00167799995761015</text:p>
              </table:table-cell>
              <table:table-cell office:value-type="float" office:value="33.4000015258789">
                <text:p>33.4000015258789</text:p>
              </table:table-cell>
              <table:table-cell office:value-type="float" office:value="-20">
                <text:p>-20</text:p>
              </table:table-cell>
            </table:table-row>
            <table:table-row>
              <table:table-cell office:value-type="string">
                <text:p>841</text:p>
              </table:table-cell>
              <table:table-cell office:value-type="float" office:value="0.00167999995755963">
                <text:p>0.00167999995755963</text:p>
              </table:table-cell>
              <table:table-cell office:value-type="float" office:value="33.7999992370606">
                <text:p>33.7999992370606</text:p>
              </table:table-cell>
              <table:table-cell office:value-type="float" office:value="-20">
                <text:p>-20</text:p>
              </table:table-cell>
            </table:table-row>
            <table:table-row>
              <table:table-cell office:value-type="string">
                <text:p>842</text:p>
              </table:table-cell>
              <table:table-cell office:value-type="float" office:value="0.00168199995750911">
                <text:p>0.00168199995750911</text:p>
              </table:table-cell>
              <table:table-cell office:value-type="float" office:value="34.4000015258789">
                <text:p>34.4000015258789</text:p>
              </table:table-cell>
              <table:table-cell office:value-type="float" office:value="-20">
                <text:p>-20</text:p>
              </table:table-cell>
            </table:table-row>
            <table:table-row>
              <table:table-cell office:value-type="string">
                <text:p>843</text:p>
              </table:table-cell>
              <table:table-cell office:value-type="float" office:value="0.00168399995745858">
                <text:p>0.00168399995745858</text:p>
              </table:table-cell>
              <table:table-cell office:value-type="float" office:value="34.5999984741211">
                <text:p>34.5999984741211</text:p>
              </table:table-cell>
              <table:table-cell office:value-type="float" office:value="-20">
                <text:p>-20</text:p>
              </table:table-cell>
            </table:table-row>
            <table:table-row>
              <table:table-cell office:value-type="string">
                <text:p>844</text:p>
              </table:table-cell>
              <table:table-cell office:value-type="float" office:value="0.00168599995740806">
                <text:p>0.00168599995740806</text:p>
              </table:table-cell>
              <table:table-cell office:value-type="float" office:value="34.7999992370606">
                <text:p>34.7999992370606</text:p>
              </table:table-cell>
              <table:table-cell office:value-type="float" office:value="-20">
                <text:p>-20</text:p>
              </table:table-cell>
            </table:table-row>
            <table:table-row>
              <table:table-cell office:value-type="string">
                <text:p>845</text:p>
              </table:table-cell>
              <table:table-cell office:value-type="float" office:value="0.00168799995735753">
                <text:p>0.00168799995735753</text:p>
              </table:table-cell>
              <table:table-cell office:value-type="float" office:value="35.2000007629395">
                <text:p>35.2000007629395</text:p>
              </table:table-cell>
              <table:table-cell office:value-type="float" office:value="-20">
                <text:p>-20</text:p>
              </table:table-cell>
            </table:table-row>
            <table:table-row>
              <table:table-cell office:value-type="string">
                <text:p>846</text:p>
              </table:table-cell>
              <table:table-cell office:value-type="float" office:value="0.00168999995730701">
                <text:p>0.00168999995730701</text:p>
              </table:table-cell>
              <table:table-cell office:value-type="float" office:value="35.5999984741211">
                <text:p>35.5999984741211</text:p>
              </table:table-cell>
              <table:table-cell office:value-type="float" office:value="-20">
                <text:p>-20</text:p>
              </table:table-cell>
            </table:table-row>
            <table:table-row>
              <table:table-cell office:value-type="string">
                <text:p>847</text:p>
              </table:table-cell>
              <table:table-cell office:value-type="float" office:value="0.00169199995725648">
                <text:p>0.00169199995725648</text:p>
              </table:table-cell>
              <table:table-cell office:value-type="float" office:value="36">
                <text:p>36</text:p>
              </table:table-cell>
              <table:table-cell office:value-type="float" office:value="-20">
                <text:p>-20</text:p>
              </table:table-cell>
            </table:table-row>
            <table:table-row>
              <table:table-cell office:value-type="string">
                <text:p>848</text:p>
              </table:table-cell>
              <table:table-cell office:value-type="float" office:value="0.00169399995720596">
                <text:p>0.00169399995720596</text:p>
              </table:table-cell>
              <table:table-cell office:value-type="float" office:value="36.5999984741211">
                <text:p>36.5999984741211</text:p>
              </table:table-cell>
              <table:table-cell office:value-type="float" office:value="-20">
                <text:p>-20</text:p>
              </table:table-cell>
            </table:table-row>
            <table:table-row>
              <table:table-cell office:value-type="string">
                <text:p>849</text:p>
              </table:table-cell>
              <table:table-cell office:value-type="float" office:value="0.00169599995715544">
                <text:p>0.00169599995715544</text:p>
              </table:table-cell>
              <table:table-cell office:value-type="float" office:value="36.7999992370606">
                <text:p>36.7999992370606</text:p>
              </table:table-cell>
              <table:table-cell office:value-type="float" office:value="-20">
                <text:p>-20</text:p>
              </table:table-cell>
            </table:table-row>
            <table:table-row>
              <table:table-cell office:value-type="string">
                <text:p>850</text:p>
              </table:table-cell>
              <table:table-cell office:value-type="float" office:value="0.00169799995710491">
                <text:p>0.00169799995710491</text:p>
              </table:table-cell>
              <table:table-cell office:value-type="float" office:value="37">
                <text:p>37</text:p>
              </table:table-cell>
              <table:table-cell office:value-type="float" office:value="-20">
                <text:p>-20</text:p>
              </table:table-cell>
            </table:table-row>
            <table:table-row>
              <table:table-cell office:value-type="string">
                <text:p>851</text:p>
              </table:table-cell>
              <table:table-cell office:value-type="float" office:value="0.00169999995705439">
                <text:p>0.00169999995705439</text:p>
              </table:table-cell>
              <table:table-cell office:value-type="float" office:value="37.4000015258789">
                <text:p>37.4000015258789</text:p>
              </table:table-cell>
              <table:table-cell office:value-type="float" office:value="-20">
                <text:p>-20</text:p>
              </table:table-cell>
            </table:table-row>
            <table:table-row>
              <table:table-cell office:value-type="string">
                <text:p>852</text:p>
              </table:table-cell>
              <table:table-cell office:value-type="float" office:value="0.00170199995700386">
                <text:p>0.00170199995700386</text:p>
              </table:table-cell>
              <table:table-cell office:value-type="float" office:value="37.7999992370606">
                <text:p>37.7999992370606</text:p>
              </table:table-cell>
              <table:table-cell office:value-type="float" office:value="-20">
                <text:p>-20</text:p>
              </table:table-cell>
            </table:table-row>
            <table:table-row>
              <table:table-cell office:value-type="string">
                <text:p>853</text:p>
              </table:table-cell>
              <table:table-cell office:value-type="float" office:value="0.00170399995695334">
                <text:p>0.00170399995695334</text:p>
              </table:table-cell>
              <table:table-cell office:value-type="float" office:value="38.2000007629395">
                <text:p>38.2000007629395</text:p>
              </table:table-cell>
              <table:table-cell office:value-type="float" office:value="-20">
                <text:p>-20</text:p>
              </table:table-cell>
            </table:table-row>
            <table:table-row>
              <table:table-cell office:value-type="string">
                <text:p>854</text:p>
              </table:table-cell>
              <table:table-cell office:value-type="float" office:value="0.00170599995690282">
                <text:p>0.00170599995690282</text:p>
              </table:table-cell>
              <table:table-cell office:value-type="float" office:value="38.4000015258789">
                <text:p>38.4000015258789</text:p>
              </table:table-cell>
              <table:table-cell office:value-type="float" office:value="-20">
                <text:p>-20</text:p>
              </table:table-cell>
            </table:table-row>
            <table:table-row>
              <table:table-cell office:value-type="string">
                <text:p>855</text:p>
              </table:table-cell>
              <table:table-cell office:value-type="float" office:value="0.00170799995685229">
                <text:p>0.00170799995685229</text:p>
              </table:table-cell>
              <table:table-cell office:value-type="float" office:value="39">
                <text:p>39</text:p>
              </table:table-cell>
              <table:table-cell office:value-type="float" office:value="-20">
                <text:p>-20</text:p>
              </table:table-cell>
            </table:table-row>
            <table:table-row>
              <table:table-cell office:value-type="string">
                <text:p>856</text:p>
              </table:table-cell>
              <table:table-cell office:value-type="float" office:value="0.00170999995680177">
                <text:p>0.00170999995680177</text:p>
              </table:table-cell>
              <table:table-cell office:value-type="float" office:value="39.2000007629395">
                <text:p>39.2000007629395</text:p>
              </table:table-cell>
              <table:table-cell office:value-type="float" office:value="-20">
                <text:p>-20</text:p>
              </table:table-cell>
            </table:table-row>
            <table:table-row>
              <table:table-cell office:value-type="string">
                <text:p>857</text:p>
              </table:table-cell>
              <table:table-cell office:value-type="float" office:value="0.00171199995675124">
                <text:p>0.00171199995675124</text:p>
              </table:table-cell>
              <table:table-cell office:value-type="float" office:value="39.5999984741211">
                <text:p>39.5999984741211</text:p>
              </table:table-cell>
              <table:table-cell office:value-type="float" office:value="-20">
                <text:p>-20</text:p>
              </table:table-cell>
            </table:table-row>
            <table:table-row>
              <table:table-cell office:value-type="string">
                <text:p>858</text:p>
              </table:table-cell>
              <table:table-cell office:value-type="float" office:value="0.00171399995670072">
                <text:p>0.00171399995670072</text:p>
              </table:table-cell>
              <table:table-cell office:value-type="float" office:value="40">
                <text:p>40</text:p>
              </table:table-cell>
              <table:table-cell office:value-type="float" office:value="-20">
                <text:p>-20</text:p>
              </table:table-cell>
            </table:table-row>
            <table:table-row>
              <table:table-cell office:value-type="string">
                <text:p>859</text:p>
              </table:table-cell>
              <table:table-cell office:value-type="float" office:value="0.00171599995665019">
                <text:p>0.00171599995665019</text:p>
              </table:table-cell>
              <table:table-cell office:value-type="float" office:value="40.2000007629395">
                <text:p>40.2000007629395</text:p>
              </table:table-cell>
              <table:table-cell office:value-type="float" office:value="-20">
                <text:p>-20</text:p>
              </table:table-cell>
            </table:table-row>
            <table:table-row>
              <table:table-cell office:value-type="string">
                <text:p>860</text:p>
              </table:table-cell>
              <table:table-cell office:value-type="float" office:value="0.00171799995659967">
                <text:p>0.00171799995659967</text:p>
              </table:table-cell>
              <table:table-cell office:value-type="float" office:value="40.2000007629395">
                <text:p>40.2000007629395</text:p>
              </table:table-cell>
              <table:table-cell office:value-type="float" office:value="-20">
                <text:p>-20</text:p>
              </table:table-cell>
            </table:table-row>
            <table:table-row>
              <table:table-cell office:value-type="string">
                <text:p>861</text:p>
              </table:table-cell>
              <table:table-cell office:value-type="float" office:value="0.00171999995654915">
                <text:p>0.00171999995654915</text:p>
              </table:table-cell>
              <table:table-cell office:value-type="float" office:value="40.2000007629395">
                <text:p>40.2000007629395</text:p>
              </table:table-cell>
              <table:table-cell office:value-type="float" office:value="-20">
                <text:p>-20</text:p>
              </table:table-cell>
            </table:table-row>
            <table:table-row>
              <table:table-cell office:value-type="string">
                <text:p>862</text:p>
              </table:table-cell>
              <table:table-cell office:value-type="float" office:value="0.00172199995649862">
                <text:p>0.00172199995649862</text:p>
              </table:table-cell>
              <table:table-cell office:value-type="float" office:value="40.2000007629395">
                <text:p>40.2000007629395</text:p>
              </table:table-cell>
              <table:table-cell office:value-type="float" office:value="-20">
                <text:p>-20</text:p>
              </table:table-cell>
            </table:table-row>
            <table:table-row>
              <table:table-cell office:value-type="string">
                <text:p>863</text:p>
              </table:table-cell>
              <table:table-cell office:value-type="float" office:value="0.0017239999564481">
                <text:p>0.0017239999564481</text:p>
              </table:table-cell>
              <table:table-cell office:value-type="float" office:value="40.2000007629395">
                <text:p>40.2000007629395</text:p>
              </table:table-cell>
              <table:table-cell office:value-type="float" office:value="-20">
                <text:p>-20</text:p>
              </table:table-cell>
            </table:table-row>
            <table:table-row>
              <table:table-cell office:value-type="string">
                <text:p>864</text:p>
              </table:table-cell>
              <table:table-cell office:value-type="float" office:value="0.00172599995639757">
                <text:p>0.00172599995639757</text:p>
              </table:table-cell>
              <table:table-cell office:value-type="float" office:value="40.2000007629395">
                <text:p>40.2000007629395</text:p>
              </table:table-cell>
              <table:table-cell office:value-type="float" office:value="-20">
                <text:p>-20</text:p>
              </table:table-cell>
            </table:table-row>
            <table:table-row>
              <table:table-cell office:value-type="string">
                <text:p>865</text:p>
              </table:table-cell>
              <table:table-cell office:value-type="float" office:value="0.00172799995634705">
                <text:p>0.00172799995634705</text:p>
              </table:table-cell>
              <table:table-cell office:value-type="float" office:value="40.2000007629395">
                <text:p>40.2000007629395</text:p>
              </table:table-cell>
              <table:table-cell office:value-type="float" office:value="-20">
                <text:p>-20</text:p>
              </table:table-cell>
            </table:table-row>
            <table:table-row>
              <table:table-cell office:value-type="string">
                <text:p>866</text:p>
              </table:table-cell>
              <table:table-cell office:value-type="float" office:value="0.00172999995629652">
                <text:p>0.00172999995629652</text:p>
              </table:table-cell>
              <table:table-cell office:value-type="float" office:value="40.2000007629395">
                <text:p>40.2000007629395</text:p>
              </table:table-cell>
              <table:table-cell office:value-type="float" office:value="-20">
                <text:p>-20</text:p>
              </table:table-cell>
            </table:table-row>
            <table:table-row>
              <table:table-cell office:value-type="string">
                <text:p>867</text:p>
              </table:table-cell>
              <table:table-cell office:value-type="float" office:value="0.001731999956246">
                <text:p>0.001731999956246</text:p>
              </table:table-cell>
              <table:table-cell office:value-type="float" office:value="40.2000007629395">
                <text:p>40.2000007629395</text:p>
              </table:table-cell>
              <table:table-cell office:value-type="float" office:value="-20">
                <text:p>-20</text:p>
              </table:table-cell>
            </table:table-row>
            <table:table-row>
              <table:table-cell office:value-type="string">
                <text:p>868</text:p>
              </table:table-cell>
              <table:table-cell office:value-type="float" office:value="0.00173399995619548">
                <text:p>0.00173399995619548</text:p>
              </table:table-cell>
              <table:table-cell office:value-type="float" office:value="40.2000007629395">
                <text:p>40.2000007629395</text:p>
              </table:table-cell>
              <table:table-cell office:value-type="float" office:value="-20">
                <text:p>-20</text:p>
              </table:table-cell>
            </table:table-row>
            <table:table-row>
              <table:table-cell office:value-type="string">
                <text:p>869</text:p>
              </table:table-cell>
              <table:table-cell office:value-type="float" office:value="0.00173599995614495">
                <text:p>0.00173599995614495</text:p>
              </table:table-cell>
              <table:table-cell office:value-type="float" office:value="40.2000007629395">
                <text:p>40.2000007629395</text:p>
              </table:table-cell>
              <table:table-cell office:value-type="float" office:value="-20">
                <text:p>-20</text:p>
              </table:table-cell>
            </table:table-row>
            <table:table-row>
              <table:table-cell office:value-type="string">
                <text:p>870</text:p>
              </table:table-cell>
              <table:table-cell office:value-type="float" office:value="0.00173799995609443">
                <text:p>0.00173799995609443</text:p>
              </table:table-cell>
              <table:table-cell office:value-type="float" office:value="40.2000007629395">
                <text:p>40.2000007629395</text:p>
              </table:table-cell>
              <table:table-cell office:value-type="float" office:value="-20">
                <text:p>-20</text:p>
              </table:table-cell>
            </table:table-row>
            <table:table-row>
              <table:table-cell office:value-type="string">
                <text:p>871</text:p>
              </table:table-cell>
              <table:table-cell office:value-type="float" office:value="0.0017399999560439">
                <text:p>0.0017399999560439</text:p>
              </table:table-cell>
              <table:table-cell office:value-type="float" office:value="40.2000007629395">
                <text:p>40.2000007629395</text:p>
              </table:table-cell>
              <table:table-cell office:value-type="float" office:value="-20">
                <text:p>-20</text:p>
              </table:table-cell>
            </table:table-row>
            <table:table-row>
              <table:table-cell office:value-type="string">
                <text:p>872</text:p>
              </table:table-cell>
              <table:table-cell office:value-type="float" office:value="0.00174199995599338">
                <text:p>0.00174199995599338</text:p>
              </table:table-cell>
              <table:table-cell office:value-type="float" office:value="40.2000007629395">
                <text:p>40.2000007629395</text:p>
              </table:table-cell>
              <table:table-cell office:value-type="float" office:value="-20">
                <text:p>-20</text:p>
              </table:table-cell>
            </table:table-row>
            <table:table-row>
              <table:table-cell office:value-type="string">
                <text:p>873</text:p>
              </table:table-cell>
              <table:table-cell office:value-type="float" office:value="0.00174399995594285">
                <text:p>0.00174399995594285</text:p>
              </table:table-cell>
              <table:table-cell office:value-type="float" office:value="40.2000007629395">
                <text:p>40.2000007629395</text:p>
              </table:table-cell>
              <table:table-cell office:value-type="float" office:value="-20">
                <text:p>-20</text:p>
              </table:table-cell>
            </table:table-row>
            <table:table-row>
              <table:table-cell office:value-type="string">
                <text:p>874</text:p>
              </table:table-cell>
              <table:table-cell office:value-type="float" office:value="0.00174599995589233">
                <text:p>0.00174599995589233</text:p>
              </table:table-cell>
              <table:table-cell office:value-type="float" office:value="40.2000007629395">
                <text:p>40.2000007629395</text:p>
              </table:table-cell>
              <table:table-cell office:value-type="float" office:value="-20">
                <text:p>-20</text:p>
              </table:table-cell>
            </table:table-row>
            <table:table-row>
              <table:table-cell office:value-type="string">
                <text:p>875</text:p>
              </table:table-cell>
              <table:table-cell office:value-type="float" office:value="0.00174799995584181">
                <text:p>0.00174799995584181</text:p>
              </table:table-cell>
              <table:table-cell office:value-type="float" office:value="40.2000007629395">
                <text:p>40.2000007629395</text:p>
              </table:table-cell>
              <table:table-cell office:value-type="float" office:value="-20">
                <text:p>-20</text:p>
              </table:table-cell>
            </table:table-row>
            <table:table-row>
              <table:table-cell office:value-type="string">
                <text:p>876</text:p>
              </table:table-cell>
              <table:table-cell office:value-type="float" office:value="0.00174999995579128">
                <text:p>0.00174999995579128</text:p>
              </table:table-cell>
              <table:table-cell office:value-type="float" office:value="40.2000007629395">
                <text:p>40.2000007629395</text:p>
              </table:table-cell>
              <table:table-cell office:value-type="float" office:value="-20">
                <text:p>-20</text:p>
              </table:table-cell>
            </table:table-row>
            <table:table-row>
              <table:table-cell office:value-type="string">
                <text:p>877</text:p>
              </table:table-cell>
              <table:table-cell office:value-type="float" office:value="0.00175199995574076">
                <text:p>0.00175199995574076</text:p>
              </table:table-cell>
              <table:table-cell office:value-type="float" office:value="40.2000007629395">
                <text:p>40.2000007629395</text:p>
              </table:table-cell>
              <table:table-cell office:value-type="float" office:value="-20">
                <text:p>-20</text:p>
              </table:table-cell>
            </table:table-row>
            <table:table-row>
              <table:table-cell office:value-type="string">
                <text:p>878</text:p>
              </table:table-cell>
              <table:table-cell office:value-type="float" office:value="0.00175399995569023">
                <text:p>0.00175399995569023</text:p>
              </table:table-cell>
              <table:table-cell office:value-type="float" office:value="40.2000007629395">
                <text:p>40.2000007629395</text:p>
              </table:table-cell>
              <table:table-cell office:value-type="float" office:value="-20">
                <text:p>-20</text:p>
              </table:table-cell>
            </table:table-row>
            <table:table-row>
              <table:table-cell office:value-type="string">
                <text:p>879</text:p>
              </table:table-cell>
              <table:table-cell office:value-type="float" office:value="0.00175599995563971">
                <text:p>0.00175599995563971</text:p>
              </table:table-cell>
              <table:table-cell office:value-type="float" office:value="40.2000007629395">
                <text:p>40.2000007629395</text:p>
              </table:table-cell>
              <table:table-cell office:value-type="float" office:value="-20">
                <text:p>-20</text:p>
              </table:table-cell>
            </table:table-row>
            <table:table-row>
              <table:table-cell office:value-type="string">
                <text:p>880</text:p>
              </table:table-cell>
              <table:table-cell office:value-type="float" office:value="0.00175799995558918">
                <text:p>0.00175799995558918</text:p>
              </table:table-cell>
              <table:table-cell office:value-type="float" office:value="40.2000007629395">
                <text:p>40.2000007629395</text:p>
              </table:table-cell>
              <table:table-cell office:value-type="float" office:value="-20">
                <text:p>-20</text:p>
              </table:table-cell>
            </table:table-row>
            <table:table-row>
              <table:table-cell office:value-type="string">
                <text:p>881</text:p>
              </table:table-cell>
              <table:table-cell office:value-type="float" office:value="0.00175999995553866">
                <text:p>0.00175999995553866</text:p>
              </table:table-cell>
              <table:table-cell office:value-type="float" office:value="40.2000007629395">
                <text:p>40.2000007629395</text:p>
              </table:table-cell>
              <table:table-cell office:value-type="float" office:value="-20">
                <text:p>-20</text:p>
              </table:table-cell>
            </table:table-row>
            <table:table-row>
              <table:table-cell office:value-type="string">
                <text:p>882</text:p>
              </table:table-cell>
              <table:table-cell office:value-type="float" office:value="0.00176199995548814">
                <text:p>0.00176199995548814</text:p>
              </table:table-cell>
              <table:table-cell office:value-type="float" office:value="40.2000007629395">
                <text:p>40.2000007629395</text:p>
              </table:table-cell>
              <table:table-cell office:value-type="float" office:value="-20">
                <text:p>-20</text:p>
              </table:table-cell>
            </table:table-row>
            <table:table-row>
              <table:table-cell office:value-type="string">
                <text:p>883</text:p>
              </table:table-cell>
              <table:table-cell office:value-type="float" office:value="0.00176399995543761">
                <text:p>0.00176399995543761</text:p>
              </table:table-cell>
              <table:table-cell office:value-type="float" office:value="40.2000007629395">
                <text:p>40.2000007629395</text:p>
              </table:table-cell>
              <table:table-cell office:value-type="float" office:value="-20">
                <text:p>-20</text:p>
              </table:table-cell>
            </table:table-row>
            <table:table-row>
              <table:table-cell office:value-type="string">
                <text:p>884</text:p>
              </table:table-cell>
              <table:table-cell office:value-type="float" office:value="0.00176599995538709">
                <text:p>0.00176599995538709</text:p>
              </table:table-cell>
              <table:table-cell office:value-type="float" office:value="40.2000007629395">
                <text:p>40.2000007629395</text:p>
              </table:table-cell>
              <table:table-cell office:value-type="float" office:value="-20">
                <text:p>-20</text:p>
              </table:table-cell>
            </table:table-row>
            <table:table-row>
              <table:table-cell office:value-type="string">
                <text:p>885</text:p>
              </table:table-cell>
              <table:table-cell office:value-type="float" office:value="0.00176799995533656">
                <text:p>0.00176799995533656</text:p>
              </table:table-cell>
              <table:table-cell office:value-type="float" office:value="40.2000007629395">
                <text:p>40.2000007629395</text:p>
              </table:table-cell>
              <table:table-cell office:value-type="float" office:value="-20">
                <text:p>-20</text:p>
              </table:table-cell>
            </table:table-row>
            <table:table-row>
              <table:table-cell office:value-type="string">
                <text:p>886</text:p>
              </table:table-cell>
              <table:table-cell office:value-type="float" office:value="0.00176999995528604">
                <text:p>0.00176999995528604</text:p>
              </table:table-cell>
              <table:table-cell office:value-type="float" office:value="40.2000007629395">
                <text:p>40.2000007629395</text:p>
              </table:table-cell>
              <table:table-cell office:value-type="float" office:value="-20">
                <text:p>-20</text:p>
              </table:table-cell>
            </table:table-row>
            <table:table-row>
              <table:table-cell office:value-type="string">
                <text:p>887</text:p>
              </table:table-cell>
              <table:table-cell office:value-type="float" office:value="0.00177199995523551">
                <text:p>0.00177199995523551</text:p>
              </table:table-cell>
              <table:table-cell office:value-type="float" office:value="40.2000007629395">
                <text:p>40.2000007629395</text:p>
              </table:table-cell>
              <table:table-cell office:value-type="float" office:value="-20">
                <text:p>-20</text:p>
              </table:table-cell>
            </table:table-row>
            <table:table-row>
              <table:table-cell office:value-type="string">
                <text:p>888</text:p>
              </table:table-cell>
              <table:table-cell office:value-type="float" office:value="0.00177399995518499">
                <text:p>0.00177399995518499</text:p>
              </table:table-cell>
              <table:table-cell office:value-type="float" office:value="40.2000007629395">
                <text:p>40.2000007629395</text:p>
              </table:table-cell>
              <table:table-cell office:value-type="float" office:value="-20">
                <text:p>-20</text:p>
              </table:table-cell>
            </table:table-row>
            <table:table-row>
              <table:table-cell office:value-type="string">
                <text:p>889</text:p>
              </table:table-cell>
              <table:table-cell office:value-type="float" office:value="0.00177599995513447">
                <text:p>0.00177599995513447</text:p>
              </table:table-cell>
              <table:table-cell office:value-type="float" office:value="40.2000007629395">
                <text:p>40.2000007629395</text:p>
              </table:table-cell>
              <table:table-cell office:value-type="float" office:value="-20">
                <text:p>-20</text:p>
              </table:table-cell>
            </table:table-row>
            <table:table-row>
              <table:table-cell office:value-type="string">
                <text:p>890</text:p>
              </table:table-cell>
              <table:table-cell office:value-type="float" office:value="0.00177799995508394">
                <text:p>0.00177799995508394</text:p>
              </table:table-cell>
              <table:table-cell office:value-type="float" office:value="40.2000007629395">
                <text:p>40.2000007629395</text:p>
              </table:table-cell>
              <table:table-cell office:value-type="float" office:value="-20">
                <text:p>-20</text:p>
              </table:table-cell>
            </table:table-row>
            <table:table-row>
              <table:table-cell office:value-type="string">
                <text:p>891</text:p>
              </table:table-cell>
              <table:table-cell office:value-type="float" office:value="0.00177999995503342">
                <text:p>0.00177999995503342</text:p>
              </table:table-cell>
              <table:table-cell office:value-type="float" office:value="40">
                <text:p>40</text:p>
              </table:table-cell>
              <table:table-cell office:value-type="float" office:value="-20">
                <text:p>-20</text:p>
              </table:table-cell>
            </table:table-row>
            <table:table-row>
              <table:table-cell office:value-type="string">
                <text:p>892</text:p>
              </table:table-cell>
              <table:table-cell office:value-type="float" office:value="0.00178199995498289">
                <text:p>0.00178199995498289</text:p>
              </table:table-cell>
              <table:table-cell office:value-type="float" office:value="39.5999984741211">
                <text:p>39.5999984741211</text:p>
              </table:table-cell>
              <table:table-cell office:value-type="float" office:value="-20">
                <text:p>-20</text:p>
              </table:table-cell>
            </table:table-row>
            <table:table-row>
              <table:table-cell office:value-type="string">
                <text:p>893</text:p>
              </table:table-cell>
              <table:table-cell office:value-type="float" office:value="0.00178399995493237">
                <text:p>0.00178399995493237</text:p>
              </table:table-cell>
              <table:table-cell office:value-type="float" office:value="39.4000015258789">
                <text:p>39.4000015258789</text:p>
              </table:table-cell>
              <table:table-cell office:value-type="float" office:value="-20">
                <text:p>-20</text:p>
              </table:table-cell>
            </table:table-row>
            <table:table-row>
              <table:table-cell office:value-type="string">
                <text:p>894</text:p>
              </table:table-cell>
              <table:table-cell office:value-type="float" office:value="0.00178599995488185">
                <text:p>0.00178599995488185</text:p>
              </table:table-cell>
              <table:table-cell office:value-type="float" office:value="39">
                <text:p>39</text:p>
              </table:table-cell>
              <table:table-cell office:value-type="float" office:value="-20">
                <text:p>-20</text:p>
              </table:table-cell>
            </table:table-row>
            <table:table-row>
              <table:table-cell office:value-type="string">
                <text:p>895</text:p>
              </table:table-cell>
              <table:table-cell office:value-type="float" office:value="0.00178799995483132">
                <text:p>0.00178799995483132</text:p>
              </table:table-cell>
              <table:table-cell office:value-type="float" office:value="38.4000015258789">
                <text:p>38.4000015258789</text:p>
              </table:table-cell>
              <table:table-cell office:value-type="float" office:value="-20">
                <text:p>-20</text:p>
              </table:table-cell>
            </table:table-row>
            <table:table-row>
              <table:table-cell office:value-type="string">
                <text:p>896</text:p>
              </table:table-cell>
              <table:table-cell office:value-type="float" office:value="0.0017899999547808">
                <text:p>0.0017899999547808</text:p>
              </table:table-cell>
              <table:table-cell office:value-type="float" office:value="38.2000007629395">
                <text:p>38.2000007629395</text:p>
              </table:table-cell>
              <table:table-cell office:value-type="float" office:value="-20">
                <text:p>-20</text:p>
              </table:table-cell>
            </table:table-row>
            <table:table-row>
              <table:table-cell office:value-type="string">
                <text:p>897</text:p>
              </table:table-cell>
              <table:table-cell office:value-type="float" office:value="0.00179199995473027">
                <text:p>0.00179199995473027</text:p>
              </table:table-cell>
              <table:table-cell office:value-type="float" office:value="37.7999992370606">
                <text:p>37.7999992370606</text:p>
              </table:table-cell>
              <table:table-cell office:value-type="float" office:value="-20">
                <text:p>-20</text:p>
              </table:table-cell>
            </table:table-row>
            <table:table-row>
              <table:table-cell office:value-type="string">
                <text:p>898</text:p>
              </table:table-cell>
              <table:table-cell office:value-type="float" office:value="0.00179399995467975">
                <text:p>0.00179399995467975</text:p>
              </table:table-cell>
              <table:table-cell office:value-type="float" office:value="37.4000015258789">
                <text:p>37.4000015258789</text:p>
              </table:table-cell>
              <table:table-cell office:value-type="float" office:value="-20">
                <text:p>-20</text:p>
              </table:table-cell>
            </table:table-row>
            <table:table-row>
              <table:table-cell office:value-type="string">
                <text:p>899</text:p>
              </table:table-cell>
              <table:table-cell office:value-type="float" office:value="0.00179599995462922">
                <text:p>0.00179599995462922</text:p>
              </table:table-cell>
              <table:table-cell office:value-type="float" office:value="37">
                <text:p>37</text:p>
              </table:table-cell>
              <table:table-cell office:value-type="float" office:value="-20">
                <text:p>-20</text:p>
              </table:table-cell>
            </table:table-row>
            <table:table-row>
              <table:table-cell office:value-type="string">
                <text:p>900</text:p>
              </table:table-cell>
              <table:table-cell office:value-type="float" office:value="0.0017979999545787">
                <text:p>0.0017979999545787</text:p>
              </table:table-cell>
              <table:table-cell office:value-type="float" office:value="36.5999984741211">
                <text:p>36.5999984741211</text:p>
              </table:table-cell>
              <table:table-cell office:value-type="float" office:value="-20">
                <text:p>-20</text:p>
              </table:table-cell>
            </table:table-row>
            <table:table-row>
              <table:table-cell office:value-type="string">
                <text:p>901</text:p>
              </table:table-cell>
              <table:table-cell office:value-type="float" office:value="0.00179999995452818">
                <text:p>0.00179999995452818</text:p>
              </table:table-cell>
              <table:table-cell office:value-type="float" office:value="36.4000015258789">
                <text:p>36.4000015258789</text:p>
              </table:table-cell>
              <table:table-cell office:value-type="float" office:value="-20">
                <text:p>-20</text:p>
              </table:table-cell>
            </table:table-row>
            <table:table-row>
              <table:table-cell office:value-type="string">
                <text:p>902</text:p>
              </table:table-cell>
              <table:table-cell office:value-type="float" office:value="0.00180199995447765">
                <text:p>0.00180199995447765</text:p>
              </table:table-cell>
              <table:table-cell office:value-type="float" office:value="36">
                <text:p>36</text:p>
              </table:table-cell>
              <table:table-cell office:value-type="float" office:value="-20">
                <text:p>-20</text:p>
              </table:table-cell>
            </table:table-row>
            <table:table-row>
              <table:table-cell office:value-type="string">
                <text:p>903</text:p>
              </table:table-cell>
              <table:table-cell office:value-type="float" office:value="0.00180399995442713">
                <text:p>0.00180399995442713</text:p>
              </table:table-cell>
              <table:table-cell office:value-type="float" office:value="35.4000015258789">
                <text:p>35.4000015258789</text:p>
              </table:table-cell>
              <table:table-cell office:value-type="float" office:value="-20">
                <text:p>-20</text:p>
              </table:table-cell>
            </table:table-row>
            <table:table-row>
              <table:table-cell office:value-type="string">
                <text:p>904</text:p>
              </table:table-cell>
              <table:table-cell office:value-type="float" office:value="0.0018059999543766">
                <text:p>0.0018059999543766</text:p>
              </table:table-cell>
              <table:table-cell office:value-type="float" office:value="35">
                <text:p>35</text:p>
              </table:table-cell>
              <table:table-cell office:value-type="float" office:value="-20">
                <text:p>-20</text:p>
              </table:table-cell>
            </table:table-row>
            <table:table-row>
              <table:table-cell office:value-type="string">
                <text:p>905</text:p>
              </table:table-cell>
              <table:table-cell office:value-type="float" office:value="0.00180799995432608">
                <text:p>0.00180799995432608</text:p>
              </table:table-cell>
              <table:table-cell office:value-type="float" office:value="34.7999992370606">
                <text:p>34.7999992370606</text:p>
              </table:table-cell>
              <table:table-cell office:value-type="float" office:value="-20">
                <text:p>-20</text:p>
              </table:table-cell>
            </table:table-row>
            <table:table-row>
              <table:table-cell office:value-type="string">
                <text:p>906</text:p>
              </table:table-cell>
              <table:table-cell office:value-type="float" office:value="0.00180999995427555">
                <text:p>0.00180999995427555</text:p>
              </table:table-cell>
              <table:table-cell office:value-type="float" office:value="34.5999984741211">
                <text:p>34.5999984741211</text:p>
              </table:table-cell>
              <table:table-cell office:value-type="float" office:value="-20">
                <text:p>-20</text:p>
              </table:table-cell>
            </table:table-row>
            <table:table-row>
              <table:table-cell office:value-type="string">
                <text:p>907</text:p>
              </table:table-cell>
              <table:table-cell office:value-type="float" office:value="0.00181199995422503">
                <text:p>0.00181199995422503</text:p>
              </table:table-cell>
              <table:table-cell office:value-type="float" office:value="34.2000007629395">
                <text:p>34.2000007629395</text:p>
              </table:table-cell>
              <table:table-cell office:value-type="float" office:value="-20">
                <text:p>-20</text:p>
              </table:table-cell>
            </table:table-row>
            <table:table-row>
              <table:table-cell office:value-type="string">
                <text:p>908</text:p>
              </table:table-cell>
              <table:table-cell office:value-type="float" office:value="0.00181399995417451">
                <text:p>0.00181399995417451</text:p>
              </table:table-cell>
              <table:table-cell office:value-type="float" office:value="33.5999984741211">
                <text:p>33.5999984741211</text:p>
              </table:table-cell>
              <table:table-cell office:value-type="float" office:value="-20">
                <text:p>-20</text:p>
              </table:table-cell>
            </table:table-row>
            <table:table-row>
              <table:table-cell office:value-type="string">
                <text:p>909</text:p>
              </table:table-cell>
              <table:table-cell office:value-type="float" office:value="0.00181599995412398">
                <text:p>0.00181599995412398</text:p>
              </table:table-cell>
              <table:table-cell office:value-type="float" office:value="33.4000015258789">
                <text:p>33.4000015258789</text:p>
              </table:table-cell>
              <table:table-cell office:value-type="float" office:value="-20">
                <text:p>-20</text:p>
              </table:table-cell>
            </table:table-row>
            <table:table-row>
              <table:table-cell office:value-type="string">
                <text:p>910</text:p>
              </table:table-cell>
              <table:table-cell office:value-type="float" office:value="0.00181799995407346">
                <text:p>0.00181799995407346</text:p>
              </table:table-cell>
              <table:table-cell office:value-type="float" office:value="33">
                <text:p>33</text:p>
              </table:table-cell>
              <table:table-cell office:value-type="float" office:value="-20">
                <text:p>-20</text:p>
              </table:table-cell>
            </table:table-row>
            <table:table-row>
              <table:table-cell office:value-type="string">
                <text:p>911</text:p>
              </table:table-cell>
              <table:table-cell office:value-type="float" office:value="0.00181999995402293">
                <text:p>0.00181999995402293</text:p>
              </table:table-cell>
              <table:table-cell office:value-type="float" office:value="32.4000015258789">
                <text:p>32.4000015258789</text:p>
              </table:table-cell>
              <table:table-cell office:value-type="float" office:value="-20">
                <text:p>-20</text:p>
              </table:table-cell>
            </table:table-row>
            <table:table-row>
              <table:table-cell office:value-type="string">
                <text:p>912</text:p>
              </table:table-cell>
              <table:table-cell office:value-type="float" office:value="0.00182199995397241">
                <text:p>0.00182199995397241</text:p>
              </table:table-cell>
              <table:table-cell office:value-type="float" office:value="32.2000007629395">
                <text:p>32.2000007629395</text:p>
              </table:table-cell>
              <table:table-cell office:value-type="float" office:value="-20">
                <text:p>-20</text:p>
              </table:table-cell>
            </table:table-row>
            <table:table-row>
              <table:table-cell office:value-type="string">
                <text:p>913</text:p>
              </table:table-cell>
              <table:table-cell office:value-type="float" office:value="0.00182399995392188">
                <text:p>0.00182399995392188</text:p>
              </table:table-cell>
              <table:table-cell office:value-type="float" office:value="32">
                <text:p>32</text:p>
              </table:table-cell>
              <table:table-cell office:value-type="float" office:value="-20">
                <text:p>-20</text:p>
              </table:table-cell>
            </table:table-row>
            <table:table-row>
              <table:table-cell office:value-type="string">
                <text:p>914</text:p>
              </table:table-cell>
              <table:table-cell office:value-type="float" office:value="0.00182599995387136">
                <text:p>0.00182599995387136</text:p>
              </table:table-cell>
              <table:table-cell office:value-type="float" office:value="31.6000003814697">
                <text:p>31.6000003814697</text:p>
              </table:table-cell>
              <table:table-cell office:value-type="float" office:value="-20">
                <text:p>-20</text:p>
              </table:table-cell>
            </table:table-row>
            <table:table-row>
              <table:table-cell office:value-type="string">
                <text:p>915</text:p>
              </table:table-cell>
              <table:table-cell office:value-type="float" office:value="0.00182799995382084">
                <text:p>0.00182799995382084</text:p>
              </table:table-cell>
              <table:table-cell office:value-type="float" office:value="31.2000007629395">
                <text:p>31.2000007629395</text:p>
              </table:table-cell>
              <table:table-cell office:value-type="float" office:value="-20">
                <text:p>-20</text:p>
              </table:table-cell>
            </table:table-row>
            <table:table-row>
              <table:table-cell office:value-type="string">
                <text:p>916</text:p>
              </table:table-cell>
              <table:table-cell office:value-type="float" office:value="0.00182999995377031">
                <text:p>0.00182999995377031</text:p>
              </table:table-cell>
              <table:table-cell office:value-type="float" office:value="30.7999992370605">
                <text:p>30.7999992370605</text:p>
              </table:table-cell>
              <table:table-cell office:value-type="float" office:value="-20">
                <text:p>-20</text:p>
              </table:table-cell>
            </table:table-row>
            <table:table-row>
              <table:table-cell office:value-type="string">
                <text:p>917</text:p>
              </table:table-cell>
              <table:table-cell office:value-type="float" office:value="0.00183199995371979">
                <text:p>0.00183199995371979</text:p>
              </table:table-cell>
              <table:table-cell office:value-type="float" office:value="30.3999996185303">
                <text:p>30.3999996185303</text:p>
              </table:table-cell>
              <table:table-cell office:value-type="float" office:value="-20">
                <text:p>-20</text:p>
              </table:table-cell>
            </table:table-row>
            <table:table-row>
              <table:table-cell office:value-type="string">
                <text:p>918</text:p>
              </table:table-cell>
              <table:table-cell office:value-type="float" office:value="0.00183399995366926">
                <text:p>0.00183399995366926</text:p>
              </table:table-cell>
              <table:table-cell office:value-type="float" office:value="30">
                <text:p>30</text:p>
              </table:table-cell>
              <table:table-cell office:value-type="float" office:value="-20">
                <text:p>-20</text:p>
              </table:table-cell>
            </table:table-row>
            <table:table-row>
              <table:table-cell office:value-type="string">
                <text:p>919</text:p>
              </table:table-cell>
              <table:table-cell office:value-type="float" office:value="0.00183599995361874">
                <text:p>0.00183599995361874</text:p>
              </table:table-cell>
              <table:table-cell office:value-type="float" office:value="29.7999992370605">
                <text:p>29.7999992370605</text:p>
              </table:table-cell>
              <table:table-cell office:value-type="float" office:value="-20">
                <text:p>-20</text:p>
              </table:table-cell>
            </table:table-row>
            <table:table-row>
              <table:table-cell office:value-type="string">
                <text:p>920</text:p>
              </table:table-cell>
              <table:table-cell office:value-type="float" office:value="0.00183799995356821">
                <text:p>0.00183799995356821</text:p>
              </table:table-cell>
              <table:table-cell office:value-type="float" office:value="29.3999996185303">
                <text:p>29.3999996185303</text:p>
              </table:table-cell>
              <table:table-cell office:value-type="float" office:value="-20">
                <text:p>-20</text:p>
              </table:table-cell>
            </table:table-row>
            <table:table-row>
              <table:table-cell office:value-type="string">
                <text:p>921</text:p>
              </table:table-cell>
              <table:table-cell office:value-type="float" office:value="0.00183999995351769">
                <text:p>0.00183999995351769</text:p>
              </table:table-cell>
              <table:table-cell office:value-type="float" office:value="29">
                <text:p>29</text:p>
              </table:table-cell>
              <table:table-cell office:value-type="float" office:value="-20">
                <text:p>-20</text:p>
              </table:table-cell>
            </table:table-row>
            <table:table-row>
              <table:table-cell office:value-type="string">
                <text:p>922</text:p>
              </table:table-cell>
              <table:table-cell office:value-type="float" office:value="0.00184199995346717">
                <text:p>0.00184199995346717</text:p>
              </table:table-cell>
              <table:table-cell office:value-type="float" office:value="28.6000003814697">
                <text:p>28.6000003814697</text:p>
              </table:table-cell>
              <table:table-cell office:value-type="float" office:value="-20">
                <text:p>-20</text:p>
              </table:table-cell>
            </table:table-row>
            <table:table-row>
              <table:table-cell office:value-type="string">
                <text:p>923</text:p>
              </table:table-cell>
              <table:table-cell office:value-type="float" office:value="0.00184399995341664">
                <text:p>0.00184399995341664</text:p>
              </table:table-cell>
              <table:table-cell office:value-type="float" office:value="28.2000007629395">
                <text:p>28.2000007629395</text:p>
              </table:table-cell>
              <table:table-cell office:value-type="float" office:value="-20">
                <text:p>-20</text:p>
              </table:table-cell>
            </table:table-row>
            <table:table-row>
              <table:table-cell office:value-type="string">
                <text:p>924</text:p>
              </table:table-cell>
              <table:table-cell office:value-type="float" office:value="0.00184599995336612">
                <text:p>0.00184599995336612</text:p>
              </table:table-cell>
              <table:table-cell office:value-type="float" office:value="27.7999992370605">
                <text:p>27.7999992370605</text:p>
              </table:table-cell>
              <table:table-cell office:value-type="float" office:value="-20">
                <text:p>-20</text:p>
              </table:table-cell>
            </table:table-row>
            <table:table-row>
              <table:table-cell office:value-type="string">
                <text:p>925</text:p>
              </table:table-cell>
              <table:table-cell office:value-type="float" office:value="0.00184799995331559">
                <text:p>0.00184799995331559</text:p>
              </table:table-cell>
              <table:table-cell office:value-type="float" office:value="27.6000003814697">
                <text:p>27.6000003814697</text:p>
              </table:table-cell>
              <table:table-cell office:value-type="float" office:value="-20">
                <text:p>-20</text:p>
              </table:table-cell>
            </table:table-row>
            <table:table-row>
              <table:table-cell office:value-type="string">
                <text:p>926</text:p>
              </table:table-cell>
              <table:table-cell office:value-type="float" office:value="0.00184999995326507">
                <text:p>0.00184999995326507</text:p>
              </table:table-cell>
              <table:table-cell office:value-type="float" office:value="27">
                <text:p>27</text:p>
              </table:table-cell>
              <table:table-cell office:value-type="float" office:value="-20">
                <text:p>-20</text:p>
              </table:table-cell>
            </table:table-row>
            <table:table-row>
              <table:table-cell office:value-type="string">
                <text:p>927</text:p>
              </table:table-cell>
              <table:table-cell office:value-type="float" office:value="0.00185199995321454">
                <text:p>0.00185199995321454</text:p>
              </table:table-cell>
              <table:table-cell office:value-type="float" office:value="26.6000003814697">
                <text:p>26.6000003814697</text:p>
              </table:table-cell>
              <table:table-cell office:value-type="float" office:value="-20">
                <text:p>-20</text:p>
              </table:table-cell>
            </table:table-row>
            <table:table-row>
              <table:table-cell office:value-type="string">
                <text:p>928</text:p>
              </table:table-cell>
              <table:table-cell office:value-type="float" office:value="0.00185399995316402">
                <text:p>0.00185399995316402</text:p>
              </table:table-cell>
              <table:table-cell office:value-type="float" office:value="26.3999996185303">
                <text:p>26.3999996185303</text:p>
              </table:table-cell>
              <table:table-cell office:value-type="float" office:value="-20">
                <text:p>-20</text:p>
              </table:table-cell>
            </table:table-row>
            <table:table-row>
              <table:table-cell office:value-type="string">
                <text:p>929</text:p>
              </table:table-cell>
              <table:table-cell office:value-type="float" office:value="0.0018559999531135">
                <text:p>0.0018559999531135</text:p>
              </table:table-cell>
              <table:table-cell office:value-type="float" office:value="26.2000007629395">
                <text:p>26.2000007629395</text:p>
              </table:table-cell>
              <table:table-cell office:value-type="float" office:value="-20">
                <text:p>-20</text:p>
              </table:table-cell>
            </table:table-row>
            <table:table-row>
              <table:table-cell office:value-type="string">
                <text:p>930</text:p>
              </table:table-cell>
              <table:table-cell office:value-type="float" office:value="0.00185799995306297">
                <text:p>0.00185799995306297</text:p>
              </table:table-cell>
              <table:table-cell office:value-type="float" office:value="25.6000003814697">
                <text:p>25.6000003814697</text:p>
              </table:table-cell>
              <table:table-cell office:value-type="float" office:value="-20">
                <text:p>-20</text:p>
              </table:table-cell>
            </table:table-row>
            <table:table-row>
              <table:table-cell office:value-type="string">
                <text:p>931</text:p>
              </table:table-cell>
              <table:table-cell office:value-type="float" office:value="0.00185999995301245">
                <text:p>0.00185999995301245</text:p>
              </table:table-cell>
              <table:table-cell office:value-type="float" office:value="25.3999996185303">
                <text:p>25.3999996185303</text:p>
              </table:table-cell>
              <table:table-cell office:value-type="float" office:value="-20">
                <text:p>-20</text:p>
              </table:table-cell>
            </table:table-row>
            <table:table-row>
              <table:table-cell office:value-type="string">
                <text:p>932</text:p>
              </table:table-cell>
              <table:table-cell office:value-type="float" office:value="0.00186199995296192">
                <text:p>0.00186199995296192</text:p>
              </table:table-cell>
              <table:table-cell office:value-type="float" office:value="25">
                <text:p>25</text:p>
              </table:table-cell>
              <table:table-cell office:value-type="float" office:value="-20">
                <text:p>-20</text:p>
              </table:table-cell>
            </table:table-row>
            <table:table-row>
              <table:table-cell office:value-type="string">
                <text:p>933</text:p>
              </table:table-cell>
              <table:table-cell office:value-type="float" office:value="0.0018639999529114">
                <text:p>0.0018639999529114</text:p>
              </table:table-cell>
              <table:table-cell office:value-type="float" office:value="24.6000003814697">
                <text:p>24.6000003814697</text:p>
              </table:table-cell>
              <table:table-cell office:value-type="float" office:value="-20">
                <text:p>-20</text:p>
              </table:table-cell>
            </table:table-row>
            <table:table-row>
              <table:table-cell office:value-type="string">
                <text:p>934</text:p>
              </table:table-cell>
              <table:table-cell office:value-type="float" office:value="0.00186599995286088">
                <text:p>0.00186599995286088</text:p>
              </table:table-cell>
              <table:table-cell office:value-type="float" office:value="24.2000007629395">
                <text:p>24.2000007629395</text:p>
              </table:table-cell>
              <table:table-cell office:value-type="float" office:value="-20">
                <text:p>-20</text:p>
              </table:table-cell>
            </table:table-row>
            <table:table-row>
              <table:table-cell office:value-type="string">
                <text:p>935</text:p>
              </table:table-cell>
              <table:table-cell office:value-type="float" office:value="0.00186799995281035">
                <text:p>0.00186799995281035</text:p>
              </table:table-cell>
              <table:table-cell office:value-type="float" office:value="23.6000003814697">
                <text:p>23.6000003814697</text:p>
              </table:table-cell>
              <table:table-cell office:value-type="float" office:value="-20">
                <text:p>-20</text:p>
              </table:table-cell>
            </table:table-row>
            <table:table-row>
              <table:table-cell office:value-type="string">
                <text:p>936</text:p>
              </table:table-cell>
              <table:table-cell office:value-type="float" office:value="0.00186999995275983">
                <text:p>0.00186999995275983</text:p>
              </table:table-cell>
              <table:table-cell office:value-type="float" office:value="23.2000007629395">
                <text:p>23.2000007629395</text:p>
              </table:table-cell>
              <table:table-cell office:value-type="float" office:value="-20">
                <text:p>-20</text:p>
              </table:table-cell>
            </table:table-row>
            <table:table-row>
              <table:table-cell office:value-type="string">
                <text:p>937</text:p>
              </table:table-cell>
              <table:table-cell office:value-type="float" office:value="0.0018719999527093">
                <text:p>0.0018719999527093</text:p>
              </table:table-cell>
              <table:table-cell office:value-type="float" office:value="23">
                <text:p>23</text:p>
              </table:table-cell>
              <table:table-cell office:value-type="float" office:value="-20">
                <text:p>-20</text:p>
              </table:table-cell>
            </table:table-row>
            <table:table-row>
              <table:table-cell office:value-type="string">
                <text:p>938</text:p>
              </table:table-cell>
              <table:table-cell office:value-type="float" office:value="0.00187399995265878">
                <text:p>0.00187399995265878</text:p>
              </table:table-cell>
              <table:table-cell office:value-type="float" office:value="22.6000003814697">
                <text:p>22.6000003814697</text:p>
              </table:table-cell>
              <table:table-cell office:value-type="float" office:value="-20">
                <text:p>-20</text:p>
              </table:table-cell>
            </table:table-row>
            <table:table-row>
              <table:table-cell office:value-type="string">
                <text:p>939</text:p>
              </table:table-cell>
              <table:table-cell office:value-type="float" office:value="0.00187599995260825">
                <text:p>0.00187599995260825</text:p>
              </table:table-cell>
              <table:table-cell office:value-type="float" office:value="22.3999996185303">
                <text:p>22.3999996185303</text:p>
              </table:table-cell>
              <table:table-cell office:value-type="float" office:value="-20">
                <text:p>-20</text:p>
              </table:table-cell>
            </table:table-row>
            <table:table-row>
              <table:table-cell office:value-type="string">
                <text:p>940</text:p>
              </table:table-cell>
              <table:table-cell office:value-type="float" office:value="0.00187799995255773">
                <text:p>0.00187799995255773</text:p>
              </table:table-cell>
              <table:table-cell office:value-type="float" office:value="21.7999992370605">
                <text:p>21.7999992370605</text:p>
              </table:table-cell>
              <table:table-cell office:value-type="float" office:value="-20">
                <text:p>-20</text:p>
              </table:table-cell>
            </table:table-row>
            <table:table-row>
              <table:table-cell office:value-type="string">
                <text:p>941</text:p>
              </table:table-cell>
              <table:table-cell office:value-type="float" office:value="0.00187999995250721">
                <text:p>0.00187999995250721</text:p>
              </table:table-cell>
              <table:table-cell office:value-type="float" office:value="21.6000003814697">
                <text:p>21.6000003814697</text:p>
              </table:table-cell>
              <table:table-cell office:value-type="float" office:value="-20">
                <text:p>-20</text:p>
              </table:table-cell>
            </table:table-row>
            <table:table-row>
              <table:table-cell office:value-type="string">
                <text:p>942</text:p>
              </table:table-cell>
              <table:table-cell office:value-type="float" office:value="0.00188199995245668">
                <text:p>0.00188199995245668</text:p>
              </table:table-cell>
              <table:table-cell office:value-type="float" office:value="21.2000007629395">
                <text:p>21.2000007629395</text:p>
              </table:table-cell>
              <table:table-cell office:value-type="float" office:value="-20">
                <text:p>-20</text:p>
              </table:table-cell>
            </table:table-row>
            <table:table-row>
              <table:table-cell office:value-type="string">
                <text:p>943</text:p>
              </table:table-cell>
              <table:table-cell office:value-type="float" office:value="0.00188399995240616">
                <text:p>0.00188399995240616</text:p>
              </table:table-cell>
              <table:table-cell office:value-type="float" office:value="20.7999992370605">
                <text:p>20.7999992370605</text:p>
              </table:table-cell>
              <table:table-cell office:value-type="float" office:value="-20">
                <text:p>-20</text:p>
              </table:table-cell>
            </table:table-row>
            <table:table-row>
              <table:table-cell office:value-type="string">
                <text:p>944</text:p>
              </table:table-cell>
              <table:table-cell office:value-type="float" office:value="0.00188599995235563">
                <text:p>0.00188599995235563</text:p>
              </table:table-cell>
              <table:table-cell office:value-type="float" office:value="20.3999996185303">
                <text:p>20.3999996185303</text:p>
              </table:table-cell>
              <table:table-cell office:value-type="float" office:value="-20">
                <text:p>-20</text:p>
              </table:table-cell>
            </table:table-row>
            <table:table-row>
              <table:table-cell office:value-type="string">
                <text:p>945</text:p>
              </table:table-cell>
              <table:table-cell office:value-type="float" office:value="0.00188799995230511">
                <text:p>0.00188799995230511</text:p>
              </table:table-cell>
              <table:table-cell office:value-type="float" office:value="20">
                <text:p>20</text:p>
              </table:table-cell>
              <table:table-cell office:value-type="float" office:value="-20">
                <text:p>-20</text:p>
              </table:table-cell>
            </table:table-row>
            <table:table-row>
              <table:table-cell office:value-type="string">
                <text:p>946</text:p>
              </table:table-cell>
              <table:table-cell office:value-type="float" office:value="0.00188999995225458">
                <text:p>0.00188999995225458</text:p>
              </table:table-cell>
              <table:table-cell office:value-type="float" office:value="19.6000003814697">
                <text:p>19.6000003814697</text:p>
              </table:table-cell>
              <table:table-cell office:value-type="float" office:value="-20">
                <text:p>-20</text:p>
              </table:table-cell>
            </table:table-row>
            <table:table-row>
              <table:table-cell office:value-type="string">
                <text:p>947</text:p>
              </table:table-cell>
              <table:table-cell office:value-type="float" office:value="0.00189199995220406">
                <text:p>0.00189199995220406</text:p>
              </table:table-cell>
              <table:table-cell office:value-type="float" office:value="19.2000007629395">
                <text:p>19.2000007629395</text:p>
              </table:table-cell>
              <table:table-cell office:value-type="float" office:value="-20">
                <text:p>-20</text:p>
              </table:table-cell>
            </table:table-row>
            <table:table-row>
              <table:table-cell office:value-type="string">
                <text:p>948</text:p>
              </table:table-cell>
              <table:table-cell office:value-type="float" office:value="0.00189399995215354">
                <text:p>0.00189399995215354</text:p>
              </table:table-cell>
              <table:table-cell office:value-type="float" office:value="18.7999992370605">
                <text:p>18.7999992370605</text:p>
              </table:table-cell>
              <table:table-cell office:value-type="float" office:value="-20">
                <text:p>-20</text:p>
              </table:table-cell>
            </table:table-row>
            <table:table-row>
              <table:table-cell office:value-type="string">
                <text:p>949</text:p>
              </table:table-cell>
              <table:table-cell office:value-type="float" office:value="0.00189599995210301">
                <text:p>0.00189599995210301</text:p>
              </table:table-cell>
              <table:table-cell office:value-type="float" office:value="18.6000003814697">
                <text:p>18.6000003814697</text:p>
              </table:table-cell>
              <table:table-cell office:value-type="float" office:value="-20">
                <text:p>-20</text:p>
              </table:table-cell>
            </table:table-row>
            <table:table-row>
              <table:table-cell office:value-type="string">
                <text:p>950</text:p>
              </table:table-cell>
              <table:table-cell office:value-type="float" office:value="0.00189799995205249">
                <text:p>0.00189799995205249</text:p>
              </table:table-cell>
              <table:table-cell office:value-type="float" office:value="18.3999996185303">
                <text:p>18.3999996185303</text:p>
              </table:table-cell>
              <table:table-cell office:value-type="float" office:value="-20">
                <text:p>-20</text:p>
              </table:table-cell>
            </table:table-row>
            <table:table-row>
              <table:table-cell office:value-type="string">
                <text:p>951</text:p>
              </table:table-cell>
              <table:table-cell office:value-type="float" office:value="0.00189999995200196">
                <text:p>0.00189999995200196</text:p>
              </table:table-cell>
              <table:table-cell office:value-type="float" office:value="17.7999992370605">
                <text:p>17.7999992370605</text:p>
              </table:table-cell>
              <table:table-cell office:value-type="float" office:value="-20">
                <text:p>-20</text:p>
              </table:table-cell>
            </table:table-row>
            <table:table-row>
              <table:table-cell office:value-type="string">
                <text:p>952</text:p>
              </table:table-cell>
              <table:table-cell office:value-type="float" office:value="0.00190199995195144">
                <text:p>0.00190199995195144</text:p>
              </table:table-cell>
              <table:table-cell office:value-type="float" office:value="17.3999996185303">
                <text:p>17.3999996185303</text:p>
              </table:table-cell>
              <table:table-cell office:value-type="float" office:value="-20">
                <text:p>-20</text:p>
              </table:table-cell>
            </table:table-row>
            <table:table-row>
              <table:table-cell office:value-type="string">
                <text:p>953</text:p>
              </table:table-cell>
              <table:table-cell office:value-type="float" office:value="0.00190399995190091">
                <text:p>0.00190399995190091</text:p>
              </table:table-cell>
              <table:table-cell office:value-type="float" office:value="17.2000007629395">
                <text:p>17.2000007629395</text:p>
              </table:table-cell>
              <table:table-cell office:value-type="float" office:value="-20">
                <text:p>-20</text:p>
              </table:table-cell>
            </table:table-row>
            <table:table-row>
              <table:table-cell office:value-type="string">
                <text:p>954</text:p>
              </table:table-cell>
              <table:table-cell office:value-type="float" office:value="0.00190599995185039">
                <text:p>0.00190599995185039</text:p>
              </table:table-cell>
              <table:table-cell office:value-type="float" office:value="16.6000003814697">
                <text:p>16.6000003814697</text:p>
              </table:table-cell>
              <table:table-cell office:value-type="float" office:value="-20">
                <text:p>-20</text:p>
              </table:table-cell>
            </table:table-row>
            <table:table-row>
              <table:table-cell office:value-type="string">
                <text:p>955</text:p>
              </table:table-cell>
              <table:table-cell office:value-type="float" office:value="0.00190799995179987">
                <text:p>0.00190799995179987</text:p>
              </table:table-cell>
              <table:table-cell office:value-type="float" office:value="16.3999996185303">
                <text:p>16.3999996185303</text:p>
              </table:table-cell>
              <table:table-cell office:value-type="float" office:value="-20">
                <text:p>-20</text:p>
              </table:table-cell>
            </table:table-row>
            <table:table-row>
              <table:table-cell office:value-type="string">
                <text:p>956</text:p>
              </table:table-cell>
              <table:table-cell office:value-type="float" office:value="0.00190999995174934">
                <text:p>0.00190999995174934</text:p>
              </table:table-cell>
              <table:table-cell office:value-type="float" office:value="16.2000007629395">
                <text:p>16.2000007629395</text:p>
              </table:table-cell>
              <table:table-cell office:value-type="float" office:value="-20">
                <text:p>-20</text:p>
              </table:table-cell>
            </table:table-row>
            <table:table-row>
              <table:table-cell office:value-type="string">
                <text:p>957</text:p>
              </table:table-cell>
              <table:table-cell office:value-type="float" office:value="0.00191199995169882">
                <text:p>0.00191199995169882</text:p>
              </table:table-cell>
              <table:table-cell office:value-type="float" office:value="15.8000001907349">
                <text:p>15.8000001907349</text:p>
              </table:table-cell>
              <table:table-cell office:value-type="float" office:value="-20">
                <text:p>-20</text:p>
              </table:table-cell>
            </table:table-row>
            <table:table-row>
              <table:table-cell office:value-type="string">
                <text:p>958</text:p>
              </table:table-cell>
              <table:table-cell office:value-type="float" office:value="0.00191399995164829">
                <text:p>0.00191399995164829</text:p>
              </table:table-cell>
              <table:table-cell office:value-type="float" office:value="15.1999998092651">
                <text:p>15.1999998092651</text:p>
              </table:table-cell>
              <table:table-cell office:value-type="float" office:value="-20">
                <text:p>-20</text:p>
              </table:table-cell>
            </table:table-row>
            <table:table-row>
              <table:table-cell office:value-type="string">
                <text:p>959</text:p>
              </table:table-cell>
              <table:table-cell office:value-type="float" office:value="0.00191599995159777">
                <text:p>0.00191599995159777</text:p>
              </table:table-cell>
              <table:table-cell office:value-type="float" office:value="14.8000001907349">
                <text:p>14.8000001907349</text:p>
              </table:table-cell>
              <table:table-cell office:value-type="float" office:value="-20">
                <text:p>-20</text:p>
              </table:table-cell>
            </table:table-row>
            <table:table-row>
              <table:table-cell office:value-type="string">
                <text:p>960</text:p>
              </table:table-cell>
              <table:table-cell office:value-type="float" office:value="0.00191799995154724">
                <text:p>0.00191799995154724</text:p>
              </table:table-cell>
              <table:table-cell office:value-type="float" office:value="14.6000003814697">
                <text:p>14.6000003814697</text:p>
              </table:table-cell>
              <table:table-cell office:value-type="float" office:value="-20">
                <text:p>-20</text:p>
              </table:table-cell>
            </table:table-row>
            <table:table-row>
              <table:table-cell office:value-type="string">
                <text:p>961</text:p>
              </table:table-cell>
              <table:table-cell office:value-type="float" office:value="0.00191999995149672">
                <text:p>0.00191999995149672</text:p>
              </table:table-cell>
              <table:table-cell office:value-type="float" office:value="14.1999998092651">
                <text:p>14.1999998092651</text:p>
              </table:table-cell>
              <table:table-cell office:value-type="float" office:value="-20">
                <text:p>-20</text:p>
              </table:table-cell>
            </table:table-row>
            <table:table-row>
              <table:table-cell office:value-type="string">
                <text:p>962</text:p>
              </table:table-cell>
              <table:table-cell office:value-type="float" office:value="0.0019219999514462">
                <text:p>0.0019219999514462</text:p>
              </table:table-cell>
              <table:table-cell office:value-type="float" office:value="13.8000001907349">
                <text:p>13.8000001907349</text:p>
              </table:table-cell>
              <table:table-cell office:value-type="float" office:value="-20">
                <text:p>-20</text:p>
              </table:table-cell>
            </table:table-row>
            <table:table-row>
              <table:table-cell office:value-type="string">
                <text:p>963</text:p>
              </table:table-cell>
              <table:table-cell office:value-type="float" office:value="0.00192399995139567">
                <text:p>0.00192399995139567</text:p>
              </table:table-cell>
              <table:table-cell office:value-type="float" office:value="13.6000003814697">
                <text:p>13.6000003814697</text:p>
              </table:table-cell>
              <table:table-cell office:value-type="float" office:value="-20">
                <text:p>-20</text:p>
              </table:table-cell>
            </table:table-row>
            <table:table-row>
              <table:table-cell office:value-type="string">
                <text:p>964</text:p>
              </table:table-cell>
              <table:table-cell office:value-type="float" office:value="0.00192599995134515">
                <text:p>0.00192599995134515</text:p>
              </table:table-cell>
              <table:table-cell office:value-type="float" office:value="13.1999998092651">
                <text:p>13.1999998092651</text:p>
              </table:table-cell>
              <table:table-cell office:value-type="float" office:value="-20">
                <text:p>-20</text:p>
              </table:table-cell>
            </table:table-row>
            <table:table-row>
              <table:table-cell office:value-type="string">
                <text:p>965</text:p>
              </table:table-cell>
              <table:table-cell office:value-type="float" office:value="0.00192799995129462">
                <text:p>0.00192799995129462</text:p>
              </table:table-cell>
              <table:table-cell office:value-type="float" office:value="12.8000001907349">
                <text:p>12.8000001907349</text:p>
              </table:table-cell>
              <table:table-cell office:value-type="float" office:value="-20">
                <text:p>-20</text:p>
              </table:table-cell>
            </table:table-row>
            <table:table-row>
              <table:table-cell office:value-type="string">
                <text:p>966</text:p>
              </table:table-cell>
              <table:table-cell office:value-type="float" office:value="0.0019299999512441">
                <text:p>0.0019299999512441</text:p>
              </table:table-cell>
              <table:table-cell office:value-type="float" office:value="12.1999998092651">
                <text:p>12.1999998092651</text:p>
              </table:table-cell>
              <table:table-cell office:value-type="float" office:value="-20">
                <text:p>-20</text:p>
              </table:table-cell>
            </table:table-row>
            <table:table-row>
              <table:table-cell office:value-type="string">
                <text:p>967</text:p>
              </table:table-cell>
              <table:table-cell office:value-type="float" office:value="0.00193199995119357">
                <text:p>0.00193199995119357</text:p>
              </table:table-cell>
              <table:table-cell office:value-type="float" office:value="11.8000001907349">
                <text:p>11.8000001907349</text:p>
              </table:table-cell>
              <table:table-cell office:value-type="float" office:value="-20">
                <text:p>-20</text:p>
              </table:table-cell>
            </table:table-row>
            <table:table-row>
              <table:table-cell office:value-type="string">
                <text:p>968</text:p>
              </table:table-cell>
              <table:table-cell office:value-type="float" office:value="0.00193399995114305">
                <text:p>0.00193399995114305</text:p>
              </table:table-cell>
              <table:table-cell office:value-type="float" office:value="11.6000003814697">
                <text:p>11.6000003814697</text:p>
              </table:table-cell>
              <table:table-cell office:value-type="float" office:value="-20">
                <text:p>-20</text:p>
              </table:table-cell>
            </table:table-row>
            <table:table-row>
              <table:table-cell office:value-type="string">
                <text:p>969</text:p>
              </table:table-cell>
              <table:table-cell office:value-type="float" office:value="0.00193599995109253">
                <text:p>0.00193599995109253</text:p>
              </table:table-cell>
              <table:table-cell office:value-type="float" office:value="11.3999996185303">
                <text:p>11.3999996185303</text:p>
              </table:table-cell>
              <table:table-cell office:value-type="float" office:value="-20">
                <text:p>-20</text:p>
              </table:table-cell>
            </table:table-row>
            <table:table-row>
              <table:table-cell office:value-type="string">
                <text:p>970</text:p>
              </table:table-cell>
              <table:table-cell office:value-type="float" office:value="0.001937999951042">
                <text:p>0.001937999951042</text:p>
              </table:table-cell>
              <table:table-cell office:value-type="float" office:value="10.8000001907349">
                <text:p>10.8000001907349</text:p>
              </table:table-cell>
              <table:table-cell office:value-type="float" office:value="-20">
                <text:p>-20</text:p>
              </table:table-cell>
            </table:table-row>
            <table:table-row>
              <table:table-cell office:value-type="string">
                <text:p>971</text:p>
              </table:table-cell>
              <table:table-cell office:value-type="float" office:value="0.00193999995099148">
                <text:p>0.00193999995099148</text:p>
              </table:table-cell>
              <table:table-cell office:value-type="float" office:value="10.3999996185303">
                <text:p>10.3999996185303</text:p>
              </table:table-cell>
              <table:table-cell office:value-type="float" office:value="-20">
                <text:p>-20</text:p>
              </table:table-cell>
            </table:table-row>
            <table:table-row>
              <table:table-cell office:value-type="string">
                <text:p>972</text:p>
              </table:table-cell>
              <table:table-cell office:value-type="float" office:value="0.00194199995094095">
                <text:p>0.00194199995094095</text:p>
              </table:table-cell>
              <table:table-cell office:value-type="float" office:value="10">
                <text:p>10</text:p>
              </table:table-cell>
              <table:table-cell office:value-type="float" office:value="-20">
                <text:p>-20</text:p>
              </table:table-cell>
            </table:table-row>
            <table:table-row>
              <table:table-cell office:value-type="string">
                <text:p>973</text:p>
              </table:table-cell>
              <table:table-cell office:value-type="float" office:value="0.00194399995089043">
                <text:p>0.00194399995089043</text:p>
              </table:table-cell>
              <table:table-cell office:value-type="float" office:value="9.80000019073486">
                <text:p>9.80000019073486</text:p>
              </table:table-cell>
              <table:table-cell office:value-type="float" office:value="-20">
                <text:p>-20</text:p>
              </table:table-cell>
            </table:table-row>
            <table:table-row>
              <table:table-cell office:value-type="string">
                <text:p>974</text:p>
              </table:table-cell>
              <table:table-cell office:value-type="float" office:value="0.00194599995083991">
                <text:p>0.00194599995083991</text:p>
              </table:table-cell>
              <table:table-cell office:value-type="float" office:value="9.39999961853027">
                <text:p>9.39999961853027</text:p>
              </table:table-cell>
              <table:table-cell office:value-type="float" office:value="-20">
                <text:p>-20</text:p>
              </table:table-cell>
            </table:table-row>
            <table:table-row>
              <table:table-cell office:value-type="string">
                <text:p>975</text:p>
              </table:table-cell>
              <table:table-cell office:value-type="float" office:value="0.00194799995078938">
                <text:p>0.00194799995078938</text:p>
              </table:table-cell>
              <table:table-cell office:value-type="float" office:value="9">
                <text:p>9</text:p>
              </table:table-cell>
              <table:table-cell office:value-type="float" office:value="-20">
                <text:p>-20</text:p>
              </table:table-cell>
            </table:table-row>
            <table:table-row>
              <table:table-cell office:value-type="string">
                <text:p>976</text:p>
              </table:table-cell>
              <table:table-cell office:value-type="float" office:value="0.00194999995073886">
                <text:p>0.00194999995073886</text:p>
              </table:table-cell>
              <table:table-cell office:value-type="float" office:value="8.80000019073486">
                <text:p>8.80000019073486</text:p>
              </table:table-cell>
              <table:table-cell office:value-type="float" office:value="-20">
                <text:p>-20</text:p>
              </table:table-cell>
            </table:table-row>
            <table:table-row>
              <table:table-cell office:value-type="string">
                <text:p>977</text:p>
              </table:table-cell>
              <table:table-cell office:value-type="float" office:value="0.00195199995068833">
                <text:p>0.00195199995068833</text:p>
              </table:table-cell>
              <table:table-cell office:value-type="float" office:value="8.39999961853027">
                <text:p>8.39999961853027</text:p>
              </table:table-cell>
              <table:table-cell office:value-type="float" office:value="-20">
                <text:p>-20</text:p>
              </table:table-cell>
            </table:table-row>
            <table:table-row>
              <table:table-cell office:value-type="string">
                <text:p>978</text:p>
              </table:table-cell>
              <table:table-cell office:value-type="float" office:value="0.00195399995063781">
                <text:p>0.00195399995063781</text:p>
              </table:table-cell>
              <table:table-cell office:value-type="float" office:value="7.80000019073486">
                <text:p>7.80000019073486</text:p>
              </table:table-cell>
              <table:table-cell office:value-type="float" office:value="-20">
                <text:p>-20</text:p>
              </table:table-cell>
            </table:table-row>
            <table:table-row>
              <table:table-cell office:value-type="string">
                <text:p>979</text:p>
              </table:table-cell>
              <table:table-cell office:value-type="float" office:value="0.00195599995058728">
                <text:p>0.00195599995058728</text:p>
              </table:table-cell>
              <table:table-cell office:value-type="float" office:value="7.40000009536743">
                <text:p>7.40000009536743</text:p>
              </table:table-cell>
              <table:table-cell office:value-type="float" office:value="-20">
                <text:p>-20</text:p>
              </table:table-cell>
            </table:table-row>
            <table:table-row>
              <table:table-cell office:value-type="string">
                <text:p>980</text:p>
              </table:table-cell>
              <table:table-cell office:value-type="float" office:value="0.00195799995053676">
                <text:p>0.00195799995053676</text:p>
              </table:table-cell>
              <table:table-cell office:value-type="float" office:value="7.19999980926514">
                <text:p>7.19999980926514</text:p>
              </table:table-cell>
              <table:table-cell office:value-type="float" office:value="-20">
                <text:p>-20</text:p>
              </table:table-cell>
            </table:table-row>
            <table:table-row>
              <table:table-cell office:value-type="string">
                <text:p>981</text:p>
              </table:table-cell>
              <table:table-cell office:value-type="float" office:value="0.00195999995048624">
                <text:p>0.00195999995048624</text:p>
              </table:table-cell>
              <table:table-cell office:value-type="float" office:value="6.80000019073486">
                <text:p>6.80000019073486</text:p>
              </table:table-cell>
              <table:table-cell office:value-type="float" office:value="-20">
                <text:p>-20</text:p>
              </table:table-cell>
            </table:table-row>
            <table:table-row>
              <table:table-cell office:value-type="string">
                <text:p>982</text:p>
              </table:table-cell>
              <table:table-cell office:value-type="float" office:value="0.00196199995043571">
                <text:p>0.00196199995043571</text:p>
              </table:table-cell>
              <table:table-cell office:value-type="float" office:value="6.19999980926514">
                <text:p>6.19999980926514</text:p>
              </table:table-cell>
              <table:table-cell office:value-type="float" office:value="-20">
                <text:p>-20</text:p>
              </table:table-cell>
            </table:table-row>
            <table:table-row>
              <table:table-cell office:value-type="string">
                <text:p>983</text:p>
              </table:table-cell>
              <table:table-cell office:value-type="float" office:value="0.00196399995038519">
                <text:p>0.00196399995038519</text:p>
              </table:table-cell>
              <table:table-cell office:value-type="float" office:value="6">
                <text:p>6</text:p>
              </table:table-cell>
              <table:table-cell office:value-type="float" office:value="-20">
                <text:p>-20</text:p>
              </table:table-cell>
            </table:table-row>
            <table:table-row>
              <table:table-cell office:value-type="string">
                <text:p>984</text:p>
              </table:table-cell>
              <table:table-cell office:value-type="float" office:value="0.00196599995033466">
                <text:p>0.00196599995033466</text:p>
              </table:table-cell>
              <table:table-cell office:value-type="float" office:value="5.59999990463257">
                <text:p>5.59999990463257</text:p>
              </table:table-cell>
              <table:table-cell office:value-type="float" office:value="-20">
                <text:p>-20</text:p>
              </table:table-cell>
            </table:table-row>
            <table:table-row>
              <table:table-cell office:value-type="string">
                <text:p>985</text:p>
              </table:table-cell>
              <table:table-cell office:value-type="float" office:value="0.00196799995028414">
                <text:p>0.00196799995028414</text:p>
              </table:table-cell>
              <table:table-cell office:value-type="float" office:value="5.19999980926514">
                <text:p>5.19999980926514</text:p>
              </table:table-cell>
              <table:table-cell office:value-type="float" office:value="-20">
                <text:p>-20</text:p>
              </table:table-cell>
            </table:table-row>
            <table:table-row>
              <table:table-cell office:value-type="string">
                <text:p>986</text:p>
              </table:table-cell>
              <table:table-cell office:value-type="float" office:value="0.00196999995023361">
                <text:p>0.00196999995023361</text:p>
              </table:table-cell>
              <table:table-cell office:value-type="float" office:value="5">
                <text:p>5</text:p>
              </table:table-cell>
              <table:table-cell office:value-type="float" office:value="-20">
                <text:p>-20</text:p>
              </table:table-cell>
            </table:table-row>
            <table:table-row>
              <table:table-cell office:value-type="string">
                <text:p>987</text:p>
              </table:table-cell>
              <table:table-cell office:value-type="float" office:value="0.00197199995018309">
                <text:p>0.00197199995018309</text:p>
              </table:table-cell>
              <table:table-cell office:value-type="float" office:value="4.59999990463257">
                <text:p>4.59999990463257</text:p>
              </table:table-cell>
              <table:table-cell office:value-type="float" office:value="-20">
                <text:p>-20</text:p>
              </table:table-cell>
            </table:table-row>
            <table:table-row>
              <table:table-cell office:value-type="string">
                <text:p>988</text:p>
              </table:table-cell>
              <table:table-cell office:value-type="float" office:value="0.00197399995013257">
                <text:p>0.00197399995013257</text:p>
              </table:table-cell>
              <table:table-cell office:value-type="float" office:value="4.40000009536743">
                <text:p>4.40000009536743</text:p>
              </table:table-cell>
              <table:table-cell office:value-type="float" office:value="-20">
                <text:p>-20</text:p>
              </table:table-cell>
            </table:table-row>
            <table:table-row>
              <table:table-cell office:value-type="string">
                <text:p>989</text:p>
              </table:table-cell>
              <table:table-cell office:value-type="float" office:value="0.00197599995008204">
                <text:p>0.00197599995008204</text:p>
              </table:table-cell>
              <table:table-cell office:value-type="float" office:value="4">
                <text:p>4</text:p>
              </table:table-cell>
              <table:table-cell office:value-type="float" office:value="-20">
                <text:p>-20</text:p>
              </table:table-cell>
            </table:table-row>
            <table:table-row>
              <table:table-cell office:value-type="string">
                <text:p>990</text:p>
              </table:table-cell>
              <table:table-cell office:value-type="float" office:value="0.00197799995003152">
                <text:p>0.00197799995003152</text:p>
              </table:table-cell>
              <table:table-cell office:value-type="float" office:value="3.40000009536743">
                <text:p>3.40000009536743</text:p>
              </table:table-cell>
              <table:table-cell office:value-type="float" office:value="-20">
                <text:p>-20</text:p>
              </table:table-cell>
            </table:table-row>
            <table:table-row>
              <table:table-cell office:value-type="string">
                <text:p>991</text:p>
              </table:table-cell>
              <table:table-cell office:value-type="float" office:value="0.00197999994998099">
                <text:p>0.00197999994998099</text:p>
              </table:table-cell>
              <table:table-cell office:value-type="float" office:value="3">
                <text:p>3</text:p>
              </table:table-cell>
              <table:table-cell office:value-type="float" office:value="-20">
                <text:p>-20</text:p>
              </table:table-cell>
            </table:table-row>
            <table:table-row>
              <table:table-cell office:value-type="string">
                <text:p>992</text:p>
              </table:table-cell>
              <table:table-cell office:value-type="float" office:value="0.00198199994993047">
                <text:p>0.00198199994993047</text:p>
              </table:table-cell>
              <table:table-cell office:value-type="float" office:value="2.59999990463257">
                <text:p>2.59999990463257</text:p>
              </table:table-cell>
              <table:table-cell office:value-type="float" office:value="-20">
                <text:p>-20</text:p>
              </table:table-cell>
            </table:table-row>
            <table:table-row>
              <table:table-cell office:value-type="string">
                <text:p>993</text:p>
              </table:table-cell>
              <table:table-cell office:value-type="float" office:value="0.00198399994987994">
                <text:p>0.00198399994987994</text:p>
              </table:table-cell>
              <table:table-cell office:value-type="float" office:value="2.40000009536743">
                <text:p>2.40000009536743</text:p>
              </table:table-cell>
              <table:table-cell office:value-type="float" office:value="-20">
                <text:p>-20</text:p>
              </table:table-cell>
            </table:table-row>
            <table:table-row>
              <table:table-cell office:value-type="string">
                <text:p>994</text:p>
              </table:table-cell>
              <table:table-cell office:value-type="float" office:value="0.00198599994982942">
                <text:p>0.00198599994982942</text:p>
              </table:table-cell>
              <table:table-cell office:value-type="float" office:value="2">
                <text:p>2</text:p>
              </table:table-cell>
              <table:table-cell office:value-type="float" office:value="-20">
                <text:p>-20</text:p>
              </table:table-cell>
            </table:table-row>
            <table:table-row>
              <table:table-cell office:value-type="string">
                <text:p>995</text:p>
              </table:table-cell>
              <table:table-cell office:value-type="float" office:value="0.0019879999497789">
                <text:p>0.0019879999497789</text:p>
              </table:table-cell>
              <table:table-cell office:value-type="float" office:value="1.79999995231628">
                <text:p>1.79999995231628</text:p>
              </table:table-cell>
              <table:table-cell office:value-type="float" office:value="-20">
                <text:p>-20</text:p>
              </table:table-cell>
            </table:table-row>
            <table:table-row>
              <table:table-cell office:value-type="string">
                <text:p>996</text:p>
              </table:table-cell>
              <table:table-cell office:value-type="float" office:value="0.00198999994972837">
                <text:p>0.00198999994972837</text:p>
              </table:table-cell>
              <table:table-cell office:value-type="float" office:value="1.20000004768372">
                <text:p>1.20000004768372</text:p>
              </table:table-cell>
              <table:table-cell office:value-type="float" office:value="-20">
                <text:p>-20</text:p>
              </table:table-cell>
            </table:table-row>
            <table:table-row>
              <table:table-cell office:value-type="string">
                <text:p>997</text:p>
              </table:table-cell>
              <table:table-cell office:value-type="float" office:value="0.00199199994967785">
                <text:p>0.00199199994967785</text:p>
              </table:table-cell>
              <table:table-cell office:value-type="float" office:value="1">
                <text:p>1</text:p>
              </table:table-cell>
              <table:table-cell office:value-type="float" office:value="-20">
                <text:p>-20</text:p>
              </table:table-cell>
            </table:table-row>
            <table:table-row>
              <table:table-cell office:value-type="string">
                <text:p>998</text:p>
              </table:table-cell>
              <table:table-cell office:value-type="float" office:value="0.00199399994962732">
                <text:p>0.00199399994962732</text:p>
              </table:table-cell>
              <table:table-cell office:value-type="float" office:value="0.200000002980232">
                <text:p>0.200000002980232</text:p>
              </table:table-cell>
              <table:table-cell office:value-type="float" office:value="-20">
                <text:p>-20</text:p>
              </table:table-cell>
            </table:table-row>
            <table:table-row>
              <table:table-cell office:value-type="string">
                <text:p>999</text:p>
              </table:table-cell>
              <table:table-cell office:value-type="float" office:value="0.0019959999495768">
                <text:p>0.0019959999495768</text:p>
              </table:table-cell>
              <table:table-cell office:value-type="float" office:value="0.200000002980232">
                <text:p>0.200000002980232</text:p>
              </table:table-cell>
              <table:table-cell office:value-type="float" office:value="-20">
                <text:p>-20</text:p>
              </table:table-cell>
            </table:table-row>
            <table:table-row>
              <table:table-cell office:value-type="string">
                <text:p>1000</text:p>
              </table:table-cell>
              <table:table-cell office:value-type="float" office:value="0.00199799994952627">
                <text:p>0.00199799994952627</text:p>
              </table:table-cell>
              <table:table-cell office:value-type="float" office:value="0">
                <text:p>0</text:p>
              </table:table-cell>
              <table:table-cell office:value-type="float" office:value="-20">
                <text:p>-20</text:p>
              </table:table-cell>
            </table:table-row>
            <table:table-row>
              <table:table-cell office:value-type="string">
                <text:p>1001</text:p>
              </table:table-cell>
              <table:table-cell office:value-type="float" office:value="0.00199999994947575">
                <text:p>0.00199999994947575</text:p>
              </table:table-cell>
              <table:table-cell office:value-type="float" office:value="-0.400000005960465">
                <text:p>-0.400000005960465</text:p>
              </table:table-cell>
              <table:table-cell office:value-type="float" office:value="-20">
                <text:p>-20</text:p>
              </table:table-cell>
            </table:table-row>
            <table:table-row>
              <table:table-cell office:value-type="string">
                <text:p>1002</text:p>
              </table:table-cell>
              <table:table-cell office:value-type="float" office:value="0.00200199994942523">
                <text:p>0.00200199994942523</text:p>
              </table:table-cell>
              <table:table-cell office:value-type="float" office:value="-1">
                <text:p>-1</text:p>
              </table:table-cell>
              <table:table-cell office:value-type="float" office:value="-20">
                <text:p>-20</text:p>
              </table:table-cell>
            </table:table-row>
            <table:table-row>
              <table:table-cell office:value-type="string">
                <text:p>1003</text:p>
              </table:table-cell>
              <table:table-cell office:value-type="float" office:value="0.0020039999493747">
                <text:p>0.0020039999493747</text:p>
              </table:table-cell>
              <table:table-cell office:value-type="float" office:value="-1.39999997615814">
                <text:p>-1.39999997615814</text:p>
              </table:table-cell>
              <table:table-cell office:value-type="float" office:value="-20">
                <text:p>-20</text:p>
              </table:table-cell>
            </table:table-row>
            <table:table-row>
              <table:table-cell office:value-type="string">
                <text:p>1004</text:p>
              </table:table-cell>
              <table:table-cell office:value-type="float" office:value="0.00200599994932418">
                <text:p>0.00200599994932418</text:p>
              </table:table-cell>
              <table:table-cell office:value-type="float" office:value="-1.60000002384186">
                <text:p>-1.60000002384186</text:p>
              </table:table-cell>
              <table:table-cell office:value-type="float" office:value="-20">
                <text:p>-20</text:p>
              </table:table-cell>
            </table:table-row>
            <table:table-row>
              <table:table-cell office:value-type="string">
                <text:p>1005</text:p>
              </table:table-cell>
              <table:table-cell office:value-type="float" office:value="0.00200799994927365">
                <text:p>0.00200799994927365</text:p>
              </table:table-cell>
              <table:table-cell office:value-type="float" office:value="-2">
                <text:p>-2</text:p>
              </table:table-cell>
              <table:table-cell office:value-type="float" office:value="-20">
                <text:p>-20</text:p>
              </table:table-cell>
            </table:table-row>
            <table:table-row>
              <table:table-cell office:value-type="string">
                <text:p>1006</text:p>
              </table:table-cell>
              <table:table-cell office:value-type="float" office:value="0.00200999994922313">
                <text:p>0.00200999994922313</text:p>
              </table:table-cell>
              <table:table-cell office:value-type="float" office:value="-2.59999990463257">
                <text:p>-2.59999990463257</text:p>
              </table:table-cell>
              <table:table-cell office:value-type="float" office:value="-20">
                <text:p>-20</text:p>
              </table:table-cell>
            </table:table-row>
            <table:table-row>
              <table:table-cell office:value-type="string">
                <text:p>1007</text:p>
              </table:table-cell>
              <table:table-cell office:value-type="float" office:value="0.0020119999491726">
                <text:p>0.0020119999491726</text:p>
              </table:table-cell>
              <table:table-cell office:value-type="float" office:value="-2.79999995231628">
                <text:p>-2.79999995231628</text:p>
              </table:table-cell>
              <table:table-cell office:value-type="float" office:value="-20">
                <text:p>-20</text:p>
              </table:table-cell>
            </table:table-row>
            <table:table-row>
              <table:table-cell office:value-type="string">
                <text:p>1008</text:p>
              </table:table-cell>
              <table:table-cell office:value-type="float" office:value="0.00201399994912208">
                <text:p>0.00201399994912208</text:p>
              </table:table-cell>
              <table:table-cell office:value-type="float" office:value="-3.20000004768372">
                <text:p>-3.20000004768372</text:p>
              </table:table-cell>
              <table:table-cell office:value-type="float" office:value="-20">
                <text:p>-20</text:p>
              </table:table-cell>
            </table:table-row>
            <table:table-row>
              <table:table-cell office:value-type="string">
                <text:p>1009</text:p>
              </table:table-cell>
              <table:table-cell office:value-type="float" office:value="0.00201599994907156">
                <text:p>0.00201599994907156</text:p>
              </table:table-cell>
              <table:table-cell office:value-type="float" office:value="-3.59999990463257">
                <text:p>-3.59999990463257</text:p>
              </table:table-cell>
              <table:table-cell office:value-type="float" office:value="-20">
                <text:p>-20</text:p>
              </table:table-cell>
            </table:table-row>
            <table:table-row>
              <table:table-cell office:value-type="string">
                <text:p>1010</text:p>
              </table:table-cell>
              <table:table-cell office:value-type="float" office:value="0.00201799994902103">
                <text:p>0.00201799994902103</text:p>
              </table:table-cell>
              <table:table-cell office:value-type="float" office:value="-4">
                <text:p>-4</text:p>
              </table:table-cell>
              <table:table-cell office:value-type="float" office:value="-20">
                <text:p>-20</text:p>
              </table:table-cell>
            </table:table-row>
            <table:table-row>
              <table:table-cell office:value-type="string">
                <text:p>1011</text:p>
              </table:table-cell>
              <table:table-cell office:value-type="float" office:value="0.00201999994897051">
                <text:p>0.00201999994897051</text:p>
              </table:table-cell>
              <table:table-cell office:value-type="float" office:value="-4.59999990463257">
                <text:p>-4.59999990463257</text:p>
              </table:table-cell>
              <table:table-cell office:value-type="float" office:value="-20">
                <text:p>-20</text:p>
              </table:table-cell>
            </table:table-row>
            <table:table-row>
              <table:table-cell office:value-type="string">
                <text:p>1012</text:p>
              </table:table-cell>
              <table:table-cell office:value-type="float" office:value="0.00202199994891998">
                <text:p>0.00202199994891998</text:p>
              </table:table-cell>
              <table:table-cell office:value-type="float" office:value="-4.59999990463257">
                <text:p>-4.59999990463257</text:p>
              </table:table-cell>
              <table:table-cell office:value-type="float" office:value="-20">
                <text:p>-20</text:p>
              </table:table-cell>
            </table:table-row>
            <table:table-row>
              <table:table-cell office:value-type="string">
                <text:p>1013</text:p>
              </table:table-cell>
              <table:table-cell office:value-type="float" office:value="0.00202399994886946">
                <text:p>0.00202399994886946</text:p>
              </table:table-cell>
              <table:table-cell office:value-type="float" office:value="-5">
                <text:p>-5</text:p>
              </table:table-cell>
              <table:table-cell office:value-type="float" office:value="-20">
                <text:p>-20</text:p>
              </table:table-cell>
            </table:table-row>
            <table:table-row>
              <table:table-cell office:value-type="string">
                <text:p>1014</text:p>
              </table:table-cell>
              <table:table-cell office:value-type="float" office:value="0.00202599994881894">
                <text:p>0.00202599994881894</text:p>
              </table:table-cell>
              <table:table-cell office:value-type="float" office:value="-5.59999990463257">
                <text:p>-5.59999990463257</text:p>
              </table:table-cell>
              <table:table-cell office:value-type="float" office:value="-20">
                <text:p>-20</text:p>
              </table:table-cell>
            </table:table-row>
            <table:table-row>
              <table:table-cell office:value-type="string">
                <text:p>1015</text:p>
              </table:table-cell>
              <table:table-cell office:value-type="float" office:value="0.00202799994876841">
                <text:p>0.00202799994876841</text:p>
              </table:table-cell>
              <table:table-cell office:value-type="float" office:value="-5.80000019073486">
                <text:p>-5.80000019073486</text:p>
              </table:table-cell>
              <table:table-cell office:value-type="float" office:value="-20">
                <text:p>-20</text:p>
              </table:table-cell>
            </table:table-row>
            <table:table-row>
              <table:table-cell office:value-type="string">
                <text:p>1016</text:p>
              </table:table-cell>
              <table:table-cell office:value-type="float" office:value="0.00202999994871789">
                <text:p>0.00202999994871789</text:p>
              </table:table-cell>
              <table:table-cell office:value-type="float" office:value="-6.19999980926514">
                <text:p>-6.19999980926514</text:p>
              </table:table-cell>
              <table:table-cell office:value-type="float" office:value="-20">
                <text:p>-20</text:p>
              </table:table-cell>
            </table:table-row>
            <table:table-row>
              <table:table-cell office:value-type="string">
                <text:p>1017</text:p>
              </table:table-cell>
              <table:table-cell office:value-type="float" office:value="0.00203199994866736">
                <text:p>0.00203199994866736</text:p>
              </table:table-cell>
              <table:table-cell office:value-type="float" office:value="-6.40000009536743">
                <text:p>-6.40000009536743</text:p>
              </table:table-cell>
              <table:table-cell office:value-type="float" office:value="-20">
                <text:p>-20</text:p>
              </table:table-cell>
            </table:table-row>
            <table:table-row>
              <table:table-cell office:value-type="string">
                <text:p>1018</text:p>
              </table:table-cell>
              <table:table-cell office:value-type="float" office:value="0.00203399994861684">
                <text:p>0.00203399994861684</text:p>
              </table:table-cell>
              <table:table-cell office:value-type="float" office:value="-6.80000019073486">
                <text:p>-6.80000019073486</text:p>
              </table:table-cell>
              <table:table-cell office:value-type="float" office:value="-20">
                <text:p>-20</text:p>
              </table:table-cell>
            </table:table-row>
            <table:table-row>
              <table:table-cell office:value-type="string">
                <text:p>1019</text:p>
              </table:table-cell>
              <table:table-cell office:value-type="float" office:value="0.00203599994856631">
                <text:p>0.00203599994856631</text:p>
              </table:table-cell>
              <table:table-cell office:value-type="float" office:value="-7">
                <text:p>-7</text:p>
              </table:table-cell>
              <table:table-cell office:value-type="float" office:value="-20">
                <text:p>-20</text:p>
              </table:table-cell>
            </table:table-row>
            <table:table-row>
              <table:table-cell office:value-type="string">
                <text:p>1020</text:p>
              </table:table-cell>
              <table:table-cell office:value-type="float" office:value="0.00203799994851579">
                <text:p>0.00203799994851579</text:p>
              </table:table-cell>
              <table:table-cell office:value-type="float" office:value="-7.59999990463257">
                <text:p>-7.59999990463257</text:p>
              </table:table-cell>
              <table:table-cell office:value-type="float" office:value="-20">
                <text:p>-20</text:p>
              </table:table-cell>
            </table:table-row>
            <table:table-row>
              <table:table-cell office:value-type="string">
                <text:p>1021</text:p>
              </table:table-cell>
              <table:table-cell office:value-type="float" office:value="0.00203999994846527">
                <text:p>0.00203999994846527</text:p>
              </table:table-cell>
              <table:table-cell office:value-type="float" office:value="-7.80000019073486">
                <text:p>-7.80000019073486</text:p>
              </table:table-cell>
              <table:table-cell office:value-type="float" office:value="-20">
                <text:p>-20</text:p>
              </table:table-cell>
            </table:table-row>
            <table:table-row>
              <table:table-cell office:value-type="string">
                <text:p>1022</text:p>
              </table:table-cell>
              <table:table-cell office:value-type="float" office:value="0.00204199994841474">
                <text:p>0.00204199994841474</text:p>
              </table:table-cell>
              <table:table-cell office:value-type="float" office:value="-8.60000038146973">
                <text:p>-8.60000038146973</text:p>
              </table:table-cell>
              <table:table-cell office:value-type="float" office:value="-20">
                <text:p>-20</text:p>
              </table:table-cell>
            </table:table-row>
            <table:table-row>
              <table:table-cell office:value-type="string">
                <text:p>1023</text:p>
              </table:table-cell>
              <table:table-cell office:value-type="float" office:value="0.00204399994836422">
                <text:p>0.00204399994836422</text:p>
              </table:table-cell>
              <table:table-cell office:value-type="float" office:value="-8.80000019073486">
                <text:p>-8.80000019073486</text:p>
              </table:table-cell>
              <table:table-cell office:value-type="float" office:value="-20">
                <text:p>-20</text:p>
              </table:table-cell>
            </table:table-row>
            <table:table-row>
              <table:table-cell office:value-type="string">
                <text:p>1024</text:p>
              </table:table-cell>
              <table:table-cell office:value-type="float" office:value="0.00204599994831369">
                <text:p>0.00204599994831369</text:p>
              </table:table-cell>
              <table:table-cell office:value-type="float" office:value="-9.19999980926514">
                <text:p>-9.19999980926514</text:p>
              </table:table-cell>
              <table:table-cell office:value-type="float" office:value="-20">
                <text:p>-20</text:p>
              </table:table-cell>
            </table:table-row>
            <table:table-row>
              <table:table-cell office:value-type="string">
                <text:p>1025</text:p>
              </table:table-cell>
              <table:table-cell office:value-type="float" office:value="0.00204799994826317">
                <text:p>0.00204799994826317</text:p>
              </table:table-cell>
              <table:table-cell office:value-type="float" office:value="-9.19999980926514">
                <text:p>-9.19999980926514</text:p>
              </table:table-cell>
              <table:table-cell office:value-type="float" office:value="-20">
                <text:p>-20</text:p>
              </table:table-cell>
            </table:table-row>
            <table:table-row>
              <table:table-cell office:value-type="string">
                <text:p>1026</text:p>
              </table:table-cell>
              <table:table-cell office:value-type="float" office:value="0.00204999994821264">
                <text:p>0.00204999994821264</text:p>
              </table:table-cell>
              <table:table-cell office:value-type="float" office:value="-9.80000019073486">
                <text:p>-9.80000019073486</text:p>
              </table:table-cell>
              <table:table-cell office:value-type="float" office:value="-20">
                <text:p>-20</text:p>
              </table:table-cell>
            </table:table-row>
            <table:table-row>
              <table:table-cell office:value-type="string">
                <text:p>1027</text:p>
              </table:table-cell>
              <table:table-cell office:value-type="float" office:value="0.00205199994816212">
                <text:p>0.00205199994816212</text:p>
              </table:table-cell>
              <table:table-cell office:value-type="float" office:value="-10.3999996185303">
                <text:p>-10.3999996185303</text:p>
              </table:table-cell>
              <table:table-cell office:value-type="float" office:value="-20">
                <text:p>-20</text:p>
              </table:table-cell>
            </table:table-row>
            <table:table-row>
              <table:table-cell office:value-type="string">
                <text:p>1028</text:p>
              </table:table-cell>
              <table:table-cell office:value-type="float" office:value="0.0020539999481116">
                <text:p>0.0020539999481116</text:p>
              </table:table-cell>
              <table:table-cell office:value-type="float" office:value="-10.6000003814697">
                <text:p>-10.6000003814697</text:p>
              </table:table-cell>
              <table:table-cell office:value-type="float" office:value="-20">
                <text:p>-20</text:p>
              </table:table-cell>
            </table:table-row>
            <table:table-row>
              <table:table-cell office:value-type="string">
                <text:p>1029</text:p>
              </table:table-cell>
              <table:table-cell office:value-type="float" office:value="0.00205599994806107">
                <text:p>0.00205599994806107</text:p>
              </table:table-cell>
              <table:table-cell office:value-type="float" office:value="-11">
                <text:p>-11</text:p>
              </table:table-cell>
              <table:table-cell office:value-type="float" office:value="-20">
                <text:p>-20</text:p>
              </table:table-cell>
            </table:table-row>
            <table:table-row>
              <table:table-cell office:value-type="string">
                <text:p>1030</text:p>
              </table:table-cell>
              <table:table-cell office:value-type="float" office:value="0.00205799994801055">
                <text:p>0.00205799994801055</text:p>
              </table:table-cell>
              <table:table-cell office:value-type="float" office:value="-11.1999998092651">
                <text:p>-11.1999998092651</text:p>
              </table:table-cell>
              <table:table-cell office:value-type="float" office:value="-20">
                <text:p>-20</text:p>
              </table:table-cell>
            </table:table-row>
            <table:table-row>
              <table:table-cell office:value-type="string">
                <text:p>1031</text:p>
              </table:table-cell>
              <table:table-cell office:value-type="float" office:value="0.00205999994796002">
                <text:p>0.00205999994796002</text:p>
              </table:table-cell>
              <table:table-cell office:value-type="float" office:value="-11.8000001907349">
                <text:p>-11.8000001907349</text:p>
              </table:table-cell>
              <table:table-cell office:value-type="float" office:value="-20">
                <text:p>-20</text:p>
              </table:table-cell>
            </table:table-row>
            <table:table-row>
              <table:table-cell office:value-type="string">
                <text:p>1032</text:p>
              </table:table-cell>
              <table:table-cell office:value-type="float" office:value="0.0020619999479095">
                <text:p>0.0020619999479095</text:p>
              </table:table-cell>
              <table:table-cell office:value-type="float" office:value="-12">
                <text:p>-12</text:p>
              </table:table-cell>
              <table:table-cell office:value-type="float" office:value="-20">
                <text:p>-20</text:p>
              </table:table-cell>
            </table:table-row>
            <table:table-row>
              <table:table-cell office:value-type="string">
                <text:p>1033</text:p>
              </table:table-cell>
              <table:table-cell office:value-type="float" office:value="0.00206399994785897">
                <text:p>0.00206399994785897</text:p>
              </table:table-cell>
              <table:table-cell office:value-type="float" office:value="-12.6000003814697">
                <text:p>-12.6000003814697</text:p>
              </table:table-cell>
              <table:table-cell office:value-type="float" office:value="-20">
                <text:p>-20</text:p>
              </table:table-cell>
            </table:table-row>
            <table:table-row>
              <table:table-cell office:value-type="string">
                <text:p>1034</text:p>
              </table:table-cell>
              <table:table-cell office:value-type="float" office:value="0.00206599994780845">
                <text:p>0.00206599994780845</text:p>
              </table:table-cell>
              <table:table-cell office:value-type="float" office:value="-12.8000001907349">
                <text:p>-12.8000001907349</text:p>
              </table:table-cell>
              <table:table-cell office:value-type="float" office:value="-20">
                <text:p>-20</text:p>
              </table:table-cell>
            </table:table-row>
            <table:table-row>
              <table:table-cell office:value-type="string">
                <text:p>1035</text:p>
              </table:table-cell>
              <table:table-cell office:value-type="float" office:value="0.00206799994775793">
                <text:p>0.00206799994775793</text:p>
              </table:table-cell>
              <table:table-cell office:value-type="float" office:value="-13.3999996185303">
                <text:p>-13.3999996185303</text:p>
              </table:table-cell>
              <table:table-cell office:value-type="float" office:value="-20">
                <text:p>-20</text:p>
              </table:table-cell>
            </table:table-row>
            <table:table-row>
              <table:table-cell office:value-type="string">
                <text:p>1036</text:p>
              </table:table-cell>
              <table:table-cell office:value-type="float" office:value="0.0020699999477074">
                <text:p>0.0020699999477074</text:p>
              </table:table-cell>
              <table:table-cell office:value-type="float" office:value="-13.6000003814697">
                <text:p>-13.6000003814697</text:p>
              </table:table-cell>
              <table:table-cell office:value-type="float" office:value="-20">
                <text:p>-20</text:p>
              </table:table-cell>
            </table:table-row>
            <table:table-row>
              <table:table-cell office:value-type="string">
                <text:p>1037</text:p>
              </table:table-cell>
              <table:table-cell office:value-type="float" office:value="0.00207199994765688">
                <text:p>0.00207199994765688</text:p>
              </table:table-cell>
              <table:table-cell office:value-type="float" office:value="-14">
                <text:p>-14</text:p>
              </table:table-cell>
              <table:table-cell office:value-type="float" office:value="-20">
                <text:p>-20</text:p>
              </table:table-cell>
            </table:table-row>
            <table:table-row>
              <table:table-cell office:value-type="string">
                <text:p>1038</text:p>
              </table:table-cell>
              <table:table-cell office:value-type="float" office:value="0.00207399994760635">
                <text:p>0.00207399994760635</text:p>
              </table:table-cell>
              <table:table-cell office:value-type="float" office:value="-14.6000003814697">
                <text:p>-14.6000003814697</text:p>
              </table:table-cell>
              <table:table-cell office:value-type="float" office:value="-20">
                <text:p>-20</text:p>
              </table:table-cell>
            </table:table-row>
            <table:table-row>
              <table:table-cell office:value-type="string">
                <text:p>1039</text:p>
              </table:table-cell>
              <table:table-cell office:value-type="float" office:value="0.00207599994755583">
                <text:p>0.00207599994755583</text:p>
              </table:table-cell>
              <table:table-cell office:value-type="float" office:value="-14.6000003814697">
                <text:p>-14.6000003814697</text:p>
              </table:table-cell>
              <table:table-cell office:value-type="float" office:value="-20">
                <text:p>-20</text:p>
              </table:table-cell>
            </table:table-row>
            <table:table-row>
              <table:table-cell office:value-type="string">
                <text:p>1040</text:p>
              </table:table-cell>
              <table:table-cell office:value-type="float" office:value="0.0020779999475053">
                <text:p>0.0020779999475053</text:p>
              </table:table-cell>
              <table:table-cell office:value-type="float" office:value="-15">
                <text:p>-15</text:p>
              </table:table-cell>
              <table:table-cell office:value-type="float" office:value="-20">
                <text:p>-20</text:p>
              </table:table-cell>
            </table:table-row>
            <table:table-row>
              <table:table-cell office:value-type="string">
                <text:p>1041</text:p>
              </table:table-cell>
              <table:table-cell office:value-type="float" office:value="0.00207999994745478">
                <text:p>0.00207999994745478</text:p>
              </table:table-cell>
              <table:table-cell office:value-type="float" office:value="-15.3999996185303">
                <text:p>-15.3999996185303</text:p>
              </table:table-cell>
              <table:table-cell office:value-type="float" office:value="-20">
                <text:p>-20</text:p>
              </table:table-cell>
            </table:table-row>
            <table:table-row>
              <table:table-cell office:value-type="string">
                <text:p>1042</text:p>
              </table:table-cell>
              <table:table-cell office:value-type="float" office:value="0.00208199994740426">
                <text:p>0.00208199994740426</text:p>
              </table:table-cell>
              <table:table-cell office:value-type="float" office:value="-16">
                <text:p>-16</text:p>
              </table:table-cell>
              <table:table-cell office:value-type="float" office:value="-20">
                <text:p>-20</text:p>
              </table:table-cell>
            </table:table-row>
            <table:table-row>
              <table:table-cell office:value-type="string">
                <text:p>1043</text:p>
              </table:table-cell>
              <table:table-cell office:value-type="float" office:value="0.00208399994735373">
                <text:p>0.00208399994735373</text:p>
              </table:table-cell>
              <table:table-cell office:value-type="float" office:value="-16.2000007629395">
                <text:p>-16.2000007629395</text:p>
              </table:table-cell>
              <table:table-cell office:value-type="float" office:value="-20">
                <text:p>-20</text:p>
              </table:table-cell>
            </table:table-row>
            <table:table-row>
              <table:table-cell office:value-type="string">
                <text:p>1044</text:p>
              </table:table-cell>
              <table:table-cell office:value-type="float" office:value="0.00208599994730321">
                <text:p>0.00208599994730321</text:p>
              </table:table-cell>
              <table:table-cell office:value-type="float" office:value="-16.3999996185303">
                <text:p>-16.3999996185303</text:p>
              </table:table-cell>
              <table:table-cell office:value-type="float" office:value="-20">
                <text:p>-20</text:p>
              </table:table-cell>
            </table:table-row>
            <table:table-row>
              <table:table-cell office:value-type="string">
                <text:p>1045</text:p>
              </table:table-cell>
              <table:table-cell office:value-type="float" office:value="0.00208799994725268">
                <text:p>0.00208799994725268</text:p>
              </table:table-cell>
              <table:table-cell office:value-type="float" office:value="-17">
                <text:p>-17</text:p>
              </table:table-cell>
              <table:table-cell office:value-type="float" office:value="-20">
                <text:p>-20</text:p>
              </table:table-cell>
            </table:table-row>
            <table:table-row>
              <table:table-cell office:value-type="string">
                <text:p>1046</text:p>
              </table:table-cell>
              <table:table-cell office:value-type="float" office:value="0.00208999994720216">
                <text:p>0.00208999994720216</text:p>
              </table:table-cell>
              <table:table-cell office:value-type="float" office:value="-17.6000003814697">
                <text:p>-17.6000003814697</text:p>
              </table:table-cell>
              <table:table-cell office:value-type="float" office:value="-20">
                <text:p>-20</text:p>
              </table:table-cell>
            </table:table-row>
            <table:table-row>
              <table:table-cell office:value-type="string">
                <text:p>1047</text:p>
              </table:table-cell>
              <table:table-cell office:value-type="float" office:value="0.00209199994715163">
                <text:p>0.00209199994715163</text:p>
              </table:table-cell>
              <table:table-cell office:value-type="float" office:value="-17.6000003814697">
                <text:p>-17.6000003814697</text:p>
              </table:table-cell>
              <table:table-cell office:value-type="float" office:value="-20">
                <text:p>-20</text:p>
              </table:table-cell>
            </table:table-row>
            <table:table-row>
              <table:table-cell office:value-type="string">
                <text:p>1048</text:p>
              </table:table-cell>
              <table:table-cell office:value-type="float" office:value="0.00209399994710111">
                <text:p>0.00209399994710111</text:p>
              </table:table-cell>
              <table:table-cell office:value-type="float" office:value="-18">
                <text:p>-18</text:p>
              </table:table-cell>
              <table:table-cell office:value-type="float" office:value="-20">
                <text:p>-20</text:p>
              </table:table-cell>
            </table:table-row>
            <table:table-row>
              <table:table-cell office:value-type="string">
                <text:p>1049</text:p>
              </table:table-cell>
              <table:table-cell office:value-type="float" office:value="0.00209599994705059">
                <text:p>0.00209599994705059</text:p>
              </table:table-cell>
              <table:table-cell office:value-type="float" office:value="-18.3999996185303">
                <text:p>-18.3999996185303</text:p>
              </table:table-cell>
              <table:table-cell office:value-type="float" office:value="-20">
                <text:p>-20</text:p>
              </table:table-cell>
            </table:table-row>
            <table:table-row>
              <table:table-cell office:value-type="string">
                <text:p>1050</text:p>
              </table:table-cell>
              <table:table-cell office:value-type="float" office:value="0.00209799994700006">
                <text:p>0.00209799994700006</text:p>
              </table:table-cell>
              <table:table-cell office:value-type="float" office:value="-18.6000003814697">
                <text:p>-18.6000003814697</text:p>
              </table:table-cell>
              <table:table-cell office:value-type="float" office:value="-20">
                <text:p>-20</text:p>
              </table:table-cell>
            </table:table-row>
            <table:table-row>
              <table:table-cell office:value-type="string">
                <text:p>1051</text:p>
              </table:table-cell>
              <table:table-cell office:value-type="float" office:value="0.00209999994694954">
                <text:p>0.00209999994694954</text:p>
              </table:table-cell>
              <table:table-cell office:value-type="float" office:value="-19.2000007629395">
                <text:p>-19.2000007629395</text:p>
              </table:table-cell>
              <table:table-cell office:value-type="float" office:value="-20">
                <text:p>-20</text:p>
              </table:table-cell>
            </table:table-row>
            <table:table-row>
              <table:table-cell office:value-type="string">
                <text:p>1052</text:p>
              </table:table-cell>
              <table:table-cell office:value-type="float" office:value="0.00210199994689901">
                <text:p>0.00210199994689901</text:p>
              </table:table-cell>
              <table:table-cell office:value-type="float" office:value="-19.3999996185303">
                <text:p>-19.3999996185303</text:p>
              </table:table-cell>
              <table:table-cell office:value-type="float" office:value="-20">
                <text:p>-20</text:p>
              </table:table-cell>
            </table:table-row>
            <table:table-row>
              <table:table-cell office:value-type="string">
                <text:p>1053</text:p>
              </table:table-cell>
              <table:table-cell office:value-type="float" office:value="0.00210399994684849">
                <text:p>0.00210399994684849</text:p>
              </table:table-cell>
              <table:table-cell office:value-type="float" office:value="-20">
                <text:p>-20</text:p>
              </table:table-cell>
              <table:table-cell office:value-type="float" office:value="-20">
                <text:p>-20</text:p>
              </table:table-cell>
            </table:table-row>
            <table:table-row>
              <table:table-cell office:value-type="string">
                <text:p>1054</text:p>
              </table:table-cell>
              <table:table-cell office:value-type="float" office:value="0.00210599994679797">
                <text:p>0.00210599994679797</text:p>
              </table:table-cell>
              <table:table-cell office:value-type="float" office:value="-20.3999996185303">
                <text:p>-20.3999996185303</text:p>
              </table:table-cell>
              <table:table-cell office:value-type="float" office:value="-20">
                <text:p>-20</text:p>
              </table:table-cell>
            </table:table-row>
            <table:table-row>
              <table:table-cell office:value-type="string">
                <text:p>1055</text:p>
              </table:table-cell>
              <table:table-cell office:value-type="float" office:value="0.00210799994674744">
                <text:p>0.00210799994674744</text:p>
              </table:table-cell>
              <table:table-cell office:value-type="float" office:value="-20.6000003814697">
                <text:p>-20.6000003814697</text:p>
              </table:table-cell>
              <table:table-cell office:value-type="float" office:value="-20">
                <text:p>-20</text:p>
              </table:table-cell>
            </table:table-row>
            <table:table-row>
              <table:table-cell office:value-type="string">
                <text:p>1056</text:p>
              </table:table-cell>
              <table:table-cell office:value-type="float" office:value="0.00210999994669692">
                <text:p>0.00210999994669692</text:p>
              </table:table-cell>
              <table:table-cell office:value-type="float" office:value="-20.7999992370605">
                <text:p>-20.7999992370605</text:p>
              </table:table-cell>
              <table:table-cell office:value-type="float" office:value="-20">
                <text:p>-20</text:p>
              </table:table-cell>
            </table:table-row>
            <table:table-row>
              <table:table-cell office:value-type="string">
                <text:p>1057</text:p>
              </table:table-cell>
              <table:table-cell office:value-type="float" office:value="0.00211199994664639">
                <text:p>0.00211199994664639</text:p>
              </table:table-cell>
              <table:table-cell office:value-type="float" office:value="-21.3999996185303">
                <text:p>-21.3999996185303</text:p>
              </table:table-cell>
              <table:table-cell office:value-type="float" office:value="-20">
                <text:p>-20</text:p>
              </table:table-cell>
            </table:table-row>
            <table:table-row>
              <table:table-cell office:value-type="string">
                <text:p>1058</text:p>
              </table:table-cell>
              <table:table-cell office:value-type="float" office:value="0.00211399994659587">
                <text:p>0.00211399994659587</text:p>
              </table:table-cell>
              <table:table-cell office:value-type="float" office:value="-21.7999992370605">
                <text:p>-21.7999992370605</text:p>
              </table:table-cell>
              <table:table-cell office:value-type="float" office:value="-20">
                <text:p>-20</text:p>
              </table:table-cell>
            </table:table-row>
            <table:table-row>
              <table:table-cell office:value-type="string">
                <text:p>1059</text:p>
              </table:table-cell>
              <table:table-cell office:value-type="float" office:value="0.00211599994654534">
                <text:p>0.00211599994654534</text:p>
              </table:table-cell>
              <table:table-cell office:value-type="float" office:value="-22.2000007629395">
                <text:p>-22.2000007629395</text:p>
              </table:table-cell>
              <table:table-cell office:value-type="float" office:value="-20">
                <text:p>-20</text:p>
              </table:table-cell>
            </table:table-row>
            <table:table-row>
              <table:table-cell office:value-type="string">
                <text:p>1060</text:p>
              </table:table-cell>
              <table:table-cell office:value-type="float" office:value="0.00211799994649482">
                <text:p>0.00211799994649482</text:p>
              </table:table-cell>
              <table:table-cell office:value-type="float" office:value="-22.3999996185303">
                <text:p>-22.3999996185303</text:p>
              </table:table-cell>
              <table:table-cell office:value-type="float" office:value="-20">
                <text:p>-20</text:p>
              </table:table-cell>
            </table:table-row>
            <table:table-row>
              <table:table-cell office:value-type="string">
                <text:p>1061</text:p>
              </table:table-cell>
              <table:table-cell office:value-type="float" office:value="0.0021199999464443">
                <text:p>0.0021199999464443</text:p>
              </table:table-cell>
              <table:table-cell office:value-type="float" office:value="-23">
                <text:p>-23</text:p>
              </table:table-cell>
              <table:table-cell office:value-type="float" office:value="-20">
                <text:p>-20</text:p>
              </table:table-cell>
            </table:table-row>
            <table:table-row>
              <table:table-cell office:value-type="string">
                <text:p>1062</text:p>
              </table:table-cell>
              <table:table-cell office:value-type="float" office:value="0.00212199994639377">
                <text:p>0.00212199994639377</text:p>
              </table:table-cell>
              <table:table-cell office:value-type="float" office:value="-23.2000007629395">
                <text:p>-23.2000007629395</text:p>
              </table:table-cell>
              <table:table-cell office:value-type="float" office:value="-20">
                <text:p>-20</text:p>
              </table:table-cell>
            </table:table-row>
            <table:table-row>
              <table:table-cell office:value-type="string">
                <text:p>1063</text:p>
              </table:table-cell>
              <table:table-cell office:value-type="float" office:value="0.00212399994634325">
                <text:p>0.00212399994634325</text:p>
              </table:table-cell>
              <table:table-cell office:value-type="float" office:value="-23.6000003814697">
                <text:p>-23.6000003814697</text:p>
              </table:table-cell>
              <table:table-cell office:value-type="float" office:value="-20">
                <text:p>-20</text:p>
              </table:table-cell>
            </table:table-row>
            <table:table-row>
              <table:table-cell office:value-type="string">
                <text:p>1064</text:p>
              </table:table-cell>
              <table:table-cell office:value-type="float" office:value="0.00212599994629272">
                <text:p>0.00212599994629272</text:p>
              </table:table-cell>
              <table:table-cell office:value-type="float" office:value="-24">
                <text:p>-24</text:p>
              </table:table-cell>
              <table:table-cell office:value-type="float" office:value="-20">
                <text:p>-20</text:p>
              </table:table-cell>
            </table:table-row>
            <table:table-row>
              <table:table-cell office:value-type="string">
                <text:p>1065</text:p>
              </table:table-cell>
              <table:table-cell office:value-type="float" office:value="0.0021279999462422">
                <text:p>0.0021279999462422</text:p>
              </table:table-cell>
              <table:table-cell office:value-type="float" office:value="-24.3999996185303">
                <text:p>-24.3999996185303</text:p>
              </table:table-cell>
              <table:table-cell office:value-type="float" office:value="-20">
                <text:p>-20</text:p>
              </table:table-cell>
            </table:table-row>
            <table:table-row>
              <table:table-cell office:value-type="string">
                <text:p>1066</text:p>
              </table:table-cell>
              <table:table-cell office:value-type="float" office:value="0.00212999994619167">
                <text:p>0.00212999994619167</text:p>
              </table:table-cell>
              <table:table-cell office:value-type="float" office:value="-24.7999992370605">
                <text:p>-24.7999992370605</text:p>
              </table:table-cell>
              <table:table-cell office:value-type="float" office:value="-20">
                <text:p>-20</text:p>
              </table:table-cell>
            </table:table-row>
            <table:table-row>
              <table:table-cell office:value-type="string">
                <text:p>1067</text:p>
              </table:table-cell>
              <table:table-cell office:value-type="float" office:value="0.00213199994614115">
                <text:p>0.00213199994614115</text:p>
              </table:table-cell>
              <table:table-cell office:value-type="float" office:value="-25.2000007629395">
                <text:p>-25.2000007629395</text:p>
              </table:table-cell>
              <table:table-cell office:value-type="float" office:value="-20">
                <text:p>-20</text:p>
              </table:table-cell>
            </table:table-row>
            <table:table-row>
              <table:table-cell office:value-type="string">
                <text:p>1068</text:p>
              </table:table-cell>
              <table:table-cell office:value-type="float" office:value="0.00213399994609063">
                <text:p>0.00213399994609063</text:p>
              </table:table-cell>
              <table:table-cell office:value-type="float" office:value="-25.3999996185303">
                <text:p>-25.3999996185303</text:p>
              </table:table-cell>
              <table:table-cell office:value-type="float" office:value="-20">
                <text:p>-20</text:p>
              </table:table-cell>
            </table:table-row>
            <table:table-row>
              <table:table-cell office:value-type="string">
                <text:p>1069</text:p>
              </table:table-cell>
              <table:table-cell office:value-type="float" office:value="0.0021359999460401">
                <text:p>0.0021359999460401</text:p>
              </table:table-cell>
              <table:table-cell office:value-type="float" office:value="-25.7999992370605">
                <text:p>-25.7999992370605</text:p>
              </table:table-cell>
              <table:table-cell office:value-type="float" office:value="-20">
                <text:p>-20</text:p>
              </table:table-cell>
            </table:table-row>
            <table:table-row>
              <table:table-cell office:value-type="string">
                <text:p>1070</text:p>
              </table:table-cell>
              <table:table-cell office:value-type="float" office:value="0.00213799994598958">
                <text:p>0.00213799994598958</text:p>
              </table:table-cell>
              <table:table-cell office:value-type="float" office:value="-26.2000007629395">
                <text:p>-26.2000007629395</text:p>
              </table:table-cell>
              <table:table-cell office:value-type="float" office:value="-20">
                <text:p>-20</text:p>
              </table:table-cell>
            </table:table-row>
            <table:table-row>
              <table:table-cell office:value-type="string">
                <text:p>1071</text:p>
              </table:table-cell>
              <table:table-cell office:value-type="float" office:value="0.00213999994593905">
                <text:p>0.00213999994593905</text:p>
              </table:table-cell>
              <table:table-cell office:value-type="float" office:value="-26.6000003814697">
                <text:p>-26.6000003814697</text:p>
              </table:table-cell>
              <table:table-cell office:value-type="float" office:value="-20">
                <text:p>-20</text:p>
              </table:table-cell>
            </table:table-row>
            <table:table-row>
              <table:table-cell office:value-type="string">
                <text:p>1072</text:p>
              </table:table-cell>
              <table:table-cell office:value-type="float" office:value="0.00214199994588853">
                <text:p>0.00214199994588853</text:p>
              </table:table-cell>
              <table:table-cell office:value-type="float" office:value="-26.7999992370605">
                <text:p>-26.7999992370605</text:p>
              </table:table-cell>
              <table:table-cell office:value-type="float" office:value="-20">
                <text:p>-20</text:p>
              </table:table-cell>
            </table:table-row>
            <table:table-row>
              <table:table-cell office:value-type="string">
                <text:p>1073</text:p>
              </table:table-cell>
              <table:table-cell office:value-type="float" office:value="0.002143999945838">
                <text:p>0.002143999945838</text:p>
              </table:table-cell>
              <table:table-cell office:value-type="float" office:value="-27.3999996185303">
                <text:p>-27.3999996185303</text:p>
              </table:table-cell>
              <table:table-cell office:value-type="float" office:value="-20">
                <text:p>-20</text:p>
              </table:table-cell>
            </table:table-row>
            <table:table-row>
              <table:table-cell office:value-type="string">
                <text:p>1074</text:p>
              </table:table-cell>
              <table:table-cell office:value-type="float" office:value="0.00214599994578748">
                <text:p>0.00214599994578748</text:p>
              </table:table-cell>
              <table:table-cell office:value-type="float" office:value="-27.3999996185303">
                <text:p>-27.3999996185303</text:p>
              </table:table-cell>
              <table:table-cell office:value-type="float" office:value="-20">
                <text:p>-20</text:p>
              </table:table-cell>
            </table:table-row>
            <table:table-row>
              <table:table-cell office:value-type="string">
                <text:p>1075</text:p>
              </table:table-cell>
              <table:table-cell office:value-type="float" office:value="0.00214799994573696">
                <text:p>0.00214799994573696</text:p>
              </table:table-cell>
              <table:table-cell office:value-type="float" office:value="-28">
                <text:p>-28</text:p>
              </table:table-cell>
              <table:table-cell office:value-type="float" office:value="-20">
                <text:p>-20</text:p>
              </table:table-cell>
            </table:table-row>
            <table:table-row>
              <table:table-cell office:value-type="string">
                <text:p>1076</text:p>
              </table:table-cell>
              <table:table-cell office:value-type="float" office:value="0.00214999994568643">
                <text:p>0.00214999994568643</text:p>
              </table:table-cell>
              <table:table-cell office:value-type="float" office:value="-28.3999996185303">
                <text:p>-28.3999996185303</text:p>
              </table:table-cell>
              <table:table-cell office:value-type="float" office:value="-20">
                <text:p>-20</text:p>
              </table:table-cell>
            </table:table-row>
            <table:table-row>
              <table:table-cell office:value-type="string">
                <text:p>1077</text:p>
              </table:table-cell>
              <table:table-cell office:value-type="float" office:value="0.00215199994563591">
                <text:p>0.00215199994563591</text:p>
              </table:table-cell>
              <table:table-cell office:value-type="float" office:value="-28.7999992370605">
                <text:p>-28.7999992370605</text:p>
              </table:table-cell>
              <table:table-cell office:value-type="float" office:value="-20">
                <text:p>-20</text:p>
              </table:table-cell>
            </table:table-row>
            <table:table-row>
              <table:table-cell office:value-type="string">
                <text:p>1078</text:p>
              </table:table-cell>
              <table:table-cell office:value-type="float" office:value="0.00215399994558538">
                <text:p>0.00215399994558538</text:p>
              </table:table-cell>
              <table:table-cell office:value-type="float" office:value="-29.3999996185303">
                <text:p>-29.3999996185303</text:p>
              </table:table-cell>
              <table:table-cell office:value-type="float" office:value="-20">
                <text:p>-20</text:p>
              </table:table-cell>
            </table:table-row>
            <table:table-row>
              <table:table-cell office:value-type="string">
                <text:p>1079</text:p>
              </table:table-cell>
              <table:table-cell office:value-type="float" office:value="0.00215599994553486">
                <text:p>0.00215599994553486</text:p>
              </table:table-cell>
              <table:table-cell office:value-type="float" office:value="-29.6000003814697">
                <text:p>-29.6000003814697</text:p>
              </table:table-cell>
              <table:table-cell office:value-type="float" office:value="-20">
                <text:p>-20</text:p>
              </table:table-cell>
            </table:table-row>
            <table:table-row>
              <table:table-cell office:value-type="string">
                <text:p>1080</text:p>
              </table:table-cell>
              <table:table-cell office:value-type="float" office:value="0.00215799994548433">
                <text:p>0.00215799994548433</text:p>
              </table:table-cell>
              <table:table-cell office:value-type="float" office:value="-29.6000003814697">
                <text:p>-29.6000003814697</text:p>
              </table:table-cell>
              <table:table-cell office:value-type="float" office:value="-20">
                <text:p>-20</text:p>
              </table:table-cell>
            </table:table-row>
            <table:table-row>
              <table:table-cell office:value-type="string">
                <text:p>1081</text:p>
              </table:table-cell>
              <table:table-cell office:value-type="float" office:value="0.00215999994543381">
                <text:p>0.00215999994543381</text:p>
              </table:table-cell>
              <table:table-cell office:value-type="float" office:value="-30.2000007629395">
                <text:p>-30.2000007629395</text:p>
              </table:table-cell>
              <table:table-cell office:value-type="float" office:value="-20">
                <text:p>-20</text:p>
              </table:table-cell>
            </table:table-row>
            <table:table-row>
              <table:table-cell office:value-type="string">
                <text:p>1082</text:p>
              </table:table-cell>
              <table:table-cell office:value-type="float" office:value="0.00216199994538329">
                <text:p>0.00216199994538329</text:p>
              </table:table-cell>
              <table:table-cell office:value-type="float" office:value="-30.6000003814697">
                <text:p>-30.6000003814697</text:p>
              </table:table-cell>
              <table:table-cell office:value-type="float" office:value="-20">
                <text:p>-20</text:p>
              </table:table-cell>
            </table:table-row>
            <table:table-row>
              <table:table-cell office:value-type="string">
                <text:p>1083</text:p>
              </table:table-cell>
              <table:table-cell office:value-type="float" office:value="0.00216399994533276">
                <text:p>0.00216399994533276</text:p>
              </table:table-cell>
              <table:table-cell office:value-type="float" office:value="-31">
                <text:p>-31</text:p>
              </table:table-cell>
              <table:table-cell office:value-type="float" office:value="-20">
                <text:p>-20</text:p>
              </table:table-cell>
            </table:table-row>
            <table:table-row>
              <table:table-cell office:value-type="string">
                <text:p>1084</text:p>
              </table:table-cell>
              <table:table-cell office:value-type="float" office:value="0.00216599994528224">
                <text:p>0.00216599994528224</text:p>
              </table:table-cell>
              <table:table-cell office:value-type="float" office:value="-31.2000007629395">
                <text:p>-31.2000007629395</text:p>
              </table:table-cell>
              <table:table-cell office:value-type="float" office:value="-20">
                <text:p>-20</text:p>
              </table:table-cell>
            </table:table-row>
            <table:table-row>
              <table:table-cell office:value-type="string">
                <text:p>1085</text:p>
              </table:table-cell>
              <table:table-cell office:value-type="float" office:value="0.00216799994523171">
                <text:p>0.00216799994523171</text:p>
              </table:table-cell>
              <table:table-cell office:value-type="float" office:value="-31.7999992370605">
                <text:p>-31.7999992370605</text:p>
              </table:table-cell>
              <table:table-cell office:value-type="float" office:value="-20">
                <text:p>-20</text:p>
              </table:table-cell>
            </table:table-row>
            <table:table-row>
              <table:table-cell office:value-type="string">
                <text:p>1086</text:p>
              </table:table-cell>
              <table:table-cell office:value-type="float" office:value="0.00216999994518119">
                <text:p>0.00216999994518119</text:p>
              </table:table-cell>
              <table:table-cell office:value-type="float" office:value="-32.2000007629395">
                <text:p>-32.2000007629395</text:p>
              </table:table-cell>
              <table:table-cell office:value-type="float" office:value="-20">
                <text:p>-20</text:p>
              </table:table-cell>
            </table:table-row>
            <table:table-row>
              <table:table-cell office:value-type="string">
                <text:p>1087</text:p>
              </table:table-cell>
              <table:table-cell office:value-type="float" office:value="0.00217199994513066">
                <text:p>0.00217199994513066</text:p>
              </table:table-cell>
              <table:table-cell office:value-type="float" office:value="-32.4000015258789">
                <text:p>-32.4000015258789</text:p>
              </table:table-cell>
              <table:table-cell office:value-type="float" office:value="-20">
                <text:p>-20</text:p>
              </table:table-cell>
            </table:table-row>
            <table:table-row>
              <table:table-cell office:value-type="string">
                <text:p>1088</text:p>
              </table:table-cell>
              <table:table-cell office:value-type="float" office:value="0.00217399994508014">
                <text:p>0.00217399994508014</text:p>
              </table:table-cell>
              <table:table-cell office:value-type="float" office:value="-32.7999992370606">
                <text:p>-32.7999992370606</text:p>
              </table:table-cell>
              <table:table-cell office:value-type="float" office:value="-20">
                <text:p>-20</text:p>
              </table:table-cell>
            </table:table-row>
            <table:table-row>
              <table:table-cell office:value-type="string">
                <text:p>1089</text:p>
              </table:table-cell>
              <table:table-cell office:value-type="float" office:value="0.00217599994502962">
                <text:p>0.00217599994502962</text:p>
              </table:table-cell>
              <table:table-cell office:value-type="float" office:value="-33.2000007629395">
                <text:p>-33.2000007629395</text:p>
              </table:table-cell>
              <table:table-cell office:value-type="float" office:value="-20">
                <text:p>-20</text:p>
              </table:table-cell>
            </table:table-row>
            <table:table-row>
              <table:table-cell office:value-type="string">
                <text:p>1090</text:p>
              </table:table-cell>
              <table:table-cell office:value-type="float" office:value="0.00217799994497909">
                <text:p>0.00217799994497909</text:p>
              </table:table-cell>
              <table:table-cell office:value-type="float" office:value="-33.5999984741211">
                <text:p>-33.5999984741211</text:p>
              </table:table-cell>
              <table:table-cell office:value-type="float" office:value="-20">
                <text:p>-20</text:p>
              </table:table-cell>
            </table:table-row>
            <table:table-row>
              <table:table-cell office:value-type="string">
                <text:p>1091</text:p>
              </table:table-cell>
              <table:table-cell office:value-type="float" office:value="0.00217999994492857">
                <text:p>0.00217999994492857</text:p>
              </table:table-cell>
              <table:table-cell office:value-type="float" office:value="-34.2000007629395">
                <text:p>-34.2000007629395</text:p>
              </table:table-cell>
              <table:table-cell office:value-type="float" office:value="-20">
                <text:p>-20</text:p>
              </table:table-cell>
            </table:table-row>
            <table:table-row>
              <table:table-cell office:value-type="string">
                <text:p>1092</text:p>
              </table:table-cell>
              <table:table-cell office:value-type="float" office:value="0.00218199994487804">
                <text:p>0.00218199994487804</text:p>
              </table:table-cell>
              <table:table-cell office:value-type="float" office:value="-34.4000015258789">
                <text:p>-34.4000015258789</text:p>
              </table:table-cell>
              <table:table-cell office:value-type="float" office:value="-20">
                <text:p>-20</text:p>
              </table:table-cell>
            </table:table-row>
            <table:table-row>
              <table:table-cell office:value-type="string">
                <text:p>1093</text:p>
              </table:table-cell>
              <table:table-cell office:value-type="float" office:value="0.00218399994482752">
                <text:p>0.00218399994482752</text:p>
              </table:table-cell>
              <table:table-cell office:value-type="float" office:value="-34.5999984741211">
                <text:p>-34.5999984741211</text:p>
              </table:table-cell>
              <table:table-cell office:value-type="float" office:value="-20">
                <text:p>-20</text:p>
              </table:table-cell>
            </table:table-row>
            <table:table-row>
              <table:table-cell office:value-type="string">
                <text:p>1094</text:p>
              </table:table-cell>
              <table:table-cell office:value-type="float" office:value="0.002185999944777">
                <text:p>0.002185999944777</text:p>
              </table:table-cell>
              <table:table-cell office:value-type="float" office:value="-35.2000007629395">
                <text:p>-35.2000007629395</text:p>
              </table:table-cell>
              <table:table-cell office:value-type="float" office:value="-20">
                <text:p>-20</text:p>
              </table:table-cell>
            </table:table-row>
            <table:table-row>
              <table:table-cell office:value-type="string">
                <text:p>1095</text:p>
              </table:table-cell>
              <table:table-cell office:value-type="float" office:value="0.00218799994472647">
                <text:p>0.00218799994472647</text:p>
              </table:table-cell>
              <table:table-cell office:value-type="float" office:value="-35.4000015258789">
                <text:p>-35.4000015258789</text:p>
              </table:table-cell>
              <table:table-cell office:value-type="float" office:value="-20">
                <text:p>-20</text:p>
              </table:table-cell>
            </table:table-row>
            <table:table-row>
              <table:table-cell office:value-type="string">
                <text:p>1096</text:p>
              </table:table-cell>
              <table:table-cell office:value-type="float" office:value="0.00218999994467595">
                <text:p>0.00218999994467595</text:p>
              </table:table-cell>
              <table:table-cell office:value-type="float" office:value="-35.5999984741211">
                <text:p>-35.5999984741211</text:p>
              </table:table-cell>
              <table:table-cell office:value-type="float" office:value="-20">
                <text:p>-20</text:p>
              </table:table-cell>
            </table:table-row>
            <table:table-row>
              <table:table-cell office:value-type="string">
                <text:p>1097</text:p>
              </table:table-cell>
              <table:table-cell office:value-type="float" office:value="0.00219199994462542">
                <text:p>0.00219199994462542</text:p>
              </table:table-cell>
              <table:table-cell office:value-type="float" office:value="-36">
                <text:p>-36</text:p>
              </table:table-cell>
              <table:table-cell office:value-type="float" office:value="-20">
                <text:p>-20</text:p>
              </table:table-cell>
            </table:table-row>
            <table:table-row>
              <table:table-cell office:value-type="string">
                <text:p>1098</text:p>
              </table:table-cell>
              <table:table-cell office:value-type="float" office:value="0.0021939999445749">
                <text:p>0.0021939999445749</text:p>
              </table:table-cell>
              <table:table-cell office:value-type="float" office:value="-36.4000015258789">
                <text:p>-36.4000015258789</text:p>
              </table:table-cell>
              <table:table-cell office:value-type="float" office:value="-20">
                <text:p>-20</text:p>
              </table:table-cell>
            </table:table-row>
            <table:table-row>
              <table:table-cell office:value-type="string">
                <text:p>1099</text:p>
              </table:table-cell>
              <table:table-cell office:value-type="float" office:value="0.00219599994452437">
                <text:p>0.00219599994452437</text:p>
              </table:table-cell>
              <table:table-cell office:value-type="float" office:value="-36.7999992370606">
                <text:p>-36.7999992370606</text:p>
              </table:table-cell>
              <table:table-cell office:value-type="float" office:value="-20">
                <text:p>-20</text:p>
              </table:table-cell>
            </table:table-row>
            <table:table-row>
              <table:table-cell office:value-type="string">
                <text:p>1100</text:p>
              </table:table-cell>
              <table:table-cell office:value-type="float" office:value="0.00219799994447385">
                <text:p>0.00219799994447385</text:p>
              </table:table-cell>
              <table:table-cell office:value-type="float" office:value="-37">
                <text:p>-37</text:p>
              </table:table-cell>
              <table:table-cell office:value-type="float" office:value="-20">
                <text:p>-20</text:p>
              </table:table-cell>
            </table:table-row>
            <table:table-row>
              <table:table-cell office:value-type="string">
                <text:p>1101</text:p>
              </table:table-cell>
              <table:table-cell office:value-type="float" office:value="0.00219999994442333">
                <text:p>0.00219999994442333</text:p>
              </table:table-cell>
              <table:table-cell office:value-type="float" office:value="-37.5999984741211">
                <text:p>-37.5999984741211</text:p>
              </table:table-cell>
              <table:table-cell office:value-type="float" office:value="-20">
                <text:p>-20</text:p>
              </table:table-cell>
            </table:table-row>
            <table:table-row>
              <table:table-cell office:value-type="string">
                <text:p>1102</text:p>
              </table:table-cell>
              <table:table-cell office:value-type="float" office:value="0.0022019999443728">
                <text:p>0.0022019999443728</text:p>
              </table:table-cell>
              <table:table-cell office:value-type="float" office:value="-38">
                <text:p>-38</text:p>
              </table:table-cell>
              <table:table-cell office:value-type="float" office:value="-20">
                <text:p>-20</text:p>
              </table:table-cell>
            </table:table-row>
            <table:table-row>
              <table:table-cell office:value-type="string">
                <text:p>1103</text:p>
              </table:table-cell>
              <table:table-cell office:value-type="float" office:value="0.00220399994432228">
                <text:p>0.00220399994432228</text:p>
              </table:table-cell>
              <table:table-cell office:value-type="float" office:value="-38.4000015258789">
                <text:p>-38.4000015258789</text:p>
              </table:table-cell>
              <table:table-cell office:value-type="float" office:value="-20">
                <text:p>-20</text:p>
              </table:table-cell>
            </table:table-row>
            <table:table-row>
              <table:table-cell office:value-type="string">
                <text:p>1104</text:p>
              </table:table-cell>
              <table:table-cell office:value-type="float" office:value="0.00220599994427175">
                <text:p>0.00220599994427175</text:p>
              </table:table-cell>
              <table:table-cell office:value-type="float" office:value="-38.5999984741211">
                <text:p>-38.5999984741211</text:p>
              </table:table-cell>
              <table:table-cell office:value-type="float" office:value="-20">
                <text:p>-20</text:p>
              </table:table-cell>
            </table:table-row>
            <table:table-row>
              <table:table-cell office:value-type="string">
                <text:p>1105</text:p>
              </table:table-cell>
              <table:table-cell office:value-type="float" office:value="0.00220799994422123">
                <text:p>0.00220799994422123</text:p>
              </table:table-cell>
              <table:table-cell office:value-type="float" office:value="-39">
                <text:p>-39</text:p>
              </table:table-cell>
              <table:table-cell office:value-type="float" office:value="-20">
                <text:p>-20</text:p>
              </table:table-cell>
            </table:table-row>
            <table:table-row>
              <table:table-cell office:value-type="string">
                <text:p>1106</text:p>
              </table:table-cell>
              <table:table-cell office:value-type="float" office:value="0.0022099999441707">
                <text:p>0.0022099999441707</text:p>
              </table:table-cell>
              <table:table-cell office:value-type="float" office:value="-39.2000007629395">
                <text:p>-39.2000007629395</text:p>
              </table:table-cell>
              <table:table-cell office:value-type="float" office:value="-20">
                <text:p>-20</text:p>
              </table:table-cell>
            </table:table-row>
            <table:table-row>
              <table:table-cell office:value-type="string">
                <text:p>1107</text:p>
              </table:table-cell>
              <table:table-cell office:value-type="float" office:value="0.00221199994412018">
                <text:p>0.00221199994412018</text:p>
              </table:table-cell>
              <table:table-cell office:value-type="float" office:value="-39.4000015258789">
                <text:p>-39.4000015258789</text:p>
              </table:table-cell>
              <table:table-cell office:value-type="float" office:value="-20">
                <text:p>-20</text:p>
              </table:table-cell>
            </table:table-row>
            <table:table-row>
              <table:table-cell office:value-type="string">
                <text:p>1108</text:p>
              </table:table-cell>
              <table:table-cell office:value-type="float" office:value="0.00221399994406966">
                <text:p>0.00221399994406966</text:p>
              </table:table-cell>
              <table:table-cell office:value-type="float" office:value="-39.7999992370606">
                <text:p>-39.7999992370606</text:p>
              </table:table-cell>
              <table:table-cell office:value-type="float" office:value="-20">
                <text:p>-20</text:p>
              </table:table-cell>
            </table:table-row>
            <table:table-row>
              <table:table-cell office:value-type="string">
                <text:p>1109</text:p>
              </table:table-cell>
              <table:table-cell office:value-type="float" office:value="0.00221599994401913">
                <text:p>0.00221599994401913</text:p>
              </table:table-cell>
              <table:table-cell office:value-type="float" office:value="-40">
                <text:p>-40</text:p>
              </table:table-cell>
              <table:table-cell office:value-type="float" office:value="-20">
                <text:p>-20</text:p>
              </table:table-cell>
            </table:table-row>
            <table:table-row>
              <table:table-cell office:value-type="string">
                <text:p>1110</text:p>
              </table:table-cell>
              <table:table-cell office:value-type="float" office:value="0.00221799994396861">
                <text:p>0.00221799994396861</text:p>
              </table:table-cell>
              <table:table-cell office:value-type="float" office:value="-40">
                <text:p>-40</text:p>
              </table:table-cell>
              <table:table-cell office:value-type="float" office:value="-20">
                <text:p>-20</text:p>
              </table:table-cell>
            </table:table-row>
            <table:table-row>
              <table:table-cell office:value-type="string">
                <text:p>1111</text:p>
              </table:table-cell>
              <table:table-cell office:value-type="float" office:value="0.00221999994391808">
                <text:p>0.00221999994391808</text:p>
              </table:table-cell>
              <table:table-cell office:value-type="float" office:value="-40">
                <text:p>-40</text:p>
              </table:table-cell>
              <table:table-cell office:value-type="float" office:value="-20">
                <text:p>-20</text:p>
              </table:table-cell>
            </table:table-row>
            <table:table-row>
              <table:table-cell office:value-type="string">
                <text:p>1112</text:p>
              </table:table-cell>
              <table:table-cell office:value-type="float" office:value="0.00222199994386756">
                <text:p>0.00222199994386756</text:p>
              </table:table-cell>
              <table:table-cell office:value-type="float" office:value="-40">
                <text:p>-40</text:p>
              </table:table-cell>
              <table:table-cell office:value-type="float" office:value="-20">
                <text:p>-20</text:p>
              </table:table-cell>
            </table:table-row>
            <table:table-row>
              <table:table-cell office:value-type="string">
                <text:p>1113</text:p>
              </table:table-cell>
              <table:table-cell office:value-type="float" office:value="0.00222399994381703">
                <text:p>0.00222399994381703</text:p>
              </table:table-cell>
              <table:table-cell office:value-type="float" office:value="-40">
                <text:p>-40</text:p>
              </table:table-cell>
              <table:table-cell office:value-type="float" office:value="-20">
                <text:p>-20</text:p>
              </table:table-cell>
            </table:table-row>
            <table:table-row>
              <table:table-cell office:value-type="string">
                <text:p>1114</text:p>
              </table:table-cell>
              <table:table-cell office:value-type="float" office:value="0.00222599994376651">
                <text:p>0.00222599994376651</text:p>
              </table:table-cell>
              <table:table-cell office:value-type="float" office:value="-40">
                <text:p>-40</text:p>
              </table:table-cell>
              <table:table-cell office:value-type="float" office:value="-20">
                <text:p>-20</text:p>
              </table:table-cell>
            </table:table-row>
            <table:table-row>
              <table:table-cell office:value-type="string">
                <text:p>1115</text:p>
              </table:table-cell>
              <table:table-cell office:value-type="float" office:value="0.00222799994371599">
                <text:p>0.00222799994371599</text:p>
              </table:table-cell>
              <table:table-cell office:value-type="float" office:value="-40">
                <text:p>-40</text:p>
              </table:table-cell>
              <table:table-cell office:value-type="float" office:value="-20">
                <text:p>-20</text:p>
              </table:table-cell>
            </table:table-row>
            <table:table-row>
              <table:table-cell office:value-type="string">
                <text:p>1116</text:p>
              </table:table-cell>
              <table:table-cell office:value-type="float" office:value="0.00222999994366546">
                <text:p>0.00222999994366546</text:p>
              </table:table-cell>
              <table:table-cell office:value-type="float" office:value="-40">
                <text:p>-40</text:p>
              </table:table-cell>
              <table:table-cell office:value-type="float" office:value="-20">
                <text:p>-20</text:p>
              </table:table-cell>
            </table:table-row>
            <table:table-row>
              <table:table-cell office:value-type="string">
                <text:p>1117</text:p>
              </table:table-cell>
              <table:table-cell office:value-type="float" office:value="0.00223199994361494">
                <text:p>0.00223199994361494</text:p>
              </table:table-cell>
              <table:table-cell office:value-type="float" office:value="-40">
                <text:p>-40</text:p>
              </table:table-cell>
              <table:table-cell office:value-type="float" office:value="-20">
                <text:p>-20</text:p>
              </table:table-cell>
            </table:table-row>
            <table:table-row>
              <table:table-cell office:value-type="string">
                <text:p>1118</text:p>
              </table:table-cell>
              <table:table-cell office:value-type="float" office:value="0.00223399994356441">
                <text:p>0.00223399994356441</text:p>
              </table:table-cell>
              <table:table-cell office:value-type="float" office:value="-40">
                <text:p>-40</text:p>
              </table:table-cell>
              <table:table-cell office:value-type="float" office:value="-20">
                <text:p>-20</text:p>
              </table:table-cell>
            </table:table-row>
            <table:table-row>
              <table:table-cell office:value-type="string">
                <text:p>1119</text:p>
              </table:table-cell>
              <table:table-cell office:value-type="float" office:value="0.00223599994351389">
                <text:p>0.00223599994351389</text:p>
              </table:table-cell>
              <table:table-cell office:value-type="float" office:value="-40">
                <text:p>-40</text:p>
              </table:table-cell>
              <table:table-cell office:value-type="float" office:value="-20">
                <text:p>-20</text:p>
              </table:table-cell>
            </table:table-row>
            <table:table-row>
              <table:table-cell office:value-type="string">
                <text:p>1120</text:p>
              </table:table-cell>
              <table:table-cell office:value-type="float" office:value="0.00223799994346337">
                <text:p>0.00223799994346337</text:p>
              </table:table-cell>
              <table:table-cell office:value-type="float" office:value="-40">
                <text:p>-40</text:p>
              </table:table-cell>
              <table:table-cell office:value-type="float" office:value="-20">
                <text:p>-20</text:p>
              </table:table-cell>
            </table:table-row>
            <table:table-row>
              <table:table-cell office:value-type="string">
                <text:p>1121</text:p>
              </table:table-cell>
              <table:table-cell office:value-type="float" office:value="0.00223999994341284">
                <text:p>0.00223999994341284</text:p>
              </table:table-cell>
              <table:table-cell office:value-type="float" office:value="-40">
                <text:p>-40</text:p>
              </table:table-cell>
              <table:table-cell office:value-type="float" office:value="-20">
                <text:p>-20</text:p>
              </table:table-cell>
            </table:table-row>
            <table:table-row>
              <table:table-cell office:value-type="string">
                <text:p>1122</text:p>
              </table:table-cell>
              <table:table-cell office:value-type="float" office:value="0.00224199994336232">
                <text:p>0.00224199994336232</text:p>
              </table:table-cell>
              <table:table-cell office:value-type="float" office:value="-40">
                <text:p>-40</text:p>
              </table:table-cell>
              <table:table-cell office:value-type="float" office:value="-20">
                <text:p>-20</text:p>
              </table:table-cell>
            </table:table-row>
            <table:table-row>
              <table:table-cell office:value-type="string">
                <text:p>1123</text:p>
              </table:table-cell>
              <table:table-cell office:value-type="float" office:value="0.00224399994331179">
                <text:p>0.00224399994331179</text:p>
              </table:table-cell>
              <table:table-cell office:value-type="float" office:value="-40">
                <text:p>-40</text:p>
              </table:table-cell>
              <table:table-cell office:value-type="float" office:value="-20">
                <text:p>-20</text:p>
              </table:table-cell>
            </table:table-row>
            <table:table-row>
              <table:table-cell office:value-type="string">
                <text:p>1124</text:p>
              </table:table-cell>
              <table:table-cell office:value-type="float" office:value="0.00224599994326127">
                <text:p>0.00224599994326127</text:p>
              </table:table-cell>
              <table:table-cell office:value-type="float" office:value="-40">
                <text:p>-40</text:p>
              </table:table-cell>
              <table:table-cell office:value-type="float" office:value="-20">
                <text:p>-20</text:p>
              </table:table-cell>
            </table:table-row>
            <table:table-row>
              <table:table-cell office:value-type="string">
                <text:p>1125</text:p>
              </table:table-cell>
              <table:table-cell office:value-type="float" office:value="0.00224799994321074">
                <text:p>0.00224799994321074</text:p>
              </table:table-cell>
              <table:table-cell office:value-type="float" office:value="-40">
                <text:p>-40</text:p>
              </table:table-cell>
              <table:table-cell office:value-type="float" office:value="-20">
                <text:p>-20</text:p>
              </table:table-cell>
            </table:table-row>
            <table:table-row>
              <table:table-cell office:value-type="string">
                <text:p>1126</text:p>
              </table:table-cell>
              <table:table-cell office:value-type="float" office:value="0.00224999994316022">
                <text:p>0.00224999994316022</text:p>
              </table:table-cell>
              <table:table-cell office:value-type="float" office:value="-40">
                <text:p>-40</text:p>
              </table:table-cell>
              <table:table-cell office:value-type="float" office:value="-20">
                <text:p>-20</text:p>
              </table:table-cell>
            </table:table-row>
            <table:table-row>
              <table:table-cell office:value-type="string">
                <text:p>1127</text:p>
              </table:table-cell>
              <table:table-cell office:value-type="float" office:value="0.00225199994310969">
                <text:p>0.00225199994310969</text:p>
              </table:table-cell>
              <table:table-cell office:value-type="float" office:value="-40">
                <text:p>-40</text:p>
              </table:table-cell>
              <table:table-cell office:value-type="float" office:value="-20">
                <text:p>-20</text:p>
              </table:table-cell>
            </table:table-row>
            <table:table-row>
              <table:table-cell office:value-type="string">
                <text:p>1128</text:p>
              </table:table-cell>
              <table:table-cell office:value-type="float" office:value="0.00225399994305917">
                <text:p>0.00225399994305917</text:p>
              </table:table-cell>
              <table:table-cell office:value-type="float" office:value="-40">
                <text:p>-40</text:p>
              </table:table-cell>
              <table:table-cell office:value-type="float" office:value="-20">
                <text:p>-20</text:p>
              </table:table-cell>
            </table:table-row>
            <table:table-row>
              <table:table-cell office:value-type="string">
                <text:p>1129</text:p>
              </table:table-cell>
              <table:table-cell office:value-type="float" office:value="0.00225599994300865">
                <text:p>0.00225599994300865</text:p>
              </table:table-cell>
              <table:table-cell office:value-type="float" office:value="-40">
                <text:p>-40</text:p>
              </table:table-cell>
              <table:table-cell office:value-type="float" office:value="-20">
                <text:p>-20</text:p>
              </table:table-cell>
            </table:table-row>
            <table:table-row>
              <table:table-cell office:value-type="string">
                <text:p>1130</text:p>
              </table:table-cell>
              <table:table-cell office:value-type="float" office:value="0.00225799994295812">
                <text:p>0.00225799994295812</text:p>
              </table:table-cell>
              <table:table-cell office:value-type="float" office:value="-40">
                <text:p>-40</text:p>
              </table:table-cell>
              <table:table-cell office:value-type="float" office:value="-20">
                <text:p>-20</text:p>
              </table:table-cell>
            </table:table-row>
            <table:table-row>
              <table:table-cell office:value-type="string">
                <text:p>1131</text:p>
              </table:table-cell>
              <table:table-cell office:value-type="float" office:value="0.0022599999429076">
                <text:p>0.0022599999429076</text:p>
              </table:table-cell>
              <table:table-cell office:value-type="float" office:value="-40">
                <text:p>-40</text:p>
              </table:table-cell>
              <table:table-cell office:value-type="float" office:value="-20">
                <text:p>-20</text:p>
              </table:table-cell>
            </table:table-row>
            <table:table-row>
              <table:table-cell office:value-type="string">
                <text:p>1132</text:p>
              </table:table-cell>
              <table:table-cell office:value-type="float" office:value="0.00226199994285707">
                <text:p>0.00226199994285707</text:p>
              </table:table-cell>
              <table:table-cell office:value-type="float" office:value="-40">
                <text:p>-40</text:p>
              </table:table-cell>
              <table:table-cell office:value-type="float" office:value="-20">
                <text:p>-20</text:p>
              </table:table-cell>
            </table:table-row>
            <table:table-row>
              <table:table-cell office:value-type="string">
                <text:p>1133</text:p>
              </table:table-cell>
              <table:table-cell office:value-type="float" office:value="0.00226399994280655">
                <text:p>0.00226399994280655</text:p>
              </table:table-cell>
              <table:table-cell office:value-type="float" office:value="-40">
                <text:p>-40</text:p>
              </table:table-cell>
              <table:table-cell office:value-type="float" office:value="-20">
                <text:p>-20</text:p>
              </table:table-cell>
            </table:table-row>
            <table:table-row>
              <table:table-cell office:value-type="string">
                <text:p>1134</text:p>
              </table:table-cell>
              <table:table-cell office:value-type="float" office:value="0.00226599994275603">
                <text:p>0.00226599994275603</text:p>
              </table:table-cell>
              <table:table-cell office:value-type="float" office:value="-40">
                <text:p>-40</text:p>
              </table:table-cell>
              <table:table-cell office:value-type="float" office:value="-20">
                <text:p>-20</text:p>
              </table:table-cell>
            </table:table-row>
            <table:table-row>
              <table:table-cell office:value-type="string">
                <text:p>1135</text:p>
              </table:table-cell>
              <table:table-cell office:value-type="float" office:value="0.0022679999427055">
                <text:p>0.0022679999427055</text:p>
              </table:table-cell>
              <table:table-cell office:value-type="float" office:value="-40">
                <text:p>-40</text:p>
              </table:table-cell>
              <table:table-cell office:value-type="float" office:value="-20">
                <text:p>-20</text:p>
              </table:table-cell>
            </table:table-row>
            <table:table-row>
              <table:table-cell office:value-type="string">
                <text:p>1136</text:p>
              </table:table-cell>
              <table:table-cell office:value-type="float" office:value="0.00226999994265498">
                <text:p>0.00226999994265498</text:p>
              </table:table-cell>
              <table:table-cell office:value-type="float" office:value="-40">
                <text:p>-40</text:p>
              </table:table-cell>
              <table:table-cell office:value-type="float" office:value="-20">
                <text:p>-20</text:p>
              </table:table-cell>
            </table:table-row>
            <table:table-row>
              <table:table-cell office:value-type="string">
                <text:p>1137</text:p>
              </table:table-cell>
              <table:table-cell office:value-type="float" office:value="0.00227199994260445">
                <text:p>0.00227199994260445</text:p>
              </table:table-cell>
              <table:table-cell office:value-type="float" office:value="-40">
                <text:p>-40</text:p>
              </table:table-cell>
              <table:table-cell office:value-type="float" office:value="-20">
                <text:p>-20</text:p>
              </table:table-cell>
            </table:table-row>
            <table:table-row>
              <table:table-cell office:value-type="string">
                <text:p>1138</text:p>
              </table:table-cell>
              <table:table-cell office:value-type="float" office:value="0.00227399994255393">
                <text:p>0.00227399994255393</text:p>
              </table:table-cell>
              <table:table-cell office:value-type="float" office:value="-40">
                <text:p>-40</text:p>
              </table:table-cell>
              <table:table-cell office:value-type="float" office:value="-20">
                <text:p>-20</text:p>
              </table:table-cell>
            </table:table-row>
            <table:table-row>
              <table:table-cell office:value-type="string">
                <text:p>1139</text:p>
              </table:table-cell>
              <table:table-cell office:value-type="float" office:value="0.0022759999425034">
                <text:p>0.0022759999425034</text:p>
              </table:table-cell>
              <table:table-cell office:value-type="float" office:value="-40">
                <text:p>-40</text:p>
              </table:table-cell>
              <table:table-cell office:value-type="float" office:value="-20">
                <text:p>-20</text:p>
              </table:table-cell>
            </table:table-row>
            <table:table-row>
              <table:table-cell office:value-type="string">
                <text:p>1140</text:p>
              </table:table-cell>
              <table:table-cell office:value-type="float" office:value="0.00227799994245288">
                <text:p>0.00227799994245288</text:p>
              </table:table-cell>
              <table:table-cell office:value-type="float" office:value="-40">
                <text:p>-40</text:p>
              </table:table-cell>
              <table:table-cell office:value-type="float" office:value="-20">
                <text:p>-20</text:p>
              </table:table-cell>
            </table:table-row>
            <table:table-row>
              <table:table-cell office:value-type="string">
                <text:p>1141</text:p>
              </table:table-cell>
              <table:table-cell office:value-type="float" office:value="0.00227999994240236">
                <text:p>0.00227999994240236</text:p>
              </table:table-cell>
              <table:table-cell office:value-type="float" office:value="-40">
                <text:p>-40</text:p>
              </table:table-cell>
              <table:table-cell office:value-type="float" office:value="-20">
                <text:p>-20</text:p>
              </table:table-cell>
            </table:table-row>
            <table:table-row>
              <table:table-cell office:value-type="string">
                <text:p>1142</text:p>
              </table:table-cell>
              <table:table-cell office:value-type="float" office:value="0.00228199994235183">
                <text:p>0.00228199994235183</text:p>
              </table:table-cell>
              <table:table-cell office:value-type="float" office:value="-40">
                <text:p>-40</text:p>
              </table:table-cell>
              <table:table-cell office:value-type="float" office:value="-20">
                <text:p>-20</text:p>
              </table:table-cell>
            </table:table-row>
            <table:table-row>
              <table:table-cell office:value-type="string">
                <text:p>1143</text:p>
              </table:table-cell>
              <table:table-cell office:value-type="float" office:value="0.00228399994230131">
                <text:p>0.00228399994230131</text:p>
              </table:table-cell>
              <table:table-cell office:value-type="float" office:value="-39.7999992370606">
                <text:p>-39.7999992370606</text:p>
              </table:table-cell>
              <table:table-cell office:value-type="float" office:value="-20">
                <text:p>-20</text:p>
              </table:table-cell>
            </table:table-row>
            <table:table-row>
              <table:table-cell office:value-type="string">
                <text:p>1144</text:p>
              </table:table-cell>
              <table:table-cell office:value-type="float" office:value="0.00228599994225078">
                <text:p>0.00228599994225078</text:p>
              </table:table-cell>
              <table:table-cell office:value-type="float" office:value="-39.5999984741211">
                <text:p>-39.5999984741211</text:p>
              </table:table-cell>
              <table:table-cell office:value-type="float" office:value="-20">
                <text:p>-20</text:p>
              </table:table-cell>
            </table:table-row>
            <table:table-row>
              <table:table-cell office:value-type="string">
                <text:p>1145</text:p>
              </table:table-cell>
              <table:table-cell office:value-type="float" office:value="0.00228799994220026">
                <text:p>0.00228799994220026</text:p>
              </table:table-cell>
              <table:table-cell office:value-type="float" office:value="-39.2000007629395">
                <text:p>-39.2000007629395</text:p>
              </table:table-cell>
              <table:table-cell office:value-type="float" office:value="-20">
                <text:p>-20</text:p>
              </table:table-cell>
            </table:table-row>
            <table:table-row>
              <table:table-cell office:value-type="string">
                <text:p>1146</text:p>
              </table:table-cell>
              <table:table-cell office:value-type="float" office:value="0.00228999994214973">
                <text:p>0.00228999994214973</text:p>
              </table:table-cell>
              <table:table-cell office:value-type="float" office:value="-39">
                <text:p>-39</text:p>
              </table:table-cell>
              <table:table-cell office:value-type="float" office:value="-20">
                <text:p>-20</text:p>
              </table:table-cell>
            </table:table-row>
            <table:table-row>
              <table:table-cell office:value-type="string">
                <text:p>1147</text:p>
              </table:table-cell>
              <table:table-cell office:value-type="float" office:value="0.00229199994209921">
                <text:p>0.00229199994209921</text:p>
              </table:table-cell>
              <table:table-cell office:value-type="float" office:value="-38.7999992370606">
                <text:p>-38.7999992370606</text:p>
              </table:table-cell>
              <table:table-cell office:value-type="float" office:value="-20">
                <text:p>-20</text:p>
              </table:table-cell>
            </table:table-row>
            <table:table-row>
              <table:table-cell office:value-type="string">
                <text:p>1148</text:p>
              </table:table-cell>
              <table:table-cell office:value-type="float" office:value="0.00229399994204869">
                <text:p>0.00229399994204869</text:p>
              </table:table-cell>
              <table:table-cell office:value-type="float" office:value="-38.2000007629395">
                <text:p>-38.2000007629395</text:p>
              </table:table-cell>
              <table:table-cell office:value-type="float" office:value="-20">
                <text:p>-20</text:p>
              </table:table-cell>
            </table:table-row>
            <table:table-row>
              <table:table-cell office:value-type="string">
                <text:p>1149</text:p>
              </table:table-cell>
              <table:table-cell office:value-type="float" office:value="0.00229599994199816">
                <text:p>0.00229599994199816</text:p>
              </table:table-cell>
              <table:table-cell office:value-type="float" office:value="-38.2000007629395">
                <text:p>-38.2000007629395</text:p>
              </table:table-cell>
              <table:table-cell office:value-type="float" office:value="-20">
                <text:p>-20</text:p>
              </table:table-cell>
            </table:table-row>
            <table:table-row>
              <table:table-cell office:value-type="string">
                <text:p>1150</text:p>
              </table:table-cell>
              <table:table-cell office:value-type="float" office:value="0.00229799994194764">
                <text:p>0.00229799994194764</text:p>
              </table:table-cell>
              <table:table-cell office:value-type="float" office:value="-37.5999984741211">
                <text:p>-37.5999984741211</text:p>
              </table:table-cell>
              <table:table-cell office:value-type="float" office:value="-20">
                <text:p>-20</text:p>
              </table:table-cell>
            </table:table-row>
            <table:table-row>
              <table:table-cell office:value-type="string">
                <text:p>1151</text:p>
              </table:table-cell>
              <table:table-cell office:value-type="float" office:value="0.00229999994189711">
                <text:p>0.00229999994189711</text:p>
              </table:table-cell>
              <table:table-cell office:value-type="float" office:value="-37.2000007629395">
                <text:p>-37.2000007629395</text:p>
              </table:table-cell>
              <table:table-cell office:value-type="float" office:value="-20">
                <text:p>-20</text:p>
              </table:table-cell>
            </table:table-row>
            <table:table-row>
              <table:table-cell office:value-type="string">
                <text:p>1152</text:p>
              </table:table-cell>
              <table:table-cell office:value-type="float" office:value="0.00230199994184659">
                <text:p>0.00230199994184659</text:p>
              </table:table-cell>
              <table:table-cell office:value-type="float" office:value="-36.7999992370606">
                <text:p>-36.7999992370606</text:p>
              </table:table-cell>
              <table:table-cell office:value-type="float" office:value="-20">
                <text:p>-20</text:p>
              </table:table-cell>
            </table:table-row>
            <table:table-row>
              <table:table-cell office:value-type="string">
                <text:p>1153</text:p>
              </table:table-cell>
              <table:table-cell office:value-type="float" office:value="0.00230399994179606">
                <text:p>0.00230399994179606</text:p>
              </table:table-cell>
              <table:table-cell office:value-type="float" office:value="-36.5999984741211">
                <text:p>-36.5999984741211</text:p>
              </table:table-cell>
              <table:table-cell office:value-type="float" office:value="-20">
                <text:p>-20</text:p>
              </table:table-cell>
            </table:table-row>
            <table:table-row>
              <table:table-cell office:value-type="string">
                <text:p>1154</text:p>
              </table:table-cell>
              <table:table-cell office:value-type="float" office:value="0.00230599994174554">
                <text:p>0.00230599994174554</text:p>
              </table:table-cell>
              <table:table-cell office:value-type="float" office:value="-36.2000007629395">
                <text:p>-36.2000007629395</text:p>
              </table:table-cell>
              <table:table-cell office:value-type="float" office:value="-20">
                <text:p>-20</text:p>
              </table:table-cell>
            </table:table-row>
            <table:table-row>
              <table:table-cell office:value-type="string">
                <text:p>1155</text:p>
              </table:table-cell>
              <table:table-cell office:value-type="float" office:value="0.00230799994169502">
                <text:p>0.00230799994169502</text:p>
              </table:table-cell>
              <table:table-cell office:value-type="float" office:value="-35.5999984741211">
                <text:p>-35.5999984741211</text:p>
              </table:table-cell>
              <table:table-cell office:value-type="float" office:value="-20">
                <text:p>-20</text:p>
              </table:table-cell>
            </table:table-row>
            <table:table-row>
              <table:table-cell office:value-type="string">
                <text:p>1156</text:p>
              </table:table-cell>
              <table:table-cell office:value-type="float" office:value="0.00230999994164449">
                <text:p>0.00230999994164449</text:p>
              </table:table-cell>
              <table:table-cell office:value-type="float" office:value="-35.4000015258789">
                <text:p>-35.4000015258789</text:p>
              </table:table-cell>
              <table:table-cell office:value-type="float" office:value="-20">
                <text:p>-20</text:p>
              </table:table-cell>
            </table:table-row>
            <table:table-row>
              <table:table-cell office:value-type="string">
                <text:p>1157</text:p>
              </table:table-cell>
              <table:table-cell office:value-type="float" office:value="0.00231199994159397">
                <text:p>0.00231199994159397</text:p>
              </table:table-cell>
              <table:table-cell office:value-type="float" office:value="-35.2000007629395">
                <text:p>-35.2000007629395</text:p>
              </table:table-cell>
              <table:table-cell office:value-type="float" office:value="-20">
                <text:p>-20</text:p>
              </table:table-cell>
            </table:table-row>
            <table:table-row>
              <table:table-cell office:value-type="string">
                <text:p>1158</text:p>
              </table:table-cell>
              <table:table-cell office:value-type="float" office:value="0.00231399994154344">
                <text:p>0.00231399994154344</text:p>
              </table:table-cell>
              <table:table-cell office:value-type="float" office:value="-34.5999984741211">
                <text:p>-34.5999984741211</text:p>
              </table:table-cell>
              <table:table-cell office:value-type="float" office:value="-20">
                <text:p>-20</text:p>
              </table:table-cell>
            </table:table-row>
            <table:table-row>
              <table:table-cell office:value-type="string">
                <text:p>1159</text:p>
              </table:table-cell>
              <table:table-cell office:value-type="float" office:value="0.00231599994149292">
                <text:p>0.00231599994149292</text:p>
              </table:table-cell>
              <table:table-cell office:value-type="float" office:value="-34.4000015258789">
                <text:p>-34.4000015258789</text:p>
              </table:table-cell>
              <table:table-cell office:value-type="float" office:value="-20">
                <text:p>-20</text:p>
              </table:table-cell>
            </table:table-row>
            <table:table-row>
              <table:table-cell office:value-type="string">
                <text:p>1160</text:p>
              </table:table-cell>
              <table:table-cell office:value-type="float" office:value="0.0023179999414424">
                <text:p>0.0023179999414424</text:p>
              </table:table-cell>
              <table:table-cell office:value-type="float" office:value="-34">
                <text:p>-34</text:p>
              </table:table-cell>
              <table:table-cell office:value-type="float" office:value="-20">
                <text:p>-20</text:p>
              </table:table-cell>
            </table:table-row>
            <table:table-row>
              <table:table-cell office:value-type="string">
                <text:p>1161</text:p>
              </table:table-cell>
              <table:table-cell office:value-type="float" office:value="0.00231999994139187">
                <text:p>0.00231999994139187</text:p>
              </table:table-cell>
              <table:table-cell office:value-type="float" office:value="-33.5999984741211">
                <text:p>-33.5999984741211</text:p>
              </table:table-cell>
              <table:table-cell office:value-type="float" office:value="-20">
                <text:p>-20</text:p>
              </table:table-cell>
            </table:table-row>
            <table:table-row>
              <table:table-cell office:value-type="string">
                <text:p>1162</text:p>
              </table:table-cell>
              <table:table-cell office:value-type="float" office:value="0.00232199994134135">
                <text:p>0.00232199994134135</text:p>
              </table:table-cell>
              <table:table-cell office:value-type="float" office:value="-33.2000007629395">
                <text:p>-33.2000007629395</text:p>
              </table:table-cell>
              <table:table-cell office:value-type="float" office:value="-20">
                <text:p>-20</text:p>
              </table:table-cell>
            </table:table-row>
            <table:table-row>
              <table:table-cell office:value-type="string">
                <text:p>1163</text:p>
              </table:table-cell>
              <table:table-cell office:value-type="float" office:value="0.00232399994129082">
                <text:p>0.00232399994129082</text:p>
              </table:table-cell>
              <table:table-cell office:value-type="float" office:value="-32.7999992370606">
                <text:p>-32.7999992370606</text:p>
              </table:table-cell>
              <table:table-cell office:value-type="float" office:value="-20">
                <text:p>-20</text:p>
              </table:table-cell>
            </table:table-row>
            <table:table-row>
              <table:table-cell office:value-type="string">
                <text:p>1164</text:p>
              </table:table-cell>
              <table:table-cell office:value-type="float" office:value="0.0023259999412403">
                <text:p>0.0023259999412403</text:p>
              </table:table-cell>
              <table:table-cell office:value-type="float" office:value="-32.5999984741211">
                <text:p>-32.5999984741211</text:p>
              </table:table-cell>
              <table:table-cell office:value-type="float" office:value="-20">
                <text:p>-20</text:p>
              </table:table-cell>
            </table:table-row>
            <table:table-row>
              <table:table-cell office:value-type="string">
                <text:p>1165</text:p>
              </table:table-cell>
              <table:table-cell office:value-type="float" office:value="0.00232799994118977">
                <text:p>0.00232799994118977</text:p>
              </table:table-cell>
              <table:table-cell office:value-type="float" office:value="-32.2000007629395">
                <text:p>-32.2000007629395</text:p>
              </table:table-cell>
              <table:table-cell office:value-type="float" office:value="-20">
                <text:p>-20</text:p>
              </table:table-cell>
            </table:table-row>
            <table:table-row>
              <table:table-cell office:value-type="string">
                <text:p>1166</text:p>
              </table:table-cell>
              <table:table-cell office:value-type="float" office:value="0.00232999994113925">
                <text:p>0.00232999994113925</text:p>
              </table:table-cell>
              <table:table-cell office:value-type="float" office:value="-32">
                <text:p>-32</text:p>
              </table:table-cell>
              <table:table-cell office:value-type="float" office:value="-20">
                <text:p>-20</text:p>
              </table:table-cell>
            </table:table-row>
            <table:table-row>
              <table:table-cell office:value-type="string">
                <text:p>1167</text:p>
              </table:table-cell>
              <table:table-cell office:value-type="float" office:value="0.00233199994108872">
                <text:p>0.00233199994108872</text:p>
              </table:table-cell>
              <table:table-cell office:value-type="float" office:value="-31.3999996185303">
                <text:p>-31.3999996185303</text:p>
              </table:table-cell>
              <table:table-cell office:value-type="float" office:value="-20">
                <text:p>-20</text:p>
              </table:table-cell>
            </table:table-row>
            <table:table-row>
              <table:table-cell office:value-type="string">
                <text:p>1168</text:p>
              </table:table-cell>
              <table:table-cell office:value-type="float" office:value="0.0023339999410382">
                <text:p>0.0023339999410382</text:p>
              </table:table-cell>
              <table:table-cell office:value-type="float" office:value="-31">
                <text:p>-31</text:p>
              </table:table-cell>
              <table:table-cell office:value-type="float" office:value="-20">
                <text:p>-20</text:p>
              </table:table-cell>
            </table:table-row>
            <table:table-row>
              <table:table-cell office:value-type="string">
                <text:p>1169</text:p>
              </table:table-cell>
              <table:table-cell office:value-type="float" office:value="0.00233599994098768">
                <text:p>0.00233599994098768</text:p>
              </table:table-cell>
              <table:table-cell office:value-type="float" office:value="-30.7999992370605">
                <text:p>-30.7999992370605</text:p>
              </table:table-cell>
              <table:table-cell office:value-type="float" office:value="-20">
                <text:p>-20</text:p>
              </table:table-cell>
            </table:table-row>
            <table:table-row>
              <table:table-cell office:value-type="string">
                <text:p>1170</text:p>
              </table:table-cell>
              <table:table-cell office:value-type="float" office:value="0.00233799994093715">
                <text:p>0.00233799994093715</text:p>
              </table:table-cell>
              <table:table-cell office:value-type="float" office:value="-30.3999996185303">
                <text:p>-30.3999996185303</text:p>
              </table:table-cell>
              <table:table-cell office:value-type="float" office:value="-20">
                <text:p>-20</text:p>
              </table:table-cell>
            </table:table-row>
            <table:table-row>
              <table:table-cell office:value-type="string">
                <text:p>1171</text:p>
              </table:table-cell>
              <table:table-cell office:value-type="float" office:value="0.00233999994088663">
                <text:p>0.00233999994088663</text:p>
              </table:table-cell>
              <table:table-cell office:value-type="float" office:value="-29.7999992370605">
                <text:p>-29.7999992370605</text:p>
              </table:table-cell>
              <table:table-cell office:value-type="float" office:value="-20">
                <text:p>-20</text:p>
              </table:table-cell>
            </table:table-row>
            <table:table-row>
              <table:table-cell office:value-type="string">
                <text:p>1172</text:p>
              </table:table-cell>
              <table:table-cell office:value-type="float" office:value="0.0023419999408361">
                <text:p>0.0023419999408361</text:p>
              </table:table-cell>
              <table:table-cell office:value-type="float" office:value="-29.6000003814697">
                <text:p>-29.6000003814697</text:p>
              </table:table-cell>
              <table:table-cell office:value-type="float" office:value="-20">
                <text:p>-20</text:p>
              </table:table-cell>
            </table:table-row>
            <table:table-row>
              <table:table-cell office:value-type="string">
                <text:p>1173</text:p>
              </table:table-cell>
              <table:table-cell office:value-type="float" office:value="0.00234399994078558">
                <text:p>0.00234399994078558</text:p>
              </table:table-cell>
              <table:table-cell office:value-type="float" office:value="-29.3999996185303">
                <text:p>-29.3999996185303</text:p>
              </table:table-cell>
              <table:table-cell office:value-type="float" office:value="-20">
                <text:p>-20</text:p>
              </table:table-cell>
            </table:table-row>
            <table:table-row>
              <table:table-cell office:value-type="string">
                <text:p>1174</text:p>
              </table:table-cell>
              <table:table-cell office:value-type="float" office:value="0.00234599994073506">
                <text:p>0.00234599994073506</text:p>
              </table:table-cell>
              <table:table-cell office:value-type="float" office:value="-29">
                <text:p>-29</text:p>
              </table:table-cell>
              <table:table-cell office:value-type="float" office:value="-20">
                <text:p>-20</text:p>
              </table:table-cell>
            </table:table-row>
            <table:table-row>
              <table:table-cell office:value-type="string">
                <text:p>1175</text:p>
              </table:table-cell>
              <table:table-cell office:value-type="float" office:value="0.00234799994068453">
                <text:p>0.00234799994068453</text:p>
              </table:table-cell>
              <table:table-cell office:value-type="float" office:value="-28.3999996185303">
                <text:p>-28.3999996185303</text:p>
              </table:table-cell>
              <table:table-cell office:value-type="float" office:value="-20">
                <text:p>-20</text:p>
              </table:table-cell>
            </table:table-row>
            <table:table-row>
              <table:table-cell office:value-type="string">
                <text:p>1176</text:p>
              </table:table-cell>
              <table:table-cell office:value-type="float" office:value="0.00234999994063401">
                <text:p>0.00234999994063401</text:p>
              </table:table-cell>
              <table:table-cell office:value-type="float" office:value="-28">
                <text:p>-28</text:p>
              </table:table-cell>
              <table:table-cell office:value-type="float" office:value="-20">
                <text:p>-20</text:p>
              </table:table-cell>
            </table:table-row>
            <table:table-row>
              <table:table-cell office:value-type="string">
                <text:p>1177</text:p>
              </table:table-cell>
              <table:table-cell office:value-type="float" office:value="0.00235199994058348">
                <text:p>0.00235199994058348</text:p>
              </table:table-cell>
              <table:table-cell office:value-type="float" office:value="-27.7999992370605">
                <text:p>-27.7999992370605</text:p>
              </table:table-cell>
              <table:table-cell office:value-type="float" office:value="-20">
                <text:p>-20</text:p>
              </table:table-cell>
            </table:table-row>
            <table:table-row>
              <table:table-cell office:value-type="string">
                <text:p>1178</text:p>
              </table:table-cell>
              <table:table-cell office:value-type="float" office:value="0.00235399994053296">
                <text:p>0.00235399994053296</text:p>
              </table:table-cell>
              <table:table-cell office:value-type="float" office:value="-27.3999996185303">
                <text:p>-27.3999996185303</text:p>
              </table:table-cell>
              <table:table-cell office:value-type="float" office:value="-20">
                <text:p>-20</text:p>
              </table:table-cell>
            </table:table-row>
            <table:table-row>
              <table:table-cell office:value-type="string">
                <text:p>1179</text:p>
              </table:table-cell>
              <table:table-cell office:value-type="float" office:value="0.00235599994048243">
                <text:p>0.00235599994048243</text:p>
              </table:table-cell>
              <table:table-cell office:value-type="float" office:value="-27">
                <text:p>-27</text:p>
              </table:table-cell>
              <table:table-cell office:value-type="float" office:value="-20">
                <text:p>-20</text:p>
              </table:table-cell>
            </table:table-row>
            <table:table-row>
              <table:table-cell office:value-type="string">
                <text:p>1180</text:p>
              </table:table-cell>
              <table:table-cell office:value-type="float" office:value="0.00235799994043191">
                <text:p>0.00235799994043191</text:p>
              </table:table-cell>
              <table:table-cell office:value-type="float" office:value="-26.6000003814697">
                <text:p>-26.6000003814697</text:p>
              </table:table-cell>
              <table:table-cell office:value-type="float" office:value="-20">
                <text:p>-20</text:p>
              </table:table-cell>
            </table:table-row>
            <table:table-row>
              <table:table-cell office:value-type="string">
                <text:p>1181</text:p>
              </table:table-cell>
              <table:table-cell office:value-type="float" office:value="0.00235999994038139">
                <text:p>0.00235999994038139</text:p>
              </table:table-cell>
              <table:table-cell office:value-type="float" office:value="-26.3999996185303">
                <text:p>-26.3999996185303</text:p>
              </table:table-cell>
              <table:table-cell office:value-type="float" office:value="-20">
                <text:p>-20</text:p>
              </table:table-cell>
            </table:table-row>
            <table:table-row>
              <table:table-cell office:value-type="string">
                <text:p>1182</text:p>
              </table:table-cell>
              <table:table-cell office:value-type="float" office:value="0.00236199994033086">
                <text:p>0.00236199994033086</text:p>
              </table:table-cell>
              <table:table-cell office:value-type="float" office:value="-26">
                <text:p>-26</text:p>
              </table:table-cell>
              <table:table-cell office:value-type="float" office:value="-20">
                <text:p>-20</text:p>
              </table:table-cell>
            </table:table-row>
            <table:table-row>
              <table:table-cell office:value-type="string">
                <text:p>1183</text:p>
              </table:table-cell>
              <table:table-cell office:value-type="float" office:value="0.00236399994028034">
                <text:p>0.00236399994028034</text:p>
              </table:table-cell>
              <table:table-cell office:value-type="float" office:value="-25.3999996185303">
                <text:p>-25.3999996185303</text:p>
              </table:table-cell>
              <table:table-cell office:value-type="float" office:value="-20">
                <text:p>-20</text:p>
              </table:table-cell>
            </table:table-row>
            <table:table-row>
              <table:table-cell office:value-type="string">
                <text:p>1184</text:p>
              </table:table-cell>
              <table:table-cell office:value-type="float" office:value="0.00236599994022981">
                <text:p>0.00236599994022981</text:p>
              </table:table-cell>
              <table:table-cell office:value-type="float" office:value="-25.2000007629395">
                <text:p>-25.2000007629395</text:p>
              </table:table-cell>
              <table:table-cell office:value-type="float" office:value="-20">
                <text:p>-20</text:p>
              </table:table-cell>
            </table:table-row>
            <table:table-row>
              <table:table-cell office:value-type="string">
                <text:p>1185</text:p>
              </table:table-cell>
              <table:table-cell office:value-type="float" office:value="0.00236799994017929">
                <text:p>0.00236799994017929</text:p>
              </table:table-cell>
              <table:table-cell office:value-type="float" office:value="-25">
                <text:p>-25</text:p>
              </table:table-cell>
              <table:table-cell office:value-type="float" office:value="-20">
                <text:p>-20</text:p>
              </table:table-cell>
            </table:table-row>
            <table:table-row>
              <table:table-cell office:value-type="string">
                <text:p>1186</text:p>
              </table:table-cell>
              <table:table-cell office:value-type="float" office:value="0.00236999994012876">
                <text:p>0.00236999994012876</text:p>
              </table:table-cell>
              <table:table-cell office:value-type="float" office:value="-24.6000003814697">
                <text:p>-24.6000003814697</text:p>
              </table:table-cell>
              <table:table-cell office:value-type="float" office:value="-20">
                <text:p>-20</text:p>
              </table:table-cell>
            </table:table-row>
            <table:table-row>
              <table:table-cell office:value-type="string">
                <text:p>1187</text:p>
              </table:table-cell>
              <table:table-cell office:value-type="float" office:value="0.00237199994007824">
                <text:p>0.00237199994007824</text:p>
              </table:table-cell>
              <table:table-cell office:value-type="float" office:value="-24">
                <text:p>-24</text:p>
              </table:table-cell>
              <table:table-cell office:value-type="float" office:value="-20">
                <text:p>-20</text:p>
              </table:table-cell>
            </table:table-row>
            <table:table-row>
              <table:table-cell office:value-type="string">
                <text:p>1188</text:p>
              </table:table-cell>
              <table:table-cell office:value-type="float" office:value="0.00237399994002772">
                <text:p>0.00237399994002772</text:p>
              </table:table-cell>
              <table:table-cell office:value-type="float" office:value="-23.6000003814697">
                <text:p>-23.6000003814697</text:p>
              </table:table-cell>
              <table:table-cell office:value-type="float" office:value="-20">
                <text:p>-20</text:p>
              </table:table-cell>
            </table:table-row>
            <table:table-row>
              <table:table-cell office:value-type="string">
                <text:p>1189</text:p>
              </table:table-cell>
              <table:table-cell office:value-type="float" office:value="0.00237599993997719">
                <text:p>0.00237599993997719</text:p>
              </table:table-cell>
              <table:table-cell office:value-type="float" office:value="-23.3999996185303">
                <text:p>-23.3999996185303</text:p>
              </table:table-cell>
              <table:table-cell office:value-type="float" office:value="-20">
                <text:p>-20</text:p>
              </table:table-cell>
            </table:table-row>
            <table:table-row>
              <table:table-cell office:value-type="string">
                <text:p>1190</text:p>
              </table:table-cell>
              <table:table-cell office:value-type="float" office:value="0.00237799993992667">
                <text:p>0.00237799993992667</text:p>
              </table:table-cell>
              <table:table-cell office:value-type="float" office:value="-23">
                <text:p>-23</text:p>
              </table:table-cell>
              <table:table-cell office:value-type="float" office:value="-20">
                <text:p>-20</text:p>
              </table:table-cell>
            </table:table-row>
            <table:table-row>
              <table:table-cell office:value-type="string">
                <text:p>1191</text:p>
              </table:table-cell>
              <table:table-cell office:value-type="float" office:value="0.00237999993987614">
                <text:p>0.00237999993987614</text:p>
              </table:table-cell>
              <table:table-cell office:value-type="float" office:value="-22.6000003814697">
                <text:p>-22.6000003814697</text:p>
              </table:table-cell>
              <table:table-cell office:value-type="float" office:value="-20">
                <text:p>-20</text:p>
              </table:table-cell>
            </table:table-row>
            <table:table-row>
              <table:table-cell office:value-type="string">
                <text:p>1192</text:p>
              </table:table-cell>
              <table:table-cell office:value-type="float" office:value="0.00238199993982562">
                <text:p>0.00238199993982562</text:p>
              </table:table-cell>
              <table:table-cell office:value-type="float" office:value="-22.2000007629395">
                <text:p>-22.2000007629395</text:p>
              </table:table-cell>
              <table:table-cell office:value-type="float" office:value="-20">
                <text:p>-20</text:p>
              </table:table-cell>
            </table:table-row>
            <table:table-row>
              <table:table-cell office:value-type="string">
                <text:p>1193</text:p>
              </table:table-cell>
              <table:table-cell office:value-type="float" office:value="0.00238399993977509">
                <text:p>0.00238399993977509</text:p>
              </table:table-cell>
              <table:table-cell office:value-type="float" office:value="-22">
                <text:p>-22</text:p>
              </table:table-cell>
              <table:table-cell office:value-type="float" office:value="-20">
                <text:p>-20</text:p>
              </table:table-cell>
            </table:table-row>
            <table:table-row>
              <table:table-cell office:value-type="string">
                <text:p>1194</text:p>
              </table:table-cell>
              <table:table-cell office:value-type="float" office:value="0.00238599993972457">
                <text:p>0.00238599993972457</text:p>
              </table:table-cell>
              <table:table-cell office:value-type="float" office:value="-21.7999992370605">
                <text:p>-21.7999992370605</text:p>
              </table:table-cell>
              <table:table-cell office:value-type="float" office:value="-20">
                <text:p>-20</text:p>
              </table:table-cell>
            </table:table-row>
            <table:table-row>
              <table:table-cell office:value-type="string">
                <text:p>1195</text:p>
              </table:table-cell>
              <table:table-cell office:value-type="float" office:value="0.00238799993967405">
                <text:p>0.00238799993967405</text:p>
              </table:table-cell>
              <table:table-cell office:value-type="float" office:value="-21.2000007629395">
                <text:p>-21.2000007629395</text:p>
              </table:table-cell>
              <table:table-cell office:value-type="float" office:value="-20">
                <text:p>-20</text:p>
              </table:table-cell>
            </table:table-row>
            <table:table-row>
              <table:table-cell office:value-type="string">
                <text:p>1196</text:p>
              </table:table-cell>
              <table:table-cell office:value-type="float" office:value="0.00238999993962352">
                <text:p>0.00238999993962352</text:p>
              </table:table-cell>
              <table:table-cell office:value-type="float" office:value="-20.6000003814697">
                <text:p>-20.6000003814697</text:p>
              </table:table-cell>
              <table:table-cell office:value-type="float" office:value="-20">
                <text:p>-20</text:p>
              </table:table-cell>
            </table:table-row>
            <table:table-row>
              <table:table-cell office:value-type="string">
                <text:p>1197</text:p>
              </table:table-cell>
              <table:table-cell office:value-type="float" office:value="0.002391999939573">
                <text:p>0.002391999939573</text:p>
              </table:table-cell>
              <table:table-cell office:value-type="float" office:value="-20.3999996185303">
                <text:p>-20.3999996185303</text:p>
              </table:table-cell>
              <table:table-cell office:value-type="float" office:value="-20">
                <text:p>-20</text:p>
              </table:table-cell>
            </table:table-row>
            <table:table-row>
              <table:table-cell office:value-type="string">
                <text:p>1198</text:p>
              </table:table-cell>
              <table:table-cell office:value-type="float" office:value="0.00239399993952247">
                <text:p>0.00239399993952247</text:p>
              </table:table-cell>
              <table:table-cell office:value-type="float" office:value="-20.2000007629395">
                <text:p>-20.2000007629395</text:p>
              </table:table-cell>
              <table:table-cell office:value-type="float" office:value="-20">
                <text:p>-20</text:p>
              </table:table-cell>
            </table:table-row>
            <table:table-row>
              <table:table-cell office:value-type="string">
                <text:p>1199</text:p>
              </table:table-cell>
              <table:table-cell office:value-type="float" office:value="0.00239599993947195">
                <text:p>0.00239599993947195</text:p>
              </table:table-cell>
              <table:table-cell office:value-type="float" office:value="-19.3999996185303">
                <text:p>-19.3999996185303</text:p>
              </table:table-cell>
              <table:table-cell office:value-type="float" office:value="-20">
                <text:p>-20</text:p>
              </table:table-cell>
            </table:table-row>
            <table:table-row>
              <table:table-cell office:value-type="string">
                <text:p>1200</text:p>
              </table:table-cell>
              <table:table-cell office:value-type="float" office:value="0.00239799993942143">
                <text:p>0.00239799993942143</text:p>
              </table:table-cell>
              <table:table-cell office:value-type="float" office:value="-19.3999996185303">
                <text:p>-19.3999996185303</text:p>
              </table:table-cell>
              <table:table-cell office:value-type="float" office:value="-20">
                <text:p>-20</text:p>
              </table:table-cell>
            </table:table-row>
            <table:table-row>
              <table:table-cell office:value-type="string">
                <text:p>1201</text:p>
              </table:table-cell>
              <table:table-cell office:value-type="float" office:value="0.0023999999393709">
                <text:p>0.0023999999393709</text:p>
              </table:table-cell>
              <table:table-cell office:value-type="float" office:value="-19">
                <text:p>-19</text:p>
              </table:table-cell>
              <table:table-cell office:value-type="float" office:value="-20">
                <text:p>-20</text:p>
              </table:table-cell>
            </table:table-row>
            <table:table-row>
              <table:table-cell office:value-type="string">
                <text:p>1202</text:p>
              </table:table-cell>
              <table:table-cell office:value-type="float" office:value="0.00240199993932038">
                <text:p>0.00240199993932038</text:p>
              </table:table-cell>
              <table:table-cell office:value-type="float" office:value="-18.3999996185303">
                <text:p>-18.3999996185303</text:p>
              </table:table-cell>
              <table:table-cell office:value-type="float" office:value="-20">
                <text:p>-20</text:p>
              </table:table-cell>
            </table:table-row>
            <table:table-row>
              <table:table-cell office:value-type="string">
                <text:p>1203</text:p>
              </table:table-cell>
              <table:table-cell office:value-type="float" office:value="0.00240399993926985">
                <text:p>0.00240399993926985</text:p>
              </table:table-cell>
              <table:table-cell office:value-type="float" office:value="-18.2000007629395">
                <text:p>-18.2000007629395</text:p>
              </table:table-cell>
              <table:table-cell office:value-type="float" office:value="-20">
                <text:p>-20</text:p>
              </table:table-cell>
            </table:table-row>
            <table:table-row>
              <table:table-cell office:value-type="string">
                <text:p>1204</text:p>
              </table:table-cell>
              <table:table-cell office:value-type="float" office:value="0.00240599993921933">
                <text:p>0.00240599993921933</text:p>
              </table:table-cell>
              <table:table-cell office:value-type="float" office:value="-18">
                <text:p>-18</text:p>
              </table:table-cell>
              <table:table-cell office:value-type="float" office:value="-20">
                <text:p>-20</text:p>
              </table:table-cell>
            </table:table-row>
            <table:table-row>
              <table:table-cell office:value-type="string">
                <text:p>1205</text:p>
              </table:table-cell>
              <table:table-cell office:value-type="float" office:value="0.0024079999391688">
                <text:p>0.0024079999391688</text:p>
              </table:table-cell>
              <table:table-cell office:value-type="float" office:value="-17.6000003814697">
                <text:p>-17.6000003814697</text:p>
              </table:table-cell>
              <table:table-cell office:value-type="float" office:value="-20">
                <text:p>-20</text:p>
              </table:table-cell>
            </table:table-row>
            <table:table-row>
              <table:table-cell office:value-type="string">
                <text:p>1206</text:p>
              </table:table-cell>
              <table:table-cell office:value-type="float" office:value="0.00240999993911828">
                <text:p>0.00240999993911828</text:p>
              </table:table-cell>
              <table:table-cell office:value-type="float" office:value="-17.2000007629395">
                <text:p>-17.2000007629395</text:p>
              </table:table-cell>
              <table:table-cell office:value-type="float" office:value="-20">
                <text:p>-20</text:p>
              </table:table-cell>
            </table:table-row>
            <table:table-row>
              <table:table-cell office:value-type="string">
                <text:p>1207</text:p>
              </table:table-cell>
              <table:table-cell office:value-type="float" office:value="0.00241199993906775">
                <text:p>0.00241199993906775</text:p>
              </table:table-cell>
              <table:table-cell office:value-type="float" office:value="-16.6000003814697">
                <text:p>-16.6000003814697</text:p>
              </table:table-cell>
              <table:table-cell office:value-type="float" office:value="-20">
                <text:p>-20</text:p>
              </table:table-cell>
            </table:table-row>
            <table:table-row>
              <table:table-cell office:value-type="string">
                <text:p>1208</text:p>
              </table:table-cell>
              <table:table-cell office:value-type="float" office:value="0.00241399993901723">
                <text:p>0.00241399993901723</text:p>
              </table:table-cell>
              <table:table-cell office:value-type="float" office:value="-16.2000007629395">
                <text:p>-16.2000007629395</text:p>
              </table:table-cell>
              <table:table-cell office:value-type="float" office:value="-20">
                <text:p>-20</text:p>
              </table:table-cell>
            </table:table-row>
            <table:table-row>
              <table:table-cell office:value-type="string">
                <text:p>1209</text:p>
              </table:table-cell>
              <table:table-cell office:value-type="float" office:value="0.00241599993896671">
                <text:p>0.00241599993896671</text:p>
              </table:table-cell>
              <table:table-cell office:value-type="float" office:value="-16">
                <text:p>-16</text:p>
              </table:table-cell>
              <table:table-cell office:value-type="float" office:value="-20">
                <text:p>-20</text:p>
              </table:table-cell>
            </table:table-row>
            <table:table-row>
              <table:table-cell office:value-type="string">
                <text:p>1210</text:p>
              </table:table-cell>
              <table:table-cell office:value-type="float" office:value="0.00241799993891618">
                <text:p>0.00241799993891618</text:p>
              </table:table-cell>
              <table:table-cell office:value-type="float" office:value="-15.6000003814697">
                <text:p>-15.6000003814697</text:p>
              </table:table-cell>
              <table:table-cell office:value-type="float" office:value="-20">
                <text:p>-20</text:p>
              </table:table-cell>
            </table:table-row>
            <table:table-row>
              <table:table-cell office:value-type="string">
                <text:p>1211</text:p>
              </table:table-cell>
              <table:table-cell office:value-type="float" office:value="0.00241999993886566">
                <text:p>0.00241999993886566</text:p>
              </table:table-cell>
              <table:table-cell office:value-type="float" office:value="-15.1999998092651">
                <text:p>-15.1999998092651</text:p>
              </table:table-cell>
              <table:table-cell office:value-type="float" office:value="-20">
                <text:p>-20</text:p>
              </table:table-cell>
            </table:table-row>
            <table:table-row>
              <table:table-cell office:value-type="string">
                <text:p>1212</text:p>
              </table:table-cell>
              <table:table-cell office:value-type="float" office:value="0.00242199993881513">
                <text:p>0.00242199993881513</text:p>
              </table:table-cell>
              <table:table-cell office:value-type="float" office:value="-15">
                <text:p>-15</text:p>
              </table:table-cell>
              <table:table-cell office:value-type="float" office:value="-20">
                <text:p>-20</text:p>
              </table:table-cell>
            </table:table-row>
            <table:table-row>
              <table:table-cell office:value-type="string">
                <text:p>1213</text:p>
              </table:table-cell>
              <table:table-cell office:value-type="float" office:value="0.00242399993876461">
                <text:p>0.00242399993876461</text:p>
              </table:table-cell>
              <table:table-cell office:value-type="float" office:value="-14.6000003814697">
                <text:p>-14.6000003814697</text:p>
              </table:table-cell>
              <table:table-cell office:value-type="float" office:value="-20">
                <text:p>-20</text:p>
              </table:table-cell>
            </table:table-row>
            <table:table-row>
              <table:table-cell office:value-type="string">
                <text:p>1214</text:p>
              </table:table-cell>
              <table:table-cell office:value-type="float" office:value="0.00242599993871409">
                <text:p>0.00242599993871409</text:p>
              </table:table-cell>
              <table:table-cell office:value-type="float" office:value="-14.3999996185303">
                <text:p>-14.3999996185303</text:p>
              </table:table-cell>
              <table:table-cell office:value-type="float" office:value="-20">
                <text:p>-20</text:p>
              </table:table-cell>
            </table:table-row>
            <table:table-row>
              <table:table-cell office:value-type="string">
                <text:p>1215</text:p>
              </table:table-cell>
              <table:table-cell office:value-type="float" office:value="0.00242799993866356">
                <text:p>0.00242799993866356</text:p>
              </table:table-cell>
              <table:table-cell office:value-type="float" office:value="-13.8000001907349">
                <text:p>-13.8000001907349</text:p>
              </table:table-cell>
              <table:table-cell office:value-type="float" office:value="-20">
                <text:p>-20</text:p>
              </table:table-cell>
            </table:table-row>
            <table:table-row>
              <table:table-cell office:value-type="string">
                <text:p>1216</text:p>
              </table:table-cell>
              <table:table-cell office:value-type="float" office:value="0.00242999993861304">
                <text:p>0.00242999993861304</text:p>
              </table:table-cell>
              <table:table-cell office:value-type="float" office:value="-13.6000003814697">
                <text:p>-13.6000003814697</text:p>
              </table:table-cell>
              <table:table-cell office:value-type="float" office:value="-20">
                <text:p>-20</text:p>
              </table:table-cell>
            </table:table-row>
            <table:table-row>
              <table:table-cell office:value-type="string">
                <text:p>1217</text:p>
              </table:table-cell>
              <table:table-cell office:value-type="float" office:value="0.00243199993856251">
                <text:p>0.00243199993856251</text:p>
              </table:table-cell>
              <table:table-cell office:value-type="float" office:value="-13.1999998092651">
                <text:p>-13.1999998092651</text:p>
              </table:table-cell>
              <table:table-cell office:value-type="float" office:value="-20">
                <text:p>-20</text:p>
              </table:table-cell>
            </table:table-row>
            <table:table-row>
              <table:table-cell office:value-type="string">
                <text:p>1218</text:p>
              </table:table-cell>
              <table:table-cell office:value-type="float" office:value="0.00243399993851199">
                <text:p>0.00243399993851199</text:p>
              </table:table-cell>
              <table:table-cell office:value-type="float" office:value="-12.8000001907349">
                <text:p>-12.8000001907349</text:p>
              </table:table-cell>
              <table:table-cell office:value-type="float" office:value="-20">
                <text:p>-20</text:p>
              </table:table-cell>
            </table:table-row>
            <table:table-row>
              <table:table-cell office:value-type="string">
                <text:p>1219</text:p>
              </table:table-cell>
              <table:table-cell office:value-type="float" office:value="0.00243599993846146">
                <text:p>0.00243599993846146</text:p>
              </table:table-cell>
              <table:table-cell office:value-type="float" office:value="-12.3999996185303">
                <text:p>-12.3999996185303</text:p>
              </table:table-cell>
              <table:table-cell office:value-type="float" office:value="-20">
                <text:p>-20</text:p>
              </table:table-cell>
            </table:table-row>
            <table:table-row>
              <table:table-cell office:value-type="string">
                <text:p>1220</text:p>
              </table:table-cell>
              <table:table-cell office:value-type="float" office:value="0.00243799993841094">
                <text:p>0.00243799993841094</text:p>
              </table:table-cell>
              <table:table-cell office:value-type="float" office:value="-11.8000001907349">
                <text:p>-11.8000001907349</text:p>
              </table:table-cell>
              <table:table-cell office:value-type="float" office:value="-20">
                <text:p>-20</text:p>
              </table:table-cell>
            </table:table-row>
            <table:table-row>
              <table:table-cell office:value-type="string">
                <text:p>1221</text:p>
              </table:table-cell>
              <table:table-cell office:value-type="float" office:value="0.00243999993836042">
                <text:p>0.00243999993836042</text:p>
              </table:table-cell>
              <table:table-cell office:value-type="float" office:value="-11.6000003814697">
                <text:p>-11.6000003814697</text:p>
              </table:table-cell>
              <table:table-cell office:value-type="float" office:value="-20">
                <text:p>-20</text:p>
              </table:table-cell>
            </table:table-row>
            <table:table-row>
              <table:table-cell office:value-type="string">
                <text:p>1222</text:p>
              </table:table-cell>
              <table:table-cell office:value-type="float" office:value="0.00244199993830989">
                <text:p>0.00244199993830989</text:p>
              </table:table-cell>
              <table:table-cell office:value-type="float" office:value="-11.3999996185303">
                <text:p>-11.3999996185303</text:p>
              </table:table-cell>
              <table:table-cell office:value-type="float" office:value="-20">
                <text:p>-20</text:p>
              </table:table-cell>
            </table:table-row>
            <table:table-row>
              <table:table-cell office:value-type="string">
                <text:p>1223</text:p>
              </table:table-cell>
              <table:table-cell office:value-type="float" office:value="0.00244399993825937">
                <text:p>0.00244399993825937</text:p>
              </table:table-cell>
              <table:table-cell office:value-type="float" office:value="-10.8000001907349">
                <text:p>-10.8000001907349</text:p>
              </table:table-cell>
              <table:table-cell office:value-type="float" office:value="-20">
                <text:p>-20</text:p>
              </table:table-cell>
            </table:table-row>
            <table:table-row>
              <table:table-cell office:value-type="string">
                <text:p>1224</text:p>
              </table:table-cell>
              <table:table-cell office:value-type="float" office:value="0.00244599993820884">
                <text:p>0.00244599993820884</text:p>
              </table:table-cell>
              <table:table-cell office:value-type="float" office:value="-10.3999996185303">
                <text:p>-10.3999996185303</text:p>
              </table:table-cell>
              <table:table-cell office:value-type="float" office:value="-20">
                <text:p>-20</text:p>
              </table:table-cell>
            </table:table-row>
            <table:table-row>
              <table:table-cell office:value-type="string">
                <text:p>1225</text:p>
              </table:table-cell>
              <table:table-cell office:value-type="float" office:value="0.00244799993815832">
                <text:p>0.00244799993815832</text:p>
              </table:table-cell>
              <table:table-cell office:value-type="float" office:value="-10">
                <text:p>-10</text:p>
              </table:table-cell>
              <table:table-cell office:value-type="float" office:value="-20">
                <text:p>-20</text:p>
              </table:table-cell>
            </table:table-row>
            <table:table-row>
              <table:table-cell office:value-type="string">
                <text:p>1226</text:p>
              </table:table-cell>
              <table:table-cell office:value-type="float" office:value="0.00244999993810779">
                <text:p>0.00244999993810779</text:p>
              </table:table-cell>
              <table:table-cell office:value-type="float" office:value="-9.60000038146973">
                <text:p>-9.60000038146973</text:p>
              </table:table-cell>
              <table:table-cell office:value-type="float" office:value="-20">
                <text:p>-20</text:p>
              </table:table-cell>
            </table:table-row>
            <table:table-row>
              <table:table-cell office:value-type="string">
                <text:p>1227</text:p>
              </table:table-cell>
              <table:table-cell office:value-type="float" office:value="0.00245199993805727">
                <text:p>0.00245199993805727</text:p>
              </table:table-cell>
              <table:table-cell office:value-type="float" office:value="-9">
                <text:p>-9</text:p>
              </table:table-cell>
              <table:table-cell office:value-type="float" office:value="-20">
                <text:p>-20</text:p>
              </table:table-cell>
            </table:table-row>
            <table:table-row>
              <table:table-cell office:value-type="string">
                <text:p>1228</text:p>
              </table:table-cell>
              <table:table-cell office:value-type="float" office:value="0.00245399993800675">
                <text:p>0.00245399993800675</text:p>
              </table:table-cell>
              <table:table-cell office:value-type="float" office:value="-9">
                <text:p>-9</text:p>
              </table:table-cell>
              <table:table-cell office:value-type="float" office:value="-20">
                <text:p>-20</text:p>
              </table:table-cell>
            </table:table-row>
            <table:table-row>
              <table:table-cell office:value-type="string">
                <text:p>1229</text:p>
              </table:table-cell>
              <table:table-cell office:value-type="float" office:value="0.00245599993795622">
                <text:p>0.00245599993795622</text:p>
              </table:table-cell>
              <table:table-cell office:value-type="float" office:value="-8.80000019073486">
                <text:p>-8.80000019073486</text:p>
              </table:table-cell>
              <table:table-cell office:value-type="float" office:value="-20">
                <text:p>-20</text:p>
              </table:table-cell>
            </table:table-row>
            <table:table-row>
              <table:table-cell office:value-type="string">
                <text:p>1230</text:p>
              </table:table-cell>
              <table:table-cell office:value-type="float" office:value="0.0024579999379057">
                <text:p>0.0024579999379057</text:p>
              </table:table-cell>
              <table:table-cell office:value-type="float" office:value="-8.60000038146973">
                <text:p>-8.60000038146973</text:p>
              </table:table-cell>
              <table:table-cell office:value-type="float" office:value="-20">
                <text:p>-20</text:p>
              </table:table-cell>
            </table:table-row>
            <table:table-row>
              <table:table-cell office:value-type="string">
                <text:p>1231</text:p>
              </table:table-cell>
              <table:table-cell office:value-type="float" office:value="0.00245999993785517">
                <text:p>0.00245999993785517</text:p>
              </table:table-cell>
              <table:table-cell office:value-type="float" office:value="-7.80000019073486">
                <text:p>-7.80000019073486</text:p>
              </table:table-cell>
              <table:table-cell office:value-type="float" office:value="-20">
                <text:p>-20</text:p>
              </table:table-cell>
            </table:table-row>
            <table:table-row>
              <table:table-cell office:value-type="string">
                <text:p>1232</text:p>
              </table:table-cell>
              <table:table-cell office:value-type="float" office:value="0.00246199993780465">
                <text:p>0.00246199993780465</text:p>
              </table:table-cell>
              <table:table-cell office:value-type="float" office:value="-7.40000009536743">
                <text:p>-7.40000009536743</text:p>
              </table:table-cell>
              <table:table-cell office:value-type="float" office:value="-20">
                <text:p>-20</text:p>
              </table:table-cell>
            </table:table-row>
            <table:table-row>
              <table:table-cell office:value-type="string">
                <text:p>1233</text:p>
              </table:table-cell>
              <table:table-cell office:value-type="float" office:value="0.00246399993775412">
                <text:p>0.00246399993775412</text:p>
              </table:table-cell>
              <table:table-cell office:value-type="float" office:value="-7">
                <text:p>-7</text:p>
              </table:table-cell>
              <table:table-cell office:value-type="float" office:value="-20">
                <text:p>-20</text:p>
              </table:table-cell>
            </table:table-row>
            <table:table-row>
              <table:table-cell office:value-type="string">
                <text:p>1234</text:p>
              </table:table-cell>
              <table:table-cell office:value-type="float" office:value="0.0024659999377036">
                <text:p>0.0024659999377036</text:p>
              </table:table-cell>
              <table:table-cell office:value-type="float" office:value="-6.80000019073486">
                <text:p>-6.80000019073486</text:p>
              </table:table-cell>
              <table:table-cell office:value-type="float" office:value="-20">
                <text:p>-20</text:p>
              </table:table-cell>
            </table:table-row>
            <table:table-row>
              <table:table-cell office:value-type="string">
                <text:p>1235</text:p>
              </table:table-cell>
              <table:table-cell office:value-type="float" office:value="0.00246799993765308">
                <text:p>0.00246799993765308</text:p>
              </table:table-cell>
              <table:table-cell office:value-type="float" office:value="-6.40000009536743">
                <text:p>-6.40000009536743</text:p>
              </table:table-cell>
              <table:table-cell office:value-type="float" office:value="-20">
                <text:p>-20</text:p>
              </table:table-cell>
            </table:table-row>
            <table:table-row>
              <table:table-cell office:value-type="string">
                <text:p>1236</text:p>
              </table:table-cell>
              <table:table-cell office:value-type="float" office:value="0.00246999993760255">
                <text:p>0.00246999993760255</text:p>
              </table:table-cell>
              <table:table-cell office:value-type="float" office:value="-6.19999980926514">
                <text:p>-6.19999980926514</text:p>
              </table:table-cell>
              <table:table-cell office:value-type="float" office:value="-20">
                <text:p>-20</text:p>
              </table:table-cell>
            </table:table-row>
            <table:table-row>
              <table:table-cell office:value-type="string">
                <text:p>1237</text:p>
              </table:table-cell>
              <table:table-cell office:value-type="float" office:value="0.00247199993755203">
                <text:p>0.00247199993755203</text:p>
              </table:table-cell>
              <table:table-cell office:value-type="float" office:value="-5.80000019073486">
                <text:p>-5.80000019073486</text:p>
              </table:table-cell>
              <table:table-cell office:value-type="float" office:value="-20">
                <text:p>-20</text:p>
              </table:table-cell>
            </table:table-row>
            <table:table-row>
              <table:table-cell office:value-type="string">
                <text:p>1238</text:p>
              </table:table-cell>
              <table:table-cell office:value-type="float" office:value="0.0024739999375015">
                <text:p>0.0024739999375015</text:p>
              </table:table-cell>
              <table:table-cell office:value-type="float" office:value="-5.19999980926514">
                <text:p>-5.19999980926514</text:p>
              </table:table-cell>
              <table:table-cell office:value-type="float" office:value="-20">
                <text:p>-20</text:p>
              </table:table-cell>
            </table:table-row>
            <table:table-row>
              <table:table-cell office:value-type="string">
                <text:p>1239</text:p>
              </table:table-cell>
              <table:table-cell office:value-type="float" office:value="0.00247599993745098">
                <text:p>0.00247599993745098</text:p>
              </table:table-cell>
              <table:table-cell office:value-type="float" office:value="-4.80000019073486">
                <text:p>-4.80000019073486</text:p>
              </table:table-cell>
              <table:table-cell office:value-type="float" office:value="-20">
                <text:p>-20</text:p>
              </table:table-cell>
            </table:table-row>
            <table:table-row>
              <table:table-cell office:value-type="string">
                <text:p>1240</text:p>
              </table:table-cell>
              <table:table-cell office:value-type="float" office:value="0.00247799993740046">
                <text:p>0.00247799993740046</text:p>
              </table:table-cell>
              <table:table-cell office:value-type="float" office:value="-4.59999990463257">
                <text:p>-4.59999990463257</text:p>
              </table:table-cell>
              <table:table-cell office:value-type="float" office:value="-20">
                <text:p>-20</text:p>
              </table:table-cell>
            </table:table-row>
            <table:table-row>
              <table:table-cell office:value-type="string">
                <text:p>1241</text:p>
              </table:table-cell>
              <table:table-cell office:value-type="float" office:value="0.00247999993734993">
                <text:p>0.00247999993734993</text:p>
              </table:table-cell>
              <table:table-cell office:value-type="float" office:value="-4.19999980926514">
                <text:p>-4.19999980926514</text:p>
              </table:table-cell>
              <table:table-cell office:value-type="float" office:value="-20">
                <text:p>-20</text:p>
              </table:table-cell>
            </table:table-row>
            <table:table-row>
              <table:table-cell office:value-type="string">
                <text:p>1242</text:p>
              </table:table-cell>
              <table:table-cell office:value-type="float" office:value="0.00248199993729941">
                <text:p>0.00248199993729941</text:p>
              </table:table-cell>
              <table:table-cell office:value-type="float" office:value="-4">
                <text:p>-4</text:p>
              </table:table-cell>
              <table:table-cell office:value-type="float" office:value="-20">
                <text:p>-20</text:p>
              </table:table-cell>
            </table:table-row>
            <table:table-row>
              <table:table-cell office:value-type="string">
                <text:p>1243</text:p>
              </table:table-cell>
              <table:table-cell office:value-type="float" office:value="0.00248399993724888">
                <text:p>0.00248399993724888</text:p>
              </table:table-cell>
              <table:table-cell office:value-type="float" office:value="-3.40000009536743">
                <text:p>-3.40000009536743</text:p>
              </table:table-cell>
              <table:table-cell office:value-type="float" office:value="-20">
                <text:p>-20</text:p>
              </table:table-cell>
            </table:table-row>
            <table:table-row>
              <table:table-cell office:value-type="string">
                <text:p>1244</text:p>
              </table:table-cell>
              <table:table-cell office:value-type="float" office:value="0.00248599993719836">
                <text:p>0.00248599993719836</text:p>
              </table:table-cell>
              <table:table-cell office:value-type="float" office:value="-3.20000004768372">
                <text:p>-3.20000004768372</text:p>
              </table:table-cell>
              <table:table-cell office:value-type="float" office:value="-20">
                <text:p>-20</text:p>
              </table:table-cell>
            </table:table-row>
            <table:table-row>
              <table:table-cell office:value-type="string">
                <text:p>1245</text:p>
              </table:table-cell>
              <table:table-cell office:value-type="float" office:value="0.00248799993714783">
                <text:p>0.00248799993714783</text:p>
              </table:table-cell>
              <table:table-cell office:value-type="float" office:value="-2.79999995231628">
                <text:p>-2.79999995231628</text:p>
              </table:table-cell>
              <table:table-cell office:value-type="float" office:value="-20">
                <text:p>-20</text:p>
              </table:table-cell>
            </table:table-row>
            <table:table-row>
              <table:table-cell office:value-type="string">
                <text:p>1246</text:p>
              </table:table-cell>
              <table:table-cell office:value-type="float" office:value="0.00248999993709731">
                <text:p>0.00248999993709731</text:p>
              </table:table-cell>
              <table:table-cell office:value-type="float" office:value="-2.40000009536743">
                <text:p>-2.40000009536743</text:p>
              </table:table-cell>
              <table:table-cell office:value-type="float" office:value="-20">
                <text:p>-20</text:p>
              </table:table-cell>
            </table:table-row>
            <table:table-row>
              <table:table-cell office:value-type="string">
                <text:p>1247</text:p>
              </table:table-cell>
              <table:table-cell office:value-type="float" office:value="0.00249199993704678">
                <text:p>0.00249199993704678</text:p>
              </table:table-cell>
              <table:table-cell office:value-type="float" office:value="-2">
                <text:p>-2</text:p>
              </table:table-cell>
              <table:table-cell office:value-type="float" office:value="-20">
                <text:p>-20</text:p>
              </table:table-cell>
            </table:table-row>
            <table:table-row>
              <table:table-cell office:value-type="string">
                <text:p>1248</text:p>
              </table:table-cell>
              <table:table-cell office:value-type="float" office:value="0.00249399993699626">
                <text:p>0.00249399993699626</text:p>
              </table:table-cell>
              <table:table-cell office:value-type="float" office:value="-1.79999995231628">
                <text:p>-1.79999995231628</text:p>
              </table:table-cell>
              <table:table-cell office:value-type="float" office:value="-20">
                <text:p>-20</text:p>
              </table:table-cell>
            </table:table-row>
            <table:table-row>
              <table:table-cell office:value-type="string">
                <text:p>1249</text:p>
              </table:table-cell>
              <table:table-cell office:value-type="float" office:value="0.00249599993694574">
                <text:p>0.00249599993694574</text:p>
              </table:table-cell>
              <table:table-cell office:value-type="float" office:value="-1.39999997615814">
                <text:p>-1.39999997615814</text:p>
              </table:table-cell>
              <table:table-cell office:value-type="float" office:value="-20">
                <text:p>-20</text:p>
              </table:table-cell>
            </table:table-row>
            <table:table-row>
              <table:table-cell office:value-type="string">
                <text:p>1250</text:p>
              </table:table-cell>
              <table:table-cell office:value-type="float" office:value="0.00249799993689521">
                <text:p>0.00249799993689521</text:p>
              </table:table-cell>
              <table:table-cell office:value-type="float" office:value="-0.800000011920929">
                <text:p>-0.800000011920929</text:p>
              </table:table-cell>
              <table:table-cell office:value-type="float" office:value="-20">
                <text:p>-20</text:p>
              </table:table-cell>
            </table:table-row>
            <table:table-row>
              <table:table-cell office:value-type="string">
                <text:p>1251</text:p>
              </table:table-cell>
              <table:table-cell office:value-type="float" office:value="0.00249999993684469">
                <text:p>0.00249999993684469</text:p>
              </table:table-cell>
              <table:table-cell office:value-type="float" office:value="-0.400000005960465">
                <text:p>-0.400000005960465</text:p>
              </table:table-cell>
              <table:table-cell office:value-type="float" office:value="-20">
                <text:p>-20</text:p>
              </table:table-cell>
            </table:table-row>
            <table:table-row>
              <table:table-cell office:value-type="string">
                <text:p>1252</text:p>
              </table:table-cell>
              <table:table-cell office:value-type="float" office:value="0.00250199993679416">
                <text:p>0.00250199993679416</text:p>
              </table:table-cell>
              <table:table-cell office:value-type="float" office:value="0">
                <text:p>0</text:p>
              </table:table-cell>
              <table:table-cell office:value-type="float" office:value="-20">
                <text:p>-20</text:p>
              </table:table-cell>
            </table:table-row>
            <table:table-row>
              <table:table-cell office:value-type="string">
                <text:p>1253</text:p>
              </table:table-cell>
              <table:table-cell office:value-type="float" office:value="0.00250399993674364">
                <text:p>0.00250399993674364</text:p>
              </table:table-cell>
              <table:table-cell office:value-type="float" office:value="0.200000002980232">
                <text:p>0.200000002980232</text:p>
              </table:table-cell>
              <table:table-cell office:value-type="float" office:value="-20">
                <text:p>-20</text:p>
              </table:table-cell>
            </table:table-row>
            <table:table-row>
              <table:table-cell office:value-type="string">
                <text:p>1254</text:p>
              </table:table-cell>
              <table:table-cell office:value-type="float" office:value="0.00250599993669312">
                <text:p>0.00250599993669312</text:p>
              </table:table-cell>
              <table:table-cell office:value-type="float" office:value="0.600000023841858">
                <text:p>0.600000023841858</text:p>
              </table:table-cell>
              <table:table-cell office:value-type="float" office:value="-20">
                <text:p>-20</text:p>
              </table:table-cell>
            </table:table-row>
            <table:table-row>
              <table:table-cell office:value-type="string">
                <text:p>1255</text:p>
              </table:table-cell>
              <table:table-cell office:value-type="float" office:value="0.00250799993664259">
                <text:p>0.00250799993664259</text:p>
              </table:table-cell>
              <table:table-cell office:value-type="float" office:value="1">
                <text:p>1</text:p>
              </table:table-cell>
              <table:table-cell office:value-type="float" office:value="-20">
                <text:p>-20</text:p>
              </table:table-cell>
            </table:table-row>
            <table:table-row>
              <table:table-cell office:value-type="string">
                <text:p>1256</text:p>
              </table:table-cell>
              <table:table-cell office:value-type="float" office:value="0.00250999993659207">
                <text:p>0.00250999993659207</text:p>
              </table:table-cell>
              <table:table-cell office:value-type="float" office:value="1.20000004768372">
                <text:p>1.20000004768372</text:p>
              </table:table-cell>
              <table:table-cell office:value-type="float" office:value="-20">
                <text:p>-20</text:p>
              </table:table-cell>
            </table:table-row>
            <table:table-row>
              <table:table-cell office:value-type="string">
                <text:p>1257</text:p>
              </table:table-cell>
              <table:table-cell office:value-type="float" office:value="0.00251199993654154">
                <text:p>0.00251199993654154</text:p>
              </table:table-cell>
              <table:table-cell office:value-type="float" office:value="1.60000002384186">
                <text:p>1.60000002384186</text:p>
              </table:table-cell>
              <table:table-cell office:value-type="float" office:value="-20">
                <text:p>-20</text:p>
              </table:table-cell>
            </table:table-row>
            <table:table-row>
              <table:table-cell office:value-type="string">
                <text:p>1258</text:p>
              </table:table-cell>
              <table:table-cell office:value-type="float" office:value="0.00251399993649102">
                <text:p>0.00251399993649102</text:p>
              </table:table-cell>
              <table:table-cell office:value-type="float" office:value="2.20000004768372">
                <text:p>2.20000004768372</text:p>
              </table:table-cell>
              <table:table-cell office:value-type="float" office:value="-20">
                <text:p>-20</text:p>
              </table:table-cell>
            </table:table-row>
            <table:table-row>
              <table:table-cell office:value-type="string">
                <text:p>1259</text:p>
              </table:table-cell>
              <table:table-cell office:value-type="float" office:value="0.00251599993644049">
                <text:p>0.00251599993644049</text:p>
              </table:table-cell>
              <table:table-cell office:value-type="float" office:value="2.40000009536743">
                <text:p>2.40000009536743</text:p>
              </table:table-cell>
              <table:table-cell office:value-type="float" office:value="-20">
                <text:p>-20</text:p>
              </table:table-cell>
            </table:table-row>
            <table:table-row>
              <table:table-cell office:value-type="string">
                <text:p>1260</text:p>
              </table:table-cell>
              <table:table-cell office:value-type="float" office:value="0.00251799993638997">
                <text:p>0.00251799993638997</text:p>
              </table:table-cell>
              <table:table-cell office:value-type="float" office:value="2.59999990463257">
                <text:p>2.59999990463257</text:p>
              </table:table-cell>
              <table:table-cell office:value-type="float" office:value="-20">
                <text:p>-20</text:p>
              </table:table-cell>
            </table:table-row>
            <table:table-row>
              <table:table-cell office:value-type="string">
                <text:p>1261</text:p>
              </table:table-cell>
              <table:table-cell office:value-type="float" office:value="0.00251999993633945">
                <text:p>0.00251999993633945</text:p>
              </table:table-cell>
              <table:table-cell office:value-type="float" office:value="3">
                <text:p>3</text:p>
              </table:table-cell>
              <table:table-cell office:value-type="float" office:value="-20">
                <text:p>-20</text:p>
              </table:table-cell>
            </table:table-row>
            <table:table-row>
              <table:table-cell office:value-type="string">
                <text:p>1262</text:p>
              </table:table-cell>
              <table:table-cell office:value-type="float" office:value="0.00252199993628892">
                <text:p>0.00252199993628892</text:p>
              </table:table-cell>
              <table:table-cell office:value-type="float" office:value="3.40000009536743">
                <text:p>3.40000009536743</text:p>
              </table:table-cell>
              <table:table-cell office:value-type="float" office:value="-20">
                <text:p>-20</text:p>
              </table:table-cell>
            </table:table-row>
            <table:table-row>
              <table:table-cell office:value-type="string">
                <text:p>1263</text:p>
              </table:table-cell>
              <table:table-cell office:value-type="float" office:value="0.0025239999362384">
                <text:p>0.0025239999362384</text:p>
              </table:table-cell>
              <table:table-cell office:value-type="float" office:value="4">
                <text:p>4</text:p>
              </table:table-cell>
              <table:table-cell office:value-type="float" office:value="-20">
                <text:p>-20</text:p>
              </table:table-cell>
            </table:table-row>
            <table:table-row>
              <table:table-cell office:value-type="string">
                <text:p>1264</text:p>
              </table:table-cell>
              <table:table-cell office:value-type="float" office:value="0.00252599993618787">
                <text:p>0.00252599993618787</text:p>
              </table:table-cell>
              <table:table-cell office:value-type="float" office:value="4.19999980926514">
                <text:p>4.19999980926514</text:p>
              </table:table-cell>
              <table:table-cell office:value-type="float" office:value="-20">
                <text:p>-20</text:p>
              </table:table-cell>
            </table:table-row>
            <table:table-row>
              <table:table-cell office:value-type="string">
                <text:p>1265</text:p>
              </table:table-cell>
              <table:table-cell office:value-type="float" office:value="0.00252799993613735">
                <text:p>0.00252799993613735</text:p>
              </table:table-cell>
              <table:table-cell office:value-type="float" office:value="4.59999990463257">
                <text:p>4.59999990463257</text:p>
              </table:table-cell>
              <table:table-cell office:value-type="float" office:value="-20">
                <text:p>-20</text:p>
              </table:table-cell>
            </table:table-row>
            <table:table-row>
              <table:table-cell office:value-type="string">
                <text:p>1266</text:p>
              </table:table-cell>
              <table:table-cell office:value-type="float" office:value="0.00252999993608682">
                <text:p>0.00252999993608682</text:p>
              </table:table-cell>
              <table:table-cell office:value-type="float" office:value="5">
                <text:p>5</text:p>
              </table:table-cell>
              <table:table-cell office:value-type="float" office:value="-20">
                <text:p>-20</text:p>
              </table:table-cell>
            </table:table-row>
            <table:table-row>
              <table:table-cell office:value-type="string">
                <text:p>1267</text:p>
              </table:table-cell>
              <table:table-cell office:value-type="float" office:value="0.0025319999360363">
                <text:p>0.0025319999360363</text:p>
              </table:table-cell>
              <table:table-cell office:value-type="float" office:value="5.40000009536743">
                <text:p>5.40000009536743</text:p>
              </table:table-cell>
              <table:table-cell office:value-type="float" office:value="-20">
                <text:p>-20</text:p>
              </table:table-cell>
            </table:table-row>
            <table:table-row>
              <table:table-cell office:value-type="string">
                <text:p>1268</text:p>
              </table:table-cell>
              <table:table-cell office:value-type="float" office:value="0.00253399993598578">
                <text:p>0.00253399993598578</text:p>
              </table:table-cell>
              <table:table-cell office:value-type="float" office:value="5.80000019073486">
                <text:p>5.80000019073486</text:p>
              </table:table-cell>
              <table:table-cell office:value-type="float" office:value="-20">
                <text:p>-20</text:p>
              </table:table-cell>
            </table:table-row>
            <table:table-row>
              <table:table-cell office:value-type="string">
                <text:p>1269</text:p>
              </table:table-cell>
              <table:table-cell office:value-type="float" office:value="0.00253599993593525">
                <text:p>0.00253599993593525</text:p>
              </table:table-cell>
              <table:table-cell office:value-type="float" office:value="6">
                <text:p>6</text:p>
              </table:table-cell>
              <table:table-cell office:value-type="float" office:value="-20">
                <text:p>-20</text:p>
              </table:table-cell>
            </table:table-row>
            <table:table-row>
              <table:table-cell office:value-type="string">
                <text:p>1270</text:p>
              </table:table-cell>
              <table:table-cell office:value-type="float" office:value="0.00253799993588473">
                <text:p>0.00253799993588473</text:p>
              </table:table-cell>
              <table:table-cell office:value-type="float" office:value="6.59999990463257">
                <text:p>6.59999990463257</text:p>
              </table:table-cell>
              <table:table-cell office:value-type="float" office:value="-20">
                <text:p>-20</text:p>
              </table:table-cell>
            </table:table-row>
            <table:table-row>
              <table:table-cell office:value-type="string">
                <text:p>1271</text:p>
              </table:table-cell>
              <table:table-cell office:value-type="float" office:value="0.0025399999358342">
                <text:p>0.0025399999358342</text:p>
              </table:table-cell>
              <table:table-cell office:value-type="float" office:value="7.19999980926514">
                <text:p>7.19999980926514</text:p>
              </table:table-cell>
              <table:table-cell office:value-type="float" office:value="-20">
                <text:p>-20</text:p>
              </table:table-cell>
            </table:table-row>
            <table:table-row>
              <table:table-cell office:value-type="string">
                <text:p>1272</text:p>
              </table:table-cell>
              <table:table-cell office:value-type="float" office:value="0.00254199993578368">
                <text:p>0.00254199993578368</text:p>
              </table:table-cell>
              <table:table-cell office:value-type="float" office:value="7.19999980926514">
                <text:p>7.19999980926514</text:p>
              </table:table-cell>
              <table:table-cell office:value-type="float" office:value="-20">
                <text:p>-20</text:p>
              </table:table-cell>
            </table:table-row>
            <table:table-row>
              <table:table-cell office:value-type="string">
                <text:p>1273</text:p>
              </table:table-cell>
              <table:table-cell office:value-type="float" office:value="0.00254399993573315">
                <text:p>0.00254399993573315</text:p>
              </table:table-cell>
              <table:table-cell office:value-type="float" office:value="7.59999990463257">
                <text:p>7.59999990463257</text:p>
              </table:table-cell>
              <table:table-cell office:value-type="float" office:value="-20">
                <text:p>-20</text:p>
              </table:table-cell>
            </table:table-row>
            <table:table-row>
              <table:table-cell office:value-type="string">
                <text:p>1274</text:p>
              </table:table-cell>
              <table:table-cell office:value-type="float" office:value="0.00254599993568263">
                <text:p>0.00254599993568263</text:p>
              </table:table-cell>
              <table:table-cell office:value-type="float" office:value="8">
                <text:p>8</text:p>
              </table:table-cell>
              <table:table-cell office:value-type="float" office:value="-20">
                <text:p>-20</text:p>
              </table:table-cell>
            </table:table-row>
            <table:table-row>
              <table:table-cell office:value-type="string">
                <text:p>1275</text:p>
              </table:table-cell>
              <table:table-cell office:value-type="float" office:value="0.00254799993563211">
                <text:p>0.00254799993563211</text:p>
              </table:table-cell>
              <table:table-cell office:value-type="float" office:value="8.60000038146973">
                <text:p>8.60000038146973</text:p>
              </table:table-cell>
              <table:table-cell office:value-type="float" office:value="-20">
                <text:p>-20</text:p>
              </table:table-cell>
            </table:table-row>
            <table:table-row>
              <table:table-cell office:value-type="string">
                <text:p>1276</text:p>
              </table:table-cell>
              <table:table-cell office:value-type="float" office:value="0.00254999993558158">
                <text:p>0.00254999993558158</text:p>
              </table:table-cell>
              <table:table-cell office:value-type="float" office:value="8.80000019073486">
                <text:p>8.80000019073486</text:p>
              </table:table-cell>
              <table:table-cell office:value-type="float" office:value="-20">
                <text:p>-20</text:p>
              </table:table-cell>
            </table:table-row>
            <table:table-row>
              <table:table-cell office:value-type="string">
                <text:p>1277</text:p>
              </table:table-cell>
              <table:table-cell office:value-type="float" office:value="0.00255199993553106">
                <text:p>0.00255199993553106</text:p>
              </table:table-cell>
              <table:table-cell office:value-type="float" office:value="9">
                <text:p>9</text:p>
              </table:table-cell>
              <table:table-cell office:value-type="float" office:value="-20">
                <text:p>-20</text:p>
              </table:table-cell>
            </table:table-row>
            <table:table-row>
              <table:table-cell office:value-type="string">
                <text:p>1278</text:p>
              </table:table-cell>
              <table:table-cell office:value-type="float" office:value="0.00255399993548053">
                <text:p>0.00255399993548053</text:p>
              </table:table-cell>
              <table:table-cell office:value-type="float" office:value="9.39999961853027">
                <text:p>9.39999961853027</text:p>
              </table:table-cell>
              <table:table-cell office:value-type="float" office:value="-20">
                <text:p>-20</text:p>
              </table:table-cell>
            </table:table-row>
            <table:table-row>
              <table:table-cell office:value-type="string">
                <text:p>1279</text:p>
              </table:table-cell>
              <table:table-cell office:value-type="float" office:value="0.00255599993543001">
                <text:p>0.00255599993543001</text:p>
              </table:table-cell>
              <table:table-cell office:value-type="float" office:value="9.80000019073486">
                <text:p>9.80000019073486</text:p>
              </table:table-cell>
              <table:table-cell office:value-type="float" office:value="-20">
                <text:p>-20</text:p>
              </table:table-cell>
            </table:table-row>
            <table:table-row>
              <table:table-cell office:value-type="string">
                <text:p>1280</text:p>
              </table:table-cell>
              <table:table-cell office:value-type="float" office:value="0.00255799993537949">
                <text:p>0.00255799993537949</text:p>
              </table:table-cell>
              <table:table-cell office:value-type="float" office:value="10.1999998092651">
                <text:p>10.1999998092651</text:p>
              </table:table-cell>
              <table:table-cell office:value-type="float" office:value="-20">
                <text:p>-20</text:p>
              </table:table-cell>
            </table:table-row>
            <table:table-row>
              <table:table-cell office:value-type="string">
                <text:p>1281</text:p>
              </table:table-cell>
              <table:table-cell office:value-type="float" office:value="0.00255999993532896">
                <text:p>0.00255999993532896</text:p>
              </table:table-cell>
              <table:table-cell office:value-type="float" office:value="10.6000003814697">
                <text:p>10.6000003814697</text:p>
              </table:table-cell>
              <table:table-cell office:value-type="float" office:value="-20">
                <text:p>-20</text:p>
              </table:table-cell>
            </table:table-row>
            <table:table-row>
              <table:table-cell office:value-type="string">
                <text:p>1282</text:p>
              </table:table-cell>
              <table:table-cell office:value-type="float" office:value="0.00256199993527844">
                <text:p>0.00256199993527844</text:p>
              </table:table-cell>
              <table:table-cell office:value-type="float" office:value="10.8000001907349">
                <text:p>10.8000001907349</text:p>
              </table:table-cell>
              <table:table-cell office:value-type="float" office:value="-20">
                <text:p>-20</text:p>
              </table:table-cell>
            </table:table-row>
            <table:table-row>
              <table:table-cell office:value-type="string">
                <text:p>1283</text:p>
              </table:table-cell>
              <table:table-cell office:value-type="float" office:value="0.00256399993522791">
                <text:p>0.00256399993522791</text:p>
              </table:table-cell>
              <table:table-cell office:value-type="float" office:value="11.3999996185303">
                <text:p>11.3999996185303</text:p>
              </table:table-cell>
              <table:table-cell office:value-type="float" office:value="-20">
                <text:p>-20</text:p>
              </table:table-cell>
            </table:table-row>
            <table:table-row>
              <table:table-cell office:value-type="string">
                <text:p>1284</text:p>
              </table:table-cell>
              <table:table-cell office:value-type="float" office:value="0.00256599993517739">
                <text:p>0.00256599993517739</text:p>
              </table:table-cell>
              <table:table-cell office:value-type="float" office:value="11.6000003814697">
                <text:p>11.6000003814697</text:p>
              </table:table-cell>
              <table:table-cell office:value-type="float" office:value="-20">
                <text:p>-20</text:p>
              </table:table-cell>
            </table:table-row>
            <table:table-row>
              <table:table-cell office:value-type="string">
                <text:p>1285</text:p>
              </table:table-cell>
              <table:table-cell office:value-type="float" office:value="0.00256799993512686">
                <text:p>0.00256799993512686</text:p>
              </table:table-cell>
              <table:table-cell office:value-type="float" office:value="12">
                <text:p>12</text:p>
              </table:table-cell>
              <table:table-cell office:value-type="float" office:value="-20">
                <text:p>-20</text:p>
              </table:table-cell>
            </table:table-row>
            <table:table-row>
              <table:table-cell office:value-type="string">
                <text:p>1286</text:p>
              </table:table-cell>
              <table:table-cell office:value-type="float" office:value="0.00256999993507634">
                <text:p>0.00256999993507634</text:p>
              </table:table-cell>
              <table:table-cell office:value-type="float" office:value="12.3999996185303">
                <text:p>12.3999996185303</text:p>
              </table:table-cell>
              <table:table-cell office:value-type="float" office:value="-20">
                <text:p>-20</text:p>
              </table:table-cell>
            </table:table-row>
            <table:table-row>
              <table:table-cell office:value-type="string">
                <text:p>1287</text:p>
              </table:table-cell>
              <table:table-cell office:value-type="float" office:value="0.00257199993502581">
                <text:p>0.00257199993502581</text:p>
              </table:table-cell>
              <table:table-cell office:value-type="float" office:value="13">
                <text:p>13</text:p>
              </table:table-cell>
              <table:table-cell office:value-type="float" office:value="-20">
                <text:p>-20</text:p>
              </table:table-cell>
            </table:table-row>
            <table:table-row>
              <table:table-cell office:value-type="string">
                <text:p>1288</text:p>
              </table:table-cell>
              <table:table-cell office:value-type="float" office:value="0.00257399993497529">
                <text:p>0.00257399993497529</text:p>
              </table:table-cell>
              <table:table-cell office:value-type="float" office:value="13.3999996185303">
                <text:p>13.3999996185303</text:p>
              </table:table-cell>
              <table:table-cell office:value-type="float" office:value="-20">
                <text:p>-20</text:p>
              </table:table-cell>
            </table:table-row>
            <table:table-row>
              <table:table-cell office:value-type="string">
                <text:p>1289</text:p>
              </table:table-cell>
              <table:table-cell office:value-type="float" office:value="0.00257599993492477">
                <text:p>0.00257599993492477</text:p>
              </table:table-cell>
              <table:table-cell office:value-type="float" office:value="13.6000003814697">
                <text:p>13.6000003814697</text:p>
              </table:table-cell>
              <table:table-cell office:value-type="float" office:value="-20">
                <text:p>-20</text:p>
              </table:table-cell>
            </table:table-row>
            <table:table-row>
              <table:table-cell office:value-type="string">
                <text:p>1290</text:p>
              </table:table-cell>
              <table:table-cell office:value-type="float" office:value="0.00257799993487424">
                <text:p>0.00257799993487424</text:p>
              </table:table-cell>
              <table:table-cell office:value-type="float" office:value="13.8000001907349">
                <text:p>13.8000001907349</text:p>
              </table:table-cell>
              <table:table-cell office:value-type="float" office:value="-20">
                <text:p>-20</text:p>
              </table:table-cell>
            </table:table-row>
            <table:table-row>
              <table:table-cell office:value-type="string">
                <text:p>1291</text:p>
              </table:table-cell>
              <table:table-cell office:value-type="float" office:value="0.00257999993482372">
                <text:p>0.00257999993482372</text:p>
              </table:table-cell>
              <table:table-cell office:value-type="float" office:value="14.3999996185303">
                <text:p>14.3999996185303</text:p>
              </table:table-cell>
              <table:table-cell office:value-type="float" office:value="-20">
                <text:p>-20</text:p>
              </table:table-cell>
            </table:table-row>
            <table:table-row>
              <table:table-cell office:value-type="string">
                <text:p>1292</text:p>
              </table:table-cell>
              <table:table-cell office:value-type="float" office:value="0.00258199993477319">
                <text:p>0.00258199993477319</text:p>
              </table:table-cell>
              <table:table-cell office:value-type="float" office:value="14.6000003814697">
                <text:p>14.6000003814697</text:p>
              </table:table-cell>
              <table:table-cell office:value-type="float" office:value="-20">
                <text:p>-20</text:p>
              </table:table-cell>
            </table:table-row>
            <table:table-row>
              <table:table-cell office:value-type="string">
                <text:p>1293</text:p>
              </table:table-cell>
              <table:table-cell office:value-type="float" office:value="0.00258399993472267">
                <text:p>0.00258399993472267</text:p>
              </table:table-cell>
              <table:table-cell office:value-type="float" office:value="14.8000001907349">
                <text:p>14.8000001907349</text:p>
              </table:table-cell>
              <table:table-cell office:value-type="float" office:value="-20">
                <text:p>-20</text:p>
              </table:table-cell>
            </table:table-row>
            <table:table-row>
              <table:table-cell office:value-type="string">
                <text:p>1294</text:p>
              </table:table-cell>
              <table:table-cell office:value-type="float" office:value="0.00258599993467215">
                <text:p>0.00258599993467215</text:p>
              </table:table-cell>
              <table:table-cell office:value-type="float" office:value="15.3999996185303">
                <text:p>15.3999996185303</text:p>
              </table:table-cell>
              <table:table-cell office:value-type="float" office:value="-20">
                <text:p>-20</text:p>
              </table:table-cell>
            </table:table-row>
            <table:table-row>
              <table:table-cell office:value-type="string">
                <text:p>1295</text:p>
              </table:table-cell>
              <table:table-cell office:value-type="float" office:value="0.00258799993462162">
                <text:p>0.00258799993462162</text:p>
              </table:table-cell>
              <table:table-cell office:value-type="float" office:value="15.8000001907349">
                <text:p>15.8000001907349</text:p>
              </table:table-cell>
              <table:table-cell office:value-type="float" office:value="-20">
                <text:p>-20</text:p>
              </table:table-cell>
            </table:table-row>
            <table:table-row>
              <table:table-cell office:value-type="string">
                <text:p>1296</text:p>
              </table:table-cell>
              <table:table-cell office:value-type="float" office:value="0.0025899999345711">
                <text:p>0.0025899999345711</text:p>
              </table:table-cell>
              <table:table-cell office:value-type="float" office:value="16.2000007629395">
                <text:p>16.2000007629395</text:p>
              </table:table-cell>
              <table:table-cell office:value-type="float" office:value="-20">
                <text:p>-20</text:p>
              </table:table-cell>
            </table:table-row>
            <table:table-row>
              <table:table-cell office:value-type="string">
                <text:p>1297</text:p>
              </table:table-cell>
              <table:table-cell office:value-type="float" office:value="0.00259199993452057">
                <text:p>0.00259199993452057</text:p>
              </table:table-cell>
              <table:table-cell office:value-type="float" office:value="16.3999996185303">
                <text:p>16.3999996185303</text:p>
              </table:table-cell>
              <table:table-cell office:value-type="float" office:value="-20">
                <text:p>-20</text:p>
              </table:table-cell>
            </table:table-row>
            <table:table-row>
              <table:table-cell office:value-type="string">
                <text:p>1298</text:p>
              </table:table-cell>
              <table:table-cell office:value-type="float" office:value="0.00259399993447005">
                <text:p>0.00259399993447005</text:p>
              </table:table-cell>
              <table:table-cell office:value-type="float" office:value="16.7999992370605">
                <text:p>16.7999992370605</text:p>
              </table:table-cell>
              <table:table-cell office:value-type="float" office:value="-20">
                <text:p>-20</text:p>
              </table:table-cell>
            </table:table-row>
            <table:table-row>
              <table:table-cell office:value-type="string">
                <text:p>1299</text:p>
              </table:table-cell>
              <table:table-cell office:value-type="float" office:value="0.00259599993441952">
                <text:p>0.00259599993441952</text:p>
              </table:table-cell>
              <table:table-cell office:value-type="float" office:value="17.2000007629395">
                <text:p>17.2000007629395</text:p>
              </table:table-cell>
              <table:table-cell office:value-type="float" office:value="-20">
                <text:p>-20</text:p>
              </table:table-cell>
            </table:table-row>
            <table:table-row>
              <table:table-cell office:value-type="string">
                <text:p>1300</text:p>
              </table:table-cell>
              <table:table-cell office:value-type="float" office:value="0.002597999934369">
                <text:p>0.002597999934369</text:p>
              </table:table-cell>
              <table:table-cell office:value-type="float" office:value="17.6000003814697">
                <text:p>17.6000003814697</text:p>
              </table:table-cell>
              <table:table-cell office:value-type="float" office:value="-20">
                <text:p>-20</text:p>
              </table:table-cell>
            </table:table-row>
            <table:table-row>
              <table:table-cell office:value-type="string">
                <text:p>1301</text:p>
              </table:table-cell>
              <table:table-cell office:value-type="float" office:value="0.00259999993431848">
                <text:p>0.00259999993431848</text:p>
              </table:table-cell>
              <table:table-cell office:value-type="float" office:value="17.7999992370605">
                <text:p>17.7999992370605</text:p>
              </table:table-cell>
              <table:table-cell office:value-type="float" office:value="-20">
                <text:p>-20</text:p>
              </table:table-cell>
            </table:table-row>
            <table:table-row>
              <table:table-cell office:value-type="string">
                <text:p>1302</text:p>
              </table:table-cell>
              <table:table-cell office:value-type="float" office:value="0.00260199993426795">
                <text:p>0.00260199993426795</text:p>
              </table:table-cell>
              <table:table-cell office:value-type="float" office:value="18.3999996185303">
                <text:p>18.3999996185303</text:p>
              </table:table-cell>
              <table:table-cell office:value-type="float" office:value="-20">
                <text:p>-20</text:p>
              </table:table-cell>
            </table:table-row>
            <table:table-row>
              <table:table-cell office:value-type="string">
                <text:p>1303</text:p>
              </table:table-cell>
              <table:table-cell office:value-type="float" office:value="0.00260399993421743">
                <text:p>0.00260399993421743</text:p>
              </table:table-cell>
              <table:table-cell office:value-type="float" office:value="18.6000003814697">
                <text:p>18.6000003814697</text:p>
              </table:table-cell>
              <table:table-cell office:value-type="float" office:value="-20">
                <text:p>-20</text:p>
              </table:table-cell>
            </table:table-row>
            <table:table-row>
              <table:table-cell office:value-type="string">
                <text:p>1304</text:p>
              </table:table-cell>
              <table:table-cell office:value-type="float" office:value="0.0026059999341669">
                <text:p>0.0026059999341669</text:p>
              </table:table-cell>
              <table:table-cell office:value-type="float" office:value="19">
                <text:p>19</text:p>
              </table:table-cell>
              <table:table-cell office:value-type="float" office:value="-20">
                <text:p>-20</text:p>
              </table:table-cell>
            </table:table-row>
            <table:table-row>
              <table:table-cell office:value-type="string">
                <text:p>1305</text:p>
              </table:table-cell>
              <table:table-cell office:value-type="float" office:value="0.00260799993411638">
                <text:p>0.00260799993411638</text:p>
              </table:table-cell>
              <table:table-cell office:value-type="float" office:value="19.3999996185303">
                <text:p>19.3999996185303</text:p>
              </table:table-cell>
              <table:table-cell office:value-type="float" office:value="-20">
                <text:p>-20</text:p>
              </table:table-cell>
            </table:table-row>
            <table:table-row>
              <table:table-cell office:value-type="string">
                <text:p>1306</text:p>
              </table:table-cell>
              <table:table-cell office:value-type="float" office:value="0.00260999993406585">
                <text:p>0.00260999993406585</text:p>
              </table:table-cell>
              <table:table-cell office:value-type="float" office:value="19.7999992370605">
                <text:p>19.7999992370605</text:p>
              </table:table-cell>
              <table:table-cell office:value-type="float" office:value="-20">
                <text:p>-20</text:p>
              </table:table-cell>
            </table:table-row>
            <table:table-row>
              <table:table-cell office:value-type="string">
                <text:p>1307</text:p>
              </table:table-cell>
              <table:table-cell office:value-type="float" office:value="0.00261199993401533">
                <text:p>0.00261199993401533</text:p>
              </table:table-cell>
              <table:table-cell office:value-type="float" office:value="20.3999996185303">
                <text:p>20.3999996185303</text:p>
              </table:table-cell>
              <table:table-cell office:value-type="float" office:value="-20">
                <text:p>-20</text:p>
              </table:table-cell>
            </table:table-row>
            <table:table-row>
              <table:table-cell office:value-type="string">
                <text:p>1308</text:p>
              </table:table-cell>
              <table:table-cell office:value-type="float" office:value="0.00261399993396481">
                <text:p>0.00261399993396481</text:p>
              </table:table-cell>
              <table:table-cell office:value-type="float" office:value="20.6000003814697">
                <text:p>20.6000003814697</text:p>
              </table:table-cell>
              <table:table-cell office:value-type="float" office:value="-20">
                <text:p>-20</text:p>
              </table:table-cell>
            </table:table-row>
            <table:table-row>
              <table:table-cell office:value-type="string">
                <text:p>1309</text:p>
              </table:table-cell>
              <table:table-cell office:value-type="float" office:value="0.00261599993391428">
                <text:p>0.00261599993391428</text:p>
              </table:table-cell>
              <table:table-cell office:value-type="float" office:value="20.7999992370605">
                <text:p>20.7999992370605</text:p>
              </table:table-cell>
              <table:table-cell office:value-type="float" office:value="-20">
                <text:p>-20</text:p>
              </table:table-cell>
            </table:table-row>
            <table:table-row>
              <table:table-cell office:value-type="string">
                <text:p>1310</text:p>
              </table:table-cell>
              <table:table-cell office:value-type="float" office:value="0.00261799993386376">
                <text:p>0.00261799993386376</text:p>
              </table:table-cell>
              <table:table-cell office:value-type="float" office:value="21.2000007629395">
                <text:p>21.2000007629395</text:p>
              </table:table-cell>
              <table:table-cell office:value-type="float" office:value="-20">
                <text:p>-20</text:p>
              </table:table-cell>
            </table:table-row>
            <table:table-row>
              <table:table-cell office:value-type="string">
                <text:p>1311</text:p>
              </table:table-cell>
              <table:table-cell office:value-type="float" office:value="0.00261999993381323">
                <text:p>0.00261999993381323</text:p>
              </table:table-cell>
              <table:table-cell office:value-type="float" office:value="21.7999992370605">
                <text:p>21.7999992370605</text:p>
              </table:table-cell>
              <table:table-cell office:value-type="float" office:value="-20">
                <text:p>-20</text:p>
              </table:table-cell>
            </table:table-row>
            <table:table-row>
              <table:table-cell office:value-type="string">
                <text:p>1312</text:p>
              </table:table-cell>
              <table:table-cell office:value-type="float" office:value="0.00262199993376271">
                <text:p>0.00262199993376271</text:p>
              </table:table-cell>
              <table:table-cell office:value-type="float" office:value="22">
                <text:p>22</text:p>
              </table:table-cell>
              <table:table-cell office:value-type="float" office:value="-20">
                <text:p>-20</text:p>
              </table:table-cell>
            </table:table-row>
            <table:table-row>
              <table:table-cell office:value-type="string">
                <text:p>1313</text:p>
              </table:table-cell>
              <table:table-cell office:value-type="float" office:value="0.00262399993371218">
                <text:p>0.00262399993371218</text:p>
              </table:table-cell>
              <table:table-cell office:value-type="float" office:value="22.3999996185303">
                <text:p>22.3999996185303</text:p>
              </table:table-cell>
              <table:table-cell office:value-type="float" office:value="-20">
                <text:p>-20</text:p>
              </table:table-cell>
            </table:table-row>
            <table:table-row>
              <table:table-cell office:value-type="string">
                <text:p>1314</text:p>
              </table:table-cell>
              <table:table-cell office:value-type="float" office:value="0.00262599993366166">
                <text:p>0.00262599993366166</text:p>
              </table:table-cell>
              <table:table-cell office:value-type="float" office:value="23">
                <text:p>23</text:p>
              </table:table-cell>
              <table:table-cell office:value-type="float" office:value="-20">
                <text:p>-20</text:p>
              </table:table-cell>
            </table:table-row>
            <table:table-row>
              <table:table-cell office:value-type="string">
                <text:p>1315</text:p>
              </table:table-cell>
              <table:table-cell office:value-type="float" office:value="0.00262799993361114">
                <text:p>0.00262799993361114</text:p>
              </table:table-cell>
              <table:table-cell office:value-type="float" office:value="23.2000007629395">
                <text:p>23.2000007629395</text:p>
              </table:table-cell>
              <table:table-cell office:value-type="float" office:value="-20">
                <text:p>-20</text:p>
              </table:table-cell>
            </table:table-row>
            <table:table-row>
              <table:table-cell office:value-type="string">
                <text:p>1316</text:p>
              </table:table-cell>
              <table:table-cell office:value-type="float" office:value="0.00262999993356061">
                <text:p>0.00262999993356061</text:p>
              </table:table-cell>
              <table:table-cell office:value-type="float" office:value="23.3999996185303">
                <text:p>23.3999996185303</text:p>
              </table:table-cell>
              <table:table-cell office:value-type="float" office:value="-20">
                <text:p>-20</text:p>
              </table:table-cell>
            </table:table-row>
            <table:table-row>
              <table:table-cell office:value-type="string">
                <text:p>1317</text:p>
              </table:table-cell>
              <table:table-cell office:value-type="float" office:value="0.00263199993351009">
                <text:p>0.00263199993351009</text:p>
              </table:table-cell>
              <table:table-cell office:value-type="float" office:value="23.7999992370605">
                <text:p>23.7999992370605</text:p>
              </table:table-cell>
              <table:table-cell office:value-type="float" office:value="-20">
                <text:p>-20</text:p>
              </table:table-cell>
            </table:table-row>
            <table:table-row>
              <table:table-cell office:value-type="string">
                <text:p>1318</text:p>
              </table:table-cell>
              <table:table-cell office:value-type="float" office:value="0.00263399993345956">
                <text:p>0.00263399993345956</text:p>
              </table:table-cell>
              <table:table-cell office:value-type="float" office:value="24.2000007629395">
                <text:p>24.2000007629395</text:p>
              </table:table-cell>
              <table:table-cell office:value-type="float" office:value="-20">
                <text:p>-20</text:p>
              </table:table-cell>
            </table:table-row>
            <table:table-row>
              <table:table-cell office:value-type="string">
                <text:p>1319</text:p>
              </table:table-cell>
              <table:table-cell office:value-type="float" office:value="0.00263599993340904">
                <text:p>0.00263599993340904</text:p>
              </table:table-cell>
              <table:table-cell office:value-type="float" office:value="24.7999992370605">
                <text:p>24.7999992370605</text:p>
              </table:table-cell>
              <table:table-cell office:value-type="float" office:value="-20">
                <text:p>-20</text:p>
              </table:table-cell>
            </table:table-row>
            <table:table-row>
              <table:table-cell office:value-type="string">
                <text:p>1320</text:p>
              </table:table-cell>
              <table:table-cell office:value-type="float" office:value="0.00263799993335852">
                <text:p>0.00263799993335852</text:p>
              </table:table-cell>
              <table:table-cell office:value-type="float" office:value="25">
                <text:p>25</text:p>
              </table:table-cell>
              <table:table-cell office:value-type="float" office:value="-20">
                <text:p>-20</text:p>
              </table:table-cell>
            </table:table-row>
            <table:table-row>
              <table:table-cell office:value-type="string">
                <text:p>1321</text:p>
              </table:table-cell>
              <table:table-cell office:value-type="float" office:value="0.00263999993330799">
                <text:p>0.00263999993330799</text:p>
              </table:table-cell>
              <table:table-cell office:value-type="float" office:value="25.6000003814697">
                <text:p>25.6000003814697</text:p>
              </table:table-cell>
              <table:table-cell office:value-type="float" office:value="-20">
                <text:p>-20</text:p>
              </table:table-cell>
            </table:table-row>
            <table:table-row>
              <table:table-cell office:value-type="string">
                <text:p>1322</text:p>
              </table:table-cell>
              <table:table-cell office:value-type="float" office:value="0.00264199993325747">
                <text:p>0.00264199993325747</text:p>
              </table:table-cell>
              <table:table-cell office:value-type="float" office:value="25.6000003814697">
                <text:p>25.6000003814697</text:p>
              </table:table-cell>
              <table:table-cell office:value-type="float" office:value="-20">
                <text:p>-20</text:p>
              </table:table-cell>
            </table:table-row>
            <table:table-row>
              <table:table-cell office:value-type="string">
                <text:p>1323</text:p>
              </table:table-cell>
              <table:table-cell office:value-type="float" office:value="0.00264399993320694">
                <text:p>0.00264399993320694</text:p>
              </table:table-cell>
              <table:table-cell office:value-type="float" office:value="26.2000007629395">
                <text:p>26.2000007629395</text:p>
              </table:table-cell>
              <table:table-cell office:value-type="float" office:value="-20">
                <text:p>-20</text:p>
              </table:table-cell>
            </table:table-row>
            <table:table-row>
              <table:table-cell office:value-type="string">
                <text:p>1324</text:p>
              </table:table-cell>
              <table:table-cell office:value-type="float" office:value="0.00264599993315642">
                <text:p>0.00264599993315642</text:p>
              </table:table-cell>
              <table:table-cell office:value-type="float" office:value="26.6000003814697">
                <text:p>26.6000003814697</text:p>
              </table:table-cell>
              <table:table-cell office:value-type="float" office:value="-20">
                <text:p>-20</text:p>
              </table:table-cell>
            </table:table-row>
            <table:table-row>
              <table:table-cell office:value-type="string">
                <text:p>1325</text:p>
              </table:table-cell>
              <table:table-cell office:value-type="float" office:value="0.00264799993310589">
                <text:p>0.00264799993310589</text:p>
              </table:table-cell>
              <table:table-cell office:value-type="float" office:value="26.7999992370605">
                <text:p>26.7999992370605</text:p>
              </table:table-cell>
              <table:table-cell office:value-type="float" office:value="-20">
                <text:p>-20</text:p>
              </table:table-cell>
            </table:table-row>
            <table:table-row>
              <table:table-cell office:value-type="string">
                <text:p>1326</text:p>
              </table:table-cell>
              <table:table-cell office:value-type="float" office:value="0.00264999993305537">
                <text:p>0.00264999993305537</text:p>
              </table:table-cell>
              <table:table-cell office:value-type="float" office:value="27.2000007629395">
                <text:p>27.2000007629395</text:p>
              </table:table-cell>
              <table:table-cell office:value-type="float" office:value="-20">
                <text:p>-20</text:p>
              </table:table-cell>
            </table:table-row>
            <table:table-row>
              <table:table-cell office:value-type="string">
                <text:p>1327</text:p>
              </table:table-cell>
              <table:table-cell office:value-type="float" office:value="0.00265199993300484">
                <text:p>0.00265199993300484</text:p>
              </table:table-cell>
              <table:table-cell office:value-type="float" office:value="27.6000003814697">
                <text:p>27.6000003814697</text:p>
              </table:table-cell>
              <table:table-cell office:value-type="float" office:value="-20">
                <text:p>-20</text:p>
              </table:table-cell>
            </table:table-row>
            <table:table-row>
              <table:table-cell office:value-type="string">
                <text:p>1328</text:p>
              </table:table-cell>
              <table:table-cell office:value-type="float" office:value="0.00265399993295432">
                <text:p>0.00265399993295432</text:p>
              </table:table-cell>
              <table:table-cell office:value-type="float" office:value="28">
                <text:p>28</text:p>
              </table:table-cell>
              <table:table-cell office:value-type="float" office:value="-20">
                <text:p>-20</text:p>
              </table:table-cell>
            </table:table-row>
            <table:table-row>
              <table:table-cell office:value-type="string">
                <text:p>1329</text:p>
              </table:table-cell>
              <table:table-cell office:value-type="float" office:value="0.0026559999329038">
                <text:p>0.0026559999329038</text:p>
              </table:table-cell>
              <table:table-cell office:value-type="float" office:value="28.3999996185303">
                <text:p>28.3999996185303</text:p>
              </table:table-cell>
              <table:table-cell office:value-type="float" office:value="-20">
                <text:p>-20</text:p>
              </table:table-cell>
            </table:table-row>
            <table:table-row>
              <table:table-cell office:value-type="string">
                <text:p>1330</text:p>
              </table:table-cell>
              <table:table-cell office:value-type="float" office:value="0.00265799993285327">
                <text:p>0.00265799993285327</text:p>
              </table:table-cell>
              <table:table-cell office:value-type="float" office:value="29">
                <text:p>29</text:p>
              </table:table-cell>
              <table:table-cell office:value-type="float" office:value="-20">
                <text:p>-20</text:p>
              </table:table-cell>
            </table:table-row>
            <table:table-row>
              <table:table-cell office:value-type="string">
                <text:p>1331</text:p>
              </table:table-cell>
              <table:table-cell office:value-type="float" office:value="0.00265999993280275">
                <text:p>0.00265999993280275</text:p>
              </table:table-cell>
              <table:table-cell office:value-type="float" office:value="29.2000007629395">
                <text:p>29.2000007629395</text:p>
              </table:table-cell>
              <table:table-cell office:value-type="float" office:value="-20">
                <text:p>-20</text:p>
              </table:table-cell>
            </table:table-row>
            <table:table-row>
              <table:table-cell office:value-type="string">
                <text:p>1332</text:p>
              </table:table-cell>
              <table:table-cell office:value-type="float" office:value="0.00266199993275222">
                <text:p>0.00266199993275222</text:p>
              </table:table-cell>
              <table:table-cell office:value-type="float" office:value="29.6000003814697">
                <text:p>29.6000003814697</text:p>
              </table:table-cell>
              <table:table-cell office:value-type="float" office:value="-20">
                <text:p>-20</text:p>
              </table:table-cell>
            </table:table-row>
            <table:table-row>
              <table:table-cell office:value-type="string">
                <text:p>1333</text:p>
              </table:table-cell>
              <table:table-cell office:value-type="float" office:value="0.0026639999327017">
                <text:p>0.0026639999327017</text:p>
              </table:table-cell>
              <table:table-cell office:value-type="float" office:value="29.7999992370605">
                <text:p>29.7999992370605</text:p>
              </table:table-cell>
              <table:table-cell office:value-type="float" office:value="-20">
                <text:p>-20</text:p>
              </table:table-cell>
            </table:table-row>
            <table:table-row>
              <table:table-cell office:value-type="string">
                <text:p>1334</text:p>
              </table:table-cell>
              <table:table-cell office:value-type="float" office:value="0.00266599993265118">
                <text:p>0.00266599993265118</text:p>
              </table:table-cell>
              <table:table-cell office:value-type="float" office:value="30.2000007629395">
                <text:p>30.2000007629395</text:p>
              </table:table-cell>
              <table:table-cell office:value-type="float" office:value="-20">
                <text:p>-20</text:p>
              </table:table-cell>
            </table:table-row>
            <table:table-row>
              <table:table-cell office:value-type="string">
                <text:p>1335</text:p>
              </table:table-cell>
              <table:table-cell office:value-type="float" office:value="0.00266799993260065">
                <text:p>0.00266799993260065</text:p>
              </table:table-cell>
              <table:table-cell office:value-type="float" office:value="30.6000003814697">
                <text:p>30.6000003814697</text:p>
              </table:table-cell>
              <table:table-cell office:value-type="float" office:value="-20">
                <text:p>-20</text:p>
              </table:table-cell>
            </table:table-row>
            <table:table-row>
              <table:table-cell office:value-type="string">
                <text:p>1336</text:p>
              </table:table-cell>
              <table:table-cell office:value-type="float" office:value="0.00266999993255013">
                <text:p>0.00266999993255013</text:p>
              </table:table-cell>
              <table:table-cell office:value-type="float" office:value="31">
                <text:p>31</text:p>
              </table:table-cell>
              <table:table-cell office:value-type="float" office:value="-20">
                <text:p>-20</text:p>
              </table:table-cell>
            </table:table-row>
            <table:table-row>
              <table:table-cell office:value-type="string">
                <text:p>1337</text:p>
              </table:table-cell>
              <table:table-cell office:value-type="float" office:value="0.0026719999324996">
                <text:p>0.0026719999324996</text:p>
              </table:table-cell>
              <table:table-cell office:value-type="float" office:value="31.3999996185303">
                <text:p>31.3999996185303</text:p>
              </table:table-cell>
              <table:table-cell office:value-type="float" office:value="-20">
                <text:p>-20</text:p>
              </table:table-cell>
            </table:table-row>
            <table:table-row>
              <table:table-cell office:value-type="string">
                <text:p>1338</text:p>
              </table:table-cell>
              <table:table-cell office:value-type="float" office:value="0.00267399993244908">
                <text:p>0.00267399993244908</text:p>
              </table:table-cell>
              <table:table-cell office:value-type="float" office:value="32">
                <text:p>32</text:p>
              </table:table-cell>
              <table:table-cell office:value-type="float" office:value="-20">
                <text:p>-20</text:p>
              </table:table-cell>
            </table:table-row>
            <table:table-row>
              <table:table-cell office:value-type="string">
                <text:p>1339</text:p>
              </table:table-cell>
              <table:table-cell office:value-type="float" office:value="0.00267599993239855">
                <text:p>0.00267599993239855</text:p>
              </table:table-cell>
              <table:table-cell office:value-type="float" office:value="32.2000007629395">
                <text:p>32.2000007629395</text:p>
              </table:table-cell>
              <table:table-cell office:value-type="float" office:value="-20">
                <text:p>-20</text:p>
              </table:table-cell>
            </table:table-row>
            <table:table-row>
              <table:table-cell office:value-type="string">
                <text:p>1340</text:p>
              </table:table-cell>
              <table:table-cell office:value-type="float" office:value="0.00267799993234803">
                <text:p>0.00267799993234803</text:p>
              </table:table-cell>
              <table:table-cell office:value-type="float" office:value="32.4000015258789">
                <text:p>32.4000015258789</text:p>
              </table:table-cell>
              <table:table-cell office:value-type="float" office:value="-20">
                <text:p>-20</text:p>
              </table:table-cell>
            </table:table-row>
            <table:table-row>
              <table:table-cell office:value-type="string">
                <text:p>1341</text:p>
              </table:table-cell>
              <table:table-cell office:value-type="float" office:value="0.00267999993229751">
                <text:p>0.00267999993229751</text:p>
              </table:table-cell>
              <table:table-cell office:value-type="float" office:value="32.5999984741211">
                <text:p>32.5999984741211</text:p>
              </table:table-cell>
              <table:table-cell office:value-type="float" office:value="-20">
                <text:p>-20</text:p>
              </table:table-cell>
            </table:table-row>
            <table:table-row>
              <table:table-cell office:value-type="string">
                <text:p>1342</text:p>
              </table:table-cell>
              <table:table-cell office:value-type="float" office:value="0.00268199993224698">
                <text:p>0.00268199993224698</text:p>
              </table:table-cell>
              <table:table-cell office:value-type="float" office:value="33">
                <text:p>33</text:p>
              </table:table-cell>
              <table:table-cell office:value-type="float" office:value="-20">
                <text:p>-20</text:p>
              </table:table-cell>
            </table:table-row>
            <table:table-row>
              <table:table-cell office:value-type="string">
                <text:p>1343</text:p>
              </table:table-cell>
              <table:table-cell office:value-type="float" office:value="0.00268399993219646">
                <text:p>0.00268399993219646</text:p>
              </table:table-cell>
              <table:table-cell office:value-type="float" office:value="33.5999984741211">
                <text:p>33.5999984741211</text:p>
              </table:table-cell>
              <table:table-cell office:value-type="float" office:value="-20">
                <text:p>-20</text:p>
              </table:table-cell>
            </table:table-row>
            <table:table-row>
              <table:table-cell office:value-type="string">
                <text:p>1344</text:p>
              </table:table-cell>
              <table:table-cell office:value-type="float" office:value="0.00268599993214593">
                <text:p>0.00268599993214593</text:p>
              </table:table-cell>
              <table:table-cell office:value-type="float" office:value="34">
                <text:p>34</text:p>
              </table:table-cell>
              <table:table-cell office:value-type="float" office:value="-20">
                <text:p>-20</text:p>
              </table:table-cell>
            </table:table-row>
            <table:table-row>
              <table:table-cell office:value-type="string">
                <text:p>1345</text:p>
              </table:table-cell>
              <table:table-cell office:value-type="float" office:value="0.00268799993209541">
                <text:p>0.00268799993209541</text:p>
              </table:table-cell>
              <table:table-cell office:value-type="float" office:value="34.4000015258789">
                <text:p>34.4000015258789</text:p>
              </table:table-cell>
              <table:table-cell office:value-type="float" office:value="-20">
                <text:p>-20</text:p>
              </table:table-cell>
            </table:table-row>
            <table:table-row>
              <table:table-cell office:value-type="string">
                <text:p>1346</text:p>
              </table:table-cell>
              <table:table-cell office:value-type="float" office:value="0.00268999993204488">
                <text:p>0.00268999993204488</text:p>
              </table:table-cell>
              <table:table-cell office:value-type="float" office:value="34.7999992370606">
                <text:p>34.7999992370606</text:p>
              </table:table-cell>
              <table:table-cell office:value-type="float" office:value="-20">
                <text:p>-20</text:p>
              </table:table-cell>
            </table:table-row>
            <table:table-row>
              <table:table-cell office:value-type="string">
                <text:p>1347</text:p>
              </table:table-cell>
              <table:table-cell office:value-type="float" office:value="0.00269199993199436">
                <text:p>0.00269199993199436</text:p>
              </table:table-cell>
              <table:table-cell office:value-type="float" office:value="35">
                <text:p>35</text:p>
              </table:table-cell>
              <table:table-cell office:value-type="float" office:value="-20">
                <text:p>-20</text:p>
              </table:table-cell>
            </table:table-row>
            <table:table-row>
              <table:table-cell office:value-type="string">
                <text:p>1348</text:p>
              </table:table-cell>
              <table:table-cell office:value-type="float" office:value="0.00269399993194384">
                <text:p>0.00269399993194384</text:p>
              </table:table-cell>
              <table:table-cell office:value-type="float" office:value="35.4000015258789">
                <text:p>35.4000015258789</text:p>
              </table:table-cell>
              <table:table-cell office:value-type="float" office:value="-20">
                <text:p>-20</text:p>
              </table:table-cell>
            </table:table-row>
            <table:table-row>
              <table:table-cell office:value-type="string">
                <text:p>1349</text:p>
              </table:table-cell>
              <table:table-cell office:value-type="float" office:value="0.00269599993189331">
                <text:p>0.00269599993189331</text:p>
              </table:table-cell>
              <table:table-cell office:value-type="float" office:value="35.7999992370606">
                <text:p>35.7999992370606</text:p>
              </table:table-cell>
              <table:table-cell office:value-type="float" office:value="-20">
                <text:p>-20</text:p>
              </table:table-cell>
            </table:table-row>
            <table:table-row>
              <table:table-cell office:value-type="string">
                <text:p>1350</text:p>
              </table:table-cell>
              <table:table-cell office:value-type="float" office:value="0.00269799993184279">
                <text:p>0.00269799993184279</text:p>
              </table:table-cell>
              <table:table-cell office:value-type="float" office:value="36.2000007629395">
                <text:p>36.2000007629395</text:p>
              </table:table-cell>
              <table:table-cell office:value-type="float" office:value="-20">
                <text:p>-20</text:p>
              </table:table-cell>
            </table:table-row>
            <table:table-row>
              <table:table-cell office:value-type="string">
                <text:p>1351</text:p>
              </table:table-cell>
              <table:table-cell office:value-type="float" office:value="0.00269999993179226">
                <text:p>0.00269999993179226</text:p>
              </table:table-cell>
              <table:table-cell office:value-type="float" office:value="36.5999984741211">
                <text:p>36.5999984741211</text:p>
              </table:table-cell>
              <table:table-cell office:value-type="float" office:value="-20">
                <text:p>-20</text:p>
              </table:table-cell>
            </table:table-row>
            <table:table-row>
              <table:table-cell office:value-type="string">
                <text:p>1352</text:p>
              </table:table-cell>
              <table:table-cell office:value-type="float" office:value="0.00270199993174174">
                <text:p>0.00270199993174174</text:p>
              </table:table-cell>
              <table:table-cell office:value-type="float" office:value="37">
                <text:p>37</text:p>
              </table:table-cell>
              <table:table-cell office:value-type="float" office:value="-20">
                <text:p>-20</text:p>
              </table:table-cell>
            </table:table-row>
            <table:table-row>
              <table:table-cell office:value-type="string">
                <text:p>1353</text:p>
              </table:table-cell>
              <table:table-cell office:value-type="float" office:value="0.00270399993169121">
                <text:p>0.00270399993169121</text:p>
              </table:table-cell>
              <table:table-cell office:value-type="float" office:value="37.2000007629395">
                <text:p>37.2000007629395</text:p>
              </table:table-cell>
              <table:table-cell office:value-type="float" office:value="-20">
                <text:p>-20</text:p>
              </table:table-cell>
            </table:table-row>
            <table:table-row>
              <table:table-cell office:value-type="string">
                <text:p>1354</text:p>
              </table:table-cell>
              <table:table-cell office:value-type="float" office:value="0.00270599993164069">
                <text:p>0.00270599993164069</text:p>
              </table:table-cell>
              <table:table-cell office:value-type="float" office:value="37.4000015258789">
                <text:p>37.4000015258789</text:p>
              </table:table-cell>
              <table:table-cell office:value-type="float" office:value="-20">
                <text:p>-20</text:p>
              </table:table-cell>
            </table:table-row>
            <table:table-row>
              <table:table-cell office:value-type="string">
                <text:p>1355</text:p>
              </table:table-cell>
              <table:table-cell office:value-type="float" office:value="0.00270799993159017">
                <text:p>0.00270799993159017</text:p>
              </table:table-cell>
              <table:table-cell office:value-type="float" office:value="38">
                <text:p>38</text:p>
              </table:table-cell>
              <table:table-cell office:value-type="float" office:value="-20">
                <text:p>-20</text:p>
              </table:table-cell>
            </table:table-row>
            <table:table-row>
              <table:table-cell office:value-type="string">
                <text:p>1356</text:p>
              </table:table-cell>
              <table:table-cell office:value-type="float" office:value="0.00270999993153964">
                <text:p>0.00270999993153964</text:p>
              </table:table-cell>
              <table:table-cell office:value-type="float" office:value="38.4000015258789">
                <text:p>38.4000015258789</text:p>
              </table:table-cell>
              <table:table-cell office:value-type="float" office:value="-20">
                <text:p>-20</text:p>
              </table:table-cell>
            </table:table-row>
            <table:table-row>
              <table:table-cell office:value-type="string">
                <text:p>1357</text:p>
              </table:table-cell>
              <table:table-cell office:value-type="float" office:value="0.00271199993148912">
                <text:p>0.00271199993148912</text:p>
              </table:table-cell>
              <table:table-cell office:value-type="float" office:value="38.5999984741211">
                <text:p>38.5999984741211</text:p>
              </table:table-cell>
              <table:table-cell office:value-type="float" office:value="-20">
                <text:p>-20</text:p>
              </table:table-cell>
            </table:table-row>
            <table:table-row>
              <table:table-cell office:value-type="string">
                <text:p>1358</text:p>
              </table:table-cell>
              <table:table-cell office:value-type="float" office:value="0.00271399993143859">
                <text:p>0.00271399993143859</text:p>
              </table:table-cell>
              <table:table-cell office:value-type="float" office:value="39">
                <text:p>39</text:p>
              </table:table-cell>
              <table:table-cell office:value-type="float" office:value="-20">
                <text:p>-20</text:p>
              </table:table-cell>
            </table:table-row>
            <table:table-row>
              <table:table-cell office:value-type="string">
                <text:p>1359</text:p>
              </table:table-cell>
              <table:table-cell office:value-type="float" office:value="0.00271599993138807">
                <text:p>0.00271599993138807</text:p>
              </table:table-cell>
              <table:table-cell office:value-type="float" office:value="39.4000015258789">
                <text:p>39.4000015258789</text:p>
              </table:table-cell>
              <table:table-cell office:value-type="float" office:value="-20">
                <text:p>-20</text:p>
              </table:table-cell>
            </table:table-row>
            <table:table-row>
              <table:table-cell office:value-type="string">
                <text:p>1360</text:p>
              </table:table-cell>
              <table:table-cell office:value-type="float" office:value="0.00271799993133755">
                <text:p>0.00271799993133755</text:p>
              </table:table-cell>
              <table:table-cell office:value-type="float" office:value="39.7999992370606">
                <text:p>39.7999992370606</text:p>
              </table:table-cell>
              <table:table-cell office:value-type="float" office:value="-20">
                <text:p>-20</text:p>
              </table:table-cell>
            </table:table-row>
            <table:table-row>
              <table:table-cell office:value-type="string">
                <text:p>1361</text:p>
              </table:table-cell>
              <table:table-cell office:value-type="float" office:value="0.00271999993128702">
                <text:p>0.00271999993128702</text:p>
              </table:table-cell>
              <table:table-cell office:value-type="float" office:value="40.2000007629395">
                <text:p>40.2000007629395</text:p>
              </table:table-cell>
              <table:table-cell office:value-type="float" office:value="-20">
                <text:p>-20</text:p>
              </table:table-cell>
            </table:table-row>
            <table:table-row>
              <table:table-cell office:value-type="string">
                <text:p>1362</text:p>
              </table:table-cell>
              <table:table-cell office:value-type="float" office:value="0.0027219999312365">
                <text:p>0.0027219999312365</text:p>
              </table:table-cell>
              <table:table-cell office:value-type="float" office:value="40.2000007629395">
                <text:p>40.2000007629395</text:p>
              </table:table-cell>
              <table:table-cell office:value-type="float" office:value="-20">
                <text:p>-20</text:p>
              </table:table-cell>
            </table:table-row>
            <table:table-row>
              <table:table-cell office:value-type="string">
                <text:p>1363</text:p>
              </table:table-cell>
              <table:table-cell office:value-type="float" office:value="0.00272399993118597">
                <text:p>0.00272399993118597</text:p>
              </table:table-cell>
              <table:table-cell office:value-type="float" office:value="40.2000007629395">
                <text:p>40.2000007629395</text:p>
              </table:table-cell>
              <table:table-cell office:value-type="float" office:value="-20">
                <text:p>-20</text:p>
              </table:table-cell>
            </table:table-row>
            <table:table-row>
              <table:table-cell office:value-type="string">
                <text:p>1364</text:p>
              </table:table-cell>
              <table:table-cell office:value-type="float" office:value="0.00272599993113545">
                <text:p>0.00272599993113545</text:p>
              </table:table-cell>
              <table:table-cell office:value-type="float" office:value="40.2000007629395">
                <text:p>40.2000007629395</text:p>
              </table:table-cell>
              <table:table-cell office:value-type="float" office:value="-20">
                <text:p>-20</text:p>
              </table:table-cell>
            </table:table-row>
            <table:table-row>
              <table:table-cell office:value-type="string">
                <text:p>1365</text:p>
              </table:table-cell>
              <table:table-cell office:value-type="float" office:value="0.00272799993108492">
                <text:p>0.00272799993108492</text:p>
              </table:table-cell>
              <table:table-cell office:value-type="float" office:value="40.2000007629395">
                <text:p>40.2000007629395</text:p>
              </table:table-cell>
              <table:table-cell office:value-type="float" office:value="-20">
                <text:p>-20</text:p>
              </table:table-cell>
            </table:table-row>
            <table:table-row>
              <table:table-cell office:value-type="string">
                <text:p>1366</text:p>
              </table:table-cell>
              <table:table-cell office:value-type="float" office:value="0.0027299999310344">
                <text:p>0.0027299999310344</text:p>
              </table:table-cell>
              <table:table-cell office:value-type="float" office:value="40.2000007629395">
                <text:p>40.2000007629395</text:p>
              </table:table-cell>
              <table:table-cell office:value-type="float" office:value="-20">
                <text:p>-20</text:p>
              </table:table-cell>
            </table:table-row>
            <table:table-row>
              <table:table-cell office:value-type="string">
                <text:p>1367</text:p>
              </table:table-cell>
              <table:table-cell office:value-type="float" office:value="0.00273199993098387">
                <text:p>0.00273199993098387</text:p>
              </table:table-cell>
              <table:table-cell office:value-type="float" office:value="40.2000007629395">
                <text:p>40.2000007629395</text:p>
              </table:table-cell>
              <table:table-cell office:value-type="float" office:value="-20">
                <text:p>-20</text:p>
              </table:table-cell>
            </table:table-row>
            <table:table-row>
              <table:table-cell office:value-type="string">
                <text:p>1368</text:p>
              </table:table-cell>
              <table:table-cell office:value-type="float" office:value="0.00273399993093335">
                <text:p>0.00273399993093335</text:p>
              </table:table-cell>
              <table:table-cell office:value-type="float" office:value="40.2000007629395">
                <text:p>40.2000007629395</text:p>
              </table:table-cell>
              <table:table-cell office:value-type="float" office:value="-20">
                <text:p>-20</text:p>
              </table:table-cell>
            </table:table-row>
            <table:table-row>
              <table:table-cell office:value-type="string">
                <text:p>1369</text:p>
              </table:table-cell>
              <table:table-cell office:value-type="float" office:value="0.00273599993088283">
                <text:p>0.00273599993088283</text:p>
              </table:table-cell>
              <table:table-cell office:value-type="float" office:value="40.2000007629395">
                <text:p>40.2000007629395</text:p>
              </table:table-cell>
              <table:table-cell office:value-type="float" office:value="-20">
                <text:p>-20</text:p>
              </table:table-cell>
            </table:table-row>
            <table:table-row>
              <table:table-cell office:value-type="string">
                <text:p>1370</text:p>
              </table:table-cell>
              <table:table-cell office:value-type="float" office:value="0.0027379999308323">
                <text:p>0.0027379999308323</text:p>
              </table:table-cell>
              <table:table-cell office:value-type="float" office:value="40.2000007629395">
                <text:p>40.2000007629395</text:p>
              </table:table-cell>
              <table:table-cell office:value-type="float" office:value="-20">
                <text:p>-20</text:p>
              </table:table-cell>
            </table:table-row>
            <table:table-row>
              <table:table-cell office:value-type="string">
                <text:p>1371</text:p>
              </table:table-cell>
              <table:table-cell office:value-type="float" office:value="0.00273999993078178">
                <text:p>0.00273999993078178</text:p>
              </table:table-cell>
              <table:table-cell office:value-type="float" office:value="40.2000007629395">
                <text:p>40.2000007629395</text:p>
              </table:table-cell>
              <table:table-cell office:value-type="float" office:value="-20">
                <text:p>-20</text:p>
              </table:table-cell>
            </table:table-row>
            <table:table-row>
              <table:table-cell office:value-type="string">
                <text:p>1372</text:p>
              </table:table-cell>
              <table:table-cell office:value-type="float" office:value="0.00274199993073125">
                <text:p>0.00274199993073125</text:p>
              </table:table-cell>
              <table:table-cell office:value-type="float" office:value="40.2000007629395">
                <text:p>40.2000007629395</text:p>
              </table:table-cell>
              <table:table-cell office:value-type="float" office:value="-20">
                <text:p>-20</text:p>
              </table:table-cell>
            </table:table-row>
            <table:table-row>
              <table:table-cell office:value-type="string">
                <text:p>1373</text:p>
              </table:table-cell>
              <table:table-cell office:value-type="float" office:value="0.00274399993068073">
                <text:p>0.00274399993068073</text:p>
              </table:table-cell>
              <table:table-cell office:value-type="float" office:value="40.2000007629395">
                <text:p>40.2000007629395</text:p>
              </table:table-cell>
              <table:table-cell office:value-type="float" office:value="-20">
                <text:p>-20</text:p>
              </table:table-cell>
            </table:table-row>
            <table:table-row>
              <table:table-cell office:value-type="string">
                <text:p>1374</text:p>
              </table:table-cell>
              <table:table-cell office:value-type="float" office:value="0.00274599993063021">
                <text:p>0.00274599993063021</text:p>
              </table:table-cell>
              <table:table-cell office:value-type="float" office:value="40.2000007629395">
                <text:p>40.2000007629395</text:p>
              </table:table-cell>
              <table:table-cell office:value-type="float" office:value="-20">
                <text:p>-20</text:p>
              </table:table-cell>
            </table:table-row>
            <table:table-row>
              <table:table-cell office:value-type="string">
                <text:p>1375</text:p>
              </table:table-cell>
              <table:table-cell office:value-type="float" office:value="0.00274799993057968">
                <text:p>0.00274799993057968</text:p>
              </table:table-cell>
              <table:table-cell office:value-type="float" office:value="40.2000007629395">
                <text:p>40.2000007629395</text:p>
              </table:table-cell>
              <table:table-cell office:value-type="float" office:value="-20">
                <text:p>-20</text:p>
              </table:table-cell>
            </table:table-row>
            <table:table-row>
              <table:table-cell office:value-type="string">
                <text:p>1376</text:p>
              </table:table-cell>
              <table:table-cell office:value-type="float" office:value="0.00274999993052916">
                <text:p>0.00274999993052916</text:p>
              </table:table-cell>
              <table:table-cell office:value-type="float" office:value="40.2000007629395">
                <text:p>40.2000007629395</text:p>
              </table:table-cell>
              <table:table-cell office:value-type="float" office:value="-20">
                <text:p>-20</text:p>
              </table:table-cell>
            </table:table-row>
            <table:table-row>
              <table:table-cell office:value-type="string">
                <text:p>1377</text:p>
              </table:table-cell>
              <table:table-cell office:value-type="float" office:value="0.00275199993047863">
                <text:p>0.00275199993047863</text:p>
              </table:table-cell>
              <table:table-cell office:value-type="float" office:value="40.2000007629395">
                <text:p>40.2000007629395</text:p>
              </table:table-cell>
              <table:table-cell office:value-type="float" office:value="-20">
                <text:p>-20</text:p>
              </table:table-cell>
            </table:table-row>
            <table:table-row>
              <table:table-cell office:value-type="string">
                <text:p>1378</text:p>
              </table:table-cell>
              <table:table-cell office:value-type="float" office:value="0.00275399993042811">
                <text:p>0.00275399993042811</text:p>
              </table:table-cell>
              <table:table-cell office:value-type="float" office:value="40.2000007629395">
                <text:p>40.2000007629395</text:p>
              </table:table-cell>
              <table:table-cell office:value-type="float" office:value="-20">
                <text:p>-20</text:p>
              </table:table-cell>
            </table:table-row>
            <table:table-row>
              <table:table-cell office:value-type="string">
                <text:p>1379</text:p>
              </table:table-cell>
              <table:table-cell office:value-type="float" office:value="0.00275599993037758">
                <text:p>0.00275599993037758</text:p>
              </table:table-cell>
              <table:table-cell office:value-type="float" office:value="40.2000007629395">
                <text:p>40.2000007629395</text:p>
              </table:table-cell>
              <table:table-cell office:value-type="float" office:value="-20">
                <text:p>-20</text:p>
              </table:table-cell>
            </table:table-row>
            <table:table-row>
              <table:table-cell office:value-type="string">
                <text:p>1380</text:p>
              </table:table-cell>
              <table:table-cell office:value-type="float" office:value="0.00275799993032706">
                <text:p>0.00275799993032706</text:p>
              </table:table-cell>
              <table:table-cell office:value-type="float" office:value="40.2000007629395">
                <text:p>40.2000007629395</text:p>
              </table:table-cell>
              <table:table-cell office:value-type="float" office:value="-20">
                <text:p>-20</text:p>
              </table:table-cell>
            </table:table-row>
            <table:table-row>
              <table:table-cell office:value-type="string">
                <text:p>1381</text:p>
              </table:table-cell>
              <table:table-cell office:value-type="float" office:value="0.00275999993027654">
                <text:p>0.00275999993027654</text:p>
              </table:table-cell>
              <table:table-cell office:value-type="float" office:value="40.2000007629395">
                <text:p>40.2000007629395</text:p>
              </table:table-cell>
              <table:table-cell office:value-type="float" office:value="-20">
                <text:p>-20</text:p>
              </table:table-cell>
            </table:table-row>
            <table:table-row>
              <table:table-cell office:value-type="string">
                <text:p>1382</text:p>
              </table:table-cell>
              <table:table-cell office:value-type="float" office:value="0.00276199993022601">
                <text:p>0.00276199993022601</text:p>
              </table:table-cell>
              <table:table-cell office:value-type="float" office:value="40.2000007629395">
                <text:p>40.2000007629395</text:p>
              </table:table-cell>
              <table:table-cell office:value-type="float" office:value="-20">
                <text:p>-20</text:p>
              </table:table-cell>
            </table:table-row>
            <table:table-row>
              <table:table-cell office:value-type="string">
                <text:p>1383</text:p>
              </table:table-cell>
              <table:table-cell office:value-type="float" office:value="0.00276399993017549">
                <text:p>0.00276399993017549</text:p>
              </table:table-cell>
              <table:table-cell office:value-type="float" office:value="40.2000007629395">
                <text:p>40.2000007629395</text:p>
              </table:table-cell>
              <table:table-cell office:value-type="float" office:value="-20">
                <text:p>-20</text:p>
              </table:table-cell>
            </table:table-row>
            <table:table-row>
              <table:table-cell office:value-type="string">
                <text:p>1384</text:p>
              </table:table-cell>
              <table:table-cell office:value-type="float" office:value="0.00276599993012496">
                <text:p>0.00276599993012496</text:p>
              </table:table-cell>
              <table:table-cell office:value-type="float" office:value="40.2000007629395">
                <text:p>40.2000007629395</text:p>
              </table:table-cell>
              <table:table-cell office:value-type="float" office:value="-20">
                <text:p>-20</text:p>
              </table:table-cell>
            </table:table-row>
            <table:table-row>
              <table:table-cell office:value-type="string">
                <text:p>1385</text:p>
              </table:table-cell>
              <table:table-cell office:value-type="float" office:value="0.00276799993007444">
                <text:p>0.00276799993007444</text:p>
              </table:table-cell>
              <table:table-cell office:value-type="float" office:value="40.2000007629395">
                <text:p>40.2000007629395</text:p>
              </table:table-cell>
              <table:table-cell office:value-type="float" office:value="-20">
                <text:p>-20</text:p>
              </table:table-cell>
            </table:table-row>
            <table:table-row>
              <table:table-cell office:value-type="string">
                <text:p>1386</text:p>
              </table:table-cell>
              <table:table-cell office:value-type="float" office:value="0.00276999993002391">
                <text:p>0.00276999993002391</text:p>
              </table:table-cell>
              <table:table-cell office:value-type="float" office:value="40.2000007629395">
                <text:p>40.2000007629395</text:p>
              </table:table-cell>
              <table:table-cell office:value-type="float" office:value="-20">
                <text:p>-20</text:p>
              </table:table-cell>
            </table:table-row>
            <table:table-row>
              <table:table-cell office:value-type="string">
                <text:p>1387</text:p>
              </table:table-cell>
              <table:table-cell office:value-type="float" office:value="0.00277199992997339">
                <text:p>0.00277199992997339</text:p>
              </table:table-cell>
              <table:table-cell office:value-type="float" office:value="40.2000007629395">
                <text:p>40.2000007629395</text:p>
              </table:table-cell>
              <table:table-cell office:value-type="float" office:value="-20">
                <text:p>-20</text:p>
              </table:table-cell>
            </table:table-row>
            <table:table-row>
              <table:table-cell office:value-type="string">
                <text:p>1388</text:p>
              </table:table-cell>
              <table:table-cell office:value-type="float" office:value="0.00277399992992287">
                <text:p>0.00277399992992287</text:p>
              </table:table-cell>
              <table:table-cell office:value-type="float" office:value="40.2000007629395">
                <text:p>40.2000007629395</text:p>
              </table:table-cell>
              <table:table-cell office:value-type="float" office:value="-20">
                <text:p>-20</text:p>
              </table:table-cell>
            </table:table-row>
            <table:table-row>
              <table:table-cell office:value-type="string">
                <text:p>1389</text:p>
              </table:table-cell>
              <table:table-cell office:value-type="float" office:value="0.00277599992987234">
                <text:p>0.00277599992987234</text:p>
              </table:table-cell>
              <table:table-cell office:value-type="float" office:value="40.2000007629395">
                <text:p>40.2000007629395</text:p>
              </table:table-cell>
              <table:table-cell office:value-type="float" office:value="-20">
                <text:p>-20</text:p>
              </table:table-cell>
            </table:table-row>
            <table:table-row>
              <table:table-cell office:value-type="string">
                <text:p>1390</text:p>
              </table:table-cell>
              <table:table-cell office:value-type="float" office:value="0.00277799992982182">
                <text:p>0.00277799992982182</text:p>
              </table:table-cell>
              <table:table-cell office:value-type="float" office:value="40.2000007629395">
                <text:p>40.2000007629395</text:p>
              </table:table-cell>
              <table:table-cell office:value-type="float" office:value="-20">
                <text:p>-20</text:p>
              </table:table-cell>
            </table:table-row>
            <table:table-row>
              <table:table-cell office:value-type="string">
                <text:p>1391</text:p>
              </table:table-cell>
              <table:table-cell office:value-type="float" office:value="0.00277999992977129">
                <text:p>0.00277999992977129</text:p>
              </table:table-cell>
              <table:table-cell office:value-type="float" office:value="40.2000007629395">
                <text:p>40.2000007629395</text:p>
              </table:table-cell>
              <table:table-cell office:value-type="float" office:value="-20">
                <text:p>-20</text:p>
              </table:table-cell>
            </table:table-row>
            <table:table-row>
              <table:table-cell office:value-type="string">
                <text:p>1392</text:p>
              </table:table-cell>
              <table:table-cell office:value-type="float" office:value="0.00278199992972077">
                <text:p>0.00278199992972077</text:p>
              </table:table-cell>
              <table:table-cell office:value-type="float" office:value="40.2000007629395">
                <text:p>40.2000007629395</text:p>
              </table:table-cell>
              <table:table-cell office:value-type="float" office:value="-20">
                <text:p>-20</text:p>
              </table:table-cell>
            </table:table-row>
            <table:table-row>
              <table:table-cell office:value-type="string">
                <text:p>1393</text:p>
              </table:table-cell>
              <table:table-cell office:value-type="float" office:value="0.00278399992967024">
                <text:p>0.00278399992967024</text:p>
              </table:table-cell>
              <table:table-cell office:value-type="float" office:value="40.2000007629395">
                <text:p>40.2000007629395</text:p>
              </table:table-cell>
              <table:table-cell office:value-type="float" office:value="-20">
                <text:p>-20</text:p>
              </table:table-cell>
            </table:table-row>
            <table:table-row>
              <table:table-cell office:value-type="string">
                <text:p>1394</text:p>
              </table:table-cell>
              <table:table-cell office:value-type="float" office:value="0.00278599992961972">
                <text:p>0.00278599992961972</text:p>
              </table:table-cell>
              <table:table-cell office:value-type="float" office:value="40">
                <text:p>40</text:p>
              </table:table-cell>
              <table:table-cell office:value-type="float" office:value="-20">
                <text:p>-20</text:p>
              </table:table-cell>
            </table:table-row>
            <table:table-row>
              <table:table-cell office:value-type="string">
                <text:p>1395</text:p>
              </table:table-cell>
              <table:table-cell office:value-type="float" office:value="0.0027879999295692">
                <text:p>0.0027879999295692</text:p>
              </table:table-cell>
              <table:table-cell office:value-type="float" office:value="39.4000015258789">
                <text:p>39.4000015258789</text:p>
              </table:table-cell>
              <table:table-cell office:value-type="float" office:value="-20">
                <text:p>-20</text:p>
              </table:table-cell>
            </table:table-row>
            <table:table-row>
              <table:table-cell office:value-type="string">
                <text:p>1396</text:p>
              </table:table-cell>
              <table:table-cell office:value-type="float" office:value="0.00278999992951867">
                <text:p>0.00278999992951867</text:p>
              </table:table-cell>
              <table:table-cell office:value-type="float" office:value="39.2000007629395">
                <text:p>39.2000007629395</text:p>
              </table:table-cell>
              <table:table-cell office:value-type="float" office:value="-20">
                <text:p>-20</text:p>
              </table:table-cell>
            </table:table-row>
            <table:table-row>
              <table:table-cell office:value-type="string">
                <text:p>1397</text:p>
              </table:table-cell>
              <table:table-cell office:value-type="float" office:value="0.00279199992946815">
                <text:p>0.00279199992946815</text:p>
              </table:table-cell>
              <table:table-cell office:value-type="float" office:value="38.7999992370606">
                <text:p>38.7999992370606</text:p>
              </table:table-cell>
              <table:table-cell office:value-type="float" office:value="-20">
                <text:p>-20</text:p>
              </table:table-cell>
            </table:table-row>
            <table:table-row>
              <table:table-cell office:value-type="string">
                <text:p>1398</text:p>
              </table:table-cell>
              <table:table-cell office:value-type="float" office:value="0.00279399992941762">
                <text:p>0.00279399992941762</text:p>
              </table:table-cell>
              <table:table-cell office:value-type="float" office:value="38.4000015258789">
                <text:p>38.4000015258789</text:p>
              </table:table-cell>
              <table:table-cell office:value-type="float" office:value="-20">
                <text:p>-20</text:p>
              </table:table-cell>
            </table:table-row>
            <table:table-row>
              <table:table-cell office:value-type="string">
                <text:p>1399</text:p>
              </table:table-cell>
              <table:table-cell office:value-type="float" office:value="0.0027959999293671">
                <text:p>0.0027959999293671</text:p>
              </table:table-cell>
              <table:table-cell office:value-type="float" office:value="37.7999992370606">
                <text:p>37.7999992370606</text:p>
              </table:table-cell>
              <table:table-cell office:value-type="float" office:value="-20">
                <text:p>-20</text:p>
              </table:table-cell>
            </table:table-row>
            <table:table-row>
              <table:table-cell office:value-type="string">
                <text:p>1400</text:p>
              </table:table-cell>
              <table:table-cell office:value-type="float" office:value="0.00279799992931658">
                <text:p>0.00279799992931658</text:p>
              </table:table-cell>
              <table:table-cell office:value-type="float" office:value="37.4000015258789">
                <text:p>37.4000015258789</text:p>
              </table:table-cell>
              <table:table-cell office:value-type="float" office:value="-20">
                <text:p>-20</text:p>
              </table:table-cell>
            </table:table-row>
            <table:table-row>
              <table:table-cell office:value-type="string">
                <text:p>1401</text:p>
              </table:table-cell>
              <table:table-cell office:value-type="float" office:value="0.00279999992926605">
                <text:p>0.00279999992926605</text:p>
              </table:table-cell>
              <table:table-cell office:value-type="float" office:value="37.2000007629395">
                <text:p>37.2000007629395</text:p>
              </table:table-cell>
              <table:table-cell office:value-type="float" office:value="-20">
                <text:p>-20</text:p>
              </table:table-cell>
            </table:table-row>
            <table:table-row>
              <table:table-cell office:value-type="string">
                <text:p>1402</text:p>
              </table:table-cell>
              <table:table-cell office:value-type="float" office:value="0.00280199992921553">
                <text:p>0.00280199992921553</text:p>
              </table:table-cell>
              <table:table-cell office:value-type="float" office:value="36.7999992370606">
                <text:p>36.7999992370606</text:p>
              </table:table-cell>
              <table:table-cell office:value-type="float" office:value="-20">
                <text:p>-20</text:p>
              </table:table-cell>
            </table:table-row>
            <table:table-row>
              <table:table-cell office:value-type="string">
                <text:p>1403</text:p>
              </table:table-cell>
              <table:table-cell office:value-type="float" office:value="0.002803999929165">
                <text:p>0.002803999929165</text:p>
              </table:table-cell>
              <table:table-cell office:value-type="float" office:value="36.5999984741211">
                <text:p>36.5999984741211</text:p>
              </table:table-cell>
              <table:table-cell office:value-type="float" office:value="-20">
                <text:p>-20</text:p>
              </table:table-cell>
            </table:table-row>
            <table:table-row>
              <table:table-cell office:value-type="string">
                <text:p>1404</text:p>
              </table:table-cell>
              <table:table-cell office:value-type="float" office:value="0.00280599992911448">
                <text:p>0.00280599992911448</text:p>
              </table:table-cell>
              <table:table-cell office:value-type="float" office:value="36.4000015258789">
                <text:p>36.4000015258789</text:p>
              </table:table-cell>
              <table:table-cell office:value-type="float" office:value="-20">
                <text:p>-20</text:p>
              </table:table-cell>
            </table:table-row>
            <table:table-row>
              <table:table-cell office:value-type="string">
                <text:p>1405</text:p>
              </table:table-cell>
              <table:table-cell office:value-type="float" office:value="0.00280799992906395">
                <text:p>0.00280799992906395</text:p>
              </table:table-cell>
              <table:table-cell office:value-type="float" office:value="35.5999984741211">
                <text:p>35.5999984741211</text:p>
              </table:table-cell>
              <table:table-cell office:value-type="float" office:value="-20">
                <text:p>-20</text:p>
              </table:table-cell>
            </table:table-row>
            <table:table-row>
              <table:table-cell office:value-type="string">
                <text:p>1406</text:p>
              </table:table-cell>
              <table:table-cell office:value-type="float" office:value="0.00280999992901343">
                <text:p>0.00280999992901343</text:p>
              </table:table-cell>
              <table:table-cell office:value-type="float" office:value="35.4000015258789">
                <text:p>35.4000015258789</text:p>
              </table:table-cell>
              <table:table-cell office:value-type="float" office:value="-20">
                <text:p>-20</text:p>
              </table:table-cell>
            </table:table-row>
            <table:table-row>
              <table:table-cell office:value-type="string">
                <text:p>1407</text:p>
              </table:table-cell>
              <table:table-cell office:value-type="float" office:value="0.00281199992896291">
                <text:p>0.00281199992896291</text:p>
              </table:table-cell>
              <table:table-cell office:value-type="float" office:value="35">
                <text:p>35</text:p>
              </table:table-cell>
              <table:table-cell office:value-type="float" office:value="-20">
                <text:p>-20</text:p>
              </table:table-cell>
            </table:table-row>
            <table:table-row>
              <table:table-cell office:value-type="string">
                <text:p>1408</text:p>
              </table:table-cell>
              <table:table-cell office:value-type="float" office:value="0.00281399992891238">
                <text:p>0.00281399992891238</text:p>
              </table:table-cell>
              <table:table-cell office:value-type="float" office:value="34.5999984741211">
                <text:p>34.5999984741211</text:p>
              </table:table-cell>
              <table:table-cell office:value-type="float" office:value="-20">
                <text:p>-20</text:p>
              </table:table-cell>
            </table:table-row>
            <table:table-row>
              <table:table-cell office:value-type="string">
                <text:p>1409</text:p>
              </table:table-cell>
              <table:table-cell office:value-type="float" office:value="0.00281599992886186">
                <text:p>0.00281599992886186</text:p>
              </table:table-cell>
              <table:table-cell office:value-type="float" office:value="34.4000015258789">
                <text:p>34.4000015258789</text:p>
              </table:table-cell>
              <table:table-cell office:value-type="float" office:value="-20">
                <text:p>-20</text:p>
              </table:table-cell>
            </table:table-row>
            <table:table-row>
              <table:table-cell office:value-type="string">
                <text:p>1410</text:p>
              </table:table-cell>
              <table:table-cell office:value-type="float" office:value="0.00281799992881133">
                <text:p>0.00281799992881133</text:p>
              </table:table-cell>
              <table:table-cell office:value-type="float" office:value="34">
                <text:p>34</text:p>
              </table:table-cell>
              <table:table-cell office:value-type="float" office:value="-20">
                <text:p>-20</text:p>
              </table:table-cell>
            </table:table-row>
            <table:table-row>
              <table:table-cell office:value-type="string">
                <text:p>1411</text:p>
              </table:table-cell>
              <table:table-cell office:value-type="float" office:value="0.00281999992876081">
                <text:p>0.00281999992876081</text:p>
              </table:table-cell>
              <table:table-cell office:value-type="float" office:value="33.5999984741211">
                <text:p>33.5999984741211</text:p>
              </table:table-cell>
              <table:table-cell office:value-type="float" office:value="-20">
                <text:p>-20</text:p>
              </table:table-cell>
            </table:table-row>
            <table:table-row>
              <table:table-cell office:value-type="string">
                <text:p>1412</text:p>
              </table:table-cell>
              <table:table-cell office:value-type="float" office:value="0.00282199992871028">
                <text:p>0.00282199992871028</text:p>
              </table:table-cell>
              <table:table-cell office:value-type="float" office:value="33">
                <text:p>33</text:p>
              </table:table-cell>
              <table:table-cell office:value-type="float" office:value="-20">
                <text:p>-20</text:p>
              </table:table-cell>
            </table:table-row>
            <table:table-row>
              <table:table-cell office:value-type="string">
                <text:p>1413</text:p>
              </table:table-cell>
              <table:table-cell office:value-type="float" office:value="0.00282399992865976">
                <text:p>0.00282399992865976</text:p>
              </table:table-cell>
              <table:table-cell office:value-type="float" office:value="32.5999984741211">
                <text:p>32.5999984741211</text:p>
              </table:table-cell>
              <table:table-cell office:value-type="float" office:value="-20">
                <text:p>-20</text:p>
              </table:table-cell>
            </table:table-row>
            <table:table-row>
              <table:table-cell office:value-type="string">
                <text:p>1414</text:p>
              </table:table-cell>
              <table:table-cell office:value-type="float" office:value="0.00282599992860924">
                <text:p>0.00282599992860924</text:p>
              </table:table-cell>
              <table:table-cell office:value-type="float" office:value="32.4000015258789">
                <text:p>32.4000015258789</text:p>
              </table:table-cell>
              <table:table-cell office:value-type="float" office:value="-20">
                <text:p>-20</text:p>
              </table:table-cell>
            </table:table-row>
            <table:table-row>
              <table:table-cell office:value-type="string">
                <text:p>1415</text:p>
              </table:table-cell>
              <table:table-cell office:value-type="float" office:value="0.00282799992855871">
                <text:p>0.00282799992855871</text:p>
              </table:table-cell>
              <table:table-cell office:value-type="float" office:value="32.2000007629395">
                <text:p>32.2000007629395</text:p>
              </table:table-cell>
              <table:table-cell office:value-type="float" office:value="-20">
                <text:p>-20</text:p>
              </table:table-cell>
            </table:table-row>
            <table:table-row>
              <table:table-cell office:value-type="string">
                <text:p>1416</text:p>
              </table:table-cell>
              <table:table-cell office:value-type="float" office:value="0.00282999992850819">
                <text:p>0.00282999992850819</text:p>
              </table:table-cell>
              <table:table-cell office:value-type="float" office:value="31.6000003814697">
                <text:p>31.6000003814697</text:p>
              </table:table-cell>
              <table:table-cell office:value-type="float" office:value="-20">
                <text:p>-20</text:p>
              </table:table-cell>
            </table:table-row>
            <table:table-row>
              <table:table-cell office:value-type="string">
                <text:p>1417</text:p>
              </table:table-cell>
              <table:table-cell office:value-type="float" office:value="0.00283199992845766">
                <text:p>0.00283199992845766</text:p>
              </table:table-cell>
              <table:table-cell office:value-type="float" office:value="31.3999996185303">
                <text:p>31.3999996185303</text:p>
              </table:table-cell>
              <table:table-cell office:value-type="float" office:value="-20">
                <text:p>-20</text:p>
              </table:table-cell>
            </table:table-row>
            <table:table-row>
              <table:table-cell office:value-type="string">
                <text:p>1418</text:p>
              </table:table-cell>
              <table:table-cell office:value-type="float" office:value="0.00283399992840714">
                <text:p>0.00283399992840714</text:p>
              </table:table-cell>
              <table:table-cell office:value-type="float" office:value="31">
                <text:p>31</text:p>
              </table:table-cell>
              <table:table-cell office:value-type="float" office:value="-20">
                <text:p>-20</text:p>
              </table:table-cell>
            </table:table-row>
            <table:table-row>
              <table:table-cell office:value-type="string">
                <text:p>1419</text:p>
              </table:table-cell>
              <table:table-cell office:value-type="float" office:value="0.00283599992835661">
                <text:p>0.00283599992835661</text:p>
              </table:table-cell>
              <table:table-cell office:value-type="float" office:value="30.6000003814697">
                <text:p>30.6000003814697</text:p>
              </table:table-cell>
              <table:table-cell office:value-type="float" office:value="-20">
                <text:p>-20</text:p>
              </table:table-cell>
            </table:table-row>
            <table:table-row>
              <table:table-cell office:value-type="string">
                <text:p>1420</text:p>
              </table:table-cell>
              <table:table-cell office:value-type="float" office:value="0.00283799992830609">
                <text:p>0.00283799992830609</text:p>
              </table:table-cell>
              <table:table-cell office:value-type="float" office:value="30.3999996185303">
                <text:p>30.3999996185303</text:p>
              </table:table-cell>
              <table:table-cell office:value-type="float" office:value="-20">
                <text:p>-20</text:p>
              </table:table-cell>
            </table:table-row>
            <table:table-row>
              <table:table-cell office:value-type="string">
                <text:p>1421</text:p>
              </table:table-cell>
              <table:table-cell office:value-type="float" office:value="0.00283999992825557">
                <text:p>0.00283999992825557</text:p>
              </table:table-cell>
              <table:table-cell office:value-type="float" office:value="29.7999992370605">
                <text:p>29.7999992370605</text:p>
              </table:table-cell>
              <table:table-cell office:value-type="float" office:value="-20">
                <text:p>-20</text:p>
              </table:table-cell>
            </table:table-row>
            <table:table-row>
              <table:table-cell office:value-type="string">
                <text:p>1422</text:p>
              </table:table-cell>
              <table:table-cell office:value-type="float" office:value="0.00284199992820504">
                <text:p>0.00284199992820504</text:p>
              </table:table-cell>
              <table:table-cell office:value-type="float" office:value="29.6000003814697">
                <text:p>29.6000003814697</text:p>
              </table:table-cell>
              <table:table-cell office:value-type="float" office:value="-20">
                <text:p>-20</text:p>
              </table:table-cell>
            </table:table-row>
            <table:table-row>
              <table:table-cell office:value-type="string">
                <text:p>1423</text:p>
              </table:table-cell>
              <table:table-cell office:value-type="float" office:value="0.00284399992815452">
                <text:p>0.00284399992815452</text:p>
              </table:table-cell>
              <table:table-cell office:value-type="float" office:value="29.2000007629395">
                <text:p>29.2000007629395</text:p>
              </table:table-cell>
              <table:table-cell office:value-type="float" office:value="-20">
                <text:p>-20</text:p>
              </table:table-cell>
            </table:table-row>
            <table:table-row>
              <table:table-cell office:value-type="string">
                <text:p>1424</text:p>
              </table:table-cell>
              <table:table-cell office:value-type="float" office:value="0.00284599992810399">
                <text:p>0.00284599992810399</text:p>
              </table:table-cell>
              <table:table-cell office:value-type="float" office:value="28.7999992370605">
                <text:p>28.7999992370605</text:p>
              </table:table-cell>
              <table:table-cell office:value-type="float" office:value="-20">
                <text:p>-20</text:p>
              </table:table-cell>
            </table:table-row>
            <table:table-row>
              <table:table-cell office:value-type="string">
                <text:p>1425</text:p>
              </table:table-cell>
              <table:table-cell office:value-type="float" office:value="0.00284799992805347">
                <text:p>0.00284799992805347</text:p>
              </table:table-cell>
              <table:table-cell office:value-type="float" office:value="28.3999996185303">
                <text:p>28.3999996185303</text:p>
              </table:table-cell>
              <table:table-cell office:value-type="float" office:value="-20">
                <text:p>-20</text:p>
              </table:table-cell>
            </table:table-row>
            <table:table-row>
              <table:table-cell office:value-type="string">
                <text:p>1426</text:p>
              </table:table-cell>
              <table:table-cell office:value-type="float" office:value="0.00284999992800294">
                <text:p>0.00284999992800294</text:p>
              </table:table-cell>
              <table:table-cell office:value-type="float" office:value="28">
                <text:p>28</text:p>
              </table:table-cell>
              <table:table-cell office:value-type="float" office:value="-20">
                <text:p>-20</text:p>
              </table:table-cell>
            </table:table-row>
            <table:table-row>
              <table:table-cell office:value-type="string">
                <text:p>1427</text:p>
              </table:table-cell>
              <table:table-cell office:value-type="float" office:value="0.00285199992795242">
                <text:p>0.00285199992795242</text:p>
              </table:table-cell>
              <table:table-cell office:value-type="float" office:value="27.7999992370605">
                <text:p>27.7999992370605</text:p>
              </table:table-cell>
              <table:table-cell office:value-type="float" office:value="-20">
                <text:p>-20</text:p>
              </table:table-cell>
            </table:table-row>
            <table:table-row>
              <table:table-cell office:value-type="string">
                <text:p>1428</text:p>
              </table:table-cell>
              <table:table-cell office:value-type="float" office:value="0.0028539999279019">
                <text:p>0.0028539999279019</text:p>
              </table:table-cell>
              <table:table-cell office:value-type="float" office:value="27.3999996185303">
                <text:p>27.3999996185303</text:p>
              </table:table-cell>
              <table:table-cell office:value-type="float" office:value="-20">
                <text:p>-20</text:p>
              </table:table-cell>
            </table:table-row>
            <table:table-row>
              <table:table-cell office:value-type="string">
                <text:p>1429</text:p>
              </table:table-cell>
              <table:table-cell office:value-type="float" office:value="0.00285599992785137">
                <text:p>0.00285599992785137</text:p>
              </table:table-cell>
              <table:table-cell office:value-type="float" office:value="26.7999992370605">
                <text:p>26.7999992370605</text:p>
              </table:table-cell>
              <table:table-cell office:value-type="float" office:value="-20">
                <text:p>-20</text:p>
              </table:table-cell>
            </table:table-row>
            <table:table-row>
              <table:table-cell office:value-type="string">
                <text:p>1430</text:p>
              </table:table-cell>
              <table:table-cell office:value-type="float" office:value="0.00285799992780085">
                <text:p>0.00285799992780085</text:p>
              </table:table-cell>
              <table:table-cell office:value-type="float" office:value="26.6000003814697">
                <text:p>26.6000003814697</text:p>
              </table:table-cell>
              <table:table-cell office:value-type="float" office:value="-20">
                <text:p>-20</text:p>
              </table:table-cell>
            </table:table-row>
            <table:table-row>
              <table:table-cell office:value-type="string">
                <text:p>1431</text:p>
              </table:table-cell>
              <table:table-cell office:value-type="float" office:value="0.00285999992775032">
                <text:p>0.00285999992775032</text:p>
              </table:table-cell>
              <table:table-cell office:value-type="float" office:value="26.2000007629395">
                <text:p>26.2000007629395</text:p>
              </table:table-cell>
              <table:table-cell office:value-type="float" office:value="-20">
                <text:p>-20</text:p>
              </table:table-cell>
            </table:table-row>
            <table:table-row>
              <table:table-cell office:value-type="string">
                <text:p>1432</text:p>
              </table:table-cell>
              <table:table-cell office:value-type="float" office:value="0.0028619999276998">
                <text:p>0.0028619999276998</text:p>
              </table:table-cell>
              <table:table-cell office:value-type="float" office:value="25.6000003814697">
                <text:p>25.6000003814697</text:p>
              </table:table-cell>
              <table:table-cell office:value-type="float" office:value="-20">
                <text:p>-20</text:p>
              </table:table-cell>
            </table:table-row>
            <table:table-row>
              <table:table-cell office:value-type="string">
                <text:p>1433</text:p>
              </table:table-cell>
              <table:table-cell office:value-type="float" office:value="0.00286399992764927">
                <text:p>0.00286399992764927</text:p>
              </table:table-cell>
              <table:table-cell office:value-type="float" office:value="25.6000003814697">
                <text:p>25.6000003814697</text:p>
              </table:table-cell>
              <table:table-cell office:value-type="float" office:value="-20">
                <text:p>-20</text:p>
              </table:table-cell>
            </table:table-row>
            <table:table-row>
              <table:table-cell office:value-type="string">
                <text:p>1434</text:p>
              </table:table-cell>
              <table:table-cell office:value-type="float" office:value="0.00286599992759875">
                <text:p>0.00286599992759875</text:p>
              </table:table-cell>
              <table:table-cell office:value-type="float" office:value="25.2000007629395">
                <text:p>25.2000007629395</text:p>
              </table:table-cell>
              <table:table-cell office:value-type="float" office:value="-20">
                <text:p>-20</text:p>
              </table:table-cell>
            </table:table-row>
            <table:table-row>
              <table:table-cell office:value-type="string">
                <text:p>1435</text:p>
              </table:table-cell>
              <table:table-cell office:value-type="float" office:value="0.00286799992754823">
                <text:p>0.00286799992754823</text:p>
              </table:table-cell>
              <table:table-cell office:value-type="float" office:value="24.7999992370605">
                <text:p>24.7999992370605</text:p>
              </table:table-cell>
              <table:table-cell office:value-type="float" office:value="-20">
                <text:p>-20</text:p>
              </table:table-cell>
            </table:table-row>
            <table:table-row>
              <table:table-cell office:value-type="string">
                <text:p>1436</text:p>
              </table:table-cell>
              <table:table-cell office:value-type="float" office:value="0.0028699999274977">
                <text:p>0.0028699999274977</text:p>
              </table:table-cell>
              <table:table-cell office:value-type="float" office:value="24.2000007629395">
                <text:p>24.2000007629395</text:p>
              </table:table-cell>
              <table:table-cell office:value-type="float" office:value="-20">
                <text:p>-20</text:p>
              </table:table-cell>
            </table:table-row>
            <table:table-row>
              <table:table-cell office:value-type="string">
                <text:p>1437</text:p>
              </table:table-cell>
              <table:table-cell office:value-type="float" office:value="0.00287199992744718">
                <text:p>0.00287199992744718</text:p>
              </table:table-cell>
              <table:table-cell office:value-type="float" office:value="23.7999992370605">
                <text:p>23.7999992370605</text:p>
              </table:table-cell>
              <table:table-cell office:value-type="float" office:value="-20">
                <text:p>-20</text:p>
              </table:table-cell>
            </table:table-row>
            <table:table-row>
              <table:table-cell office:value-type="string">
                <text:p>1438</text:p>
              </table:table-cell>
              <table:table-cell office:value-type="float" office:value="0.00287399992739665">
                <text:p>0.00287399992739665</text:p>
              </table:table-cell>
              <table:table-cell office:value-type="float" office:value="23.6000003814697">
                <text:p>23.6000003814697</text:p>
              </table:table-cell>
              <table:table-cell office:value-type="float" office:value="-20">
                <text:p>-20</text:p>
              </table:table-cell>
            </table:table-row>
            <table:table-row>
              <table:table-cell office:value-type="string">
                <text:p>1439</text:p>
              </table:table-cell>
              <table:table-cell office:value-type="float" office:value="0.00287599992734613">
                <text:p>0.00287599992734613</text:p>
              </table:table-cell>
              <table:table-cell office:value-type="float" office:value="23.2000007629395">
                <text:p>23.2000007629395</text:p>
              </table:table-cell>
              <table:table-cell office:value-type="float" office:value="-20">
                <text:p>-20</text:p>
              </table:table-cell>
            </table:table-row>
            <table:table-row>
              <table:table-cell office:value-type="string">
                <text:p>1440</text:p>
              </table:table-cell>
              <table:table-cell office:value-type="float" office:value="0.00287799992729561">
                <text:p>0.00287799992729561</text:p>
              </table:table-cell>
              <table:table-cell office:value-type="float" office:value="22.7999992370605">
                <text:p>22.7999992370605</text:p>
              </table:table-cell>
              <table:table-cell office:value-type="float" office:value="-20">
                <text:p>-20</text:p>
              </table:table-cell>
            </table:table-row>
            <table:table-row>
              <table:table-cell office:value-type="string">
                <text:p>1441</text:p>
              </table:table-cell>
              <table:table-cell office:value-type="float" office:value="0.00287999992724508">
                <text:p>0.00287999992724508</text:p>
              </table:table-cell>
              <table:table-cell office:value-type="float" office:value="22.6000003814697">
                <text:p>22.6000003814697</text:p>
              </table:table-cell>
              <table:table-cell office:value-type="float" office:value="-20">
                <text:p>-20</text:p>
              </table:table-cell>
            </table:table-row>
            <table:table-row>
              <table:table-cell office:value-type="string">
                <text:p>1442</text:p>
              </table:table-cell>
              <table:table-cell office:value-type="float" office:value="0.00288199992719456">
                <text:p>0.00288199992719456</text:p>
              </table:table-cell>
              <table:table-cell office:value-type="float" office:value="22.2000007629395">
                <text:p>22.2000007629395</text:p>
              </table:table-cell>
              <table:table-cell office:value-type="float" office:value="-20">
                <text:p>-20</text:p>
              </table:table-cell>
            </table:table-row>
            <table:table-row>
              <table:table-cell office:value-type="string">
                <text:p>1443</text:p>
              </table:table-cell>
              <table:table-cell office:value-type="float" office:value="0.00288399992714403">
                <text:p>0.00288399992714403</text:p>
              </table:table-cell>
              <table:table-cell office:value-type="float" office:value="21.7999992370605">
                <text:p>21.7999992370605</text:p>
              </table:table-cell>
              <table:table-cell office:value-type="float" office:value="-20">
                <text:p>-20</text:p>
              </table:table-cell>
            </table:table-row>
            <table:table-row>
              <table:table-cell office:value-type="string">
                <text:p>1444</text:p>
              </table:table-cell>
              <table:table-cell office:value-type="float" office:value="0.00288599992709351">
                <text:p>0.00288599992709351</text:p>
              </table:table-cell>
              <table:table-cell office:value-type="float" office:value="21.2000007629395">
                <text:p>21.2000007629395</text:p>
              </table:table-cell>
              <table:table-cell office:value-type="float" office:value="-20">
                <text:p>-20</text:p>
              </table:table-cell>
            </table:table-row>
            <table:table-row>
              <table:table-cell office:value-type="string">
                <text:p>1445</text:p>
              </table:table-cell>
              <table:table-cell office:value-type="float" office:value="0.00288799992704298">
                <text:p>0.00288799992704298</text:p>
              </table:table-cell>
              <table:table-cell office:value-type="float" office:value="20.7999992370605">
                <text:p>20.7999992370605</text:p>
              </table:table-cell>
              <table:table-cell office:value-type="float" office:value="-20">
                <text:p>-20</text:p>
              </table:table-cell>
            </table:table-row>
            <table:table-row>
              <table:table-cell office:value-type="string">
                <text:p>1446</text:p>
              </table:table-cell>
              <table:table-cell office:value-type="float" office:value="0.00288999992699246">
                <text:p>0.00288999992699246</text:p>
              </table:table-cell>
              <table:table-cell office:value-type="float" office:value="20.7999992370605">
                <text:p>20.7999992370605</text:p>
              </table:table-cell>
              <table:table-cell office:value-type="float" office:value="-20">
                <text:p>-20</text:p>
              </table:table-cell>
            </table:table-row>
            <table:table-row>
              <table:table-cell office:value-type="string">
                <text:p>1447</text:p>
              </table:table-cell>
              <table:table-cell office:value-type="float" office:value="0.00289199992694194">
                <text:p>0.00289199992694194</text:p>
              </table:table-cell>
              <table:table-cell office:value-type="float" office:value="20.3999996185303">
                <text:p>20.3999996185303</text:p>
              </table:table-cell>
              <table:table-cell office:value-type="float" office:value="-20">
                <text:p>-20</text:p>
              </table:table-cell>
            </table:table-row>
            <table:table-row>
              <table:table-cell office:value-type="string">
                <text:p>1448</text:p>
              </table:table-cell>
              <table:table-cell office:value-type="float" office:value="0.00289399992689141">
                <text:p>0.00289399992689141</text:p>
              </table:table-cell>
              <table:table-cell office:value-type="float" office:value="20">
                <text:p>20</text:p>
              </table:table-cell>
              <table:table-cell office:value-type="float" office:value="-20">
                <text:p>-20</text:p>
              </table:table-cell>
            </table:table-row>
            <table:table-row>
              <table:table-cell office:value-type="string">
                <text:p>1449</text:p>
              </table:table-cell>
              <table:table-cell office:value-type="float" office:value="0.00289599992684089">
                <text:p>0.00289599992684089</text:p>
              </table:table-cell>
              <table:table-cell office:value-type="float" office:value="19.3999996185303">
                <text:p>19.3999996185303</text:p>
              </table:table-cell>
              <table:table-cell office:value-type="float" office:value="-20">
                <text:p>-20</text:p>
              </table:table-cell>
            </table:table-row>
            <table:table-row>
              <table:table-cell office:value-type="string">
                <text:p>1450</text:p>
              </table:table-cell>
              <table:table-cell office:value-type="float" office:value="0.00289799992679036">
                <text:p>0.00289799992679036</text:p>
              </table:table-cell>
              <table:table-cell office:value-type="float" office:value="19">
                <text:p>19</text:p>
              </table:table-cell>
              <table:table-cell office:value-type="float" office:value="-20">
                <text:p>-20</text:p>
              </table:table-cell>
            </table:table-row>
            <table:table-row>
              <table:table-cell office:value-type="string">
                <text:p>1451</text:p>
              </table:table-cell>
              <table:table-cell office:value-type="float" office:value="0.00289999992673984">
                <text:p>0.00289999992673984</text:p>
              </table:table-cell>
              <table:table-cell office:value-type="float" office:value="18.7999992370605">
                <text:p>18.7999992370605</text:p>
              </table:table-cell>
              <table:table-cell office:value-type="float" office:value="-20">
                <text:p>-20</text:p>
              </table:table-cell>
            </table:table-row>
            <table:table-row>
              <table:table-cell office:value-type="string">
                <text:p>1452</text:p>
              </table:table-cell>
              <table:table-cell office:value-type="float" office:value="0.00290199992668931">
                <text:p>0.00290199992668931</text:p>
              </table:table-cell>
              <table:table-cell office:value-type="float" office:value="18.3999996185303">
                <text:p>18.3999996185303</text:p>
              </table:table-cell>
              <table:table-cell office:value-type="float" office:value="-20">
                <text:p>-20</text:p>
              </table:table-cell>
            </table:table-row>
            <table:table-row>
              <table:table-cell office:value-type="string">
                <text:p>1453</text:p>
              </table:table-cell>
              <table:table-cell office:value-type="float" office:value="0.00290399992663879">
                <text:p>0.00290399992663879</text:p>
              </table:table-cell>
              <table:table-cell office:value-type="float" office:value="18">
                <text:p>18</text:p>
              </table:table-cell>
              <table:table-cell office:value-type="float" office:value="-20">
                <text:p>-20</text:p>
              </table:table-cell>
            </table:table-row>
            <table:table-row>
              <table:table-cell office:value-type="string">
                <text:p>1454</text:p>
              </table:table-cell>
              <table:table-cell office:value-type="float" office:value="0.00290599992658827">
                <text:p>0.00290599992658827</text:p>
              </table:table-cell>
              <table:table-cell office:value-type="float" office:value="17.7999992370605">
                <text:p>17.7999992370605</text:p>
              </table:table-cell>
              <table:table-cell office:value-type="float" office:value="-20">
                <text:p>-20</text:p>
              </table:table-cell>
            </table:table-row>
            <table:table-row>
              <table:table-cell office:value-type="string">
                <text:p>1455</text:p>
              </table:table-cell>
              <table:table-cell office:value-type="float" office:value="0.00290799992653774">
                <text:p>0.00290799992653774</text:p>
              </table:table-cell>
              <table:table-cell office:value-type="float" office:value="17.3999996185303">
                <text:p>17.3999996185303</text:p>
              </table:table-cell>
              <table:table-cell office:value-type="float" office:value="-20">
                <text:p>-20</text:p>
              </table:table-cell>
            </table:table-row>
            <table:table-row>
              <table:table-cell office:value-type="string">
                <text:p>1456</text:p>
              </table:table-cell>
              <table:table-cell office:value-type="float" office:value="0.00290999992648722">
                <text:p>0.00290999992648722</text:p>
              </table:table-cell>
              <table:table-cell office:value-type="float" office:value="16.7999992370605">
                <text:p>16.7999992370605</text:p>
              </table:table-cell>
              <table:table-cell office:value-type="float" office:value="-20">
                <text:p>-20</text:p>
              </table:table-cell>
            </table:table-row>
            <table:table-row>
              <table:table-cell office:value-type="string">
                <text:p>1457</text:p>
              </table:table-cell>
              <table:table-cell office:value-type="float" office:value="0.00291199992643669">
                <text:p>0.00291199992643669</text:p>
              </table:table-cell>
              <table:table-cell office:value-type="float" office:value="16.3999996185303">
                <text:p>16.3999996185303</text:p>
              </table:table-cell>
              <table:table-cell office:value-type="float" office:value="-20">
                <text:p>-20</text:p>
              </table:table-cell>
            </table:table-row>
            <table:table-row>
              <table:table-cell office:value-type="string">
                <text:p>1458</text:p>
              </table:table-cell>
              <table:table-cell office:value-type="float" office:value="0.00291399992638617">
                <text:p>0.00291399992638617</text:p>
              </table:table-cell>
              <table:table-cell office:value-type="float" office:value="16.3999996185303">
                <text:p>16.3999996185303</text:p>
              </table:table-cell>
              <table:table-cell office:value-type="float" office:value="-20">
                <text:p>-20</text:p>
              </table:table-cell>
            </table:table-row>
            <table:table-row>
              <table:table-cell office:value-type="string">
                <text:p>1459</text:p>
              </table:table-cell>
              <table:table-cell office:value-type="float" office:value="0.00291599992633564">
                <text:p>0.00291599992633564</text:p>
              </table:table-cell>
              <table:table-cell office:value-type="float" office:value="16">
                <text:p>16</text:p>
              </table:table-cell>
              <table:table-cell office:value-type="float" office:value="-20">
                <text:p>-20</text:p>
              </table:table-cell>
            </table:table-row>
            <table:table-row>
              <table:table-cell office:value-type="string">
                <text:p>1460</text:p>
              </table:table-cell>
              <table:table-cell office:value-type="float" office:value="0.00291799992628512">
                <text:p>0.00291799992628512</text:p>
              </table:table-cell>
              <table:table-cell office:value-type="float" office:value="15.3999996185303">
                <text:p>15.3999996185303</text:p>
              </table:table-cell>
              <table:table-cell office:value-type="float" office:value="-20">
                <text:p>-20</text:p>
              </table:table-cell>
            </table:table-row>
            <table:table-row>
              <table:table-cell office:value-type="string">
                <text:p>1461</text:p>
              </table:table-cell>
              <table:table-cell office:value-type="float" office:value="0.0029199999262346">
                <text:p>0.0029199999262346</text:p>
              </table:table-cell>
              <table:table-cell office:value-type="float" office:value="15">
                <text:p>15</text:p>
              </table:table-cell>
              <table:table-cell office:value-type="float" office:value="-20">
                <text:p>-20</text:p>
              </table:table-cell>
            </table:table-row>
            <table:table-row>
              <table:table-cell office:value-type="string">
                <text:p>1462</text:p>
              </table:table-cell>
              <table:table-cell office:value-type="float" office:value="0.00292199992618407">
                <text:p>0.00292199992618407</text:p>
              </table:table-cell>
              <table:table-cell office:value-type="float" office:value="14.6000003814697">
                <text:p>14.6000003814697</text:p>
              </table:table-cell>
              <table:table-cell office:value-type="float" office:value="-20">
                <text:p>-20</text:p>
              </table:table-cell>
            </table:table-row>
            <table:table-row>
              <table:table-cell office:value-type="string">
                <text:p>1463</text:p>
              </table:table-cell>
              <table:table-cell office:value-type="float" office:value="0.00292399992613355">
                <text:p>0.00292399992613355</text:p>
              </table:table-cell>
              <table:table-cell office:value-type="float" office:value="14.3999996185303">
                <text:p>14.3999996185303</text:p>
              </table:table-cell>
              <table:table-cell office:value-type="float" office:value="-20">
                <text:p>-20</text:p>
              </table:table-cell>
            </table:table-row>
            <table:table-row>
              <table:table-cell office:value-type="string">
                <text:p>1464</text:p>
              </table:table-cell>
              <table:table-cell office:value-type="float" office:value="0.00292599992608302">
                <text:p>0.00292599992608302</text:p>
              </table:table-cell>
              <table:table-cell office:value-type="float" office:value="14.1999998092651">
                <text:p>14.1999998092651</text:p>
              </table:table-cell>
              <table:table-cell office:value-type="float" office:value="-20">
                <text:p>-20</text:p>
              </table:table-cell>
            </table:table-row>
            <table:table-row>
              <table:table-cell office:value-type="string">
                <text:p>1465</text:p>
              </table:table-cell>
              <table:table-cell office:value-type="float" office:value="0.0029279999260325">
                <text:p>0.0029279999260325</text:p>
              </table:table-cell>
              <table:table-cell office:value-type="float" office:value="13.8000001907349">
                <text:p>13.8000001907349</text:p>
              </table:table-cell>
              <table:table-cell office:value-type="float" office:value="-20">
                <text:p>-20</text:p>
              </table:table-cell>
            </table:table-row>
            <table:table-row>
              <table:table-cell office:value-type="string">
                <text:p>1466</text:p>
              </table:table-cell>
              <table:table-cell office:value-type="float" office:value="0.00292999992598197">
                <text:p>0.00292999992598197</text:p>
              </table:table-cell>
              <table:table-cell office:value-type="float" office:value="13.1999998092651">
                <text:p>13.1999998092651</text:p>
              </table:table-cell>
              <table:table-cell office:value-type="float" office:value="-20">
                <text:p>-20</text:p>
              </table:table-cell>
            </table:table-row>
            <table:table-row>
              <table:table-cell office:value-type="string">
                <text:p>1467</text:p>
              </table:table-cell>
              <table:table-cell office:value-type="float" office:value="0.00293199992593145">
                <text:p>0.00293199992593145</text:p>
              </table:table-cell>
              <table:table-cell office:value-type="float" office:value="12.8000001907349">
                <text:p>12.8000001907349</text:p>
              </table:table-cell>
              <table:table-cell office:value-type="float" office:value="-20">
                <text:p>-20</text:p>
              </table:table-cell>
            </table:table-row>
            <table:table-row>
              <table:table-cell office:value-type="string">
                <text:p>1468</text:p>
              </table:table-cell>
              <table:table-cell office:value-type="float" office:value="0.00293399992588093">
                <text:p>0.00293399992588093</text:p>
              </table:table-cell>
              <table:table-cell office:value-type="float" office:value="12.3999996185303">
                <text:p>12.3999996185303</text:p>
              </table:table-cell>
              <table:table-cell office:value-type="float" office:value="-20">
                <text:p>-20</text:p>
              </table:table-cell>
            </table:table-row>
            <table:table-row>
              <table:table-cell office:value-type="string">
                <text:p>1469</text:p>
              </table:table-cell>
              <table:table-cell office:value-type="float" office:value="0.0029359999258304">
                <text:p>0.0029359999258304</text:p>
              </table:table-cell>
              <table:table-cell office:value-type="float" office:value="11.8000001907349">
                <text:p>11.8000001907349</text:p>
              </table:table-cell>
              <table:table-cell office:value-type="float" office:value="-20">
                <text:p>-20</text:p>
              </table:table-cell>
            </table:table-row>
            <table:table-row>
              <table:table-cell office:value-type="string">
                <text:p>1470</text:p>
              </table:table-cell>
              <table:table-cell office:value-type="float" office:value="0.00293799992577988">
                <text:p>0.00293799992577988</text:p>
              </table:table-cell>
              <table:table-cell office:value-type="float" office:value="11.6000003814697">
                <text:p>11.6000003814697</text:p>
              </table:table-cell>
              <table:table-cell office:value-type="float" office:value="-20">
                <text:p>-20</text:p>
              </table:table-cell>
            </table:table-row>
            <table:table-row>
              <table:table-cell office:value-type="string">
                <text:p>1471</text:p>
              </table:table-cell>
              <table:table-cell office:value-type="float" office:value="0.00293999992572935">
                <text:p>0.00293999992572935</text:p>
              </table:table-cell>
              <table:table-cell office:value-type="float" office:value="11.6000003814697">
                <text:p>11.6000003814697</text:p>
              </table:table-cell>
              <table:table-cell office:value-type="float" office:value="-20">
                <text:p>-20</text:p>
              </table:table-cell>
            </table:table-row>
            <table:table-row>
              <table:table-cell office:value-type="string">
                <text:p>1472</text:p>
              </table:table-cell>
              <table:table-cell office:value-type="float" office:value="0.00294199992567883">
                <text:p>0.00294199992567883</text:p>
              </table:table-cell>
              <table:table-cell office:value-type="float" office:value="11">
                <text:p>11</text:p>
              </table:table-cell>
              <table:table-cell office:value-type="float" office:value="-20">
                <text:p>-20</text:p>
              </table:table-cell>
            </table:table-row>
            <table:table-row>
              <table:table-cell office:value-type="string">
                <text:p>1473</text:p>
              </table:table-cell>
              <table:table-cell office:value-type="float" office:value="0.0029439999256283">
                <text:p>0.0029439999256283</text:p>
              </table:table-cell>
              <table:table-cell office:value-type="float" office:value="10.6000003814697">
                <text:p>10.6000003814697</text:p>
              </table:table-cell>
              <table:table-cell office:value-type="float" office:value="-20">
                <text:p>-20</text:p>
              </table:table-cell>
            </table:table-row>
            <table:table-row>
              <table:table-cell office:value-type="string">
                <text:p>1474</text:p>
              </table:table-cell>
              <table:table-cell office:value-type="float" office:value="0.00294599992557778">
                <text:p>0.00294599992557778</text:p>
              </table:table-cell>
              <table:table-cell office:value-type="float" office:value="10.1999998092651">
                <text:p>10.1999998092651</text:p>
              </table:table-cell>
              <table:table-cell office:value-type="float" office:value="-20">
                <text:p>-20</text:p>
              </table:table-cell>
            </table:table-row>
            <table:table-row>
              <table:table-cell office:value-type="string">
                <text:p>1475</text:p>
              </table:table-cell>
              <table:table-cell office:value-type="float" office:value="0.00294799992552726">
                <text:p>0.00294799992552726</text:p>
              </table:table-cell>
              <table:table-cell office:value-type="float" office:value="10">
                <text:p>10</text:p>
              </table:table-cell>
              <table:table-cell office:value-type="float" office:value="-20">
                <text:p>-20</text:p>
              </table:table-cell>
            </table:table-row>
            <table:table-row>
              <table:table-cell office:value-type="string">
                <text:p>1476</text:p>
              </table:table-cell>
              <table:table-cell office:value-type="float" office:value="0.00294999992547673">
                <text:p>0.00294999992547673</text:p>
              </table:table-cell>
              <table:table-cell office:value-type="float" office:value="9.60000038146973">
                <text:p>9.60000038146973</text:p>
              </table:table-cell>
              <table:table-cell office:value-type="float" office:value="-20">
                <text:p>-20</text:p>
              </table:table-cell>
            </table:table-row>
            <table:table-row>
              <table:table-cell office:value-type="string">
                <text:p>1477</text:p>
              </table:table-cell>
              <table:table-cell office:value-type="float" office:value="0.00295199992542621">
                <text:p>0.00295199992542621</text:p>
              </table:table-cell>
              <table:table-cell office:value-type="float" office:value="9.19999980926514">
                <text:p>9.19999980926514</text:p>
              </table:table-cell>
              <table:table-cell office:value-type="float" office:value="-20">
                <text:p>-20</text:p>
              </table:table-cell>
            </table:table-row>
            <table:table-row>
              <table:table-cell office:value-type="string">
                <text:p>1478</text:p>
              </table:table-cell>
              <table:table-cell office:value-type="float" office:value="0.00295399992537568">
                <text:p>0.00295399992537568</text:p>
              </table:table-cell>
              <table:table-cell office:value-type="float" office:value="8.80000019073486">
                <text:p>8.80000019073486</text:p>
              </table:table-cell>
              <table:table-cell office:value-type="float" office:value="-20">
                <text:p>-20</text:p>
              </table:table-cell>
            </table:table-row>
            <table:table-row>
              <table:table-cell office:value-type="string">
                <text:p>1479</text:p>
              </table:table-cell>
              <table:table-cell office:value-type="float" office:value="0.00295599992532516">
                <text:p>0.00295599992532516</text:p>
              </table:table-cell>
              <table:table-cell office:value-type="float" office:value="8.60000038146973">
                <text:p>8.60000038146973</text:p>
              </table:table-cell>
              <table:table-cell office:value-type="float" office:value="-20">
                <text:p>-20</text:p>
              </table:table-cell>
            </table:table-row>
            <table:table-row>
              <table:table-cell office:value-type="string">
                <text:p>1480</text:p>
              </table:table-cell>
              <table:table-cell office:value-type="float" office:value="0.00295799992527464">
                <text:p>0.00295799992527464</text:p>
              </table:table-cell>
              <table:table-cell office:value-type="float" office:value="8">
                <text:p>8</text:p>
              </table:table-cell>
              <table:table-cell office:value-type="float" office:value="-20">
                <text:p>-20</text:p>
              </table:table-cell>
            </table:table-row>
            <table:table-row>
              <table:table-cell office:value-type="string">
                <text:p>1481</text:p>
              </table:table-cell>
              <table:table-cell office:value-type="float" office:value="0.00295999992522411">
                <text:p>0.00295999992522411</text:p>
              </table:table-cell>
              <table:table-cell office:value-type="float" office:value="7.59999990463257">
                <text:p>7.59999990463257</text:p>
              </table:table-cell>
              <table:table-cell office:value-type="float" office:value="-20">
                <text:p>-20</text:p>
              </table:table-cell>
            </table:table-row>
            <table:table-row>
              <table:table-cell office:value-type="string">
                <text:p>1482</text:p>
              </table:table-cell>
              <table:table-cell office:value-type="float" office:value="0.00296199992517359">
                <text:p>0.00296199992517359</text:p>
              </table:table-cell>
              <table:table-cell office:value-type="float" office:value="7.19999980926514">
                <text:p>7.19999980926514</text:p>
              </table:table-cell>
              <table:table-cell office:value-type="float" office:value="-20">
                <text:p>-20</text:p>
              </table:table-cell>
            </table:table-row>
            <table:table-row>
              <table:table-cell office:value-type="string">
                <text:p>1483</text:p>
              </table:table-cell>
              <table:table-cell office:value-type="float" office:value="0.00296399992512306">
                <text:p>0.00296399992512306</text:p>
              </table:table-cell>
              <table:table-cell office:value-type="float" office:value="7.19999980926514">
                <text:p>7.19999980926514</text:p>
              </table:table-cell>
              <table:table-cell office:value-type="float" office:value="-20">
                <text:p>-20</text:p>
              </table:table-cell>
            </table:table-row>
            <table:table-row>
              <table:table-cell office:value-type="string">
                <text:p>1484</text:p>
              </table:table-cell>
              <table:table-cell office:value-type="float" office:value="0.00296599992507254">
                <text:p>0.00296599992507254</text:p>
              </table:table-cell>
              <table:table-cell office:value-type="float" office:value="6.40000009536743">
                <text:p>6.40000009536743</text:p>
              </table:table-cell>
              <table:table-cell office:value-type="float" office:value="-20">
                <text:p>-20</text:p>
              </table:table-cell>
            </table:table-row>
            <table:table-row>
              <table:table-cell office:value-type="string">
                <text:p>1485</text:p>
              </table:table-cell>
              <table:table-cell office:value-type="float" office:value="0.00296799992502201">
                <text:p>0.00296799992502201</text:p>
              </table:table-cell>
              <table:table-cell office:value-type="float" office:value="6.19999980926514">
                <text:p>6.19999980926514</text:p>
              </table:table-cell>
              <table:table-cell office:value-type="float" office:value="-20">
                <text:p>-20</text:p>
              </table:table-cell>
            </table:table-row>
            <table:table-row>
              <table:table-cell office:value-type="string">
                <text:p>1486</text:p>
              </table:table-cell>
              <table:table-cell office:value-type="float" office:value="0.00296999992497149">
                <text:p>0.00296999992497149</text:p>
              </table:table-cell>
              <table:table-cell office:value-type="float" office:value="5.80000019073486">
                <text:p>5.80000019073486</text:p>
              </table:table-cell>
              <table:table-cell office:value-type="float" office:value="-20">
                <text:p>-20</text:p>
              </table:table-cell>
            </table:table-row>
            <table:table-row>
              <table:table-cell office:value-type="string">
                <text:p>1487</text:p>
              </table:table-cell>
              <table:table-cell office:value-type="float" office:value="0.00297199992492097">
                <text:p>0.00297199992492097</text:p>
              </table:table-cell>
              <table:table-cell office:value-type="float" office:value="5.59999990463257">
                <text:p>5.59999990463257</text:p>
              </table:table-cell>
              <table:table-cell office:value-type="float" office:value="-20">
                <text:p>-20</text:p>
              </table:table-cell>
            </table:table-row>
            <table:table-row>
              <table:table-cell office:value-type="string">
                <text:p>1488</text:p>
              </table:table-cell>
              <table:table-cell office:value-type="float" office:value="0.00297399992487044">
                <text:p>0.00297399992487044</text:p>
              </table:table-cell>
              <table:table-cell office:value-type="float" office:value="5">
                <text:p>5</text:p>
              </table:table-cell>
              <table:table-cell office:value-type="float" office:value="-20">
                <text:p>-20</text:p>
              </table:table-cell>
            </table:table-row>
            <table:table-row>
              <table:table-cell office:value-type="string">
                <text:p>1489</text:p>
              </table:table-cell>
              <table:table-cell office:value-type="float" office:value="0.00297599992481992">
                <text:p>0.00297599992481992</text:p>
              </table:table-cell>
              <table:table-cell office:value-type="float" office:value="4.59999990463257">
                <text:p>4.59999990463257</text:p>
              </table:table-cell>
              <table:table-cell office:value-type="float" office:value="-20">
                <text:p>-20</text:p>
              </table:table-cell>
            </table:table-row>
            <table:table-row>
              <table:table-cell office:value-type="string">
                <text:p>1490</text:p>
              </table:table-cell>
              <table:table-cell office:value-type="float" office:value="0.00297799992476939">
                <text:p>0.00297799992476939</text:p>
              </table:table-cell>
              <table:table-cell office:value-type="float" office:value="4.59999990463257">
                <text:p>4.59999990463257</text:p>
              </table:table-cell>
              <table:table-cell office:value-type="float" office:value="-20">
                <text:p>-20</text:p>
              </table:table-cell>
            </table:table-row>
            <table:table-row>
              <table:table-cell office:value-type="string">
                <text:p>1491</text:p>
              </table:table-cell>
              <table:table-cell office:value-type="float" office:value="0.00297999992471887">
                <text:p>0.00297999992471887</text:p>
              </table:table-cell>
              <table:table-cell office:value-type="float" office:value="4.19999980926514">
                <text:p>4.19999980926514</text:p>
              </table:table-cell>
              <table:table-cell office:value-type="float" office:value="-20">
                <text:p>-20</text:p>
              </table:table-cell>
            </table:table-row>
            <table:table-row>
              <table:table-cell office:value-type="string">
                <text:p>1492</text:p>
              </table:table-cell>
              <table:table-cell office:value-type="float" office:value="0.00298199992466834">
                <text:p>0.00298199992466834</text:p>
              </table:table-cell>
              <table:table-cell office:value-type="float" office:value="3.59999990463257">
                <text:p>3.59999990463257</text:p>
              </table:table-cell>
              <table:table-cell office:value-type="float" office:value="-20">
                <text:p>-20</text:p>
              </table:table-cell>
            </table:table-row>
            <table:table-row>
              <table:table-cell office:value-type="string">
                <text:p>1493</text:p>
              </table:table-cell>
              <table:table-cell office:value-type="float" office:value="0.00298399992461782">
                <text:p>0.00298399992461782</text:p>
              </table:table-cell>
              <table:table-cell office:value-type="float" office:value="3">
                <text:p>3</text:p>
              </table:table-cell>
              <table:table-cell office:value-type="float" office:value="-20">
                <text:p>-20</text:p>
              </table:table-cell>
            </table:table-row>
            <table:table-row>
              <table:table-cell office:value-type="string">
                <text:p>1494</text:p>
              </table:table-cell>
              <table:table-cell office:value-type="float" office:value="0.0029859999245673">
                <text:p>0.0029859999245673</text:p>
              </table:table-cell>
              <table:table-cell office:value-type="float" office:value="2.79999995231628">
                <text:p>2.79999995231628</text:p>
              </table:table-cell>
              <table:table-cell office:value-type="float" office:value="-20">
                <text:p>-20</text:p>
              </table:table-cell>
            </table:table-row>
            <table:table-row>
              <table:table-cell office:value-type="string">
                <text:p>1495</text:p>
              </table:table-cell>
              <table:table-cell office:value-type="float" office:value="0.00298799992451677">
                <text:p>0.00298799992451677</text:p>
              </table:table-cell>
              <table:table-cell office:value-type="float" office:value="2.59999990463257">
                <text:p>2.59999990463257</text:p>
              </table:table-cell>
              <table:table-cell office:value-type="float" office:value="-20">
                <text:p>-20</text:p>
              </table:table-cell>
            </table:table-row>
            <table:table-row>
              <table:table-cell office:value-type="string">
                <text:p>1496</text:p>
              </table:table-cell>
              <table:table-cell office:value-type="float" office:value="0.00298999992446625">
                <text:p>0.00298999992446625</text:p>
              </table:table-cell>
              <table:table-cell office:value-type="float" office:value="2.40000009536743">
                <text:p>2.40000009536743</text:p>
              </table:table-cell>
              <table:table-cell office:value-type="float" office:value="-20">
                <text:p>-20</text:p>
              </table:table-cell>
            </table:table-row>
            <table:table-row>
              <table:table-cell office:value-type="string">
                <text:p>1497</text:p>
              </table:table-cell>
              <table:table-cell office:value-type="float" office:value="0.00299199992441572">
                <text:p>0.00299199992441572</text:p>
              </table:table-cell>
              <table:table-cell office:value-type="float" office:value="2">
                <text:p>2</text:p>
              </table:table-cell>
              <table:table-cell office:value-type="float" office:value="-20">
                <text:p>-20</text:p>
              </table:table-cell>
            </table:table-row>
            <table:table-row>
              <table:table-cell office:value-type="string">
                <text:p>1498</text:p>
              </table:table-cell>
              <table:table-cell office:value-type="float" office:value="0.0029939999243652">
                <text:p>0.0029939999243652</text:p>
              </table:table-cell>
              <table:table-cell office:value-type="float" office:value="1.39999997615814">
                <text:p>1.39999997615814</text:p>
              </table:table-cell>
              <table:table-cell office:value-type="float" office:value="-20">
                <text:p>-20</text:p>
              </table:table-cell>
            </table:table-row>
            <table:table-row>
              <table:table-cell office:value-type="string">
                <text:p>1499</text:p>
              </table:table-cell>
              <table:table-cell office:value-type="float" office:value="0.00299599992431467">
                <text:p>0.00299599992431467</text:p>
              </table:table-cell>
              <table:table-cell office:value-type="float" office:value="1">
                <text:p>1</text:p>
              </table:table-cell>
              <table:table-cell office:value-type="float" office:value="-20">
                <text:p>-20</text:p>
              </table:table-cell>
            </table:table-row>
            <table:table-row>
              <table:table-cell office:value-type="string">
                <text:p>1500</text:p>
              </table:table-cell>
              <table:table-cell office:value-type="float" office:value="0.00299799992426415">
                <text:p>0.00299799992426415</text:p>
              </table:table-cell>
              <table:table-cell office:value-type="float" office:value="0.800000011920929">
                <text:p>0.800000011920929</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3.2$Windows_X86_64 LibreOffice_project/70e089b17412e4cb7773e41413306b17a2328c34</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draw:stroke-dash draw:name="msLineDash_20_1" draw:display-name="msLineDash 1" draw:style="rect" draw:dots1="1" draw:dots1-length="300%" draw:distance="100%"/>
    <draw:stroke-dash draw:name="msLineDash_20_2" draw:display-name="msLineDash 2" draw:style="rect" draw:dots1="1" draw:dots1-length="300%" draw:distance="100%"/>
  </office:styles>
</office:document-styles>
</file>